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3.604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3.268cm"/>
    </style:style>
    <style:style style:name="co11" style:family="table-column">
      <style:table-column-properties fo:break-before="auto" style:column-width="0.407cm"/>
    </style:style>
    <style:style style:name="co12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59cm"/>
    </style:style>
    <style:style style:name="co14" style:family="table-column">
      <style:table-column-properties fo:break-before="auto" style:column-width="2.2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21"/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evel_cpmc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3" office:value-type="string" calcext:value-type="string" table:number-columns-spanned="2" table:number-rows-spanned="1">
            <text:p>Technical</text:p>
          </table:table-cell>
          <table:covered-table-cell/>
          <table:table-cell/>
          <table:table-cell table:style-name="ce13" office:value-type="string" calcext:value-type="string" table:number-columns-spanned="2" table:number-rows-spanned="1">
            <text:p>Social</text:p>
          </table:table-cell>
          <table:covered-table-cell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JUCO PRE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RN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. SANTIS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GUARA-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APET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VA PO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RE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C.BARRE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ME.RANGO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NAO DI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BEIRAOPRE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 PAULI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ABE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 MORA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ARECI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GUARA-3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RBOCLO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MEN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GI CRUZ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ARAQUARA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. PAULIS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M JARD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NTA CABE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A BARBA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BR CUBATA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.DESPACHO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RDES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COS CALD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M REBERT 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O SIMAO-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.CAETANO SU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RA FU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VAIPORA F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. FLUMINEN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ILO PECANH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RMINAL R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.BORDEN SU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RRO AGUD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G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JUCO PRET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TREI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RGINHA 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GUEL REA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AXA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GRA FU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BERLANDIA 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. FLUMINEN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AGUACU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VA PO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. SANTIST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RIANOPOL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APE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RNAO DI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REN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BEIRAOPRE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IMBOND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OE.NOBREG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VES 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. MORA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URO PRETO 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ONA OES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RIANOPOLI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RARAQUARA 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M JARDI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IBAIA I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NTA BARBAR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ME.RANGON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COS CALD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BIUN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RAJA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S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ERMINAL RI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RRO AGUD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UA AZU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RAXA 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UA VERMELH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BERLANDIA 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RAQUARA CT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ENDA PEDR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VA PONTE 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O JO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VA IGUACU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RIMBOND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ARAQUARA FU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AGO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ATIB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TIBAIA 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ABE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.C.BARRET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UB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UA AZU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OLTA GRANDE-S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VA PONTE 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AJUBA 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VA IGUACU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ONA OES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RARAQUARA FU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SEN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ATIB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R.COQUEIRO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UBA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UMBIA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TAJUBA 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QUARI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ND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TUMBIAR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PARECID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TEIA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RBOCLO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V DO BRASI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V DO BRASI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.JOSE CAMP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.JOSE CAMPO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AGUARA-3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MPERJ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ERJ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CAREPAGU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ACAREPAGU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CAE MERCH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CAE MERCH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MPINA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MPINA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UARULHO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BIUN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TERLAGO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RACATU 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GI CRUZ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MPOS 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ARA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OLTA GRANDE-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IRACICAB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OPOLDINA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RACATU 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RANAIB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MPOS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IO VERDE FU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JA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URIT.LES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NTA CABEC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URITIBA NOR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BR CUBATA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AGUARIAIV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VA LIMA 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NTA GROSS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OPOLDINA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NDEIRAN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ENDA PEDRA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TE ALEGRE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ANT.DUMONT 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M REBERT 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MPO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.CAETANO SU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UARULHO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RASSOL I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TERLAGO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O JO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INOS 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VAIPORA FU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MBORCACA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TU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RANAIB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NHANGUER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IO VERDE FU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RRA PEIX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RAO COCAIS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TRO NOR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TABIRA 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.S.J.PINHAI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.COMPRID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ONTA G NOR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URIT.LEST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.MATEUS SU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URITIBA NOR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NTA MONIC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GUARIAIV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BERAB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ONTA GROSS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TARARE 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ILO PECANH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IRATINING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.BORDEN SU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IO NOVO SU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GI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RBACENA 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IRATINING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. COLOMB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NDEIRANTE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IRAPORA 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RUMB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O GOTARDO 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NTE ALEGRE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NT.DUMONT 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AVANT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MPO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VAIPORA EL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GUEL REAL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ONTA G SU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ORT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OSTO FISCA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XAVANTE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.MAU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LHA SOLTEIR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IRATININGA 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.VERDE NORT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. DOURAD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INOS 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OIANIA LES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MBORCACA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LANALT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TU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ONDONOPOL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IRINOPOLIS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URIT. CENTR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LARZINH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LABIN CELULO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RATININGA 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NDRINA ES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. DOURAD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RIGOT SOUZ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OIANIA LEST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NOINHAS ES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TAI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ENTRO-CT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NALTO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FAIETE 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INDA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TESCLAROS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.MONLEVADE 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. JUSCELI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L.SOLTEIRA 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ES MARIAS-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BEIRAOZINHO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ARZEA PALMA 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.I.CURITIB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UZIAN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STRO NORT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.SANTIAG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.S.J.PINHAI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.VITORIA NOR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RATI NORT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PA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NTA G NORT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. FORNASAR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.MATEUS SUL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IO DAS EGUA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NTA MONIC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SOLO 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NTAQUITERI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IO CLARO 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BERAB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RAPE-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ENTRO-CT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TABIRA 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TARARE II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NAUBA 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IO NOVO SUL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GUEIR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ARBACENA 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BIPOR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. COLOMBI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RING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IRAPORA 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T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O GOTARDO 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SSI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AGUACU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ETE LAGOAS 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RIMBONDO II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RAS.LEST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VAIPORA EL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ERRA MESA 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ONTA G SUL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ALTO CAXIA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OSTO FISCAL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NDRINA SU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E.MAU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ARAND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CALA III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NDRINA CO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NOE.NOBREG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ENTRO-CT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. FORNASARO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ARZEA PALMA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ES IRMAO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EGRED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SOLO 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ARREIRAS 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RMINOPOLI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OM.JES.LAPA 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RRA PEIX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RACUAI 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 CUIAB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TABIRA 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URIT. CENTRO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BARA 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LABIN CELULO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NDIRA LES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RIGOT SOUZ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PUCARA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NOINHAS ESU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UAIR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ARANAVAI NO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AFAIETE 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AXIAS NOR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ONTESCLAROS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VA STA RIT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. JUSCELINO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NTO ANGEL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RES MARIAS-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ETIM 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RZEA PALMA 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EVES 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ZIANI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APIVAR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ILVANI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UMAR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RANATING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AQUARUCU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.SANTIAGO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ANAUBA 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OCENCI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RIMBONDO 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PA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IO GRANDE 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ENTRO-CT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IO FORMOSO 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ITORI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ANXERE ESU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IO DAS EGUA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INHALZINHO 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RAPE-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R.PAULISTA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TABIRA 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. DAS ALMAS 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NAUBA 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SPASIANO 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APADA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CHADINH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NARAN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.JESUS LAP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XIP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ARREIRA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URU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GAPORA I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BR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GAPORA II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ONDONOPOLI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RAUNA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INOP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AQUARI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NDIRA LEST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TO BRANC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ONDRINA ESU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. OSOR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.INDUSTRIA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ADRE FIALH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ANDELARIA 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TE LAGOAS 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OZ CHAPEC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PIVAR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CAMBARA 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MAR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ISSO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AQUARUCU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TE CLAR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AS.LEST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.PETROQUIMI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RRA MESA 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SSO FUND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AUDI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HARLAU 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ALTO CAXIA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.NOVO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AR.PAULISTA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TABIRITO 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RZEA PALMA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LTA PAULIST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GRED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. PRIMAVER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ARREIRAS II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PLA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IO CLARO 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ENTIO OURO I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RACUAI 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OL DO SERTA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TABIRA 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.VERDE NORT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ABARA 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.DESPACHO 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UB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ELINHA 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RRISO II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AIB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PUCARAN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ILBUES I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IGUEIR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V.GARABI 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BIPOR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V.GARABI 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RING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UAIBA 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ILHEN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OVA ERA 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XIAS NORT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.MONLEVADE 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VA STA RIT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MUARAMA SU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ORTO ALEGRE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TIM 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XIAS 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LTA PAULIST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INHEDO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. PRIMAVER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ANTA ROSA 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NAUBA 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ARZED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IO GRANDE II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.IGUACU 60HZ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IO FORMOSO II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ROTAS.MACAUBA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RZ.GRANDE 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OUROLANDIA I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ORRISO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ATA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NDRINA SUL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RINDAD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RANDI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ARAO COCAI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NDRINA CO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.VALADARES 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XANXERE ESU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TABIRA 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INHALZINHO 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IBEIRAOZINH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. DAS ALMAS II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OM JESUS I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ESPASIANO 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.JOAO PIAU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RANAIT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.MOURA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CHADINHO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SCAVEL NOR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RREIRA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SCAVEL OES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GAPORA III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CHOEIRINHA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AUNA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NDIOTA 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ASNOR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NOAS 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UAIR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STERTEC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RANAVAI NO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HARQUEADA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IMENTA BUEN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LDORADO SU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.INDUSTRIA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ARIBALDI 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NDELARIA 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UAIBA 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ARROUPILH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UARIT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OZ CHAPEC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TAUB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AJEADO 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VRAMENTO 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CAMBARA 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ORTO ALEGRE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ISSOE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ORTOALEGRE 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ONTE CLAR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OVO NOV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.PETROQUIMI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ANTA MART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SSO FUND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BDON BATIST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CHARLAU 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ARRA GRAND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.NOVO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.P.PRIMAVER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.P.PRIMAVER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ARREIRO 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TABIRITO 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RDAU O.BRANC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OGI MIRIM 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GUARA-5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PLA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URO PRETO 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PELINHA 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IMENT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AIB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URITIRAM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ILBUES II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RAVATA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V.GARABI 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ABOCAS BRJ VL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V.GARABI 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INDAI I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UAIBA 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NOAS 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ABOCAS BRJ VL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AO BORJA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OVA ERA 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LA MARI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.MONLEVADE 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ECEAB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ORTO ALEGRE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RECH.ROND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XIAS 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. G. DO PAR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XIAS SUL 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IRACEM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INHEDO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MPO FORMOS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NTA ROSA 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REC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NTO ANGELO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RMINOPOLI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RZED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.MONLEVADE 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RECH.RONDO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VINHEMA 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OLV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E CUIAB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VINHEMA 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CO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OVA MUTUM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AIXO IGUACU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OM JESUS I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SCA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.JOAO PIAU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LEGRETE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I-PARAN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MAQUA 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CHOEIRINHA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PIVARI SU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NDIOTA 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XIA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NOAS 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ERRO CHAT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STERTEC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RROUPILH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ARQUEADAS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.VERMELHA 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LDORADO SUL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OVA PRATA 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ARIBALDI 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ORTOALEGRE 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UAIBA 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ORTOALEGRE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UARIT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ANTA MARIA 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TAUB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.D.FRANCISC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SSO REAL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AG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RTO ALEGRE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 LAJEAD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RTOALEGRE 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ARRO BRANC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VO NOVO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URNA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NTA MARIA 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TUTING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NTA MART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ETULIN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BDON BATIST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ILVANI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RRA GRAN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. PARAISO 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RREIRO 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AO SIMAO-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ERDAU O.BRANCO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ARANATING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ETULIN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RRA PELAD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UPI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OLINA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URITIRAM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URUP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RAVATA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ARMELEIRO 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INDAI I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ONSE. PEN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IO BRILHANT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.VALADARES 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UIN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IO BRILHAN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RECIS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LISEU MARTIN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MUARAMA SUL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EDIANEIRA 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NOAS 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XIAS SUL 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O BORJA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HARQUEADA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ILA MARI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AJEADO II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OSAN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APERA 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ECEAB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QUINT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. G. DO PAR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IDEIR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IRACEM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IDEROPOLIS 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.IGUACU 60HZ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OSAN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MPO GRANDE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VA LIMA 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OURADOS 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QUEIMADA NOVA 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MBIRUSSU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TAGUACU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ARDANELO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.DA MES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.D.RIO VER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MPERATRI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ICO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IMORES-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SCAVEL OES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AMPO GRANDE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RIQUEME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OURADOS 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GE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MBIRUSSU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AQUA 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ANARAN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PIVARI SU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JAURU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XIA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BR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RUZ ALTA 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INO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.VERMELHA 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TEGRADOR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VRAMENTO 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TACAIUNA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OVA PRATA 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HAPADA II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ORTOALEGRE 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.IGUACUNORT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ORTOALEGRE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OZ DO CHOPI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.D.FRANCISC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AMPO BO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AGE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JARDIM BOTANIC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E LAJEADO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.PETROPOLIS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RRO BRANCO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RE.MEDICI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TUTING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.VICENTE SU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URU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.URUGUAIAN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ENTIO OURO I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RUGUAIANA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ERRA PELAD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IGUACU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LINA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ORQUILHINH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URUP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IDEROPOL.ESU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RMELEIRO 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ANOPOLIS II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LISEU MARTIN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JUIZ DE FORA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.AIRE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ADRE FIALH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ARQUEADA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UA VERMELH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AJEADO II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URU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APERA 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JUPI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UINT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OCOES III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IDEIR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ILAGRES II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IDEROPOLIS 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AUDI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UEIMADA NOVA 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XINGU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OM.JES.LAPA I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URRAL PIAUI II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OTAS.MACAUBA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IB.GONCALV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UROLANDIA I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EIXE 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.DA MES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AUA II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MPERATRIZ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ALEZA SU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URADO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IVRAMENTO 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NTEGRADOR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IAMAO 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TACAIUNA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AXIAS SUL 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APADA I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ANTO ANGELO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IXO IGUACU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ARGINHA 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SCAVEL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 V PALMAR 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SCAVEL NOR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EDEIROS NETOI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ARU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OCOES I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RATO I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LEGRETE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ASCARENHA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MPO BOM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AR.COQUEIRO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ERRO CHATO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ARAJA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JUI 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ALSA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ARDIM BOTANICO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.DUTR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.PETROPOLIS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OURADO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E.MEDIC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JUB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IGUACU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ORRISO I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ORQUILHINH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LTAMIR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IDEROPOL.ESU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JURUPAR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BREUV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UCURU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IANOPOLIS I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HAPADA 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UIZ DE FORA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HAPADA II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ILAGRES I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CU II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XINGU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ILHEN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URRAL PIAUI I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AG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IB.GONCALVE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AMAQU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IXE 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JUI 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IDROLANDIA 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JBO LT PA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RAISO 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.GRAND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EDIANEIRA N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ACAMBAR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VRAMENTO 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ELOTAS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IAMAO 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STING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XIAS SUL 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ANTA CRUZ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EST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AQUAR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GASPAR 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 V PALMAR 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TAJAI 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.JESUS LAP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J.LACERDA-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MPO FORMOS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ABREUV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GAPORA I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RARAQUARA CTP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REC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BICOAR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RAJA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ORRO CHAPEU I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ALSA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AMAMBAI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.DUTR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ANTA LUZIA I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NASTACI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IQUELANDI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LTAMIR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ORTO FRANC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URUPAR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IDROLANDIA 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UCURU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RAISO 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HAPADA 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VARZ.GRANDE 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HAPADA II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NCA PUM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.IGUACUNORT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XINGUARA 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OZ DO CHOPIM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RRES 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JBO LT GRA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ORTO VELH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ESTERR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MAQU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ATON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BO LT PA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UBARAO SU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.GRAND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LMA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LOTAS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VITORI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STING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EST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.VICENTE SUL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ALT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ANTA CRUZ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RANAIT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AQUAR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ARANJA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.URUGUAIAN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RUMADO II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RUGUAIANA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TAGIB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ASPAR 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APEACU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TAJAI 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JAGUARUANA II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.LACERDA-B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RAS. SU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DGARD SOUZ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INHAR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MBU-GUACU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ARRO ALT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ACELL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IRINEU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ERDAU SP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NASTACI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ORRO CHAPEU I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RASNOR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OL DO SERTA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OXIP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ARITUB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ANTA LUZIA I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RIXIMIN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IQUELANDI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ANT. ARAGUAI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ORTO FRANC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. ESPERANC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NCA PUM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ARAUBAS II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XINGUARA 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IMPLIC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EALEZA SUL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IMENTA BUEN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RRES 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TLANTIDA 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BO LT GRA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RUZ ALTA 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ESTERR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GRAVATAI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ATONE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SORIO 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UBARAO SUL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LUMENAU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LMA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DAIA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ARANJAL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.LACERDA-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APEAC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DGARD SOUZ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GUARUANA II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MBU-GUACU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AS. SUL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RARA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ARRO ALTO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RACEL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IRINEU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ERDAU S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RITUB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OGI MIRIM 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RIXIMIN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RACICAB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ANT. ARAGUAI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QUIXAD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.GRANDE III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OAO NEIVA 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. ESPERANC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ARAB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CU II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ONTE VERD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RAUBAS II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OINVILLE SU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OSSORO II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EIX FREITAS II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IMPLIC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VERON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BUN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QUIRINOPOLIS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.PORTO VELHO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LMEIRA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TLANTIDA 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ERITOR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RAVATAI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RANSAMAZONI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CAMBAR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. CAMARA III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SORIO 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LHOCA <text:s/>ESU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LUMENA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TAJAI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NDAIAL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IRASSOL II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.LACERDA-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.ANTON LOP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BA2 CIA.B.ALU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ACAP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OCOES III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AMACARI I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UIXAD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UNAPOLI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RAB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UNI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ONTE VER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RAS. GERA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OINVILLE SUL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DEI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ALMEIRA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TAPACI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ITORO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CAILANDI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ORUMBA 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AXIAS II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RANSAMAZONI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ESQUIT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. CAMARA III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OVA MUTU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ALHOCA <text:s/>ES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ASTANHA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TAJAI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URUTI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UROPOLI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IRITUB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APAJOS II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ANDIR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VILA DO COND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.ANTON LOPE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ERESIN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IO BRANCO 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B.ESPERANC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CAP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REI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EARA MIRIM 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UNIL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OAO CAMARA 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EDEIROS NETOI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I-PARAN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OCOES I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IBRAPLA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TO.A.JESU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RAVATAI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UIXER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ASSO REA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AS. GERAL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ORTOALEGRE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DEI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ARAGUA DO SU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TAPAC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RUMB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CAILANDI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BA2 CIA.B.ALU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XIAS I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LHA SOLTEIR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STANHAL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ILV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URUT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LINDIN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UROPOLI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ACATUB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APAJOS I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ANDAIRA II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ILA DO COND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USSAS II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OAO PESSOA I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SSORO I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IACHAO I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UAS LINDA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ARANHUNS I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AO MATEUS 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ERESIN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RUMBA 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B.ESPERANC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UIN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REI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ARECI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EARA MIRIM 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TING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TREMOZ I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IO DO SU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OAO CAMARA 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LA III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ARAISO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OYOT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IBRAPLA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IRITUB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RAVATAI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IANA 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ORTOALEGRE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ANDIR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ARAGUA DO SUL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OLVA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ERQUILHO II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ECHUG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ILV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LAGOINHAS I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BICOAR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AMACARI I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LINDIN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TAPEBI 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CATUB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ITUACU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. PARAISO 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.A.JESU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ANDAIRA I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ANABUIU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UCUM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ORTALEZA I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USSAS I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AGUARI-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OSSORO IV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PATINGA 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GUAS LINDA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L.SOLTEIRA 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TING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ARDANELO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IO DO SUL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.D.RIO VERD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EIJO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UAM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CHUG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IRAMA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LAGOINHAS I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OME ACU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UMADO I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.GRANDE II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MACARI I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URITIB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TU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UARAPUAVA O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TAGIB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RIQUEM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TAPEBI S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AJEADO 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ITUACU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ORTOALEGRE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ORTALEZA I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JOINVILL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.VALADARES 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JARDI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UAM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ERQUILHO II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RAMA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IAN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OME ACU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AGUACU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USSURE I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JEREMOAB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GELI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ECEM I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COVERDE I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TA LUZIA II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U FERRO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ORTO SERGIPE 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URITIB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ACAPA II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UARAPUAVA OES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IRAJ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. OSORIO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OL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GOA NOVA I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M ELISEU I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TAL II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IMOTEO 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ORTOALEGRE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ORTO ESTREL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OINVILL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ORRIS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ARDI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NTA MARI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OTUCATU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ARINTIN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EREMOABO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JOINV.NORT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CEM I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OURO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OAO NEIVA 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.AIR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TA LUZIA II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OSORIO 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S. L.GONZAG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ES IRMAO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ORTO SERGIPE 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RISTIANO ROCH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CAPA II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JORG.TEIXEIR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ACARACANG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OTEGIP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IRAJ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. SANTANA II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OLO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OR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EIX FREITAS I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.MANGABEIR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OM ELISEU I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TABUNA II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ANTA MARI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LEX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RINTIN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QUIRAZ I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.VITORIA NORT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AUIP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OINV.NORT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ELM. GOUVEI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URO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ORTALEZ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SORIO 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IRANDA I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RUZEIRO SUL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PERAM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ANTANA I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UIL AMORIM-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RISTIANO ROCH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JOAO PESSOA I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ORG.TEIXEIR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IACHAO I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TEGIP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ARANHUNS I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UNAPOLIS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RATI NORT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. SANTANA II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EXTREMOZ I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OSSORO I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.MANGABEIR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JARU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TABUNA II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AMUE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UIP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SA.SRA.SOCORR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ELM. GOUVEI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OTUCATU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USINA XING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LAGRES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CARAU II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RANDA I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OBRAL II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ESQUIT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EQUADO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.GRANDE I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ANAU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ETES I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ARANDIB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AGOA DO CARRO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ARACANAU I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TA NORT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ICI I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RUEIRA I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NOCENCI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.MOURAO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UMBAR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TO BRANCO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OMB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URR NOVOS I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CARAU I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TABAIANINH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QUIXER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SA.SRA.SOCORRO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OBRAL I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VARE NOV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HAPADINHA I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HAVANTES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ENCRUZO NOV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SINA XINGO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AO LUIS I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UAZEIRO II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HAPADA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ARAU II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USSURE I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OBRAL II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NGELI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QUADO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RCOVERDE I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AU FERR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TATU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AMPO ASSOBI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ARANDIB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RALHA AZU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RACANAU I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EROXIDO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ICI I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ATAL II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SE. PEN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TO VELH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.VALADARES 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VARE NOV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ANTA RITA I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HAVANT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MBAR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US. L.GONZAG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ATAL I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ARNAIBA II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APAO BONITO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OA VIST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ANA 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ENED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ESSIAS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R.FIGUEIRED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UAZEIRO II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AUA II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MBA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ATATU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BAIARA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JACARACANG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ARAU II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IANGUA I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NABUIU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APAO BONIT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RATO II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NTANA I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CO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E BALBIN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AURITI II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. AFONSO IV_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OBRAL II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BIAPINA I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HAPADINHA II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ILAGR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NCRUZO NOVO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.GRANDE I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AO LUIS II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AETES I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IMORES-S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LAGOA DO CARR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AGUARI-S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ATA NORT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PATINGA 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IRUEIRA I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ACAIMBO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IBEIRA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MPO ASSOBIO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ERESINA I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RALHA AZUL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.COMPRID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EROXIDOS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BUN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ANA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.PORTO VELH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UTURA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JUAZEIRO II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RNAIBA III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ACABEIR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OA VISTA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OELHO NET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ENEDO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O LUIS 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R.FIGUEIREDO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O LUIS II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AUA III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NTA RITA I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ANGUA II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LTO GRANDE SP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REMAS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ATAL I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MOTEO 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IRAJU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ORTO ESTRELA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O LUIS I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TEMINAS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IO BRANCO I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ALTO GRANDE SP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JUAZEIRO II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IRAJU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.AFONSO III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E BALBIN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C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AGUARARI-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ACAIMB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.SOBRADINHO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RANGATU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.I.CURITIB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QUIRAZ II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ANTAQUITERI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BIAPINA II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ARAIS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SCARENHA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RUMIRIM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PERA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UTUR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UIL AMORIM-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NGELIM II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APE II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UCUM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ERESINA II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OREMA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URUMIRI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OTEMINA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CABEIR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ILARZINH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IO LARGO II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EIJ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CEIO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ICERO DANTA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CEIO II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AGUARARI-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R.BONFIM II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U.SOBRADINH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AUA II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OM NOM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ELHO NETO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UAPE II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AO LUIS I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IRIPIRI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AO LUIS III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CU II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AO LUIS IV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AGOA NOVA II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RAPIRACA III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ITABAIA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INHARES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R.BONFIM II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IRAPAMA II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ZEBU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ECIFE II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RUZEIRO SU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ARANGATU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ESSIA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NGELIM II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ATU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ERONA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BAIAR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APE III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AURITI II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. AFONSO IV_S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LORESTA II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OIANINH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IRAPAMA II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JABOATAO I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CIFE II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IBEIRAO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URR NOVOS II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IRIPIR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ACARATU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AO MATEUS 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UAPE III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JOAIRA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RESINA III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IRUEIR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OIANINH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.AFONSO III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JABOATAO II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ONGI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TABAIANINH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ORFIL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IO LARGO II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ERESINA III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CEI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ICERO DANTA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CEIO II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OM NOM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JOAIRA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ITABAIANA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IRUEIR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EBU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RAPIRACA III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LORESTA II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ONGI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ACARATU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ORFIL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edges_cpmci_technical" table:style-name="ta1">
        <table:table-column table:style-name="co5" table:number-columns-repeated="2" table:default-cell-style-name="Default"/>
        <table:table-column table:style-name="co6" table:default-cell-style-name="ce14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style-name="Default"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TIJUCO PRETO</text:p>
          </table:table-cell>
          <table:table-cell office:value-type="string" calcext:value-type="string">
            <text:p>ITABERA</text:p>
          </table:table-cell>
          <table:table-cell office:value-type="float" office:value="2.42830220156315" calcext:value-type="float">
            <text:p>2,428302</text:p>
          </table:table-cell>
        </table:table-row>
        <table:table-row table:style-name="ro1">
          <table:table-cell office:value-type="string" calcext:value-type="string">
            <text:p>ITABERA</text:p>
          </table:table-cell>
          <table:table-cell office:value-type="string" calcext:value-type="string">
            <text:p>IVAIPORA FUR</text:p>
          </table:table-cell>
          <table:table-cell office:value-type="float" office:value="2.39316669549539" calcext:value-type="float">
            <text:p>2,393167</text:p>
          </table:table-cell>
        </table:table-row>
        <table:table-row table:style-name="ro1">
          <table:table-cell office:value-type="string" calcext:value-type="string">
            <text:p>RIO DAS EGUAS</text:p>
          </table:table-cell>
          <table:table-cell office:value-type="string" calcext:value-type="string">
            <text:p>LUZIANIA</text:p>
          </table:table-cell>
          <table:table-cell office:value-type="float" office:value="2.08888531428723" calcext:value-type="float">
            <text:p>2,088885</text:p>
          </table:table-cell>
        </table:table-row>
        <table:table-row table:style-name="ro1">
          <table:table-cell office:value-type="string" calcext:value-type="string">
            <text:p>NOVA IGUACU</text:p>
          </table:table-cell>
          <table:table-cell office:value-type="string" calcext:value-type="string">
            <text:p>TERMINAL RIO</text:p>
          </table:table-cell>
          <table:table-cell office:value-type="float" office:value="2.03585952672134" calcext:value-type="float">
            <text:p>2,035860</text:p>
          </table:table-cell>
        </table:table-row>
        <table:table-row table:style-name="ro1">
          <table:table-cell office:value-type="string" calcext:value-type="string">
            <text:p>BARREIRAS II</text:p>
          </table:table-cell>
          <table:table-cell office:value-type="string" calcext:value-type="string">
            <text:p>RIO DAS EGUAS</text:p>
          </table:table-cell>
          <table:table-cell office:value-type="float" office:value="2.02832875354292" calcext:value-type="float">
            <text:p>2,028329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FERNAO DIAS</text:p>
          </table:table-cell>
          <table:table-cell office:value-type="float" office:value="1.98501476173632" calcext:value-type="float">
            <text:p>1,985015</text:p>
          </table:table-cell>
        </table:table-row>
        <table:table-row table:style-name="ro1">
          <table:table-cell office:value-type="string" calcext:value-type="string">
            <text:p>CASCAVEL OEST</text:p>
          </table:table-cell>
          <table:table-cell office:value-type="string" calcext:value-type="string">
            <text:p>F.IGUACU 60HZ</text:p>
          </table:table-cell>
          <table:table-cell office:value-type="float" office:value="1.9841986254596" calcext:value-type="float">
            <text:p>1,984199</text:p>
          </table:table-cell>
        </table:table-row>
        <table:table-row table:style-name="ro1">
          <table:table-cell office:value-type="string" calcext:value-type="string">
            <text:p>S.JOAO PIAUI</text:p>
          </table:table-cell>
          <table:table-cell office:value-type="string" calcext:value-type="string">
            <text:p>GILBUES II</text:p>
          </table:table-cell>
          <table:table-cell office:value-type="float" office:value="1.97867120242677" calcext:value-type="float">
            <text:p>1,978671</text:p>
          </table:table-cell>
        </table:table-row>
        <table:table-row table:style-name="ro1">
          <table:table-cell office:value-type="string" calcext:value-type="string">
            <text:p>ACAILANDIA</text:p>
          </table:table-cell>
          <table:table-cell office:value-type="string" calcext:value-type="string">
            <text:p>STA LUZIA III</text:p>
          </table:table-cell>
          <table:table-cell office:value-type="float" office:value="1.9613296098083" calcext:value-type="float">
            <text:p>1,961330</text:p>
          </table:table-cell>
        </table:table-row>
        <table:table-row table:style-name="ro1">
          <table:table-cell office:value-type="string" calcext:value-type="string">
            <text:p>SERRA PELADA</text:p>
          </table:table-cell>
          <table:table-cell office:value-type="string" calcext:value-type="string">
            <text:p>XINGU</text:p>
          </table:table-cell>
          <table:table-cell office:value-type="float" office:value="1.95913999554038" calcext:value-type="float">
            <text:p>1,959140</text:p>
          </table:table-cell>
        </table:table-row>
        <table:table-row table:style-name="ro1">
          <table:table-cell office:value-type="string" calcext:value-type="string">
            <text:p>MIRANDA II</text:p>
          </table:table-cell>
          <table:table-cell office:value-type="string" calcext:value-type="string">
            <text:p>STA LUZIA III</text:p>
          </table:table-cell>
          <table:table-cell office:value-type="float" office:value="1.93396721372565" calcext:value-type="float">
            <text:p>1,933967</text:p>
          </table:table-cell>
        </table:table-row>
        <table:table-row table:style-name="ro1">
          <table:table-cell office:value-type="string" calcext:value-type="string">
            <text:p>FERNAO DIAS</text:p>
          </table:table-cell>
          <table:table-cell office:value-type="string" calcext:value-type="string">
            <text:p>TERMINAL RIO</text:p>
          </table:table-cell>
          <table:table-cell office:value-type="float" office:value="1.84134075852179" calcext:value-type="float">
            <text:p>1,841341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string" calcext:value-type="string">
            <text:p>TERMINAL RIO</text:p>
          </table:table-cell>
          <table:table-cell office:value-type="float" office:value="1.84098796491851" calcext:value-type="float">
            <text:p>1,840988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C. PAULISTA</text:p>
          </table:table-cell>
          <table:table-cell office:value-type="float" office:value="1.83780661830519" calcext:value-type="float">
            <text:p>1,837807</text:p>
          </table:table-cell>
        </table:table-row>
        <table:table-row table:style-name="ro1">
          <table:table-cell office:value-type="string" calcext:value-type="string">
            <text:p>TUCURUI</text:p>
          </table:table-cell>
          <table:table-cell office:value-type="string" calcext:value-type="string">
            <text:p>XINGU</text:p>
          </table:table-cell>
          <table:table-cell office:value-type="float" office:value="1.80816089638534" calcext:value-type="float">
            <text:p>1,808161</text:p>
          </table:table-cell>
        </table:table-row>
        <table:table-row table:style-name="ro1">
          <table:table-cell office:value-type="string" calcext:value-type="string">
            <text:p>GUAIRA</text:p>
          </table:table-cell>
          <table:table-cell office:value-type="string" calcext:value-type="string">
            <text:p>F.IGUACU 60HZ</text:p>
          </table:table-cell>
          <table:table-cell office:value-type="float" office:value="1.80735019866048" calcext:value-type="float">
            <text:p>1,807350</text:p>
          </table:table-cell>
        </table:table-row>
        <table:table-row table:style-name="ro1">
          <table:table-cell office:value-type="string" calcext:value-type="string">
            <text:p>JURUPARI</text:p>
          </table:table-cell>
          <table:table-cell office:value-type="string" calcext:value-type="string">
            <text:p>XINGU</text:p>
          </table:table-cell>
          <table:table-cell office:value-type="float" office:value="1.80127988928231" calcext:value-type="float">
            <text:p>1,801280</text:p>
          </table:table-cell>
        </table:table-row>
        <table:table-row table:style-name="ro1">
          <table:table-cell office:value-type="string" calcext:value-type="string">
            <text:p>P. JUSCELINO</text:p>
          </table:table-cell>
          <table:table-cell office:value-type="string" calcext:value-type="string">
            <text:p>PIRAPORA 2</text:p>
          </table:table-cell>
          <table:table-cell office:value-type="float" office:value="1.76689705996521" calcext:value-type="float">
            <text:p>1,766897</text:p>
          </table:table-cell>
        </table:table-row>
        <table:table-row table:style-name="ro1">
          <table:table-cell office:value-type="string" calcext:value-type="string">
            <text:p>PIRAPORA 2</text:p>
          </table:table-cell>
          <table:table-cell office:value-type="string" calcext:value-type="string">
            <text:p>LUZIANIA</text:p>
          </table:table-cell>
          <table:table-cell office:value-type="float" office:value="1.76056516434866" calcext:value-type="float">
            <text:p>1,760565</text:p>
          </table:table-cell>
        </table:table-row>
        <table:table-row table:style-name="ro1">
          <table:table-cell office:value-type="string" calcext:value-type="string">
            <text:p>ITABIRA 5</text:p>
          </table:table-cell>
          <table:table-cell office:value-type="string" calcext:value-type="string">
            <text:p>P. JUSCELINO</text:p>
          </table:table-cell>
          <table:table-cell office:value-type="float" office:value="1.75897909936002" calcext:value-type="float">
            <text:p>1,758979</text:p>
          </table:table-cell>
        </table:table-row>
        <table:table-row table:style-name="ro1">
          <table:table-cell office:value-type="string" calcext:value-type="string">
            <text:p>ARARAQUARA 2</text:p>
          </table:table-cell>
          <table:table-cell office:value-type="string" calcext:value-type="string">
            <text:p>FERNAO DIAS</text:p>
          </table:table-cell>
          <table:table-cell office:value-type="float" office:value="1.71803352649392" calcext:value-type="float">
            <text:p>1,718034</text:p>
          </table:table-cell>
        </table:table-row>
        <table:table-row table:style-name="ro1">
          <table:table-cell office:value-type="string" calcext:value-type="string">
            <text:p>ARARAQUARA 2</text:p>
          </table:table-cell>
          <table:table-cell office:value-type="string" calcext:value-type="string">
            <text:p>ITATIBA</text:p>
          </table:table-cell>
          <table:table-cell office:value-type="float" office:value="1.70458704417875" calcext:value-type="float">
            <text:p>1,704587</text:p>
          </table:table-cell>
        </table:table-row>
        <table:table-row table:style-name="ro1">
          <table:table-cell office:value-type="string" calcext:value-type="string">
            <text:p>POVO NOVO</text:p>
          </table:table-cell>
          <table:table-cell office:value-type="string" calcext:value-type="string">
            <text:p>GUAIBA 3</text:p>
          </table:table-cell>
          <table:table-cell office:value-type="float" office:value="1.70348235916258" calcext:value-type="float">
            <text:p>1,703482</text:p>
          </table:table-cell>
        </table:table-row>
        <table:table-row table:style-name="ro1">
          <table:table-cell office:value-type="string" calcext:value-type="string">
            <text:p>MORRO CHAPEU II</text:p>
          </table:table-cell>
          <table:table-cell office:value-type="string" calcext:value-type="string">
            <text:p>POCOES III</text:p>
          </table:table-cell>
          <table:table-cell office:value-type="float" office:value="1.70151595163274" calcext:value-type="float">
            <text:p>1,701516</text:p>
          </table:table-cell>
        </table:table-row>
        <table:table-row table:style-name="ro1">
          <table:table-cell office:value-type="string" calcext:value-type="string">
            <text:p>CANDIOTA 2</text:p>
          </table:table-cell>
          <table:table-cell office:value-type="string" calcext:value-type="string">
            <text:p>GUAIBA 3</text:p>
          </table:table-cell>
          <table:table-cell office:value-type="float" office:value="1.69185623281381" calcext:value-type="float">
            <text:p>1,691856</text:p>
          </table:table-cell>
        </table:table-row>
        <table:table-row table:style-name="ro1">
          <table:table-cell office:value-type="string" calcext:value-type="string">
            <text:p>BOM.JES.LAPA II</text:p>
          </table:table-cell>
          <table:table-cell office:value-type="string" calcext:value-type="string">
            <text:p>GENTIO OURO II</text:p>
          </table:table-cell>
          <table:table-cell office:value-type="float" office:value="1.6756982275923" calcext:value-type="float">
            <text:p>1,675698</text:p>
          </table:table-cell>
        </table:table-row>
        <table:table-row table:style-name="ro1">
          <table:table-cell office:value-type="string" calcext:value-type="string">
            <text:p>POVO NOVO</text:p>
          </table:table-cell>
          <table:table-cell office:value-type="string" calcext:value-type="string">
            <text:p>MARMELEIRO 2</text:p>
          </table:table-cell>
          <table:table-cell office:value-type="float" office:value="1.67324378844416" calcext:value-type="float">
            <text:p>1,673244</text:p>
          </table:table-cell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TIJUCO PRETO</text:p>
          </table:table-cell>
          <table:table-cell office:value-type="float" office:value="1.672251802763" calcext:value-type="float">
            <text:p>1,672252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MILAGRES II</text:p>
          </table:table-cell>
          <table:table-cell office:value-type="float" office:value="1.66284758320196" calcext:value-type="float">
            <text:p>1,662848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string" calcext:value-type="string">
            <text:p>ITATIBA</text:p>
          </table:table-cell>
          <table:table-cell office:value-type="float" office:value="1.66141996763698" calcext:value-type="float">
            <text:p>1,661420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MARIMBONDO II</text:p>
          </table:table-cell>
          <table:table-cell office:value-type="float" office:value="1.65544862478274" calcext:value-type="float">
            <text:p>1,655449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string" calcext:value-type="string">
            <text:p>CURIT.LESTE</text:p>
          </table:table-cell>
          <table:table-cell office:value-type="float" office:value="1.64693488564932" calcext:value-type="float">
            <text:p>1,646935</text:p>
          </table:table-cell>
        </table:table-row>
        <table:table-row table:style-name="ro1">
          <table:table-cell office:value-type="string" calcext:value-type="string">
            <text:p>MARMELEIRO 2</text:p>
          </table:table-cell>
          <table:table-cell office:value-type="string" calcext:value-type="string">
            <text:p>S V PALMAR 2</text:p>
          </table:table-cell>
          <table:table-cell office:value-type="float" office:value="1.63624513159642" calcext:value-type="float">
            <text:p>1,636245</text:p>
          </table:table-cell>
        </table:table-row>
        <table:table-row table:style-name="ro1">
          <table:table-cell office:value-type="string" calcext:value-type="string">
            <text:p>ARARAQUARA 2</text:p>
          </table:table-cell>
          <table:table-cell office:value-type="string" calcext:value-type="string">
            <text:p>NOVA PONTE 3</text:p>
          </table:table-cell>
          <table:table-cell office:value-type="float" office:value="1.63167595000855" calcext:value-type="float">
            <text:p>1,631676</text:p>
          </table:table-cell>
        </table:table-row>
        <table:table-row table:style-name="ro1">
          <table:table-cell office:value-type="string" calcext:value-type="string">
            <text:p>NOVA STA RITA</text:p>
          </table:table-cell>
          <table:table-cell office:value-type="string" calcext:value-type="string">
            <text:p>GUAIBA 3</text:p>
          </table:table-cell>
          <table:table-cell office:value-type="float" office:value="1.6308657929903" calcext:value-type="float">
            <text:p>1,630866</text:p>
          </table:table-cell>
        </table:table-row>
        <table:table-row table:style-name="ro1">
          <table:table-cell office:value-type="string" calcext:value-type="string">
            <text:p>GILBUES II</text:p>
          </table:table-cell>
          <table:table-cell office:value-type="string" calcext:value-type="string">
            <text:p>MIRACEMA</text:p>
          </table:table-cell>
          <table:table-cell office:value-type="float" office:value="1.62578957941014" calcext:value-type="float">
            <text:p>1,625790</text:p>
          </table:table-cell>
        </table:table-row>
        <table:table-row table:style-name="ro1">
          <table:table-cell office:value-type="string" calcext:value-type="string">
            <text:p>SERRA PELADA</text:p>
          </table:table-cell>
          <table:table-cell office:value-type="string" calcext:value-type="string">
            <text:p>MIRACEMA</text:p>
          </table:table-cell>
          <table:table-cell office:value-type="float" office:value="1.62479198801555" calcext:value-type="float">
            <text:p>1,624792</text:p>
          </table:table-cell>
        </table:table-row>
        <table:table-row table:style-name="ro1">
          <table:table-cell office:value-type="string" calcext:value-type="string">
            <text:p>MARITUBA</text:p>
          </table:table-cell>
          <table:table-cell office:value-type="string" calcext:value-type="string">
            <text:p>VILA DO CONDE</text:p>
          </table:table-cell>
          <table:table-cell office:value-type="float" office:value="1.61986732284185" calcext:value-type="float">
            <text:p>1,619867</text:p>
          </table:table-cell>
        </table:table-row>
        <table:table-row table:style-name="ro1">
          <table:table-cell office:value-type="string" calcext:value-type="string">
            <text:p>ABDON BATISTA</text:p>
          </table:table-cell>
          <table:table-cell office:value-type="string" calcext:value-type="string">
            <text:p>SIDEROPOLIS 2</text:p>
          </table:table-cell>
          <table:table-cell office:value-type="float" office:value="1.60349858550115" calcext:value-type="float">
            <text:p>1,603499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NOVA PONTE</text:p>
          </table:table-cell>
          <table:table-cell office:value-type="float" office:value="1.6033037542632" calcext:value-type="float">
            <text:p>1,603304</text:p>
          </table:table-cell>
        </table:table-row>
        <table:table-row table:style-name="ro1">
          <table:table-cell office:value-type="string" calcext:value-type="string">
            <text:p>BARREIRAS II</text:p>
          </table:table-cell>
          <table:table-cell office:value-type="string" calcext:value-type="string">
            <text:p>GILBUES II</text:p>
          </table:table-cell>
          <table:table-cell office:value-type="float" office:value="1.57872599436912" calcext:value-type="float">
            <text:p>1,578726</text:p>
          </table:table-cell>
        </table:table-row>
        <table:table-row table:style-name="ro1">
          <table:table-cell office:value-type="string" calcext:value-type="string">
            <text:p>PONTA GROSSA</text:p>
          </table:table-cell>
          <table:table-cell office:value-type="string" calcext:value-type="string">
            <text:p>IVAIPORA ELS</text:p>
          </table:table-cell>
          <table:table-cell office:value-type="float" office:value="1.57631898241064" calcext:value-type="float">
            <text:p>1,576319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string" calcext:value-type="string">
            <text:p>PONTA GROSSA</text:p>
          </table:table-cell>
          <table:table-cell office:value-type="float" office:value="1.5712168480791" calcext:value-type="float">
            <text:p>1,571217</text:p>
          </table:table-cell>
        </table:table-row>
        <table:table-row table:style-name="ro1">
          <table:table-cell office:value-type="string" calcext:value-type="string">
            <text:p>BIGUACU</text:p>
          </table:table-cell>
          <table:table-cell office:value-type="string" calcext:value-type="string">
            <text:p>SIDEROPOLIS 2</text:p>
          </table:table-cell>
          <table:table-cell office:value-type="float" office:value="1.57028817861402" calcext:value-type="float">
            <text:p>1,570288</text:p>
          </table:table-cell>
        </table:table-row>
        <table:table-row table:style-name="ro1">
          <table:table-cell office:value-type="string" calcext:value-type="string">
            <text:p>GUAIRA</text:p>
          </table:table-cell>
          <table:table-cell office:value-type="string" calcext:value-type="string">
            <text:p>SARANDI</text:p>
          </table:table-cell>
          <table:table-cell office:value-type="float" office:value="1.56748178875872" calcext:value-type="float">
            <text:p>1,567482</text:p>
          </table:table-cell>
        </table:table-row>
        <table:table-row table:style-name="ro1">
          <table:table-cell office:value-type="string" calcext:value-type="string">
            <text:p>BURITIRAMA</text:p>
          </table:table-cell>
          <table:table-cell office:value-type="string" calcext:value-type="string">
            <text:p>GILBUES II</text:p>
          </table:table-cell>
          <table:table-cell office:value-type="float" office:value="1.55870076812754" calcext:value-type="float">
            <text:p>1,558701</text:p>
          </table:table-cell>
        </table:table-row>
        <table:table-row table:style-name="ro1">
          <table:table-cell office:value-type="string" calcext:value-type="string">
            <text:p>ARARAQUARA 2</text:p>
          </table:table-cell>
          <table:table-cell office:value-type="string" calcext:value-type="string">
            <text:p>TAUBATE</text:p>
          </table:table-cell>
          <table:table-cell office:value-type="float" office:value="1.55484604496447" calcext:value-type="float">
            <text:p>1,554846</text:p>
          </table:table-cell>
        </table:table-row>
        <table:table-row table:style-name="ro1">
          <table:table-cell office:value-type="string" calcext:value-type="string">
            <text:p>BURITIRAMA</text:p>
          </table:table-cell>
          <table:table-cell office:value-type="string" calcext:value-type="string">
            <text:p>GENTIO OURO II</text:p>
          </table:table-cell>
          <table:table-cell office:value-type="float" office:value="1.5528674124639" calcext:value-type="float">
            <text:p>1,552867</text:p>
          </table:table-cell>
        </table:table-row>
        <table:table-row table:style-name="ro1">
          <table:table-cell office:value-type="string" calcext:value-type="string">
            <text:p>OUROLANDIA II</text:p>
          </table:table-cell>
          <table:table-cell office:value-type="string" calcext:value-type="string">
            <text:p>GENTIO OURO II</text:p>
          </table:table-cell>
          <table:table-cell office:value-type="float" office:value="1.54574030739844" calcext:value-type="float">
            <text:p>1,545740</text:p>
          </table:table-cell>
        </table:table-row>
        <table:table-row table:style-name="ro1">
          <table:table-cell office:value-type="string" calcext:value-type="string">
            <text:p>AREIA</text:p>
          </table:table-cell>
          <table:table-cell office:value-type="string" calcext:value-type="string">
            <text:p>JOINVILLE SUL</text:p>
          </table:table-cell>
          <table:table-cell office:value-type="float" office:value="1.54337097824043" calcext:value-type="float">
            <text:p>1,543371</text:p>
          </table:table-cell>
        </table:table-row>
        <table:table-row table:style-name="ro1">
          <table:table-cell office:value-type="string" calcext:value-type="string">
            <text:p>JANAUBA 3</text:p>
          </table:table-cell>
          <table:table-cell office:value-type="string" calcext:value-type="string">
            <text:p>S. DAS ALMAS II</text:p>
          </table:table-cell>
          <table:table-cell office:value-type="float" office:value="1.54025220454095" calcext:value-type="float">
            <text:p>1,540252</text:p>
          </table:table-cell>
        </table:table-row>
        <table:table-row table:style-name="ro1">
          <table:table-cell office:value-type="string" calcext:value-type="string">
            <text:p>JANAUBA 3</text:p>
          </table:table-cell>
          <table:table-cell office:value-type="string" calcext:value-type="string">
            <text:p>P. JUSCELINO</text:p>
          </table:table-cell>
          <table:table-cell office:value-type="float" office:value="1.53806851788986" calcext:value-type="float">
            <text:p>1,538069</text:p>
          </table:table-cell>
        </table:table-row>
        <table:table-row table:style-name="ro1">
          <table:table-cell office:value-type="string" calcext:value-type="string">
            <text:p>JURUPARI</text:p>
          </table:table-cell>
          <table:table-cell office:value-type="string" calcext:value-type="string">
            <text:p>ORIXIMINA</text:p>
          </table:table-cell>
          <table:table-cell office:value-type="float" office:value="1.53743230761904" calcext:value-type="float">
            <text:p>1,537432</text:p>
          </table:table-cell>
        </table:table-row>
        <table:table-row table:style-name="ro1">
          <table:table-cell office:value-type="string" calcext:value-type="string">
            <text:p>MUTUM</text:p>
          </table:table-cell>
          <table:table-cell office:value-type="string" calcext:value-type="string">
            <text:p>CAMPOS 2</text:p>
          </table:table-cell>
          <table:table-cell office:value-type="float" office:value="1.53434040729281" calcext:value-type="float">
            <text:p>1,534340</text:p>
          </table:table-cell>
        </table:table-row>
        <table:table-row table:style-name="ro1">
          <table:table-cell office:value-type="string" calcext:value-type="string">
            <text:p>MESQUITA</text:p>
          </table:table-cell>
          <table:table-cell office:value-type="string" calcext:value-type="string">
            <text:p>JOAO NEIVA 2</text:p>
          </table:table-cell>
          <table:table-cell office:value-type="float" office:value="1.53264098962992" calcext:value-type="float">
            <text:p>1,532641</text:p>
          </table:table-cell>
        </table:table-row>
        <table:table-row table:style-name="ro1">
          <table:table-cell office:value-type="string" calcext:value-type="string">
            <text:p>IVAIPORA ELS</text:p>
          </table:table-cell>
          <table:table-cell office:value-type="string" calcext:value-type="string">
            <text:p>S.SANTIAGO</text:p>
          </table:table-cell>
          <table:table-cell office:value-type="float" office:value="1.53175108222497" calcext:value-type="float">
            <text:p>1,531751</text:p>
          </table:table-cell>
        </table:table-row>
        <table:table-row table:style-name="ro1">
          <table:table-cell office:value-type="string" calcext:value-type="string">
            <text:p>OUROLANDIA II</text:p>
          </table:table-cell>
          <table:table-cell office:value-type="string" calcext:value-type="string">
            <text:p>MORRO CHAPEU II</text:p>
          </table:table-cell>
          <table:table-cell office:value-type="float" office:value="1.53069253277341" calcext:value-type="float">
            <text:p>1,530693</text:p>
          </table:table-cell>
        </table:table-row>
        <table:table-row table:style-name="ro1">
          <table:table-cell office:value-type="string" calcext:value-type="string">
            <text:p>ORIXIMINA</text:p>
          </table:table-cell>
          <table:table-cell office:value-type="string" calcext:value-type="string">
            <text:p>SILVES</text:p>
          </table:table-cell>
          <table:table-cell office:value-type="float" office:value="1.53012225362072" calcext:value-type="float">
            <text:p>1,530122</text:p>
          </table:table-cell>
        </table:table-row>
        <table:table-row table:style-name="ro1">
          <table:table-cell office:value-type="string" calcext:value-type="string">
            <text:p>NOVA PONTE 3</text:p>
          </table:table-cell>
          <table:table-cell office:value-type="string" calcext:value-type="string">
            <text:p>PARACATU 4</text:p>
          </table:table-cell>
          <table:table-cell office:value-type="float" office:value="1.51873106540138" calcext:value-type="float">
            <text:p>1,518731</text:p>
          </table:table-cell>
        </table:table-row>
        <table:table-row table:style-name="ro1">
          <table:table-cell office:value-type="string" calcext:value-type="string">
            <text:p>POCOES III</text:p>
          </table:table-cell>
          <table:table-cell office:value-type="string" calcext:value-type="string">
            <text:p>PE. PARAISO 2</text:p>
          </table:table-cell>
          <table:table-cell office:value-type="float" office:value="1.51507866084724" calcext:value-type="float">
            <text:p>1,515079</text:p>
          </table:table-cell>
        </table:table-row>
        <table:table-row table:style-name="ro1">
          <table:table-cell office:value-type="string" calcext:value-type="string">
            <text:p>TRINDADE</text:p>
          </table:table-cell>
          <table:table-cell office:value-type="string" calcext:value-type="string">
            <text:p>SILVANIA</text:p>
          </table:table-cell>
          <table:table-cell office:value-type="float" office:value="1.51350738656312" calcext:value-type="float">
            <text:p>1,513507</text:p>
          </table:table-cell>
        </table:table-row>
        <table:table-row table:style-name="ro1">
          <table:table-cell office:value-type="string" calcext:value-type="string">
            <text:p>BURITIRAMA</text:p>
          </table:table-cell>
          <table:table-cell office:value-type="string" calcext:value-type="string">
            <text:p>QUEIMADA NOVA 2</text:p>
          </table:table-cell>
          <table:table-cell office:value-type="float" office:value="1.51290291290078" calcext:value-type="float">
            <text:p>1,512903</text:p>
          </table:table-cell>
        </table:table-row>
        <table:table-row table:style-name="ro1">
          <table:table-cell office:value-type="string" calcext:value-type="string">
            <text:p>R.VERDE NORTE</text:p>
          </table:table-cell>
          <table:table-cell office:value-type="string" calcext:value-type="string">
            <text:p>MARIMBONDO II</text:p>
          </table:table-cell>
          <table:table-cell office:value-type="float" office:value="1.51181260180435" calcext:value-type="float">
            <text:p>1,511813</text:p>
          </table:table-cell>
        </table:table-row>
        <table:table-row table:style-name="ro1">
          <table:table-cell office:value-type="string" calcext:value-type="string">
            <text:p>IGAPORA III</text:p>
          </table:table-cell>
          <table:table-cell office:value-type="string" calcext:value-type="string">
            <text:p>S. DAS ALMAS II</text:p>
          </table:table-cell>
          <table:table-cell office:value-type="float" office:value="1.50941509397797" calcext:value-type="float">
            <text:p>1,509415</text:p>
          </table:table-cell>
        </table:table-row>
        <table:table-row table:style-name="ro1">
          <table:table-cell office:value-type="string" calcext:value-type="string">
            <text:p>RIBEIRAOZINHO</text:p>
          </table:table-cell>
          <table:table-cell office:value-type="string" calcext:value-type="string">
            <text:p>PARANATINGA</text:p>
          </table:table-cell>
          <table:table-cell office:value-type="float" office:value="1.50896177186556" calcext:value-type="float">
            <text:p>1,508962</text:p>
          </table:table-cell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PARANATINGA</text:p>
          </table:table-cell>
          <table:table-cell office:value-type="float" office:value="1.5077226339581" calcext:value-type="float">
            <text:p>1,507723</text:p>
          </table:table-cell>
        </table:table-row>
        <table:table-row table:style-name="ro1">
          <table:table-cell office:value-type="string" calcext:value-type="string">
            <text:p>JAIBA</text:p>
          </table:table-cell>
          <table:table-cell office:value-type="string" calcext:value-type="string">
            <text:p>JANAUBA 6</text:p>
          </table:table-cell>
          <table:table-cell office:value-type="float" office:value="1.50246061017381" calcext:value-type="float">
            <text:p>1,502461</text:p>
          </table:table-cell>
        </table:table-row>
        <table:table-row table:style-name="ro1">
          <table:table-cell office:value-type="string" calcext:value-type="string">
            <text:p>ITAJAI 2</text:p>
          </table:table-cell>
          <table:table-cell office:value-type="string" calcext:value-type="string">
            <text:p>JOINVILLE SUL</text:p>
          </table:table-cell>
          <table:table-cell office:value-type="float" office:value="1.50004503942675" calcext:value-type="float">
            <text:p>1,500045</text:p>
          </table:table-cell>
        </table:table-row>
        <table:table-row table:style-name="ro1">
          <table:table-cell office:value-type="string" calcext:value-type="string">
            <text:p>LONDRINA ESU</text:p>
          </table:table-cell>
          <table:table-cell office:value-type="string" calcext:value-type="string">
            <text:p>ASSIS</text:p>
          </table:table-cell>
          <table:table-cell office:value-type="float" office:value="1.49918384830732" calcext:value-type="float">
            <text:p>1,499184</text:p>
          </table:table-cell>
        </table:table-row>
        <table:table-row table:style-name="ro1">
          <table:table-cell office:value-type="string" calcext:value-type="string">
            <text:p>CAPELINHA 3</text:p>
          </table:table-cell>
          <table:table-cell office:value-type="string" calcext:value-type="string">
            <text:p>JANAUBA 6</text:p>
          </table:table-cell>
          <table:table-cell office:value-type="float" office:value="1.49898415367982" calcext:value-type="float">
            <text:p>1,498984</text:p>
          </table:table-cell>
        </table:table-row>
        <table:table-row table:style-name="ro1">
          <table:table-cell office:value-type="string" calcext:value-type="string">
            <text:p>ITACAIUNAS</text:p>
          </table:table-cell>
          <table:table-cell office:value-type="string" calcext:value-type="string">
            <text:p>SERRA PELADA</text:p>
          </table:table-cell>
          <table:table-cell office:value-type="float" office:value="1.49804744008056" calcext:value-type="float">
            <text:p>1,498047</text:p>
          </table:table-cell>
        </table:table-row>
        <table:table-row table:style-name="ro1">
          <table:table-cell office:value-type="string" calcext:value-type="string">
            <text:p>LONDRINA ESU</text:p>
          </table:table-cell>
          <table:table-cell office:value-type="string" calcext:value-type="string">
            <text:p>SARANDI</text:p>
          </table:table-cell>
          <table:table-cell office:value-type="float" office:value="1.49751478967638" calcext:value-type="float">
            <text:p>1,497515</text:p>
          </table:table-cell>
        </table:table-row>
        <table:table-row table:style-name="ro1">
          <table:table-cell office:value-type="string" calcext:value-type="string">
            <text:p>BIGUACU</text:p>
          </table:table-cell>
          <table:table-cell office:value-type="string" calcext:value-type="string">
            <text:p>ITAJAI 2</text:p>
          </table:table-cell>
          <table:table-cell office:value-type="float" office:value="1.49731408612046" calcext:value-type="float">
            <text:p>1,497314</text:p>
          </table:table-cell>
        </table:table-row>
        <table:table-row table:style-name="ro1">
          <table:table-cell office:value-type="string" calcext:value-type="string">
            <text:p>MILAGRES II</text:p>
          </table:table-cell>
          <table:table-cell office:value-type="string" calcext:value-type="string">
            <text:p>QUEIMADA NOVA 2</text:p>
          </table:table-cell>
          <table:table-cell office:value-type="float" office:value="1.496676179433" calcext:value-type="float">
            <text:p>1,496676</text:p>
          </table:table-cell>
        </table:table-row>
        <table:table-row table:style-name="ro1">
          <table:table-cell office:value-type="string" calcext:value-type="string">
            <text:p>MILAGRES II</text:p>
          </table:table-cell>
          <table:table-cell office:value-type="string" calcext:value-type="string">
            <text:p>SANTA LUZIA II</text:p>
          </table:table-cell>
          <table:table-cell office:value-type="float" office:value="1.49644612046225" calcext:value-type="float">
            <text:p>1,496446</text:p>
          </table:table-cell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SILVES</text:p>
          </table:table-cell>
          <table:table-cell office:value-type="float" office:value="1.49614914639712" calcext:value-type="float">
            <text:p>1,496149</text:p>
          </table:table-cell>
        </table:table-row>
        <table:table-row table:style-name="ro1">
          <table:table-cell office:value-type="string" calcext:value-type="string">
            <text:p>MEDEIROS NETOII</text:p>
          </table:table-cell>
          <table:table-cell office:value-type="string" calcext:value-type="string">
            <text:p>POCOES III</text:p>
          </table:table-cell>
          <table:table-cell office:value-type="float" office:value="1.4958146533243" calcext:value-type="float">
            <text:p>1,495815</text:p>
          </table:table-cell>
        </table:table-row>
        <table:table-row table:style-name="ro1">
          <table:table-cell office:value-type="string" calcext:value-type="string">
            <text:p>MEDEIROS NETOII</text:p>
          </table:table-cell>
          <table:table-cell office:value-type="string" calcext:value-type="string">
            <text:p>JOAO NEIVA 2</text:p>
          </table:table-cell>
          <table:table-cell office:value-type="float" office:value="1.49145197786524" calcext:value-type="float">
            <text:p>1,491452</text:p>
          </table:table-cell>
        </table:table-row>
        <table:table-row table:style-name="ro1">
          <table:table-cell office:value-type="string" calcext:value-type="string">
            <text:p>MARITUBA</text:p>
          </table:table-cell>
          <table:table-cell office:value-type="string" calcext:value-type="string">
            <text:p>TUCURUI</text:p>
          </table:table-cell>
          <table:table-cell office:value-type="float" office:value="1.48937898547399" calcext:value-type="float">
            <text:p>1,489379</text:p>
          </table:table-cell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PARANAITA</text:p>
          </table:table-cell>
          <table:table-cell office:value-type="float" office:value="1.48859632731712" calcext:value-type="float">
            <text:p>1,488596</text:p>
          </table:table-cell>
        </table:table-row>
        <table:table-row table:style-name="ro1">
          <table:table-cell office:value-type="string" calcext:value-type="string">
            <text:p>SAPEACU</text:p>
          </table:table-cell>
          <table:table-cell office:value-type="string" calcext:value-type="string">
            <text:p>MORRO CHAPEU II</text:p>
          </table:table-cell>
          <table:table-cell office:value-type="float" office:value="1.4881892892964" calcext:value-type="float">
            <text:p>1,488189</text:p>
          </table:table-cell>
        </table:table-row>
        <table:table-row table:style-name="ro1">
          <table:table-cell office:value-type="string" calcext:value-type="string">
            <text:p>SINOP</text:p>
          </table:table-cell>
          <table:table-cell office:value-type="string" calcext:value-type="string">
            <text:p>PARANATINGA</text:p>
          </table:table-cell>
          <table:table-cell office:value-type="float" office:value="1.48678114421386" calcext:value-type="float">
            <text:p>1,486781</text:p>
          </table:table-cell>
        </table:table-row>
        <table:table-row table:style-name="ro1">
          <table:table-cell office:value-type="string" calcext:value-type="string">
            <text:p>RIBEIRAOZINHO</text:p>
          </table:table-cell>
          <table:table-cell office:value-type="string" calcext:value-type="string">
            <text:p>SE CUIABA</text:p>
          </table:table-cell>
          <table:table-cell office:value-type="float" office:value="1.48512375152231" calcext:value-type="float">
            <text:p>1,485124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string" calcext:value-type="string">
            <text:p>CAMPOS 2</text:p>
          </table:table-cell>
          <table:table-cell office:value-type="float" office:value="1.48369101537802" calcext:value-type="float">
            <text:p>1,483691</text:p>
          </table:table-cell>
        </table:table-row>
        <table:table-row table:style-name="ro1">
          <table:table-cell office:value-type="string" calcext:value-type="string">
            <text:p>GARANHUNS II</text:p>
          </table:table-cell>
          <table:table-cell office:value-type="string" calcext:value-type="string">
            <text:p>US. L.GONZAGA</text:p>
          </table:table-cell>
          <table:table-cell office:value-type="float" office:value="1.48344579606523" calcext:value-type="float">
            <text:p>1,483446</text:p>
          </table:table-cell>
        </table:table-row>
        <table:table-row table:style-name="ro1">
          <table:table-cell office:value-type="string" calcext:value-type="string">
            <text:p>PIRAPORA 2</text:p>
          </table:table-cell>
          <table:table-cell office:value-type="string" calcext:value-type="string">
            <text:p>ARINOS 2</text:p>
          </table:table-cell>
          <table:table-cell office:value-type="float" office:value="1.48311969280286" calcext:value-type="float">
            <text:p>1,483120</text:p>
          </table:table-cell>
        </table:table-row>
        <table:table-row table:style-name="ro1">
          <table:table-cell office:value-type="string" calcext:value-type="string">
            <text:p>ARINOS 2</text:p>
          </table:table-cell>
          <table:table-cell office:value-type="string" calcext:value-type="string">
            <text:p>PARACATU 4</text:p>
          </table:table-cell>
          <table:table-cell office:value-type="float" office:value="1.4809141422646" calcext:value-type="float">
            <text:p>1,480914</text:p>
          </table:table-cell>
        </table:table-row>
        <table:table-row table:style-name="ro1">
          <table:table-cell office:value-type="string" calcext:value-type="string">
            <text:p>GARANHUNS II</text:p>
          </table:table-cell>
          <table:table-cell office:value-type="string" calcext:value-type="string">
            <text:p>PAU FERRO</text:p>
          </table:table-cell>
          <table:table-cell office:value-type="float" office:value="1.48034284579164" calcext:value-type="float">
            <text:p>1,480343</text:p>
          </table:table-cell>
        </table:table-row>
        <table:table-row table:style-name="ro1">
          <table:table-cell office:value-type="string" calcext:value-type="string">
            <text:p>G.VALADARES 6</text:p>
          </table:table-cell>
          <table:table-cell office:value-type="string" calcext:value-type="string">
            <text:p>PE. PARAISO 2</text:p>
          </table:table-cell>
          <table:table-cell office:value-type="float" office:value="1.48025946545418" calcext:value-type="float">
            <text:p>1,480259</text:p>
          </table:table-cell>
        </table:table-row>
        <table:table-row table:style-name="ro1">
          <table:table-cell office:value-type="string" calcext:value-type="string">
            <text:p>JANAUBA 3</text:p>
          </table:table-cell>
          <table:table-cell office:value-type="string" calcext:value-type="string">
            <text:p>JANAUBA 6</text:p>
          </table:table-cell>
          <table:table-cell office:value-type="float" office:value="1.47944111200098" calcext:value-type="float">
            <text:p>1,479441</text:p>
          </table:table-cell>
        </table:table-row>
        <table:table-row table:style-name="ro1">
          <table:table-cell office:value-type="string" calcext:value-type="string">
            <text:p>C.GRANDE III</text:p>
          </table:table-cell>
          <table:table-cell office:value-type="string" calcext:value-type="string">
            <text:p>CEARA MIRIM 2</text:p>
          </table:table-cell>
          <table:table-cell office:value-type="float" office:value="1.47517994216912" calcext:value-type="float">
            <text:p>1,475180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J. CAMARA III</text:p>
          </table:table-cell>
          <table:table-cell office:value-type="float" office:value="1.47375497196522" calcext:value-type="float">
            <text:p>1,473755</text:p>
          </table:table-cell>
        </table:table-row>
        <table:table-row table:style-name="ro1">
          <table:table-cell office:value-type="string" calcext:value-type="string">
            <text:p>C.GRANDE III</text:p>
          </table:table-cell>
          <table:table-cell office:value-type="string" calcext:value-type="string">
            <text:p>GARANHUNS II</text:p>
          </table:table-cell>
          <table:table-cell office:value-type="float" office:value="1.4715530672349" calcext:value-type="float">
            <text:p>1,471553</text:p>
          </table:table-cell>
        </table:table-row>
        <table:table-row table:style-name="ro1">
          <table:table-cell office:value-type="string" calcext:value-type="string">
            <text:p>RIBEIRAOZINHO</text:p>
          </table:table-cell>
          <table:table-cell office:value-type="string" calcext:value-type="string">
            <text:p>R.VERDE NORTE</text:p>
          </table:table-cell>
          <table:table-cell office:value-type="float" office:value="1.46676872648629" calcext:value-type="float">
            <text:p>1,466769</text:p>
          </table:table-cell>
        </table:table-row>
        <table:table-row table:style-name="ro1">
          <table:table-cell office:value-type="string" calcext:value-type="string">
            <text:p>BACABEIRA</text:p>
          </table:table-cell>
          <table:table-cell office:value-type="string" calcext:value-type="string">
            <text:p>PARNAIBA III</text:p>
          </table:table-cell>
          <table:table-cell office:value-type="float" office:value="1.4625475168008" calcext:value-type="float">
            <text:p>1,462548</text:p>
          </table:table-cell>
        </table:table-row>
        <table:table-row table:style-name="ro1">
          <table:table-cell office:value-type="string" calcext:value-type="string">
            <text:p>JAGUARUANA II</text:p>
          </table:table-cell>
          <table:table-cell office:value-type="string" calcext:value-type="string">
            <text:p>PACATUBA</text:p>
          </table:table-cell>
          <table:table-cell office:value-type="float" office:value="1.46184643702825" calcext:value-type="float">
            <text:p>1,461846</text:p>
          </table:table-cell>
        </table:table-row>
        <table:table-row table:style-name="ro1">
          <table:table-cell office:value-type="string" calcext:value-type="string">
            <text:p>MIRANDA II</text:p>
          </table:table-cell>
          <table:table-cell office:value-type="string" calcext:value-type="string">
            <text:p>SAO LUIS II</text:p>
          </table:table-cell>
          <table:table-cell office:value-type="float" office:value="1.45930965608792" calcext:value-type="float">
            <text:p>1,459310</text:p>
          </table:table-cell>
        </table:table-row>
        <table:table-row table:style-name="ro1">
          <table:table-cell office:value-type="string" calcext:value-type="string">
            <text:p>ABDON BATISTA</text:p>
          </table:table-cell>
          <table:table-cell office:value-type="string" calcext:value-type="string">
            <text:p>C.NOVOS</text:p>
          </table:table-cell>
          <table:table-cell office:value-type="float" office:value="1.45844517419606" calcext:value-type="float">
            <text:p>1,458445</text:p>
          </table:table-cell>
        </table:table-row>
        <table:table-row table:style-name="ro1">
          <table:table-cell office:value-type="string" calcext:value-type="string">
            <text:p>IMPERATRIZ</text:p>
          </table:table-cell>
          <table:table-cell office:value-type="string" calcext:value-type="string">
            <text:p>COLINAS</text:p>
          </table:table-cell>
          <table:table-cell office:value-type="float" office:value="1.45654046763155" calcext:value-type="float">
            <text:p>1,456540</text:p>
          </table:table-cell>
        </table:table-row>
        <table:table-row table:style-name="ro1">
          <table:table-cell office:value-type="string" calcext:value-type="string">
            <text:p>C.GRANDE III</text:p>
          </table:table-cell>
          <table:table-cell office:value-type="string" calcext:value-type="string">
            <text:p>SANTA LUZIA II</text:p>
          </table:table-cell>
          <table:table-cell office:value-type="float" office:value="1.45537809464972" calcext:value-type="float">
            <text:p>1,455378</text:p>
          </table:table-cell>
        </table:table-row>
        <table:table-row table:style-name="ro1">
          <table:table-cell office:value-type="string" calcext:value-type="string">
            <text:p>IMPERATRIZ</text:p>
          </table:table-cell>
          <table:table-cell office:value-type="string" calcext:value-type="string">
            <text:p>P.DUTRA</text:p>
          </table:table-cell>
          <table:table-cell office:value-type="float" office:value="1.45456202944472" calcext:value-type="float">
            <text:p>1,454562</text:p>
          </table:table-cell>
        </table:table-row>
        <table:table-row table:style-name="ro1">
          <table:table-cell office:value-type="string" calcext:value-type="string">
            <text:p>BIGUACU</text:p>
          </table:table-cell>
          <table:table-cell office:value-type="string" calcext:value-type="string">
            <text:p>GASPAR 2</text:p>
          </table:table-cell>
          <table:table-cell office:value-type="float" office:value="1.44822292193319" calcext:value-type="float">
            <text:p>1,448223</text:p>
          </table:table-cell>
        </table:table-row>
        <table:table-row table:style-name="ro1">
          <table:table-cell office:value-type="string" calcext:value-type="string">
            <text:p>JAGUARUANA II</text:p>
          </table:table-cell>
          <table:table-cell office:value-type="string" calcext:value-type="string">
            <text:p>ACU III</text:p>
          </table:table-cell>
          <table:table-cell office:value-type="float" office:value="1.44294876718857" calcext:value-type="float">
            <text:p>1,442949</text:p>
          </table:table-cell>
        </table:table-row>
        <table:table-row table:style-name="ro1">
          <table:table-cell office:value-type="string" calcext:value-type="string">
            <text:p>C.GRANDE III</text:p>
          </table:table-cell>
          <table:table-cell office:value-type="string" calcext:value-type="string">
            <text:p>JOAO PESSOA II</text:p>
          </table:table-cell>
          <table:table-cell office:value-type="float" office:value="1.44221710832828" calcext:value-type="float">
            <text:p>1,442217</text:p>
          </table:table-cell>
        </table:table-row>
        <table:table-row table:style-name="ro1">
          <table:table-cell office:value-type="string" calcext:value-type="string">
            <text:p>S.DA MESA</text:p>
          </table:table-cell>
          <table:table-cell office:value-type="string" calcext:value-type="string">
            <text:p>SAMAMBAIA</text:p>
          </table:table-cell>
          <table:table-cell office:value-type="float" office:value="1.4395543865848" calcext:value-type="float">
            <text:p>1,439554</text:p>
          </table:table-cell>
        </table:table-row>
        <table:table-row table:style-name="ro1">
          <table:table-cell office:value-type="string" calcext:value-type="string">
            <text:p>JOAO NEIVA 2</text:p>
          </table:table-cell>
          <table:table-cell office:value-type="string" calcext:value-type="string">
            <text:p>VIANA 2</text:p>
          </table:table-cell>
          <table:table-cell office:value-type="float" office:value="1.439205752658" calcext:value-type="float">
            <text:p>1,439206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RIBEIRAOPRETO</text:p>
          </table:table-cell>
          <table:table-cell office:value-type="float" office:value="1.43661455761293" calcext:value-type="float">
            <text:p>1,436615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QUIXADA</text:p>
          </table:table-cell>
          <table:table-cell office:value-type="float" office:value="1.43523044989314" calcext:value-type="float">
            <text:p>1,435230</text:p>
          </table:table-cell>
        </table:table-row>
        <table:table-row table:style-name="ro1">
          <table:table-cell office:value-type="string" calcext:value-type="string">
            <text:p>ACARAU III</text:p>
          </table:table-cell>
          <table:table-cell office:value-type="string" calcext:value-type="string">
            <text:p>PECEM II</text:p>
          </table:table-cell>
          <table:table-cell office:value-type="float" office:value="1.43378681262438" calcext:value-type="float">
            <text:p>1,433787</text:p>
          </table:table-cell>
        </table:table-row>
        <table:table-row table:style-name="ro1">
          <table:table-cell office:value-type="string" calcext:value-type="string">
            <text:p>ACARAU III</text:p>
          </table:table-cell>
          <table:table-cell office:value-type="string" calcext:value-type="string">
            <text:p>PARNAIBA III</text:p>
          </table:table-cell>
          <table:table-cell office:value-type="float" office:value="1.43340702517706" calcext:value-type="float">
            <text:p>1,433407</text:p>
          </table:table-cell>
        </table:table-row>
        <table:table-row table:style-name="ro1">
          <table:table-cell office:value-type="string" calcext:value-type="string">
            <text:p>JAURU</text:p>
          </table:table-cell>
          <table:table-cell office:value-type="string" calcext:value-type="string">
            <text:p>SE CUIABA</text:p>
          </table:table-cell>
          <table:table-cell office:value-type="float" office:value="1.43249845957793" calcext:value-type="float">
            <text:p>1,432498</text:p>
          </table:table-cell>
        </table:table-row>
        <table:table-row table:style-name="ro1">
          <table:table-cell office:value-type="string" calcext:value-type="string">
            <text:p>S.DA MESA</text:p>
          </table:table-cell>
          <table:table-cell office:value-type="string" calcext:value-type="string">
            <text:p>GURUPI</text:p>
          </table:table-cell>
          <table:table-cell office:value-type="float" office:value="1.43015588307192" calcext:value-type="float">
            <text:p>1,430156</text:p>
          </table:table-cell>
        </table:table-row>
        <table:table-row table:style-name="ro1">
          <table:table-cell office:value-type="string" calcext:value-type="string">
            <text:p>SAPEACU</text:p>
          </table:table-cell>
          <table:table-cell office:value-type="string" calcext:value-type="string">
            <text:p>OLINDINA</text:p>
          </table:table-cell>
          <table:table-cell office:value-type="float" office:value="1.42987337102318" calcext:value-type="float">
            <text:p>1,429873</text:p>
          </table:table-cell>
        </table:table-row>
        <table:table-row table:style-name="ro1">
          <table:table-cell office:value-type="string" calcext:value-type="string">
            <text:p>GURUPI</text:p>
          </table:table-cell>
          <table:table-cell office:value-type="string" calcext:value-type="string">
            <text:p>MIRACEMA</text:p>
          </table:table-cell>
          <table:table-cell office:value-type="float" office:value="1.42905181957592" calcext:value-type="float">
            <text:p>1,429052</text:p>
          </table:table-cell>
        </table:table-row>
        <table:table-row table:style-name="ro1">
          <table:table-cell office:value-type="string" calcext:value-type="string">
            <text:p>ACARAU III</text:p>
          </table:table-cell>
          <table:table-cell office:value-type="string" calcext:value-type="string">
            <text:p>TIANGUA II</text:p>
          </table:table-cell>
          <table:table-cell office:value-type="float" office:value="1.42787051096191" calcext:value-type="float">
            <text:p>1,427871</text:p>
          </table:table-cell>
        </table:table-row>
        <table:table-row table:style-name="ro1">
          <table:table-cell office:value-type="string" calcext:value-type="string">
            <text:p>BLUMENAU</text:p>
          </table:table-cell>
          <table:table-cell office:value-type="string" calcext:value-type="string">
            <text:p>GASPAR 2</text:p>
          </table:table-cell>
          <table:table-cell office:value-type="float" office:value="1.42771134383488" calcext:value-type="float">
            <text:p>1,427711</text:p>
          </table:table-cell>
        </table:table-row>
        <table:table-row table:style-name="ro1">
          <table:table-cell office:value-type="string" calcext:value-type="string">
            <text:p>BOM.JES.LAPA II</text:p>
          </table:table-cell>
          <table:table-cell office:value-type="string" calcext:value-type="string">
            <text:p>SOL DO SERTAO</text:p>
          </table:table-cell>
          <table:table-cell office:value-type="float" office:value="1.42465502646666" calcext:value-type="float">
            <text:p>1,424655</text:p>
          </table:table-cell>
        </table:table-row>
        <table:table-row table:style-name="ro1">
          <table:table-cell office:value-type="string" calcext:value-type="string">
            <text:p>OLINDINA</text:p>
          </table:table-cell>
          <table:table-cell office:value-type="string" calcext:value-type="string">
            <text:p>PORTO SERGIPE I</text:p>
          </table:table-cell>
          <table:table-cell office:value-type="float" office:value="1.42420916926599" calcext:value-type="float">
            <text:p>1,424209</text:p>
          </table:table-cell>
        </table:table-row>
        <table:table-row table:style-name="ro1">
          <table:table-cell office:value-type="string" calcext:value-type="string">
            <text:p>SAO LUIS II</text:p>
          </table:table-cell>
          <table:table-cell office:value-type="string" calcext:value-type="string">
            <text:p>SAO LUIS IV</text:p>
          </table:table-cell>
          <table:table-cell office:value-type="float" office:value="1.42052578919864" calcext:value-type="float">
            <text:p>1,420526</text:p>
          </table:table-cell>
        </table:table-row>
        <table:table-row table:style-name="ro1">
          <table:table-cell office:value-type="string" calcext:value-type="string">
            <text:p>ITUMBIARA</text:p>
          </table:table-cell>
          <table:table-cell office:value-type="string" calcext:value-type="string">
            <text:p>NOVA PONTE 3</text:p>
          </table:table-cell>
          <table:table-cell office:value-type="float" office:value="1.4135280016679" calcext:value-type="float">
            <text:p>1,413528</text:p>
          </table:table-cell>
        </table:table-row>
        <table:table-row table:style-name="ro1">
          <table:table-cell office:value-type="string" calcext:value-type="string">
            <text:p>CURRAL PIAUI II</text:p>
          </table:table-cell>
          <table:table-cell office:value-type="string" calcext:value-type="string">
            <text:p>QUEIMADA NOVA 2</text:p>
          </table:table-cell>
          <table:table-cell office:value-type="float" office:value="1.41171032493276" calcext:value-type="float">
            <text:p>1,411710</text:p>
          </table:table-cell>
        </table:table-row>
        <table:table-row table:style-name="ro1">
          <table:table-cell office:value-type="string" calcext:value-type="string">
            <text:p>CAMPINAS</text:p>
          </table:table-cell>
          <table:table-cell office:value-type="string" calcext:value-type="string">
            <text:p>ITATIBA</text:p>
          </table:table-cell>
          <table:table-cell office:value-type="float" office:value="1.40925687873135" calcext:value-type="float">
            <text:p>1,409257</text:p>
          </table:table-cell>
        </table:table-row>
        <table:table-row table:style-name="ro1">
          <table:table-cell office:value-type="string" calcext:value-type="string">
            <text:p>RIO NOVO SUL</text:p>
          </table:table-cell>
          <table:table-cell office:value-type="string" calcext:value-type="string">
            <text:p>MUTUM</text:p>
          </table:table-cell>
          <table:table-cell office:value-type="float" office:value="1.40794241313812" calcext:value-type="float">
            <text:p>1,407942</text:p>
          </table:table-cell>
        </table:table-row>
        <table:table-row table:style-name="ro1">
          <table:table-cell office:value-type="string" calcext:value-type="string">
            <text:p>LUZIANIA</text:p>
          </table:table-cell>
          <table:table-cell office:value-type="string" calcext:value-type="string">
            <text:p>SERRA MESA 2</text:p>
          </table:table-cell>
          <table:table-cell office:value-type="float" office:value="1.40555890799991" calcext:value-type="float">
            <text:p>1,405559</text:p>
          </table:table-cell>
        </table:table-row>
        <table:table-row table:style-name="ro1">
          <table:table-cell office:value-type="string" calcext:value-type="string">
            <text:p>COLINAS</text:p>
          </table:table-cell>
          <table:table-cell office:value-type="string" calcext:value-type="string">
            <text:p>MIRACEMA</text:p>
          </table:table-cell>
          <table:table-cell office:value-type="float" office:value="1.40394348319854" calcext:value-type="float">
            <text:p>1,403943</text:p>
          </table:table-cell>
        </table:table-row>
        <table:table-row table:style-name="ro1">
          <table:table-cell office:value-type="string" calcext:value-type="string">
            <text:p>GURUPI</text:p>
          </table:table-cell>
          <table:table-cell office:value-type="string" calcext:value-type="string">
            <text:p>PEIXE 2</text:p>
          </table:table-cell>
          <table:table-cell office:value-type="float" office:value="1.4034965614344" calcext:value-type="float">
            <text:p>1,403497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JAGUARA-500</text:p>
          </table:table-cell>
          <table:table-cell office:value-type="float" office:value="1.40266962384814" calcext:value-type="float">
            <text:p>1,402670</text:p>
          </table:table-cell>
        </table:table-row>
        <table:table-row table:style-name="ro1">
          <table:table-cell office:value-type="string" calcext:value-type="string">
            <text:p>PECEM II</text:p>
          </table:table-cell>
          <table:table-cell office:value-type="string" calcext:value-type="string">
            <text:p>SOBRAL III</text:p>
          </table:table-cell>
          <table:table-cell office:value-type="float" office:value="1.4004970141061" calcext:value-type="float">
            <text:p>1,400497</text:p>
          </table:table-cell>
        </table:table-row>
        <table:table-row table:style-name="ro1">
          <table:table-cell office:value-type="string" calcext:value-type="string">
            <text:p>OURO PRETO 2</text:p>
          </table:table-cell>
          <table:table-cell office:value-type="string" calcext:value-type="string">
            <text:p>B.DESPACHO 3</text:p>
          </table:table-cell>
          <table:table-cell office:value-type="float" office:value="1.40041470789639" calcext:value-type="float">
            <text:p>1,400415</text:p>
          </table:table-cell>
        </table:table-row>
        <table:table-row table:style-name="ro1">
          <table:table-cell office:value-type="string" calcext:value-type="string">
            <text:p>TUCURUI</text:p>
          </table:table-cell>
          <table:table-cell office:value-type="string" calcext:value-type="string">
            <text:p>MARABA</text:p>
          </table:table-cell>
          <table:table-cell office:value-type="float" office:value="1.39992395479554" calcext:value-type="float">
            <text:p>1,399924</text:p>
          </table:table-cell>
        </table:table-row>
        <table:table-row table:style-name="ro1">
          <table:table-cell office:value-type="string" calcext:value-type="string">
            <text:p>C. PAULISTA</text:p>
          </table:table-cell>
          <table:table-cell office:value-type="string" calcext:value-type="string">
            <text:p>TIJUCO PRETO</text:p>
          </table:table-cell>
          <table:table-cell office:value-type="float" office:value="1.39744091516246" calcext:value-type="float">
            <text:p>1,397441</text:p>
          </table:table-cell>
        </table:table-row>
        <table:table-row table:style-name="ro1">
          <table:table-cell office:value-type="string" calcext:value-type="string">
            <text:p>NOVA STA RITA</text:p>
          </table:table-cell>
          <table:table-cell office:value-type="string" calcext:value-type="string">
            <text:p>C.NOVOS</text:p>
          </table:table-cell>
          <table:table-cell office:value-type="float" office:value="1.39692299473334" calcext:value-type="float">
            <text:p>1,396923</text:p>
          </table:table-cell>
        </table:table-row>
        <table:table-row table:style-name="ro1">
          <table:table-cell office:value-type="string" calcext:value-type="string">
            <text:p>ACAILANDIA</text:p>
          </table:table-cell>
          <table:table-cell office:value-type="string" calcext:value-type="string">
            <text:p>MARABA</text:p>
          </table:table-cell>
          <table:table-cell office:value-type="float" office:value="1.39167511728203" calcext:value-type="float">
            <text:p>1,391675</text:p>
          </table:table-cell>
        </table:table-row>
        <table:table-row table:style-name="ro1">
          <table:table-cell office:value-type="string" calcext:value-type="string">
            <text:p>PACATUBA</text:p>
          </table:table-cell>
          <table:table-cell office:value-type="string" calcext:value-type="string">
            <text:p>PECEM II</text:p>
          </table:table-cell>
          <table:table-cell office:value-type="float" office:value="1.39070493687818" calcext:value-type="float">
            <text:p>1,390705</text:p>
          </table:table-cell>
        </table:table-row>
        <table:table-row table:style-name="ro1">
          <table:table-cell office:value-type="string" calcext:value-type="string">
            <text:p>TRINDADE</text:p>
          </table:table-cell>
          <table:table-cell office:value-type="string" calcext:value-type="string">
            <text:p>R.VERDE NORTE</text:p>
          </table:table-cell>
          <table:table-cell office:value-type="float" office:value="1.39046822410262" calcext:value-type="float">
            <text:p>1,390468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MONTE VERDE</text:p>
          </table:table-cell>
          <table:table-cell office:value-type="float" office:value="1.3856936787204" calcext:value-type="float">
            <text:p>1,385694</text:p>
          </table:table-cell>
        </table:table-row>
        <table:table-row table:style-name="ro1">
          <table:table-cell office:value-type="string" calcext:value-type="string">
            <text:p>ALTA PAULISTA</text:p>
          </table:table-cell>
          <table:table-cell office:value-type="string" calcext:value-type="string">
            <text:p>MARECH.RONDON</text:p>
          </table:table-cell>
          <table:table-cell office:value-type="float" office:value="1.38370834951402" calcext:value-type="float">
            <text:p>1,383708</text:p>
          </table:table-cell>
        </table:table-row>
        <table:table-row table:style-name="ro1">
          <table:table-cell office:value-type="string" calcext:value-type="string">
            <text:p>ADRIANOPOLIS</text:p>
          </table:table-cell>
          <table:table-cell office:value-type="string" calcext:value-type="string">
            <text:p>GRAJAU</text:p>
          </table:table-cell>
          <table:table-cell office:value-type="float" office:value="1.37920280470151" calcext:value-type="float">
            <text:p>1,379203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S.SANTIAGO</text:p>
          </table:table-cell>
          <table:table-cell office:value-type="float" office:value="1.37852359136478" calcext:value-type="float">
            <text:p>1,378524</text:p>
          </table:table-cell>
        </table:table-row>
        <table:table-row table:style-name="ro1">
          <table:table-cell office:value-type="string" calcext:value-type="string">
            <text:p>IBICOARA</text:p>
          </table:table-cell>
          <table:table-cell office:value-type="string" calcext:value-type="string">
            <text:p>POCOES III</text:p>
          </table:table-cell>
          <table:table-cell office:value-type="float" office:value="1.37530971650188" calcext:value-type="float">
            <text:p>1,375310</text:p>
          </table:table-cell>
        </table:table-row>
        <table:table-row table:style-name="ro1">
          <table:table-cell office:value-type="string" calcext:value-type="string">
            <text:p>SAO GOTARDO 2</text:p>
          </table:table-cell>
          <table:table-cell office:value-type="string" calcext:value-type="string">
            <text:p>EMBORCACAO</text:p>
          </table:table-cell>
          <table:table-cell office:value-type="float" office:value="1.37363947008927" calcext:value-type="float">
            <text:p>1,373639</text:p>
          </table:table-cell>
        </table:table-row>
        <table:table-row table:style-name="ro1">
          <table:table-cell office:value-type="string" calcext:value-type="string">
            <text:p>EMBORCACAO</text:p>
          </table:table-cell>
          <table:table-cell office:value-type="string" calcext:value-type="string">
            <text:p>PARACATU 4</text:p>
          </table:table-cell>
          <table:table-cell office:value-type="float" office:value="1.37213260846559" calcext:value-type="float">
            <text:p>1,372133</text:p>
          </table:table-cell>
        </table:table-row>
        <table:table-row table:style-name="ro1">
          <table:table-cell office:value-type="string" calcext:value-type="string">
            <text:p>TERMINAL RIO</text:p>
          </table:table-cell>
          <table:table-cell office:value-type="string" calcext:value-type="string">
            <text:p>RESENDE</text:p>
          </table:table-cell>
          <table:table-cell office:value-type="float" office:value="1.37206030539376" calcext:value-type="float">
            <text:p>1,372060</text:p>
          </table:table-cell>
        </table:table-row>
        <table:table-row table:style-name="ro1">
          <table:table-cell office:value-type="string" calcext:value-type="string">
            <text:p>ADRIANOPOLIS</text:p>
          </table:table-cell>
          <table:table-cell office:value-type="string" calcext:value-type="string">
            <text:p>SAO JOSE</text:p>
          </table:table-cell>
          <table:table-cell office:value-type="float" office:value="1.37126111026055" calcext:value-type="float">
            <text:p>1,371261</text:p>
          </table:table-cell>
        </table:table-row>
        <table:table-row table:style-name="ro1">
          <table:table-cell office:value-type="string" calcext:value-type="string">
            <text:p>B. FLUMINENSE</text:p>
          </table:table-cell>
          <table:table-cell office:value-type="string" calcext:value-type="string">
            <text:p>C. PAULISTA</text:p>
          </table:table-cell>
          <table:table-cell office:value-type="float" office:value="1.36985972398325" calcext:value-type="float">
            <text:p>1,369860</text:p>
          </table:table-cell>
        </table:table-row>
        <table:table-row table:style-name="ro1">
          <table:table-cell office:value-type="string" calcext:value-type="string">
            <text:p>FORTALEZA II</text:p>
          </table:table-cell>
          <table:table-cell office:value-type="string" calcext:value-type="string">
            <text:p>PACATUBA</text:p>
          </table:table-cell>
          <table:table-cell office:value-type="float" office:value="1.36860080020487" calcext:value-type="float">
            <text:p>1,368601</text:p>
          </table:table-cell>
        </table:table-row>
        <table:table-row table:style-name="ro1">
          <table:table-cell office:value-type="string" calcext:value-type="string">
            <text:p>JAGUARA-500</text:p>
          </table:table-cell>
          <table:table-cell office:value-type="string" calcext:value-type="string">
            <text:p>B.DESPACHO 3</text:p>
          </table:table-cell>
          <table:table-cell office:value-type="float" office:value="1.36795457064289" calcext:value-type="float">
            <text:p>1,367955</text:p>
          </table:table-cell>
        </table:table-row>
        <table:table-row table:style-name="ro1">
          <table:table-cell office:value-type="string" calcext:value-type="string">
            <text:p>NOVA STA RITA</text:p>
          </table:table-cell>
          <table:table-cell office:value-type="string" calcext:value-type="string">
            <text:p>ITA</text:p>
          </table:table-cell>
          <table:table-cell office:value-type="float" office:value="1.3594699345787" calcext:value-type="float">
            <text:p>1,359470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string" calcext:value-type="string">
            <text:p>SAPEACU</text:p>
          </table:table-cell>
          <table:table-cell office:value-type="float" office:value="1.35897944897637" calcext:value-type="float">
            <text:p>1,358979</text:p>
          </table:table-cell>
        </table:table-row>
        <table:table-row table:style-name="ro1">
          <table:table-cell office:value-type="string" calcext:value-type="string">
            <text:p>ITABIRITO 2</text:p>
          </table:table-cell>
          <table:table-cell office:value-type="string" calcext:value-type="string">
            <text:p>VESPASIANO 2</text:p>
          </table:table-cell>
          <table:table-cell office:value-type="float" office:value="1.35556586208544" calcext:value-type="float">
            <text:p>1,355566</text:p>
          </table:table-cell>
        </table:table-row>
        <table:table-row table:style-name="ro1">
          <table:table-cell office:value-type="string" calcext:value-type="string">
            <text:p>JAGUARA-500</text:p>
          </table:table-cell>
          <table:table-cell office:value-type="string" calcext:value-type="string">
            <text:p>SAO SIMAO-SE</text:p>
          </table:table-cell>
          <table:table-cell office:value-type="float" office:value="1.34982135123724" calcext:value-type="float">
            <text:p>1,349821</text:p>
          </table:table-cell>
        </table:table-row>
        <table:table-row table:style-name="ro1">
          <table:table-cell office:value-type="string" calcext:value-type="string">
            <text:p>AREIA</text:p>
          </table:table-cell>
          <table:table-cell office:value-type="string" calcext:value-type="string">
            <text:p>CURITIBA</text:p>
          </table:table-cell>
          <table:table-cell office:value-type="float" office:value="1.34902396990287" calcext:value-type="float">
            <text:p>1,349024</text:p>
          </table:table-cell>
        </table:table-row>
        <table:table-row table:style-name="ro1">
          <table:table-cell office:value-type="string" calcext:value-type="string">
            <text:p>ADRIANOPOLIS</text:p>
          </table:table-cell>
          <table:table-cell office:value-type="string" calcext:value-type="string">
            <text:p>TERMINAL RIO</text:p>
          </table:table-cell>
          <table:table-cell office:value-type="float" office:value="1.34836404027063" calcext:value-type="float">
            <text:p>1,348364</text:p>
          </table:table-cell>
        </table:table-row>
        <table:table-row table:style-name="ro1">
          <table:table-cell office:value-type="string" calcext:value-type="string">
            <text:p>IBIUNA</text:p>
          </table:table-cell>
          <table:table-cell office:value-type="string" calcext:value-type="string">
            <text:p>INTERLAGOS</text:p>
          </table:table-cell>
          <table:table-cell office:value-type="float" office:value="1.34827442338241" calcext:value-type="float">
            <text:p>1,348274</text:p>
          </table:table-cell>
        </table:table-row>
        <table:table-row table:style-name="ro1">
          <table:table-cell office:value-type="string" calcext:value-type="string">
            <text:p>IL.SOLTEIRA 2</text:p>
          </table:table-cell>
          <table:table-cell office:value-type="string" calcext:value-type="string">
            <text:p>ILHA SOLTEIRA</text:p>
          </table:table-cell>
          <table:table-cell office:value-type="float" office:value="1.34060702673747" calcext:value-type="float">
            <text:p>1,340607</text:p>
          </table:table-cell>
        </table:table-row>
        <table:table-row table:style-name="ro1">
          <table:table-cell office:value-type="string" calcext:value-type="string">
            <text:p>JANDAIRA II</text:p>
          </table:table-cell>
          <table:table-cell office:value-type="string" calcext:value-type="string">
            <text:p>J. CAMARA III</text:p>
          </table:table-cell>
          <table:table-cell office:value-type="float" office:value="1.34000426489857" calcext:value-type="float">
            <text:p>1,340004</text:p>
          </table:table-cell>
        </table:table-row>
        <table:table-row table:style-name="ro1">
          <table:table-cell office:value-type="string" calcext:value-type="string">
            <text:p>NEVES 1</text:p>
          </table:table-cell>
          <table:table-cell office:value-type="string" calcext:value-type="string">
            <text:p>B.DESPACHO 3</text:p>
          </table:table-cell>
          <table:table-cell office:value-type="float" office:value="1.33197599530857" calcext:value-type="float">
            <text:p>1,331976</text:p>
          </table:table-cell>
        </table:table-row>
        <table:table-row table:style-name="ro1">
          <table:table-cell office:value-type="string" calcext:value-type="string">
            <text:p>INTEGRADORA</text:p>
          </table:table-cell>
          <table:table-cell office:value-type="string" calcext:value-type="string">
            <text:p>SERRA PELADA</text:p>
          </table:table-cell>
          <table:table-cell office:value-type="float" office:value="1.33115623234496" calcext:value-type="float">
            <text:p>1,331156</text:p>
          </table:table-cell>
        </table:table-row>
        <table:table-row table:style-name="ro1">
          <table:table-cell office:value-type="string" calcext:value-type="string">
            <text:p>ITABIRITO 2</text:p>
          </table:table-cell>
          <table:table-cell office:value-type="string" calcext:value-type="string">
            <text:p>S. G. DO PARA</text:p>
          </table:table-cell>
          <table:table-cell office:value-type="float" office:value="1.32959097583726" calcext:value-type="float">
            <text:p>1,329591</text:p>
          </table:table-cell>
        </table:table-row>
        <table:table-row table:style-name="ro1">
          <table:table-cell office:value-type="string" calcext:value-type="string">
            <text:p>ITUMBIARA</text:p>
          </table:table-cell>
          <table:table-cell office:value-type="string" calcext:value-type="string">
            <text:p>R.VERDE NORTE</text:p>
          </table:table-cell>
          <table:table-cell office:value-type="float" office:value="1.32361372733306" calcext:value-type="float">
            <text:p>1,323614</text:p>
          </table:table-cell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EQUADOR</text:p>
          </table:table-cell>
          <table:table-cell office:value-type="float" office:value="1.32300639297573" calcext:value-type="float">
            <text:p>1,323006</text:p>
          </table:table-cell>
        </table:table-row>
        <table:table-row table:style-name="ro1">
          <table:table-cell office:value-type="string" calcext:value-type="string">
            <text:p>ITABIRA 5</text:p>
          </table:table-cell>
          <table:table-cell office:value-type="string" calcext:value-type="string">
            <text:p>VESPASIANO 2</text:p>
          </table:table-cell>
          <table:table-cell office:value-type="float" office:value="1.30876689252219" calcext:value-type="float">
            <text:p>1,308767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ITA</text:p>
          </table:table-cell>
          <table:table-cell office:value-type="float" office:value="1.30837456748236" calcext:value-type="float">
            <text:p>1,308375</text:p>
          </table:table-cell>
        </table:table-row>
        <table:table-row table:style-name="ro1">
          <table:table-cell office:value-type="string" calcext:value-type="string">
            <text:p>MILAGRES</text:p>
          </table:table-cell>
          <table:table-cell office:value-type="string" calcext:value-type="string">
            <text:p>US. L.GONZAGA</text:p>
          </table:table-cell>
          <table:table-cell office:value-type="float" office:value="1.30606309619539" calcext:value-type="float">
            <text:p>1,306063</text:p>
          </table:table-cell>
        </table:table-row>
        <table:table-row table:style-name="ro1">
          <table:table-cell office:value-type="string" calcext:value-type="string">
            <text:p>ALTA PAULISTA</text:p>
          </table:table-cell>
          <table:table-cell office:value-type="string" calcext:value-type="string">
            <text:p>TAQUARUCU</text:p>
          </table:table-cell>
          <table:table-cell office:value-type="float" office:value="1.30489258756251" calcext:value-type="float">
            <text:p>1,304893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string" calcext:value-type="string">
            <text:p>JARDIM</text:p>
          </table:table-cell>
          <table:table-cell office:value-type="float" office:value="1.30469445971026" calcext:value-type="float">
            <text:p>1,304694</text:p>
          </table:table-cell>
        </table:table-row>
        <table:table-row table:style-name="ro1">
          <table:table-cell office:value-type="string" calcext:value-type="string">
            <text:p>BOA VISTA</text:p>
          </table:table-cell>
          <table:table-cell office:value-type="string" calcext:value-type="string">
            <text:p>EQUADOR</text:p>
          </table:table-cell>
          <table:table-cell office:value-type="float" office:value="1.30047612071923" calcext:value-type="float">
            <text:p>1,300476</text:p>
          </table:table-cell>
        </table:table-row>
        <table:table-row table:style-name="ro1">
          <table:table-cell office:value-type="string" calcext:value-type="string">
            <text:p>BRAS.LESTE</text:p>
          </table:table-cell>
          <table:table-cell office:value-type="string" calcext:value-type="string">
            <text:p>LUZIANIA</text:p>
          </table:table-cell>
          <table:table-cell office:value-type="float" office:value="1.29981039441048" calcext:value-type="float">
            <text:p>1,299810</text:p>
          </table:table-cell>
        </table:table-row>
        <table:table-row table:style-name="ro1">
          <table:table-cell office:value-type="string" calcext:value-type="string">
            <text:p>ITAGUACU</text:p>
          </table:table-cell>
          <table:table-cell office:value-type="string" calcext:value-type="string">
            <text:p>SAO SIMAO-SE</text:p>
          </table:table-cell>
          <table:table-cell office:value-type="float" office:value="1.29376232517484" calcext:value-type="float">
            <text:p>1,293762</text:p>
          </table:table-cell>
        </table:table-row>
        <table:table-row table:style-name="ro1">
          <table:table-cell office:value-type="string" calcext:value-type="string">
            <text:p>IBIUNA</text:p>
          </table:table-cell>
          <table:table-cell office:value-type="string" calcext:value-type="string">
            <text:p>TIJUCO PRETO</text:p>
          </table:table-cell>
          <table:table-cell office:value-type="float" office:value="1.29372132720077" calcext:value-type="float">
            <text:p>1,293721</text:p>
          </table:table-cell>
        </table:table-row>
        <table:table-row table:style-name="ro1">
          <table:table-cell office:value-type="string" calcext:value-type="string">
            <text:p>TERESINA II</text:p>
          </table:table-cell>
          <table:table-cell office:value-type="string" calcext:value-type="string">
            <text:p>TIANGUA II</text:p>
          </table:table-cell>
          <table:table-cell office:value-type="float" office:value="1.28956155920188" calcext:value-type="float">
            <text:p>1,289562</text:p>
          </table:table-cell>
        </table:table-row>
        <table:table-row table:style-name="ro1">
          <table:table-cell office:value-type="string" calcext:value-type="string">
            <text:p>GRAVATAI</text:p>
          </table:table-cell>
          <table:table-cell office:value-type="string" calcext:value-type="string">
            <text:p>GUAIBA 3</text:p>
          </table:table-cell>
          <table:table-cell office:value-type="float" office:value="1.28881779701348" calcext:value-type="float">
            <text:p>1,288818</text:p>
          </table:table-cell>
        </table:table-row>
        <table:table-row table:style-name="ro1">
          <table:table-cell office:value-type="string" calcext:value-type="string">
            <text:p>CAPIVARI SUL</text:p>
          </table:table-cell>
          <table:table-cell office:value-type="string" calcext:value-type="string">
            <text:p>GRAVATAI</text:p>
          </table:table-cell>
          <table:table-cell office:value-type="float" office:value="1.28693037360489" calcext:value-type="float">
            <text:p>1,286930</text:p>
          </table:table-cell>
        </table:table-row>
        <table:table-row table:style-name="ro1">
          <table:table-cell office:value-type="string" calcext:value-type="string">
            <text:p>S.SANTIAGO</text:p>
          </table:table-cell>
          <table:table-cell office:value-type="string" calcext:value-type="string">
            <text:p>SEGREDO</text:p>
          </table:table-cell>
          <table:table-cell office:value-type="float" office:value="1.28587635019045" calcext:value-type="float">
            <text:p>1,285876</text:p>
          </table:table-cell>
        </table:table-row>
        <table:table-row table:style-name="ro1">
          <table:table-cell office:value-type="string" calcext:value-type="string">
            <text:p>RIB.GONCALVES</text:p>
          </table:table-cell>
          <table:table-cell office:value-type="string" calcext:value-type="string">
            <text:p>COLINAS</text:p>
          </table:table-cell>
          <table:table-cell office:value-type="float" office:value="1.2801836377937" calcext:value-type="float">
            <text:p>1,280184</text:p>
          </table:table-cell>
        </table:table-row>
        <table:table-row table:style-name="ro1">
          <table:table-cell office:value-type="string" calcext:value-type="string">
            <text:p>JUAZEIRO III</text:p>
          </table:table-cell>
          <table:table-cell office:value-type="string" calcext:value-type="string">
            <text:p>US. L.GONZAGA</text:p>
          </table:table-cell>
          <table:table-cell office:value-type="float" office:value="1.27369721826998" calcext:value-type="float">
            <text:p>1,273697</text:p>
          </table:table-cell>
        </table:table-row>
        <table:table-row table:style-name="ro1">
          <table:table-cell office:value-type="string" calcext:value-type="string">
            <text:p>JARDIM</text:p>
          </table:table-cell>
          <table:table-cell office:value-type="string" calcext:value-type="string">
            <text:p>USINA XINGO</text:p>
          </table:table-cell>
          <table:table-cell office:value-type="float" office:value="1.27308705075793" calcext:value-type="float">
            <text:p>1,273087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office:value-type="string" calcext:value-type="string">
            <text:p>GUARULHOS</text:p>
          </table:table-cell>
          <table:table-cell office:value-type="float" office:value="1.2721857607914" calcext:value-type="float">
            <text:p>1,272186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CV.GARABI 2</text:p>
          </table:table-cell>
          <table:table-cell office:value-type="float" office:value="1.27001497301797" calcext:value-type="float">
            <text:p>1,270015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CV.GARABI 1</text:p>
          </table:table-cell>
          <table:table-cell office:value-type="float" office:value="1.26741364353524" calcext:value-type="float">
            <text:p>1,267414</text:p>
          </table:table-cell>
        </table:table-row>
        <table:table-row table:style-name="ro1">
          <table:table-cell office:value-type="string" calcext:value-type="string">
            <text:p>INTERLAGOS</text:p>
          </table:table-cell>
          <table:table-cell office:value-type="string" calcext:value-type="string">
            <text:p>XAVANTES</text:p>
          </table:table-cell>
          <table:table-cell office:value-type="float" office:value="1.2666111718815" calcext:value-type="float">
            <text:p>1,266611</text:p>
          </table:table-cell>
        </table:table-row>
        <table:table-row table:style-name="ro1">
          <table:table-cell office:value-type="string" calcext:value-type="string">
            <text:p>AGUA VERMELHA</text:p>
          </table:table-cell>
          <table:table-cell office:value-type="string" calcext:value-type="string">
            <text:p>SAO SIMAO-SE</text:p>
          </table:table-cell>
          <table:table-cell office:value-type="float" office:value="1.26619302632699" calcext:value-type="float">
            <text:p>1,266193</text:p>
          </table:table-cell>
        </table:table-row>
        <table:table-row table:style-name="ro1">
          <table:table-cell office:value-type="string" calcext:value-type="string">
            <text:p>ARARAQUARA 2</text:p>
          </table:table-cell>
          <table:table-cell office:value-type="string" calcext:value-type="string">
            <text:p>ARARAQUARA FUR</text:p>
          </table:table-cell>
          <table:table-cell office:value-type="float" office:value="1.26441122672939" calcext:value-type="float">
            <text:p>1,264411</text:p>
          </table:table-cell>
        </table:table-row>
        <table:table-row table:style-name="ro1">
          <table:table-cell office:value-type="string" calcext:value-type="string">
            <text:p>SUAPE II</text:p>
          </table:table-cell>
          <table:table-cell office:value-type="string" calcext:value-type="string">
            <text:p>ANGELIM II</text:p>
          </table:table-cell>
          <table:table-cell office:value-type="float" office:value="1.25766427851591" calcext:value-type="float">
            <text:p>1,257664</text:p>
          </table:table-cell>
        </table:table-row>
        <table:table-row table:style-name="ro1">
          <table:table-cell office:value-type="string" calcext:value-type="string">
            <text:p>P. AFONSO IV_SE</text:p>
          </table:table-cell>
          <table:table-cell office:value-type="string" calcext:value-type="string">
            <text:p>ANGELIM II</text:p>
          </table:table-cell>
          <table:table-cell office:value-type="float" office:value="1.25455989657881" calcext:value-type="float">
            <text:p>1,254560</text:p>
          </table:table-cell>
        </table:table-row>
        <table:table-row table:style-name="ro1">
          <table:table-cell office:value-type="string" calcext:value-type="string">
            <text:p>GUARULHOS</text:p>
          </table:table-cell>
          <table:table-cell office:value-type="string" calcext:value-type="string">
            <text:p>NORTE</text:p>
          </table:table-cell>
          <table:table-cell office:value-type="float" office:value="1.24893401695267" calcext:value-type="float">
            <text:p>1,248934</text:p>
          </table:table-cell>
        </table:table-row>
        <table:table-row table:style-name="ro1">
          <table:table-cell office:value-type="string" calcext:value-type="string">
            <text:p>MESSIAS</text:p>
          </table:table-cell>
          <table:table-cell office:value-type="string" calcext:value-type="string">
            <text:p>USINA XINGO</text:p>
          </table:table-cell>
          <table:table-cell office:value-type="float" office:value="1.2479521657772" calcext:value-type="float">
            <text:p>1,247952</text:p>
          </table:table-cell>
        </table:table-row>
        <table:table-row table:style-name="ro1">
          <table:table-cell office:value-type="string" calcext:value-type="string">
            <text:p>MESSIAS</text:p>
          </table:table-cell>
          <table:table-cell office:value-type="string" calcext:value-type="string">
            <text:p>SUAPE II</text:p>
          </table:table-cell>
          <table:table-cell office:value-type="float" office:value="1.23784755495087" calcext:value-type="float">
            <text:p>1,237848</text:p>
          </table:table-cell>
        </table:table-row>
        <table:table-row table:style-name="ro1">
          <table:table-cell office:value-type="string" calcext:value-type="string">
            <text:p>RECIFE II</text:p>
          </table:table-cell>
          <table:table-cell office:value-type="string" calcext:value-type="string">
            <text:p>SUAPE II</text:p>
          </table:table-cell>
          <table:table-cell office:value-type="float" office:value="1.23770874340438" calcext:value-type="float">
            <text:p>1,237709</text:p>
          </table:table-cell>
        </table:table-row>
        <table:table-row table:style-name="ro1">
          <table:table-cell office:value-type="string" calcext:value-type="string">
            <text:p>FUTURA</text:p>
          </table:table-cell>
          <table:table-cell office:value-type="string" calcext:value-type="string">
            <text:p>JUAZEIRO III</text:p>
          </table:table-cell>
          <table:table-cell office:value-type="float" office:value="1.22657397113672" calcext:value-type="float">
            <text:p>1,226574</text:p>
          </table:table-cell>
        </table:table-row>
        <table:table-row table:style-name="ro1">
          <table:table-cell office:value-type="string" calcext:value-type="string">
            <text:p>CAMACARI II</text:p>
          </table:table-cell>
          <table:table-cell office:value-type="string" calcext:value-type="string">
            <text:p>OLINDINA</text:p>
          </table:table-cell>
          <table:table-cell office:value-type="float" office:value="1.22492064255575" calcext:value-type="float">
            <text:p>1,224921</text:p>
          </table:table-cell>
        </table:table-row>
        <table:table-row table:style-name="ro1">
          <table:table-cell office:value-type="string" calcext:value-type="string">
            <text:p>JEREMOABO</text:p>
          </table:table-cell>
          <table:table-cell office:value-type="string" calcext:value-type="string">
            <text:p>OLINDINA</text:p>
          </table:table-cell>
          <table:table-cell office:value-type="float" office:value="1.21788558258398" calcext:value-type="float">
            <text:p>1,217886</text:p>
          </table:table-cell>
        </table:table-row>
        <table:table-row table:style-name="ro1">
          <table:table-cell office:value-type="string" calcext:value-type="string">
            <text:p>ARARAQUARA 2</text:p>
          </table:table-cell>
          <table:table-cell office:value-type="string" calcext:value-type="string">
            <text:p>ARARAQUARA CTP</text:p>
          </table:table-cell>
          <table:table-cell office:value-type="float" office:value="1.20832372650526" calcext:value-type="float">
            <text:p>1,208324</text:p>
          </table:table-cell>
        </table:table-row>
        <table:table-row table:style-name="ro1">
          <table:table-cell office:value-type="string" calcext:value-type="string">
            <text:p>RIBEIRAOPRETO</text:p>
          </table:table-cell>
          <table:table-cell office:value-type="string" calcext:value-type="string">
            <text:p>POCOS CALDAS</text:p>
          </table:table-cell>
          <table:table-cell office:value-type="float" office:value="1.20088458762653" calcext:value-type="float">
            <text:p>1,200885</text:p>
          </table:table-cell>
        </table:table-row>
        <table:table-row table:style-name="ro1">
          <table:table-cell office:value-type="string" calcext:value-type="string">
            <text:p>MARIMBONDO</text:p>
          </table:table-cell>
          <table:table-cell office:value-type="string" calcext:value-type="string">
            <text:p>MORRO AGUDO</text:p>
          </table:table-cell>
          <table:table-cell office:value-type="float" office:value="1.20002633292873" calcext:value-type="float">
            <text:p>1,200026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CAPIVARA</text:p>
          </table:table-cell>
          <table:table-cell office:value-type="float" office:value="1.19957964913367" calcext:value-type="float">
            <text:p>1,199580</text:p>
          </table:table-cell>
        </table:table-row>
        <table:table-row table:style-name="ro1">
          <table:table-cell office:value-type="string" calcext:value-type="string">
            <text:p>GUARULHOS</text:p>
          </table:table-cell>
          <table:table-cell office:value-type="string" calcext:value-type="string">
            <text:p>IBIUNA</text:p>
          </table:table-cell>
          <table:table-cell office:value-type="float" office:value="1.19679884408434" calcext:value-type="float">
            <text:p>1,196799</text:p>
          </table:table-cell>
        </table:table-row>
        <table:table-row table:style-name="ro1">
          <table:table-cell office:value-type="string" calcext:value-type="string">
            <text:p>CAXIAS</text:p>
          </table:table-cell>
          <table:table-cell office:value-type="string" calcext:value-type="string">
            <text:p>GRAVATAI</text:p>
          </table:table-cell>
          <table:table-cell office:value-type="float" office:value="1.19608237388162" calcext:value-type="float">
            <text:p>1,196082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SUMARE</text:p>
          </table:table-cell>
          <table:table-cell office:value-type="float" office:value="1.19385027279464" calcext:value-type="float">
            <text:p>1,193850</text:p>
          </table:table-cell>
        </table:table-row>
        <table:table-row table:style-name="ro1">
          <table:table-cell office:value-type="string" calcext:value-type="string">
            <text:p>P.DUTRA</text:p>
          </table:table-cell>
          <table:table-cell office:value-type="string" calcext:value-type="string">
            <text:p>S.ANTON LOPES</text:p>
          </table:table-cell>
          <table:table-cell office:value-type="float" office:value="1.19065358372598" calcext:value-type="float">
            <text:p>1,190654</text:p>
          </table:table-cell>
        </table:table-row>
        <table:table-row table:style-name="ro1">
          <table:table-cell office:value-type="string" calcext:value-type="string">
            <text:p>GETULINA</text:p>
          </table:table-cell>
          <table:table-cell office:value-type="string" calcext:value-type="string">
            <text:p>MARECH.RONDON</text:p>
          </table:table-cell>
          <table:table-cell office:value-type="float" office:value="1.18978300518831" calcext:value-type="float">
            <text:p>1,189783</text:p>
          </table:table-cell>
        </table:table-row>
        <table:table-row table:style-name="ro1">
          <table:table-cell office:value-type="string" calcext:value-type="string">
            <text:p>U.SOBRADINHO</text:p>
          </table:table-cell>
          <table:table-cell office:value-type="string" calcext:value-type="string">
            <text:p>FUTURA</text:p>
          </table:table-cell>
          <table:table-cell office:value-type="float" office:value="1.18488499130003" calcext:value-type="float">
            <text:p>1,184885</text:p>
          </table:table-cell>
        </table:table-row>
        <table:table-row table:style-name="ro1">
          <table:table-cell office:value-type="string" calcext:value-type="string">
            <text:p>RIBEIRAOPRETO</text:p>
          </table:table-cell>
          <table:table-cell office:value-type="string" calcext:value-type="string">
            <text:p>MORRO AGUDO</text:p>
          </table:table-cell>
          <table:table-cell office:value-type="float" office:value="1.17943480930934" calcext:value-type="float">
            <text:p>1,179435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MACHADINHO</text:p>
          </table:table-cell>
          <table:table-cell office:value-type="float" office:value="1.17917193199826" calcext:value-type="float">
            <text:p>1,179172</text:p>
          </table:table-cell>
        </table:table-row>
        <table:table-row table:style-name="ro1">
          <table:table-cell office:value-type="string" calcext:value-type="string">
            <text:p>SE LAJEADO</text:p>
          </table:table-cell>
          <table:table-cell office:value-type="string" calcext:value-type="string">
            <text:p>MIRACEMA</text:p>
          </table:table-cell>
          <table:table-cell office:value-type="float" office:value="1.17900980925171" calcext:value-type="float">
            <text:p>1,179010</text:p>
          </table:table-cell>
        </table:table-row>
        <table:table-row table:style-name="ro1">
          <table:table-cell office:value-type="string" calcext:value-type="string">
            <text:p>POCOS CALDAS</text:p>
          </table:table-cell>
          <table:table-cell office:value-type="string" calcext:value-type="string">
            <text:p>ITAJUBA 3</text:p>
          </table:table-cell>
          <table:table-cell office:value-type="float" office:value="1.16343044471528" calcext:value-type="float">
            <text:p>1,163430</text:p>
          </table:table-cell>
        </table:table-row>
        <table:table-row table:style-name="ro1">
          <table:table-cell office:value-type="string" calcext:value-type="string">
            <text:p>ARARAQUARA CTP</text:p>
          </table:table-cell>
          <table:table-cell office:value-type="string" calcext:value-type="string">
            <text:p>MIRASSOL II</text:p>
          </table:table-cell>
          <table:table-cell office:value-type="float" office:value="1.15577064170095" calcext:value-type="float">
            <text:p>1,155771</text:p>
          </table:table-cell>
        </table:table-row>
        <table:table-row table:style-name="ro1">
          <table:table-cell office:value-type="string" calcext:value-type="string">
            <text:p>ANGRA FUR</text:p>
          </table:table-cell>
          <table:table-cell office:value-type="string" calcext:value-type="string">
            <text:p>C. PAULISTA</text:p>
          </table:table-cell>
          <table:table-cell office:value-type="float" office:value="1.15154231090794" calcext:value-type="float">
            <text:p>1,151542</text:p>
          </table:table-cell>
        </table:table-row>
        <table:table-row table:style-name="ro1">
          <table:table-cell office:value-type="string" calcext:value-type="string">
            <text:p>BAURU</text:p>
          </table:table-cell>
          <table:table-cell office:value-type="string" calcext:value-type="string">
            <text:p>GETULINA</text:p>
          </table:table-cell>
          <table:table-cell office:value-type="float" office:value="1.14553036997634" calcext:value-type="float">
            <text:p>1,145530</text:p>
          </table:table-cell>
        </table:table-row>
        <table:table-row table:style-name="ro1">
          <table:table-cell office:value-type="string" calcext:value-type="string">
            <text:p>ANGRA FUR</text:p>
          </table:table-cell>
          <table:table-cell office:value-type="string" calcext:value-type="string">
            <text:p>ZONA OESTE</text:p>
          </table:table-cell>
          <table:table-cell office:value-type="float" office:value="1.14433179647059" calcext:value-type="float">
            <text:p>1,144332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office:value-type="string" calcext:value-type="string">
            <text:p>M. FORNASARO</text:p>
          </table:table-cell>
          <table:table-cell office:value-type="float" office:value="1.1431923962286" calcext:value-type="float">
            <text:p>1,143192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TAQUARUCU</text:p>
          </table:table-cell>
          <table:table-cell office:value-type="float" office:value="1.14047592356821" calcext:value-type="float">
            <text:p>1,140476</text:p>
          </table:table-cell>
        </table:table-row>
        <table:table-row table:style-name="ro1">
          <table:table-cell office:value-type="string" calcext:value-type="string">
            <text:p>P.DUTRA</text:p>
          </table:table-cell>
          <table:table-cell office:value-type="string" calcext:value-type="string">
            <text:p>B. ESPERANCA</text:p>
          </table:table-cell>
          <table:table-cell office:value-type="float" office:value="1.14033073543636" calcext:value-type="float">
            <text:p>1,140331</text:p>
          </table:table-cell>
        </table:table-row>
        <table:table-row table:style-name="ro1">
          <table:table-cell office:value-type="string" calcext:value-type="string">
            <text:p>ILHA SOLTEIRA</text:p>
          </table:table-cell>
          <table:table-cell office:value-type="string" calcext:value-type="string">
            <text:p>TRES IRMAOS</text:p>
          </table:table-cell>
          <table:table-cell office:value-type="float" office:value="1.14002183202399" calcext:value-type="float">
            <text:p>1,140022</text:p>
          </table:table-cell>
        </table:table-row>
        <table:table-row table:style-name="ro1">
          <table:table-cell office:value-type="string" calcext:value-type="string">
            <text:p>GERDAU SP</text:p>
          </table:table-cell>
          <table:table-cell office:value-type="string" calcext:value-type="string">
            <text:p>JANDIRA</text:p>
          </table:table-cell>
          <table:table-cell office:value-type="float" office:value="1.12510588796018" calcext:value-type="float">
            <text:p>1,125106</text:p>
          </table:table-cell>
        </table:table-row>
        <table:table-row table:style-name="ro1">
          <table:table-cell office:value-type="string" calcext:value-type="string">
            <text:p>RIBEIRAOPRETO</text:p>
          </table:table-cell>
          <table:table-cell office:value-type="string" calcext:value-type="string">
            <text:p>SANTA BARBARA</text:p>
          </table:table-cell>
          <table:table-cell office:value-type="float" office:value="1.10476940298861" calcext:value-type="float">
            <text:p>1,104769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MOGI MIRIM 3</text:p>
          </table:table-cell>
          <table:table-cell office:value-type="float" office:value="1.10296606829031" calcext:value-type="float">
            <text:p>1,102966</text:p>
          </table:table-cell>
        </table:table-row>
        <table:table-row table:style-name="ro1">
          <table:table-cell office:value-type="string" calcext:value-type="string">
            <text:p>JUPIA</text:p>
          </table:table-cell>
          <table:table-cell office:value-type="string" calcext:value-type="string">
            <text:p>MARECH.RONDON</text:p>
          </table:table-cell>
          <table:table-cell office:value-type="float" office:value="1.10234175772783" calcext:value-type="float">
            <text:p>1,102342</text:p>
          </table:table-cell>
        </table:table-row>
        <table:table-row table:style-name="ro1">
          <table:table-cell office:value-type="string" calcext:value-type="string">
            <text:p>ILHA SOLTEIRA</text:p>
          </table:table-cell>
          <table:table-cell office:value-type="string" calcext:value-type="string">
            <text:p>MIRASSOL II</text:p>
          </table:table-cell>
          <table:table-cell office:value-type="float" office:value="1.10154762899013" calcext:value-type="float">
            <text:p>1,101548</text:p>
          </table:table-cell>
        </table:table-row>
        <table:table-row table:style-name="ro1">
          <table:table-cell office:value-type="string" calcext:value-type="string">
            <text:p>BRACELL</text:p>
          </table:table-cell>
          <table:table-cell office:value-type="string" calcext:value-type="string">
            <text:p>OESTE</text:p>
          </table:table-cell>
          <table:table-cell office:value-type="float" office:value="1.09784061520332" calcext:value-type="float">
            <text:p>1,097841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REPLAN</text:p>
          </table:table-cell>
          <table:table-cell office:value-type="float" office:value="1.0883712505322" calcext:value-type="float">
            <text:p>1,088371</text:p>
          </table:table-cell>
        </table:table-row>
        <table:table-row table:style-name="ro1">
          <table:table-cell office:value-type="string" calcext:value-type="string">
            <text:p>CABREUVA</text:p>
          </table:table-cell>
          <table:table-cell office:value-type="string" calcext:value-type="string">
            <text:p>BAURU</text:p>
          </table:table-cell>
          <table:table-cell office:value-type="float" office:value="1.08047721237866" calcext:value-type="float">
            <text:p>1,080477</text:p>
          </table:table-cell>
        </table:table-row>
        <table:table-row table:style-name="ro1">
          <table:table-cell office:value-type="string" calcext:value-type="string">
            <text:p>P. PRIMAVERA</text:p>
          </table:table-cell>
          <table:table-cell office:value-type="string" calcext:value-type="string">
            <text:p>TAQUARUCU</text:p>
          </table:table-cell>
          <table:table-cell office:value-type="float" office:value="1.08046206065167" calcext:value-type="float">
            <text:p>1,080462</text:p>
          </table:table-cell>
        </table:table-row>
        <table:table-row table:style-name="ro1">
          <table:table-cell office:value-type="string" calcext:value-type="string">
            <text:p>BAGUACU</text:p>
          </table:table-cell>
          <table:table-cell office:value-type="string" calcext:value-type="string">
            <text:p>ILHA SOLTEIRA</text:p>
          </table:table-cell>
          <table:table-cell office:value-type="float" office:value="1.07994787310911" calcext:value-type="float">
            <text:p>1,079948</text:p>
          </table:table-cell>
        </table:table-row>
        <table:table-row table:style-name="ro1">
          <table:table-cell office:value-type="string" calcext:value-type="string">
            <text:p>BAURU</text:p>
          </table:table-cell>
          <table:table-cell office:value-type="string" calcext:value-type="string">
            <text:p>OESTE</text:p>
          </table:table-cell>
          <table:table-cell office:value-type="float" office:value="1.07783835188027" calcext:value-type="float">
            <text:p>1,077838</text:p>
          </table:table-cell>
        </table:table-row>
        <table:table-row table:style-name="ro1">
          <table:table-cell office:value-type="string" calcext:value-type="string">
            <text:p>BAURU</text:p>
          </table:table-cell>
          <table:table-cell office:value-type="string" calcext:value-type="string">
            <text:p>SALTO</text:p>
          </table:table-cell>
          <table:table-cell office:value-type="float" office:value="1.07532892399908" calcext:value-type="float">
            <text:p>1,075329</text:p>
          </table:table-cell>
        </table:table-row>
        <table:table-row table:style-name="ro1">
          <table:table-cell office:value-type="string" calcext:value-type="string">
            <text:p>ARARAQUARA CTP</text:p>
          </table:table-cell>
          <table:table-cell office:value-type="string" calcext:value-type="string">
            <text:p>PIRACICABA</text:p>
          </table:table-cell>
          <table:table-cell office:value-type="float" office:value="1.06533005947673" calcext:value-type="float">
            <text:p>1,065330</text:p>
          </table:table-cell>
        </table:table-row>
        <table:table-row table:style-name="ro1">
          <table:table-cell office:value-type="string" calcext:value-type="string">
            <text:p>BOM JARDIM</text:p>
          </table:table-cell>
          <table:table-cell office:value-type="string" calcext:value-type="string">
            <text:p>FERNAO DIAS</text:p>
          </table:table-cell>
          <table:table-cell office:value-type="float" office:value="1.06375748531667" calcext:value-type="float">
            <text:p>1,063757</text:p>
          </table:table-cell>
        </table:table-row>
        <table:table-row table:style-name="ro1">
          <table:table-cell office:value-type="string" calcext:value-type="string">
            <text:p>AGUA AZUL</text:p>
          </table:table-cell>
          <table:table-cell office:value-type="string" calcext:value-type="string">
            <text:p>BOM JARDIM</text:p>
          </table:table-cell>
          <table:table-cell office:value-type="float" office:value="1.05986086072935" calcext:value-type="float">
            <text:p>1,059861</text:p>
          </table:table-cell>
        </table:table-row>
        <table:table-row table:style-name="ro1">
          <table:table-cell office:value-type="string" calcext:value-type="string">
            <text:p>SUL</text:p>
          </table:table-cell>
          <table:table-cell office:value-type="string" calcext:value-type="string">
            <text:p>TIJUCO PRETO</text:p>
          </table:table-cell>
          <table:table-cell office:value-type="float" office:value="1.05949605678976" calcext:value-type="float">
            <text:p>1,059496</text:p>
          </table:table-cell>
        </table:table-row>
        <table:table-row table:style-name="ro1">
          <table:table-cell office:value-type="string" calcext:value-type="string">
            <text:p>S.SANTIAGO</text:p>
          </table:table-cell>
          <table:table-cell office:value-type="string" calcext:value-type="string">
            <text:p>SALTO CAXIAS</text:p>
          </table:table-cell>
          <table:table-cell office:value-type="float" office:value="1.05342138598746" calcext:value-type="float">
            <text:p>1,053421</text:p>
          </table:table-cell>
        </table:table-row>
        <table:table-row table:style-name="ro1">
          <table:table-cell office:value-type="string" calcext:value-type="string">
            <text:p>N.P.PRIMAVERA</text:p>
          </table:table-cell>
          <table:table-cell office:value-type="string" calcext:value-type="string">
            <text:p>P. PRIMAVERA</text:p>
          </table:table-cell>
          <table:table-cell office:value-type="float" office:value="1.05249284077452" calcext:value-type="float">
            <text:p>1,052493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SOLVAY</text:p>
          </table:table-cell>
          <table:table-cell office:value-type="float" office:value="1.0522734797621" calcext:value-type="float">
            <text:p>1,052273</text:p>
          </table:table-cell>
        </table:table-row>
        <table:table-row table:style-name="ro1">
          <table:table-cell office:value-type="string" calcext:value-type="string">
            <text:p>ARARAQUARA CTP</text:p>
          </table:table-cell>
          <table:table-cell office:value-type="string" calcext:value-type="string">
            <text:p>ARARAS</text:p>
          </table:table-cell>
          <table:table-cell office:value-type="float" office:value="1.0378444008979" calcext:value-type="float">
            <text:p>1,037844</text:p>
          </table:table-cell>
        </table:table-row>
        <table:table-row table:style-name="ro1">
          <table:table-cell office:value-type="string" calcext:value-type="string">
            <text:p>CABREUVA</text:p>
          </table:table-cell>
          <table:table-cell office:value-type="string" calcext:value-type="string">
            <text:p>GERDAU SP</text:p>
          </table:table-cell>
          <table:table-cell office:value-type="float" office:value="1.03051791428887" calcext:value-type="float">
            <text:p>1,030518</text:p>
          </table:table-cell>
        </table:table-row>
        <table:table-row table:style-name="ro1">
          <table:table-cell office:value-type="string" calcext:value-type="string">
            <text:p>EMBU-GUACU</text:p>
          </table:table-cell>
          <table:table-cell office:value-type="string" calcext:value-type="string">
            <text:p>OESTE</text:p>
          </table:table-cell>
          <table:table-cell office:value-type="float" office:value="1.02889722734105" calcext:value-type="float">
            <text:p>1,028897</text:p>
          </table:table-cell>
        </table:table-row>
        <table:table-row table:style-name="ro1">
          <table:table-cell office:value-type="string" calcext:value-type="string">
            <text:p>ITAPETI</text:p>
          </table:table-cell>
          <table:table-cell office:value-type="string" calcext:value-type="string">
            <text:p>TIJUCO PRETO</text:p>
          </table:table-cell>
          <table:table-cell office:value-type="float" office:value="1.02486051940952" calcext:value-type="float">
            <text:p>1,024861</text:p>
          </table:table-cell>
        </table:table-row>
        <table:table-row table:style-name="ro1">
          <table:table-cell office:value-type="string" calcext:value-type="string">
            <text:p>EMBU-GUACU</text:p>
          </table:table-cell>
          <table:table-cell office:value-type="string" calcext:value-type="string">
            <text:p>CBA2 CIA.B.ALUM</text:p>
          </table:table-cell>
          <table:table-cell office:value-type="float" office:value="1.02303243543851" calcext:value-type="float">
            <text:p>1,023032</text:p>
          </table:table-cell>
        </table:table-row>
        <table:table-row table:style-name="ro1">
          <table:table-cell office:value-type="string" calcext:value-type="string">
            <text:p>LESTE</text:p>
          </table:table-cell>
          <table:table-cell office:value-type="string" calcext:value-type="string">
            <text:p>RAM REBERT F</text:p>
          </table:table-cell>
          <table:table-cell office:value-type="float" office:value="1.01873029852615" calcext:value-type="float">
            <text:p>1,018730</text:p>
          </table:table-cell>
        </table:table-row>
        <table:table-row table:style-name="ro1">
          <table:table-cell office:value-type="string" calcext:value-type="string">
            <text:p>B. SANTISTA</text:p>
          </table:table-cell>
          <table:table-cell office:value-type="string" calcext:value-type="string">
            <text:p>TIJUCO PRETO</text:p>
          </table:table-cell>
          <table:table-cell office:value-type="float" office:value="0.981301455461796" calcext:value-type="float">
            <text:p>0,981301</text:p>
          </table:table-cell>
        </table:table-row>
        <table:table-row table:style-name="ro1">
          <table:table-cell office:value-type="string" calcext:value-type="string">
            <text:p>BETIM 6</text:p>
          </table:table-cell>
          <table:table-cell office:value-type="string" calcext:value-type="string">
            <text:p>SARZEDO</text:p>
          </table:table-cell>
          <table:table-cell office:value-type="float" office:value="0.912161525662546" calcext:value-type="float">
            <text:p>0,912162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FURNAS</text:p>
          </table:table-cell>
          <table:table-cell office:value-type="float" office:value="0.858105841929441" calcext:value-type="float">
            <text:p>0,858106</text:p>
          </table:table-cell>
        </table:table-row>
        <table:table-row table:style-name="ro1">
          <table:table-cell office:value-type="string" calcext:value-type="string">
            <text:p>MONTESCLAROS2</text:p>
          </table:table-cell>
          <table:table-cell office:value-type="string" calcext:value-type="string">
            <text:p>PIRAPORA 2</text:p>
          </table:table-cell>
          <table:table-cell office:value-type="float" office:value="0.855529508750124" calcext:value-type="float">
            <text:p>0,855530</text:p>
          </table:table-cell>
        </table:table-row>
        <table:table-row table:style-name="ro1">
          <table:table-cell office:value-type="string" calcext:value-type="string">
            <text:p>SAO GOTARDO 2</text:p>
          </table:table-cell>
          <table:table-cell office:value-type="string" calcext:value-type="string">
            <text:p>TRES MARIAS-SE</text:p>
          </table:table-cell>
          <table:table-cell office:value-type="float" office:value="0.848142361469893" calcext:value-type="float">
            <text:p>0,848142</text:p>
          </table:table-cell>
        </table:table-row>
        <table:table-row table:style-name="ro1">
          <table:table-cell office:value-type="string" calcext:value-type="string">
            <text:p>DOME.RANGONI</text:p>
          </table:table-cell>
          <table:table-cell office:value-type="string" calcext:value-type="string">
            <text:p>TIJUCO PRETO</text:p>
          </table:table-cell>
          <table:table-cell office:value-type="float" office:value="0.840125286745049" calcext:value-type="float">
            <text:p>0,840125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string" calcext:value-type="string">
            <text:p>LEOPOLDINA2</text:p>
          </table:table-cell>
          <table:table-cell office:value-type="float" office:value="0.836488716945828" calcext:value-type="float">
            <text:p>0,836489</text:p>
          </table:table-cell>
        </table:table-row>
        <table:table-row table:style-name="ro1">
          <table:table-cell office:value-type="string" calcext:value-type="string">
            <text:p>LESTE</text:p>
          </table:table-cell>
          <table:table-cell office:value-type="string" calcext:value-type="string">
            <text:p>TIJUCO PRETO</text:p>
          </table:table-cell>
          <table:table-cell office:value-type="float" office:value="0.836449222732356" calcext:value-type="float">
            <text:p>0,836449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string" calcext:value-type="string">
            <text:p>MACAE MERCHAN</text:p>
          </table:table-cell>
          <table:table-cell office:value-type="float" office:value="0.823911262420112" calcext:value-type="float">
            <text:p>0,823911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L.C.BARRETO</text:p>
          </table:table-cell>
          <table:table-cell office:value-type="float" office:value="0.822089734288089" calcext:value-type="float">
            <text:p>0,822090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M. MORAES</text:p>
          </table:table-cell>
          <table:table-cell office:value-type="float" office:value="0.815162822297762" calcext:value-type="float">
            <text:p>0,815163</text:p>
          </table:table-cell>
        </table:table-row>
        <table:table-row table:style-name="ro1">
          <table:table-cell office:value-type="string" calcext:value-type="string">
            <text:p>ITABIRITO 2</text:p>
          </table:table-cell>
          <table:table-cell office:value-type="string" calcext:value-type="string">
            <text:p>JECEABA</text:p>
          </table:table-cell>
          <table:table-cell office:value-type="float" office:value="0.814884579801449" calcext:value-type="float">
            <text:p>0,814885</text:p>
          </table:table-cell>
        </table:table-row>
        <table:table-row table:style-name="ro1">
          <table:table-cell office:value-type="string" calcext:value-type="string">
            <text:p>P. JUSCELINO</text:p>
          </table:table-cell>
          <table:table-cell office:value-type="string" calcext:value-type="string">
            <text:p>SETE LAGOAS 4</text:p>
          </table:table-cell>
          <table:table-cell office:value-type="float" office:value="0.809077417180763" calcext:value-type="float">
            <text:p>0,809077</text:p>
          </table:table-cell>
        </table:table-row>
        <table:table-row table:style-name="ro1">
          <table:table-cell office:value-type="string" calcext:value-type="string">
            <text:p>TAQUARIL</text:p>
          </table:table-cell>
          <table:table-cell office:value-type="string" calcext:value-type="string">
            <text:p>NEVES 1</text:p>
          </table:table-cell>
          <table:table-cell office:value-type="float" office:value="0.802679216058776" calcext:value-type="float">
            <text:p>0,802679</text:p>
          </table:table-cell>
        </table:table-row>
        <table:table-row table:style-name="ro1">
          <table:table-cell office:value-type="string" calcext:value-type="string">
            <text:p>INTERLAGOS</text:p>
          </table:table-cell>
          <table:table-cell office:value-type="string" calcext:value-type="string">
            <text:p>PIRATININGA 2</text:p>
          </table:table-cell>
          <table:table-cell office:value-type="float" office:value="0.792490785854286" calcext:value-type="float">
            <text:p>0,792491</text:p>
          </table:table-cell>
        </table:table-row>
        <table:table-row table:style-name="ro1">
          <table:table-cell office:value-type="string" calcext:value-type="string">
            <text:p>CURITIBA</text:p>
          </table:table-cell>
          <table:table-cell office:value-type="string" calcext:value-type="string">
            <text:p>UMBARA</text:p>
          </table:table-cell>
          <table:table-cell office:value-type="float" office:value="0.784930745250458" calcext:value-type="float">
            <text:p>0,784931</text:p>
          </table:table-cell>
        </table:table-row>
        <table:table-row table:style-name="ro1">
          <table:table-cell office:value-type="string" calcext:value-type="string">
            <text:p>GERDAU O.BRANCO</text:p>
          </table:table-cell>
          <table:table-cell office:value-type="string" calcext:value-type="string">
            <text:p>ITABIRITO 2</text:p>
          </table:table-cell>
          <table:table-cell office:value-type="float" office:value="0.783018815465561" calcext:value-type="float">
            <text:p>0,783019</text:p>
          </table:table-cell>
        </table:table-row>
        <table:table-row table:style-name="ro1">
          <table:table-cell office:value-type="string" calcext:value-type="string">
            <text:p>ITAPETI</text:p>
          </table:table-cell>
          <table:table-cell office:value-type="string" calcext:value-type="string">
            <text:p>NORDESTE</text:p>
          </table:table-cell>
          <table:table-cell office:value-type="float" office:value="0.780829406543775" calcext:value-type="float">
            <text:p>0,780829</text:p>
          </table:table-cell>
        </table:table-row>
        <table:table-row table:style-name="ro1">
          <table:table-cell office:value-type="string" calcext:value-type="string">
            <text:p>PIRAPORA 2</text:p>
          </table:table-cell>
          <table:table-cell office:value-type="string" calcext:value-type="string">
            <text:p>VARZEA PALMA 4</text:p>
          </table:table-cell>
          <table:table-cell office:value-type="float" office:value="0.76999755469528" calcext:value-type="float">
            <text:p>0,769998</text:p>
          </table:table-cell>
        </table:table-row>
        <table:table-row table:style-name="ro1">
          <table:table-cell office:value-type="string" calcext:value-type="string">
            <text:p>NOVA PONTE</text:p>
          </table:table-cell>
          <table:table-cell office:value-type="string" calcext:value-type="string">
            <text:p>ARAXA 3</text:p>
          </table:table-cell>
          <table:table-cell office:value-type="float" office:value="0.763513854188706" calcext:value-type="float">
            <text:p>0,763514</text:p>
          </table:table-cell>
        </table:table-row>
        <table:table-row table:style-name="ro1">
          <table:table-cell office:value-type="string" calcext:value-type="string">
            <text:p>VIANA</text:p>
          </table:table-cell>
          <table:table-cell office:value-type="string" calcext:value-type="string">
            <text:p>VIANA 2</text:p>
          </table:table-cell>
          <table:table-cell office:value-type="float" office:value="0.758797451821491" calcext:value-type="float">
            <text:p>0,758797</text:p>
          </table:table-cell>
        </table:table-row>
        <table:table-row table:style-name="ro1">
          <table:table-cell office:value-type="string" calcext:value-type="string">
            <text:p>ITUTINGA</text:p>
          </table:table-cell>
          <table:table-cell office:value-type="string" calcext:value-type="string">
            <text:p>JECEABA</text:p>
          </table:table-cell>
          <table:table-cell office:value-type="float" office:value="0.749548342304729" calcext:value-type="float">
            <text:p>0,749548</text:p>
          </table:table-cell>
        </table:table-row>
        <table:table-row table:style-name="ro1">
          <table:table-cell office:value-type="string" calcext:value-type="string">
            <text:p>NOVA PONTE</text:p>
          </table:table-cell>
          <table:table-cell office:value-type="string" calcext:value-type="string">
            <text:p>UBERLANDIA 10</text:p>
          </table:table-cell>
          <table:table-cell office:value-type="float" office:value="0.743627161352508" calcext:value-type="float">
            <text:p>0,743627</text:p>
          </table:table-cell>
        </table:table-row>
        <table:table-row table:style-name="ro1">
          <table:table-cell office:value-type="string" calcext:value-type="string">
            <text:p>ITUMBIARA</text:p>
          </table:table-cell>
          <table:table-cell office:value-type="string" calcext:value-type="string">
            <text:p>BANDEIRANTES</text:p>
          </table:table-cell>
          <table:table-cell office:value-type="float" office:value="0.740098192433419" calcext:value-type="float">
            <text:p>0,740098</text:p>
          </table:table-cell>
        </table:table-row>
        <table:table-row table:style-name="ro1">
          <table:table-cell office:value-type="string" calcext:value-type="string">
            <text:p>ITUTINGA</text:p>
          </table:table-cell>
          <table:table-cell office:value-type="string" calcext:value-type="string">
            <text:p>JUIZ DE FORA1</text:p>
          </table:table-cell>
          <table:table-cell office:value-type="float" office:value="0.735552410592539" calcext:value-type="float">
            <text:p>0,735552</text:p>
          </table:table-cell>
        </table:table-row>
        <table:table-row table:style-name="ro1">
          <table:table-cell office:value-type="string" calcext:value-type="string">
            <text:p>SANT.DUMONT 2</text:p>
          </table:table-cell>
          <table:table-cell office:value-type="string" calcext:value-type="string">
            <text:p>LEOPOLDINA2</text:p>
          </table:table-cell>
          <table:table-cell office:value-type="float" office:value="0.730897121019593" calcext:value-type="float">
            <text:p>0,730897</text:p>
          </table:table-cell>
        </table:table-row>
        <table:table-row table:style-name="ro1">
          <table:table-cell office:value-type="string" calcext:value-type="string">
            <text:p>ATIBAIA II</text:p>
          </table:table-cell>
          <table:table-cell office:value-type="string" calcext:value-type="string">
            <text:p>POCOS CALDAS</text:p>
          </table:table-cell>
          <table:table-cell office:value-type="float" office:value="0.726141070210951" calcext:value-type="float">
            <text:p>0,726141</text:p>
          </table:table-cell>
        </table:table-row>
        <table:table-row table:style-name="ro1">
          <table:table-cell office:value-type="string" calcext:value-type="string">
            <text:p>BARBACENA 2</text:p>
          </table:table-cell>
          <table:table-cell office:value-type="string" calcext:value-type="string">
            <text:p>SANT.DUMONT 2</text:p>
          </table:table-cell>
          <table:table-cell office:value-type="float" office:value="0.722970420432675" calcext:value-type="float">
            <text:p>0,722970</text:p>
          </table:table-cell>
        </table:table-row>
        <table:table-row table:style-name="ro1">
          <table:table-cell office:value-type="string" calcext:value-type="string">
            <text:p>ALTAMIRA</text:p>
          </table:table-cell>
          <table:table-cell office:value-type="string" calcext:value-type="string">
            <text:p>XINGU</text:p>
          </table:table-cell>
          <table:table-cell office:value-type="float" office:value="0.714057026964796" calcext:value-type="float">
            <text:p>0,714057</text:p>
          </table:table-cell>
        </table:table-row>
        <table:table-row table:style-name="ro1">
          <table:table-cell office:value-type="string" calcext:value-type="string">
            <text:p>IRAPE-SE</text:p>
          </table:table-cell>
          <table:table-cell office:value-type="string" calcext:value-type="string">
            <text:p>MONTESCLAROS2</text:p>
          </table:table-cell>
          <table:table-cell office:value-type="float" office:value="0.711366844551571" calcext:value-type="float">
            <text:p>0,711367</text:p>
          </table:table-cell>
        </table:table-row>
        <table:table-row table:style-name="ro1">
          <table:table-cell office:value-type="string" calcext:value-type="string">
            <text:p>COMPERJ</text:p>
          </table:table-cell>
          <table:table-cell office:value-type="string" calcext:value-type="string">
            <text:p>LAGOS</text:p>
          </table:table-cell>
          <table:table-cell office:value-type="float" office:value="0.709441065838659" calcext:value-type="float">
            <text:p>0,709441</text:p>
          </table:table-cell>
        </table:table-row>
        <table:table-row table:style-name="ro1">
          <table:table-cell office:value-type="string" calcext:value-type="string">
            <text:p>ADRIANOPOLIS</text:p>
          </table:table-cell>
          <table:table-cell office:value-type="string" calcext:value-type="string">
            <text:p>VENDA PEDRAS</text:p>
          </table:table-cell>
          <table:table-cell office:value-type="float" office:value="0.70802661586413" calcext:value-type="float">
            <text:p>0,708027</text:p>
          </table:table-cell>
        </table:table-row>
        <table:table-row table:style-name="ro1">
          <table:table-cell office:value-type="string" calcext:value-type="string">
            <text:p>BARRO BRANCO</text:p>
          </table:table-cell>
          <table:table-cell office:value-type="string" calcext:value-type="string">
            <text:p>GERDAU O.BRANCO</text:p>
          </table:table-cell>
          <table:table-cell office:value-type="float" office:value="0.70787371389826" calcext:value-type="float">
            <text:p>0,707874</text:p>
          </table:table-cell>
        </table:table-row>
        <table:table-row table:style-name="ro1">
          <table:table-cell office:value-type="string" calcext:value-type="string">
            <text:p>TRES MARIAS-SE</text:p>
          </table:table-cell>
          <table:table-cell office:value-type="string" calcext:value-type="string">
            <text:p>VARZEA PALMA1</text:p>
          </table:table-cell>
          <table:table-cell office:value-type="float" office:value="0.707060201263003" calcext:value-type="float">
            <text:p>0,707060</text:p>
          </table:table-cell>
        </table:table-row>
        <table:table-row table:style-name="ro1">
          <table:table-cell office:value-type="string" calcext:value-type="string">
            <text:p>CAMPOS</text:p>
          </table:table-cell>
          <table:table-cell office:value-type="string" calcext:value-type="string">
            <text:p>MACAE MERCHAN</text:p>
          </table:table-cell>
          <table:table-cell office:value-type="float" office:value="0.706473774729885" calcext:value-type="float">
            <text:p>0,706474</text:p>
          </table:table-cell>
        </table:table-row>
        <table:table-row table:style-name="ro1">
          <table:table-cell office:value-type="string" calcext:value-type="string">
            <text:p>BETIM 6</text:p>
          </table:table-cell>
          <table:table-cell office:value-type="string" calcext:value-type="string">
            <text:p>SETE LAGOAS 4</text:p>
          </table:table-cell>
          <table:table-cell office:value-type="float" office:value="0.705834138818534" calcext:value-type="float">
            <text:p>0,705834</text:p>
          </table:table-cell>
        </table:table-row>
        <table:table-row table:style-name="ro1">
          <table:table-cell office:value-type="string" calcext:value-type="string">
            <text:p>PIRINEUS</text:p>
          </table:table-cell>
          <table:table-cell office:value-type="string" calcext:value-type="string">
            <text:p>SAMAMBAIA</text:p>
          </table:table-cell>
          <table:table-cell office:value-type="float" office:value="0.700918065698422" calcext:value-type="float">
            <text:p>0,700918</text:p>
          </table:table-cell>
        </table:table-row>
        <table:table-row table:style-name="ro1">
          <table:table-cell office:value-type="string" calcext:value-type="string">
            <text:p>FURNAS</text:p>
          </table:table-cell>
          <table:table-cell office:value-type="string" calcext:value-type="string">
            <text:p>PIMENTA</text:p>
          </table:table-cell>
          <table:table-cell office:value-type="float" office:value="0.698748992715312" calcext:value-type="float">
            <text:p>0,698749</text:p>
          </table:table-cell>
        </table:table-row>
        <table:table-row table:style-name="ro1">
          <table:table-cell office:value-type="string" calcext:value-type="string">
            <text:p>ITUMBIARA</text:p>
          </table:table-cell>
          <table:table-cell office:value-type="string" calcext:value-type="string">
            <text:p>CORUMBA</text:p>
          </table:table-cell>
          <table:table-cell office:value-type="float" office:value="0.698201186707919" calcext:value-type="float">
            <text:p>0,698201</text:p>
          </table:table-cell>
        </table:table-row>
        <table:table-row table:style-name="ro1">
          <table:table-cell office:value-type="string" calcext:value-type="string">
            <text:p>BAR.COQUEIROS</text:p>
          </table:table-cell>
          <table:table-cell office:value-type="string" calcext:value-type="string">
            <text:p>ITAGUACU</text:p>
          </table:table-cell>
          <table:table-cell office:value-type="float" office:value="0.694766736745832" calcext:value-type="float">
            <text:p>0,694767</text:p>
          </table:table-cell>
        </table:table-row>
        <table:table-row table:style-name="ro1">
          <table:table-cell office:value-type="string" calcext:value-type="string">
            <text:p>OURO PRETO 2</text:p>
          </table:table-cell>
          <table:table-cell office:value-type="string" calcext:value-type="string">
            <text:p>NOVA LIMA 6</text:p>
          </table:table-cell>
          <table:table-cell office:value-type="float" office:value="0.692574669313365" calcext:value-type="float">
            <text:p>0,692575</text:p>
          </table:table-cell>
        </table:table-row>
        <table:table-row table:style-name="ro1">
          <table:table-cell office:value-type="string" calcext:value-type="string">
            <text:p>ITUMBIARA</text:p>
          </table:table-cell>
          <table:table-cell office:value-type="string" calcext:value-type="string">
            <text:p>MONTE ALEGRE2</text:p>
          </table:table-cell>
          <table:table-cell office:value-type="float" office:value="0.688862752394444" calcext:value-type="float">
            <text:p>0,688863</text:p>
          </table:table-cell>
        </table:table-row>
        <table:table-row table:style-name="ro1">
          <table:table-cell office:value-type="string" calcext:value-type="string">
            <text:p>BRAS. SUL</text:p>
          </table:table-cell>
          <table:table-cell office:value-type="string" calcext:value-type="string">
            <text:p>SAMAMBAIA</text:p>
          </table:table-cell>
          <table:table-cell office:value-type="float" office:value="0.684554840478123" calcext:value-type="float">
            <text:p>0,684555</text:p>
          </table:table-cell>
        </table:table-row>
        <table:table-row table:style-name="ro1">
          <table:table-cell office:value-type="string" calcext:value-type="string">
            <text:p>JACAREPAGUA</text:p>
          </table:table-cell>
          <table:table-cell office:value-type="string" calcext:value-type="string">
            <text:p>NOVA IGUACU</text:p>
          </table:table-cell>
          <table:table-cell office:value-type="float" office:value="0.682958786652185" calcext:value-type="float">
            <text:p>0,682959</text:p>
          </table:table-cell>
        </table:table-row>
        <table:table-row table:style-name="ro1">
          <table:table-cell office:value-type="string" calcext:value-type="string">
            <text:p>JAGUARA-345</text:p>
          </table:table-cell>
          <table:table-cell office:value-type="string" calcext:value-type="string">
            <text:p>L.C.BARRETO</text:p>
          </table:table-cell>
          <table:table-cell office:value-type="float" office:value="0.678277145560366" calcext:value-type="float">
            <text:p>0,678277</text:p>
          </table:table-cell>
        </table:table-row>
        <table:table-row table:style-name="ro1">
          <table:table-cell office:value-type="string" calcext:value-type="string">
            <text:p>JUAZEIRO II</text:p>
          </table:table-cell>
          <table:table-cell office:value-type="string" calcext:value-type="string">
            <text:p>JUAZEIRO III</text:p>
          </table:table-cell>
          <table:table-cell office:value-type="float" office:value="0.675019338589853" calcext:value-type="float">
            <text:p>0,675019</text:p>
          </table:table-cell>
        </table:table-row>
        <table:table-row table:style-name="ro1">
          <table:table-cell office:value-type="string" calcext:value-type="string">
            <text:p>PADRE FIALHO</text:p>
          </table:table-cell>
          <table:table-cell office:value-type="string" calcext:value-type="string">
            <text:p>VITORIA</text:p>
          </table:table-cell>
          <table:table-cell office:value-type="float" office:value="0.673197615145871" calcext:value-type="float">
            <text:p>0,673198</text:p>
          </table:table-cell>
        </table:table-row>
        <table:table-row table:style-name="ro1">
          <table:table-cell office:value-type="string" calcext:value-type="string">
            <text:p>JAURU</text:p>
          </table:table-cell>
          <table:table-cell office:value-type="string" calcext:value-type="string">
            <text:p>VILHENA</text:p>
          </table:table-cell>
          <table:table-cell office:value-type="float" office:value="0.670672780806" calcext:value-type="float">
            <text:p>0,670673</text:p>
          </table:table-cell>
        </table:table-row>
        <table:table-row table:style-name="ro1">
          <table:table-cell office:value-type="string" calcext:value-type="string">
            <text:p>CARAJAS</text:p>
          </table:table-cell>
          <table:table-cell office:value-type="string" calcext:value-type="string">
            <text:p>ITACAIUNAS</text:p>
          </table:table-cell>
          <table:table-cell office:value-type="float" office:value="0.668427813017047" calcext:value-type="float">
            <text:p>0,668428</text:p>
          </table:table-cell>
        </table:table-row>
        <table:table-row table:style-name="ro1">
          <table:table-cell office:value-type="string" calcext:value-type="string">
            <text:p>JORG.TEIXEIRA</text:p>
          </table:table-cell>
          <table:table-cell office:value-type="string" calcext:value-type="string">
            <text:p>LECHUGA</text:p>
          </table:table-cell>
          <table:table-cell office:value-type="float" office:value="0.664488050280051" calcext:value-type="float">
            <text:p>0,664488</text:p>
          </table:table-cell>
        </table:table-row>
        <table:table-row table:style-name="ro1">
          <table:table-cell office:value-type="string" calcext:value-type="string">
            <text:p>JAURU</text:p>
          </table:table-cell>
          <table:table-cell office:value-type="string" calcext:value-type="string">
            <text:p>VARZ.GRANDE 2</text:p>
          </table:table-cell>
          <table:table-cell office:value-type="float" office:value="0.664393333838411" calcext:value-type="float">
            <text:p>0,664393</text:p>
          </table:table-cell>
        </table:table-row>
        <table:table-row table:style-name="ro1">
          <table:table-cell office:value-type="string" calcext:value-type="string">
            <text:p>RIO NOVO SUL</text:p>
          </table:table-cell>
          <table:table-cell office:value-type="string" calcext:value-type="string">
            <text:p>VITORIA</text:p>
          </table:table-cell>
          <table:table-cell office:value-type="float" office:value="0.658598497205163" calcext:value-type="float">
            <text:p>0,658598</text:p>
          </table:table-cell>
        </table:table-row>
        <table:table-row table:style-name="ro1">
          <table:table-cell office:value-type="string" calcext:value-type="string">
            <text:p>JATAI</text:p>
          </table:table-cell>
          <table:table-cell office:value-type="string" calcext:value-type="string">
            <text:p>R.VERDE NORTE</text:p>
          </table:table-cell>
          <table:table-cell office:value-type="float" office:value="0.657032018060492" calcext:value-type="float">
            <text:p>0,657032</text:p>
          </table:table-cell>
        </table:table-row>
        <table:table-row table:style-name="ro1">
          <table:table-cell office:value-type="string" calcext:value-type="string">
            <text:p>FURNAS</text:p>
          </table:table-cell>
          <table:table-cell office:value-type="string" calcext:value-type="string">
            <text:p>VARGINHA 4</text:p>
          </table:table-cell>
          <table:table-cell office:value-type="float" office:value="0.65319076833621" calcext:value-type="float">
            <text:p>0,653191</text:p>
          </table:table-cell>
        </table:table-row>
        <table:table-row table:style-name="ro1">
          <table:table-cell office:value-type="string" calcext:value-type="string">
            <text:p>MONTE ALEGRE2</text:p>
          </table:table-cell>
          <table:table-cell office:value-type="string" calcext:value-type="string">
            <text:p>P. COLOMBIA</text:p>
          </table:table-cell>
          <table:table-cell office:value-type="float" office:value="0.651942838728788" calcext:value-type="float">
            <text:p>0,651943</text:p>
          </table:table-cell>
        </table:table-row>
        <table:table-row table:style-name="ro1">
          <table:table-cell office:value-type="string" calcext:value-type="string">
            <text:p>BLUMENAU</text:p>
          </table:table-cell>
          <table:table-cell office:value-type="string" calcext:value-type="string">
            <text:p>JARAGUA DO SUL</text:p>
          </table:table-cell>
          <table:table-cell office:value-type="float" office:value="0.64527532089074" calcext:value-type="float">
            <text:p>0,645275</text:p>
          </table:table-cell>
        </table:table-row>
        <table:table-row table:style-name="ro1">
          <table:table-cell office:value-type="string" calcext:value-type="string">
            <text:p>DIANOPOLIS II</text:p>
          </table:table-cell>
          <table:table-cell office:value-type="string" calcext:value-type="string">
            <text:p>GURUPI</text:p>
          </table:table-cell>
          <table:table-cell office:value-type="float" office:value="0.640941542297227" calcext:value-type="float">
            <text:p>0,640942</text:p>
          </table:table-cell>
        </table:table-row>
        <table:table-row table:style-name="ro1">
          <table:table-cell office:value-type="string" calcext:value-type="string">
            <text:p>JAGUARA-345</text:p>
          </table:table-cell>
          <table:table-cell office:value-type="string" calcext:value-type="string">
            <text:p>VOLTA GRANDE-SE</text:p>
          </table:table-cell>
          <table:table-cell office:value-type="float" office:value="0.640867016156629" calcext:value-type="float">
            <text:p>0,640867</text:p>
          </table:table-cell>
        </table:table-row>
        <table:table-row table:style-name="ro1">
          <table:table-cell office:value-type="string" calcext:value-type="string">
            <text:p>N.P.PRIMAVERA</text:p>
          </table:table-cell>
          <table:table-cell office:value-type="string" calcext:value-type="string">
            <text:p>RIO BRILHANTE</text:p>
          </table:table-cell>
          <table:table-cell office:value-type="float" office:value="0.638434809665894" calcext:value-type="float">
            <text:p>0,638435</text:p>
          </table:table-cell>
        </table:table-row>
        <table:table-row table:style-name="ro1">
          <table:table-cell office:value-type="string" calcext:value-type="string">
            <text:p>B.JESUS LAPA</text:p>
          </table:table-cell>
          <table:table-cell office:value-type="string" calcext:value-type="string">
            <text:p>BOM.JES.LAPA II</text:p>
          </table:table-cell>
          <table:table-cell office:value-type="float" office:value="0.630643399239596" calcext:value-type="float">
            <text:p>0,630643</text:p>
          </table:table-cell>
        </table:table-row>
        <table:table-row table:style-name="ro1">
          <table:table-cell office:value-type="string" calcext:value-type="string">
            <text:p>ITAPETI</text:p>
          </table:table-cell>
          <table:table-cell office:value-type="string" calcext:value-type="string">
            <text:p>MOGI CRUZES</text:p>
          </table:table-cell>
          <table:table-cell office:value-type="float" office:value="0.626524243291148" calcext:value-type="float">
            <text:p>0,626524</text:p>
          </table:table-cell>
        </table:table-row>
        <table:table-row table:style-name="ro1">
          <table:table-cell office:value-type="string" calcext:value-type="string">
            <text:p>IL.SOLTEIRA 2</text:p>
          </table:table-cell>
          <table:table-cell office:value-type="string" calcext:value-type="string">
            <text:p>INOCENCIA</text:p>
          </table:table-cell>
          <table:table-cell office:value-type="float" office:value="0.626145717816116" calcext:value-type="float">
            <text:p>0,626146</text:p>
          </table:table-cell>
        </table:table-row>
        <table:table-row table:style-name="ro1">
          <table:table-cell office:value-type="string" calcext:value-type="string">
            <text:p>CASTANHAL</text:p>
          </table:table-cell>
          <table:table-cell office:value-type="string" calcext:value-type="string">
            <text:p>MARITUBA</text:p>
          </table:table-cell>
          <table:table-cell office:value-type="float" office:value="0.619481672476555" calcext:value-type="float">
            <text:p>0,619482</text:p>
          </table:table-cell>
        </table:table-row>
        <table:table-row table:style-name="ro1">
          <table:table-cell office:value-type="string" calcext:value-type="string">
            <text:p>P. AFONSO IV_SE</text:p>
          </table:table-cell>
          <table:table-cell office:value-type="string" calcext:value-type="string">
            <text:p>P.AFONSO III</text:p>
          </table:table-cell>
          <table:table-cell office:value-type="float" office:value="0.619101941726801" calcext:value-type="float">
            <text:p>0,619102</text:p>
          </table:table-cell>
        </table:table-row>
        <table:table-row table:style-name="ro1">
          <table:table-cell office:value-type="string" calcext:value-type="string">
            <text:p>BOM.JES.LAPA II</text:p>
          </table:table-cell>
          <table:table-cell office:value-type="string" calcext:value-type="string">
            <text:p>IGAPORA II</text:p>
          </table:table-cell>
          <table:table-cell office:value-type="float" office:value="0.618612856132995" calcext:value-type="float">
            <text:p>0,618613</text:p>
          </table:table-cell>
        </table:table-row>
        <table:table-row table:style-name="ro1">
          <table:table-cell office:value-type="string" calcext:value-type="string">
            <text:p>GV DO BRASIL</text:p>
          </table:table-cell>
          <table:table-cell office:value-type="string" calcext:value-type="string">
            <text:p>TAUBATE</text:p>
          </table:table-cell>
          <table:table-cell office:value-type="float" office:value="0.616514626477513" calcext:value-type="float">
            <text:p>0,616515</text:p>
          </table:table-cell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SANTA CABECA</text:p>
          </table:table-cell>
          <table:table-cell office:value-type="float" office:value="0.615431036385187" calcext:value-type="float">
            <text:p>0,615431</text:p>
          </table:table-cell>
        </table:table-row>
        <table:table-row table:style-name="ro1">
          <table:table-cell office:value-type="string" calcext:value-type="string">
            <text:p>GUAIBA 2</text:p>
          </table:table-cell>
          <table:table-cell office:value-type="string" calcext:value-type="string">
            <text:p>GUAIBA 3</text:p>
          </table:table-cell>
          <table:table-cell office:value-type="float" office:value="0.611827031922118" calcext:value-type="float">
            <text:p>0,611827</text:p>
          </table:table-cell>
        </table:table-row>
        <table:table-row table:style-name="ro1">
          <table:table-cell office:value-type="string" calcext:value-type="string">
            <text:p>BARRA GRANDE</text:p>
          </table:table-cell>
          <table:table-cell office:value-type="string" calcext:value-type="string">
            <text:p>C.NOVOS</text:p>
          </table:table-cell>
          <table:table-cell office:value-type="float" office:value="0.610967958249522" calcext:value-type="float">
            <text:p>0,610968</text:p>
          </table:table-cell>
        </table:table-row>
        <table:table-row table:style-name="ro1">
          <table:table-cell office:value-type="string" calcext:value-type="string">
            <text:p>S.DA MESA</text:p>
          </table:table-cell>
          <table:table-cell office:value-type="string" calcext:value-type="string">
            <text:p>NIQUELANDIA</text:p>
          </table:table-cell>
          <table:table-cell office:value-type="float" office:value="0.609959764326798" calcext:value-type="float">
            <text:p>0,609960</text:p>
          </table:table-cell>
        </table:table-row>
        <table:table-row table:style-name="ro1">
          <table:table-cell office:value-type="string" calcext:value-type="string">
            <text:p>PAU FERRO</text:p>
          </table:table-cell>
          <table:table-cell office:value-type="string" calcext:value-type="string">
            <text:p>SANTA RITA II</text:p>
          </table:table-cell>
          <table:table-cell office:value-type="float" office:value="0.604693523256773" calcext:value-type="float">
            <text:p>0,604694</text:p>
          </table:table-cell>
        </table:table-row>
        <table:table-row table:style-name="ro1">
          <table:table-cell office:value-type="string" calcext:value-type="string">
            <text:p>IVINHEMA 2</text:p>
          </table:table-cell>
          <table:table-cell office:value-type="string" calcext:value-type="string">
            <text:p>N.P.PRIMAVERA</text:p>
          </table:table-cell>
          <table:table-cell office:value-type="float" office:value="0.603215403415165" calcext:value-type="float">
            <text:p>0,603215</text:p>
          </table:table-cell>
        </table:table-row>
        <table:table-row table:style-name="ro1">
          <table:table-cell office:value-type="string" calcext:value-type="string">
            <text:p>CHARQUEADAS3</text:p>
          </table:table-cell>
          <table:table-cell office:value-type="string" calcext:value-type="string">
            <text:p>GUAIBA 3</text:p>
          </table:table-cell>
          <table:table-cell office:value-type="float" office:value="0.600363450168732" calcext:value-type="float">
            <text:p>0,600363</text:p>
          </table:table-cell>
        </table:table-row>
        <table:table-row table:style-name="ro1">
          <table:table-cell office:value-type="string" calcext:value-type="string">
            <text:p>JAURU</text:p>
          </table:table-cell>
          <table:table-cell office:value-type="string" calcext:value-type="string">
            <text:p>JUBA</text:p>
          </table:table-cell>
          <table:table-cell office:value-type="float" office:value="0.598419365761458" calcext:value-type="float">
            <text:p>0,598419</text:p>
          </table:table-cell>
        </table:table-row>
        <table:table-row table:style-name="ro1">
          <table:table-cell office:value-type="string" calcext:value-type="string">
            <text:p>CAMAQUA 3</text:p>
          </table:table-cell>
          <table:table-cell office:value-type="string" calcext:value-type="string">
            <text:p>POVO NOVO</text:p>
          </table:table-cell>
          <table:table-cell office:value-type="float" office:value="0.597005415669681" calcext:value-type="float">
            <text:p>0,597005</text:p>
          </table:table-cell>
        </table:table-row>
        <table:table-row table:style-name="ro1">
          <table:table-cell office:value-type="string" calcext:value-type="string">
            <text:p>CEARA MIRIM 2</text:p>
          </table:table-cell>
          <table:table-cell office:value-type="string" calcext:value-type="string">
            <text:p>TOUROS</text:p>
          </table:table-cell>
          <table:table-cell office:value-type="float" office:value="0.59310965556198" calcext:value-type="float">
            <text:p>0,593110</text:p>
          </table:table-cell>
        </table:table-row>
        <table:table-row table:style-name="ro1">
          <table:table-cell office:value-type="string" calcext:value-type="string">
            <text:p>S.JOSE CAMPOS</text:p>
          </table:table-cell>
          <table:table-cell office:value-type="string" calcext:value-type="string">
            <text:p>TAUBATE</text:p>
          </table:table-cell>
          <table:table-cell office:value-type="float" office:value="0.592909796629487" calcext:value-type="float">
            <text:p>0,592910</text:p>
          </table:table-cell>
        </table:table-row>
        <table:table-row table:style-name="ro1">
          <table:table-cell office:value-type="string" calcext:value-type="string">
            <text:p>IGAPORA III</text:p>
          </table:table-cell>
          <table:table-cell office:value-type="string" calcext:value-type="string">
            <text:p>PINDAI II</text:p>
          </table:table-cell>
          <table:table-cell office:value-type="float" office:value="0.5838623206063" calcext:value-type="float">
            <text:p>0,583862</text:p>
          </table:table-cell>
        </table:table-row>
        <table:table-row table:style-name="ro1">
          <table:table-cell office:value-type="string" calcext:value-type="string">
            <text:p>POCOES II</text:p>
          </table:table-cell>
          <table:table-cell office:value-type="string" calcext:value-type="string">
            <text:p>POCOES III</text:p>
          </table:table-cell>
          <table:table-cell office:value-type="float" office:value="0.581399900443678" calcext:value-type="float">
            <text:p>0,581400</text:p>
          </table:table-cell>
        </table:table-row>
        <table:table-row table:style-name="ro1">
          <table:table-cell office:value-type="string" calcext:value-type="string">
            <text:p>NOBRES</text:p>
          </table:table-cell>
          <table:table-cell office:value-type="string" calcext:value-type="string">
            <text:p>SE CUIABA</text:p>
          </table:table-cell>
          <table:table-cell office:value-type="float" office:value="0.581255658054967" calcext:value-type="float">
            <text:p>0,581256</text:p>
          </table:table-cell>
        </table:table-row>
        <table:table-row table:style-name="ro1">
          <table:table-cell office:value-type="string" calcext:value-type="string">
            <text:p>IBIAPINA II</text:p>
          </table:table-cell>
          <table:table-cell office:value-type="string" calcext:value-type="string">
            <text:p>TIANGUA II</text:p>
          </table:table-cell>
          <table:table-cell office:value-type="float" office:value="0.58049857062601" calcext:value-type="float">
            <text:p>0,580499</text:p>
          </table:table-cell>
        </table:table-row>
        <table:table-row table:style-name="ro1">
          <table:table-cell office:value-type="string" calcext:value-type="string">
            <text:p>RIO VERDE FUR</text:p>
          </table:table-cell>
          <table:table-cell office:value-type="string" calcext:value-type="string">
            <text:p>ITUMBIARA</text:p>
          </table:table-cell>
          <table:table-cell office:value-type="float" office:value="0.579701251523225" calcext:value-type="float">
            <text:p>0,579701</text:p>
          </table:table-cell>
        </table:table-row>
        <table:table-row table:style-name="ro1">
          <table:table-cell office:value-type="string" calcext:value-type="string">
            <text:p>BARREIRAS</text:p>
          </table:table-cell>
          <table:table-cell office:value-type="string" calcext:value-type="string">
            <text:p>BARREIRAS II</text:p>
          </table:table-cell>
          <table:table-cell office:value-type="float" office:value="0.578411515384327" calcext:value-type="float">
            <text:p>0,578412</text:p>
          </table:table-cell>
        </table:table-row>
        <table:table-row table:style-name="ro1">
          <table:table-cell office:value-type="string" calcext:value-type="string">
            <text:p>CAMPO GRANDE2</text:p>
          </table:table-cell>
          <table:table-cell office:value-type="string" calcext:value-type="string">
            <text:p>PARAISO 2</text:p>
          </table:table-cell>
          <table:table-cell office:value-type="float" office:value="0.578378327866851" calcext:value-type="float">
            <text:p>0,578378</text:p>
          </table:table-cell>
        </table:table-row>
        <table:table-row table:style-name="ro1">
          <table:table-cell office:value-type="string" calcext:value-type="string">
            <text:p>C.GRANDE III</text:p>
          </table:table-cell>
          <table:table-cell office:value-type="string" calcext:value-type="string">
            <text:p>EXTREMOZ II</text:p>
          </table:table-cell>
          <table:table-cell office:value-type="float" office:value="0.577938255176993" calcext:value-type="float">
            <text:p>0,577938</text:p>
          </table:table-cell>
        </table:table-row>
        <table:table-row table:style-name="ro1">
          <table:table-cell office:value-type="string" calcext:value-type="string">
            <text:p>BARREIRO 1</text:p>
          </table:table-cell>
          <table:table-cell office:value-type="string" calcext:value-type="string">
            <text:p>SARZEDO</text:p>
          </table:table-cell>
          <table:table-cell office:value-type="float" office:value="0.575452133907693" calcext:value-type="float">
            <text:p>0,575452</text:p>
          </table:table-cell>
        </table:table-row>
        <table:table-row table:style-name="ro1">
          <table:table-cell office:value-type="string" calcext:value-type="string">
            <text:p>ANASTACIO</text:p>
          </table:table-cell>
          <table:table-cell office:value-type="string" calcext:value-type="string">
            <text:p>CORUMBA 2</text:p>
          </table:table-cell>
          <table:table-cell office:value-type="float" office:value="0.574681036446689" calcext:value-type="float">
            <text:p>0,574681</text:p>
          </table:table-cell>
        </table:table-row>
        <table:table-row table:style-name="ro1">
          <table:table-cell office:value-type="string" calcext:value-type="string">
            <text:p>APARECIDA</text:p>
          </table:table-cell>
          <table:table-cell office:value-type="string" calcext:value-type="string">
            <text:p>LORENA</text:p>
          </table:table-cell>
          <table:table-cell office:value-type="float" office:value="0.572990324464935" calcext:value-type="float">
            <text:p>0,572990</text:p>
          </table:table-cell>
        </table:table-row>
        <table:table-row table:style-name="ro1">
          <table:table-cell office:value-type="string" calcext:value-type="string">
            <text:p>JOAO CAMARA 2</text:p>
          </table:table-cell>
          <table:table-cell office:value-type="string" calcext:value-type="string">
            <text:p>J. CAMARA III</text:p>
          </table:table-cell>
          <table:table-cell office:value-type="float" office:value="0.57255875353027" calcext:value-type="float">
            <text:p>0,572559</text:p>
          </table:table-cell>
        </table:table-row>
        <table:table-row table:style-name="ro1">
          <table:table-cell office:value-type="string" calcext:value-type="string">
            <text:p>ACARAU II</text:p>
          </table:table-cell>
          <table:table-cell office:value-type="string" calcext:value-type="string">
            <text:p>ACARAU III</text:p>
          </table:table-cell>
          <table:table-cell office:value-type="float" office:value="0.571106543753625" calcext:value-type="float">
            <text:p>0,571107</text:p>
          </table:table-cell>
        </table:table-row>
        <table:table-row table:style-name="ro1">
          <table:table-cell office:value-type="string" calcext:value-type="string">
            <text:p>RONDONOPOLIS</text:p>
          </table:table-cell>
          <table:table-cell office:value-type="string" calcext:value-type="string">
            <text:p>SE CUIABA</text:p>
          </table:table-cell>
          <table:table-cell office:value-type="float" office:value="0.56957366929996" calcext:value-type="float">
            <text:p>0,569574</text:p>
          </table:table-cell>
        </table:table-row>
        <table:table-row table:style-name="ro1">
          <table:table-cell office:value-type="string" calcext:value-type="string">
            <text:p>JAGUARUANA II</text:p>
          </table:table-cell>
          <table:table-cell office:value-type="string" calcext:value-type="string">
            <text:p>MOSSORO IV</text:p>
          </table:table-cell>
          <table:table-cell office:value-type="float" office:value="0.569141076501476" calcext:value-type="float">
            <text:p>0,569141</text:p>
          </table:table-cell>
        </table:table-row>
        <table:table-row table:style-name="ro1">
          <table:table-cell office:value-type="string" calcext:value-type="string">
            <text:p>CAPIVARI SUL</text:p>
          </table:table-cell>
          <table:table-cell office:value-type="string" calcext:value-type="string">
            <text:p>VIAMAO 3</text:p>
          </table:table-cell>
          <table:table-cell office:value-type="float" office:value="0.568415466630003" calcext:value-type="float">
            <text:p>0,568415</text:p>
          </table:table-cell>
        </table:table-row>
        <table:table-row table:style-name="ro1">
          <table:table-cell office:value-type="string" calcext:value-type="string">
            <text:p>SIDEROPOL.ESU</text:p>
          </table:table-cell>
          <table:table-cell office:value-type="string" calcext:value-type="string">
            <text:p>SIDEROPOLIS 2</text:p>
          </table:table-cell>
          <table:table-cell office:value-type="float" office:value="0.56750736613726" calcext:value-type="float">
            <text:p>0,567507</text:p>
          </table:table-cell>
        </table:table-row>
        <table:table-row table:style-name="ro1">
          <table:table-cell office:value-type="string" calcext:value-type="string">
            <text:p>RIO BRANCO I</text:p>
          </table:table-cell>
          <table:table-cell office:value-type="string" calcext:value-type="string">
            <text:p>ABUNA</text:p>
          </table:table-cell>
          <table:table-cell office:value-type="float" office:value="0.567081010523858" calcext:value-type="float">
            <text:p>0,567081</text:p>
          </table:table-cell>
        </table:table-row>
        <table:table-row table:style-name="ro1">
          <table:table-cell office:value-type="string" calcext:value-type="string">
            <text:p>LARANJAL</text:p>
          </table:table-cell>
          <table:table-cell office:value-type="string" calcext:value-type="string">
            <text:p>JURUPARI</text:p>
          </table:table-cell>
          <table:table-cell office:value-type="float" office:value="0.565342105596143" calcext:value-type="float">
            <text:p>0,565342</text:p>
          </table:table-cell>
        </table:table-row>
        <table:table-row table:style-name="ro1">
          <table:table-cell office:value-type="string" calcext:value-type="string">
            <text:p>RIO DAS EGUAS</text:p>
          </table:table-cell>
          <table:table-cell office:value-type="string" calcext:value-type="string">
            <text:p>RIO FORMOSO II</text:p>
          </table:table-cell>
          <table:table-cell office:value-type="float" office:value="0.563952847422763" calcext:value-type="float">
            <text:p>0,563953</text:p>
          </table:table-cell>
        </table:table-row>
        <table:table-row table:style-name="ro1">
          <table:table-cell office:value-type="string" calcext:value-type="string">
            <text:p>GUAMA</text:p>
          </table:table-cell>
          <table:table-cell office:value-type="string" calcext:value-type="string">
            <text:p>VILA DO CONDE</text:p>
          </table:table-cell>
          <table:table-cell office:value-type="float" office:value="0.562927244982902" calcext:value-type="float">
            <text:p>0,562927</text:p>
          </table:table-cell>
        </table:table-row>
        <table:table-row table:style-name="ro1">
          <table:table-cell office:value-type="string" calcext:value-type="string">
            <text:p>JARDIM</text:p>
          </table:table-cell>
          <table:table-cell office:value-type="string" calcext:value-type="string">
            <text:p>NSA.SRA.SOCORRO</text:p>
          </table:table-cell>
          <table:table-cell office:value-type="float" office:value="0.56173648141003" calcext:value-type="float">
            <text:p>0,561736</text:p>
          </table:table-cell>
        </table:table-row>
        <table:table-row table:style-name="ro1">
          <table:table-cell office:value-type="string" calcext:value-type="string">
            <text:p>MACAMBARA 3</text:p>
          </table:table-cell>
          <table:table-cell office:value-type="string" calcext:value-type="string">
            <text:p>SANTO ANGELO</text:p>
          </table:table-cell>
          <table:table-cell office:value-type="float" office:value="0.561541578055073" calcext:value-type="float">
            <text:p>0,561542</text:p>
          </table:table-cell>
        </table:table-row>
        <table:table-row table:style-name="ro1">
          <table:table-cell office:value-type="string" calcext:value-type="string">
            <text:p>ABUNA</text:p>
          </table:table-cell>
          <table:table-cell office:value-type="string" calcext:value-type="string">
            <text:p>TUCUMA</text:p>
          </table:table-cell>
          <table:table-cell office:value-type="float" office:value="0.558896853066807" calcext:value-type="float">
            <text:p>0,558897</text:p>
          </table:table-cell>
        </table:table-row>
        <table:table-row table:style-name="ro1">
          <table:table-cell office:value-type="string" calcext:value-type="string">
            <text:p>CRISTIANO ROCHA</text:p>
          </table:table-cell>
          <table:table-cell office:value-type="string" calcext:value-type="string">
            <text:p>LECHUGA</text:p>
          </table:table-cell>
          <table:table-cell office:value-type="float" office:value="0.558131492300613" calcext:value-type="float">
            <text:p>0,558131</text:p>
          </table:table-cell>
        </table:table-row>
        <table:table-row table:style-name="ro1">
          <table:table-cell office:value-type="string" calcext:value-type="string">
            <text:p>JORG.TEIXEIRA</text:p>
          </table:table-cell>
          <table:table-cell office:value-type="string" calcext:value-type="string">
            <text:p>MAUA III</text:p>
          </table:table-cell>
          <table:table-cell office:value-type="float" office:value="0.554577218348165" calcext:value-type="float">
            <text:p>0,554577</text:p>
          </table:table-cell>
        </table:table-row>
        <table:table-row table:style-name="ro1">
          <table:table-cell office:value-type="string" calcext:value-type="string">
            <text:p>JAGUARUANA II</text:p>
          </table:table-cell>
          <table:table-cell office:value-type="string" calcext:value-type="string">
            <text:p>RUSSAS II</text:p>
          </table:table-cell>
          <table:table-cell office:value-type="float" office:value="0.55395660020242" calcext:value-type="float">
            <text:p>0,553957</text:p>
          </table:table-cell>
        </table:table-row>
        <table:table-row table:style-name="ro1">
          <table:table-cell office:value-type="string" calcext:value-type="string">
            <text:p>CHAPADAO</text:p>
          </table:table-cell>
          <table:table-cell office:value-type="string" calcext:value-type="string">
            <text:p>INOCENCIA</text:p>
          </table:table-cell>
          <table:table-cell office:value-type="float" office:value="0.553950199168029" calcext:value-type="float">
            <text:p>0,553950</text:p>
          </table:table-cell>
        </table:table-row>
        <table:table-row table:style-name="ro1">
          <table:table-cell office:value-type="string" calcext:value-type="string">
            <text:p>MESSIAS</text:p>
          </table:table-cell>
          <table:table-cell office:value-type="string" calcext:value-type="string">
            <text:p>MACEIO II</text:p>
          </table:table-cell>
          <table:table-cell office:value-type="float" office:value="0.553714721191167" calcext:value-type="float">
            <text:p>0,553715</text:p>
          </table:table-cell>
        </table:table-row>
        <table:table-row table:style-name="ro1">
          <table:table-cell office:value-type="string" calcext:value-type="string">
            <text:p>BARBACENA 2</text:p>
          </table:table-cell>
          <table:table-cell office:value-type="string" calcext:value-type="string">
            <text:p>LAFAIETE 1</text:p>
          </table:table-cell>
          <table:table-cell office:value-type="float" office:value="0.545419783196678" calcext:value-type="float">
            <text:p>0,545420</text:p>
          </table:table-cell>
        </table:table-row>
        <table:table-row table:style-name="ro1">
          <table:table-cell office:value-type="string" calcext:value-type="string">
            <text:p>MARITUBA</text:p>
          </table:table-cell>
          <table:table-cell office:value-type="string" calcext:value-type="string">
            <text:p>UTINGA</text:p>
          </table:table-cell>
          <table:table-cell office:value-type="float" office:value="0.543831039067232" calcext:value-type="float">
            <text:p>0,543831</text:p>
          </table:table-cell>
        </table:table-row>
        <table:table-row table:style-name="ro1">
          <table:table-cell office:value-type="string" calcext:value-type="string">
            <text:p>CAMPO GRANDE2</text:p>
          </table:table-cell>
          <table:table-cell office:value-type="string" calcext:value-type="string">
            <text:p>RIO BRILHANTE</text:p>
          </table:table-cell>
          <table:table-cell office:value-type="float" office:value="0.542355425825939" calcext:value-type="float">
            <text:p>0,542355</text:p>
          </table:table-cell>
        </table:table-row>
        <table:table-row table:style-name="ro1">
          <table:table-cell office:value-type="string" calcext:value-type="string">
            <text:p>C.PORTO VELHO</text:p>
          </table:table-cell>
          <table:table-cell office:value-type="string" calcext:value-type="string">
            <text:p>PORTO VELHO</text:p>
          </table:table-cell>
          <table:table-cell office:value-type="float" office:value="0.53752492687219" calcext:value-type="float">
            <text:p>0,537525</text:p>
          </table:table-cell>
        </table:table-row>
        <table:table-row table:style-name="ro1">
          <table:table-cell office:value-type="string" calcext:value-type="string">
            <text:p>SOBRAL II</text:p>
          </table:table-cell>
          <table:table-cell office:value-type="string" calcext:value-type="string">
            <text:p>SOBRAL III</text:p>
          </table:table-cell>
          <table:table-cell office:value-type="float" office:value="0.536266778843829" calcext:value-type="float">
            <text:p>0,536267</text:p>
          </table:table-cell>
        </table:table-row>
        <table:table-row table:style-name="ro1">
          <table:table-cell office:value-type="string" calcext:value-type="string">
            <text:p>POVO NOVO</text:p>
          </table:table-cell>
          <table:table-cell office:value-type="string" calcext:value-type="string">
            <text:p>QUINTA</text:p>
          </table:table-cell>
          <table:table-cell office:value-type="float" office:value="0.533232461458869" calcext:value-type="float">
            <text:p>0,533232</text:p>
          </table:table-cell>
        </table:table-row>
        <table:table-row table:style-name="ro1">
          <table:table-cell office:value-type="string" calcext:value-type="string">
            <text:p>MESSIAS</text:p>
          </table:table-cell>
          <table:table-cell office:value-type="string" calcext:value-type="string">
            <text:p>RIO LARGO II</text:p>
          </table:table-cell>
          <table:table-cell office:value-type="float" office:value="0.532169530486651" calcext:value-type="float">
            <text:p>0,532170</text:p>
          </table:table-cell>
        </table:table-row>
        <table:table-row table:style-name="ro1">
          <table:table-cell office:value-type="string" calcext:value-type="string">
            <text:p>DOURADOS 2</text:p>
          </table:table-cell>
          <table:table-cell office:value-type="string" calcext:value-type="string">
            <text:p>RIO BRILHANTE</text:p>
          </table:table-cell>
          <table:table-cell office:value-type="float" office:value="0.532157907176362" calcext:value-type="float">
            <text:p>0,532158</text:p>
          </table:table-cell>
        </table:table-row>
        <table:table-row table:style-name="ro1">
          <table:table-cell office:value-type="string" calcext:value-type="string">
            <text:p>ALTAMIRA</text:p>
          </table:table-cell>
          <table:table-cell office:value-type="string" calcext:value-type="string">
            <text:p>TRANSAMAZONIC</text:p>
          </table:table-cell>
          <table:table-cell office:value-type="float" office:value="0.53106233324385" calcext:value-type="float">
            <text:p>0,531062</text:p>
          </table:table-cell>
        </table:table-row>
        <table:table-row table:style-name="ro1">
          <table:table-cell office:value-type="string" calcext:value-type="string">
            <text:p>C.GRANDE III</text:p>
          </table:table-cell>
          <table:table-cell office:value-type="string" calcext:value-type="string">
            <text:p>RIACHAO II</text:p>
          </table:table-cell>
          <table:table-cell office:value-type="float" office:value="0.530258438364688" calcext:value-type="float">
            <text:p>0,530258</text:p>
          </table:table-cell>
        </table:table-row>
        <table:table-row table:style-name="ro1">
          <table:table-cell office:value-type="string" calcext:value-type="string">
            <text:p>ABUNA</text:p>
          </table:table-cell>
          <table:table-cell office:value-type="string" calcext:value-type="string">
            <text:p>PORTO VELHO</text:p>
          </table:table-cell>
          <table:table-cell office:value-type="float" office:value="0.526741063844838" calcext:value-type="float">
            <text:p>0,526741</text:p>
          </table:table-cell>
        </table:table-row>
        <table:table-row table:style-name="ro1">
          <table:table-cell office:value-type="string" calcext:value-type="string">
            <text:p>CAXIAS NORTE</text:p>
          </table:table-cell>
          <table:table-cell office:value-type="string" calcext:value-type="string">
            <text:p>ITA</text:p>
          </table:table-cell>
          <table:table-cell office:value-type="float" office:value="0.525368165104311" calcext:value-type="float">
            <text:p>0,525368</text:p>
          </table:table-cell>
        </table:table-row>
        <table:table-row table:style-name="ro1">
          <table:table-cell office:value-type="string" calcext:value-type="string">
            <text:p>C.GRANDE II</text:p>
          </table:table-cell>
          <table:table-cell office:value-type="string" calcext:value-type="string">
            <text:p>PAU FERRO</text:p>
          </table:table-cell>
          <table:table-cell office:value-type="float" office:value="0.522567665519091" calcext:value-type="float">
            <text:p>0,522568</text:p>
          </table:table-cell>
        </table:table-row>
        <table:table-row table:style-name="ro1">
          <table:table-cell office:value-type="string" calcext:value-type="string">
            <text:p>DIANOPOLIS II</text:p>
          </table:table-cell>
          <table:table-cell office:value-type="string" calcext:value-type="string">
            <text:p>PALMAS</text:p>
          </table:table-cell>
          <table:table-cell office:value-type="float" office:value="0.519517377523753" calcext:value-type="float">
            <text:p>0,519517</text:p>
          </table:table-cell>
        </table:table-row>
        <table:table-row table:style-name="ro1">
          <table:table-cell office:value-type="string" calcext:value-type="string">
            <text:p>ARACUAI 2</text:p>
          </table:table-cell>
          <table:table-cell office:value-type="string" calcext:value-type="string">
            <text:p>IRAPE-SE</text:p>
          </table:table-cell>
          <table:table-cell office:value-type="float" office:value="0.516951689143522" calcext:value-type="float">
            <text:p>0,516952</text:p>
          </table:table-cell>
        </table:table-row>
        <table:table-row table:style-name="ro1">
          <table:table-cell office:value-type="string" calcext:value-type="string">
            <text:p>BRASNORTE</text:p>
          </table:table-cell>
          <table:table-cell office:value-type="string" calcext:value-type="string">
            <text:p>JUBA</text:p>
          </table:table-cell>
          <table:table-cell office:value-type="float" office:value="0.516855970303427" calcext:value-type="float">
            <text:p>0,516856</text:p>
          </table:table-cell>
        </table:table-row>
        <table:table-row table:style-name="ro1">
          <table:table-cell office:value-type="string" calcext:value-type="string">
            <text:p>JARAGUA DO SUL</text:p>
          </table:table-cell>
          <table:table-cell office:value-type="string" calcext:value-type="string">
            <text:p>JOINV.NORTE</text:p>
          </table:table-cell>
          <table:table-cell office:value-type="float" office:value="0.514754204656284" calcext:value-type="float">
            <text:p>0,514754</text:p>
          </table:table-cell>
        </table:table-row>
        <table:table-row table:style-name="ro1">
          <table:table-cell office:value-type="string" calcext:value-type="string">
            <text:p>IMBIRUSSU</text:p>
          </table:table-cell>
          <table:table-cell office:value-type="string" calcext:value-type="string">
            <text:p>RIO BRILHANTE</text:p>
          </table:table-cell>
          <table:table-cell office:value-type="float" office:value="0.514324499538289" calcext:value-type="float">
            <text:p>0,514324</text:p>
          </table:table-cell>
        </table:table-row>
        <table:table-row table:style-name="ro1">
          <table:table-cell office:value-type="string" calcext:value-type="string">
            <text:p>LIVRAMENTO 3</text:p>
          </table:table-cell>
          <table:table-cell office:value-type="string" calcext:value-type="string">
            <text:p>SANTA MARIA 3</text:p>
          </table:table-cell>
          <table:table-cell office:value-type="float" office:value="0.513976322696293" calcext:value-type="float">
            <text:p>0,513976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PINHALZINHO 2</text:p>
          </table:table-cell>
          <table:table-cell office:value-type="float" office:value="0.513228210703836" calcext:value-type="float">
            <text:p>0,513228</text:p>
          </table:table-cell>
        </table:table-row>
        <table:table-row table:style-name="ro1">
          <table:table-cell office:value-type="string" calcext:value-type="string">
            <text:p>PIRAPAMA II</text:p>
          </table:table-cell>
          <table:table-cell office:value-type="string" calcext:value-type="string">
            <text:p>SUAPE II</text:p>
          </table:table-cell>
          <table:table-cell office:value-type="float" office:value="0.512693047620108" calcext:value-type="float">
            <text:p>0,512693</text:p>
          </table:table-cell>
        </table:table-row>
        <table:table-row table:style-name="ro1">
          <table:table-cell office:value-type="string" calcext:value-type="string">
            <text:p>PIRIPIRI</text:p>
          </table:table-cell>
          <table:table-cell office:value-type="string" calcext:value-type="string">
            <text:p>TERESINA III</text:p>
          </table:table-cell>
          <table:table-cell office:value-type="float" office:value="0.512646685300476" calcext:value-type="float">
            <text:p>0,512647</text:p>
          </table:table-cell>
        </table:table-row>
        <table:table-row table:style-name="ro1">
          <table:table-cell office:value-type="string" calcext:value-type="string">
            <text:p>JARAGUA DO SUL</text:p>
          </table:table-cell>
          <table:table-cell office:value-type="string" calcext:value-type="string">
            <text:p>JOINVILLE</text:p>
          </table:table-cell>
          <table:table-cell office:value-type="float" office:value="0.511528195348867" calcext:value-type="float">
            <text:p>0,511528</text:p>
          </table:table-cell>
        </table:table-row>
        <table:table-row table:style-name="ro1">
          <table:table-cell office:value-type="string" calcext:value-type="string">
            <text:p>NOVA STA RITA</text:p>
          </table:table-cell>
          <table:table-cell office:value-type="string" calcext:value-type="string">
            <text:p>PORTO ALEGRE9</text:p>
          </table:table-cell>
          <table:table-cell office:value-type="float" office:value="0.510324871917671" calcext:value-type="float">
            <text:p>0,510325</text:p>
          </table:table-cell>
        </table:table-row>
        <table:table-row table:style-name="ro1">
          <table:table-cell office:value-type="string" calcext:value-type="string">
            <text:p>LARANJAL</text:p>
          </table:table-cell>
          <table:table-cell office:value-type="string" calcext:value-type="string">
            <text:p>MACAPA</text:p>
          </table:table-cell>
          <table:table-cell office:value-type="float" office:value="0.510120993508349" calcext:value-type="float">
            <text:p>0,510121</text:p>
          </table:table-cell>
        </table:table-row>
        <table:table-row table:style-name="ro1">
          <table:table-cell office:value-type="string" calcext:value-type="string">
            <text:p>NOVA STA RITA</text:p>
          </table:table-cell>
          <table:table-cell office:value-type="string" calcext:value-type="string">
            <text:p>P.PETROQUIMIC</text:p>
          </table:table-cell>
          <table:table-cell office:value-type="float" office:value="0.509918962399551" calcext:value-type="float">
            <text:p>0,509919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SANTO ANGELO2</text:p>
          </table:table-cell>
          <table:table-cell office:value-type="float" office:value="0.508178608517547" calcext:value-type="float">
            <text:p>0,508179</text:p>
          </table:table-cell>
        </table:table-row>
        <table:table-row table:style-name="ro1">
          <table:table-cell office:value-type="string" calcext:value-type="string">
            <text:p>BRASNORTE</text:p>
          </table:table-cell>
          <table:table-cell office:value-type="string" calcext:value-type="string">
            <text:p>JUINA</text:p>
          </table:table-cell>
          <table:table-cell office:value-type="float" office:value="0.506490520463987" calcext:value-type="float">
            <text:p>0,506491</text:p>
          </table:table-cell>
        </table:table-row>
        <table:table-row table:style-name="ro1">
          <table:table-cell office:value-type="string" calcext:value-type="string">
            <text:p>SUL</text:p>
          </table:table-cell>
          <table:table-cell office:value-type="string" calcext:value-type="string">
            <text:p>S.CAETANO SUL</text:p>
          </table:table-cell>
          <table:table-cell office:value-type="float" office:value="0.505757871999407" calcext:value-type="float">
            <text:p>0,505758</text:p>
          </table:table-cell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MANAUS</text:p>
          </table:table-cell>
          <table:table-cell office:value-type="float" office:value="0.504657750923633" calcext:value-type="float">
            <text:p>0,504658</text:p>
          </table:table-cell>
        </table:table-row>
        <table:table-row table:style-name="ro1">
          <table:table-cell office:value-type="string" calcext:value-type="string">
            <text:p>SUAPE II</text:p>
          </table:table-cell>
          <table:table-cell office:value-type="string" calcext:value-type="string">
            <text:p>SUAPE III</text:p>
          </table:table-cell>
          <table:table-cell office:value-type="float" office:value="0.504481037438433" calcext:value-type="float">
            <text:p>0,504481</text:p>
          </table:table-cell>
        </table:table-row>
        <table:table-row table:style-name="ro1">
          <table:table-cell office:value-type="string" calcext:value-type="string">
            <text:p>DOURADOS</text:p>
          </table:table-cell>
          <table:table-cell office:value-type="string" calcext:value-type="string">
            <text:p>DOURADOS 2</text:p>
          </table:table-cell>
          <table:table-cell office:value-type="float" office:value="0.504126068595943" calcext:value-type="float">
            <text:p>0,504126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FORTALEZA II</text:p>
          </table:table-cell>
          <table:table-cell office:value-type="float" office:value="0.502181887109632" calcext:value-type="float">
            <text:p>0,502182</text:p>
          </table:table-cell>
        </table:table-row>
        <table:table-row table:style-name="ro1">
          <table:table-cell office:value-type="string" calcext:value-type="string">
            <text:p>H.BORDEN SUB</text:p>
          </table:table-cell>
          <table:table-cell office:value-type="string" calcext:value-type="string">
            <text:p>MANOE.NOBREGA</text:p>
          </table:table-cell>
          <table:table-cell office:value-type="float" office:value="0.501072825418255" calcext:value-type="float">
            <text:p>0,501073</text:p>
          </table:table-cell>
        </table:table-row>
        <table:table-row table:style-name="ro1">
          <table:table-cell office:value-type="string" calcext:value-type="string">
            <text:p>BRASNORTE</text:p>
          </table:table-cell>
          <table:table-cell office:value-type="string" calcext:value-type="string">
            <text:p>NOVA MUTUM</text:p>
          </table:table-cell>
          <table:table-cell office:value-type="float" office:value="0.499622372172536" calcext:value-type="float">
            <text:p>0,499622</text:p>
          </table:table-cell>
        </table:table-row>
        <table:table-row table:style-name="ro1">
          <table:table-cell office:value-type="string" calcext:value-type="string">
            <text:p>COXIPO</text:p>
          </table:table-cell>
          <table:table-cell office:value-type="string" calcext:value-type="string">
            <text:p>SE CUIABA</text:p>
          </table:table-cell>
          <table:table-cell office:value-type="float" office:value="0.499206948779971" calcext:value-type="float">
            <text:p>0,499207</text:p>
          </table:table-cell>
        </table:table-row>
        <table:table-row table:style-name="ro1">
          <table:table-cell office:value-type="string" calcext:value-type="string">
            <text:p>SANTA MARIA 3</text:p>
          </table:table-cell>
          <table:table-cell office:value-type="string" calcext:value-type="string">
            <text:p>SANTO ANGELO2</text:p>
          </table:table-cell>
          <table:table-cell office:value-type="float" office:value="0.499183116196488" calcext:value-type="float">
            <text:p>0,499183</text:p>
          </table:table-cell>
        </table:table-row>
        <table:table-row table:style-name="ro1">
          <table:table-cell office:value-type="string" calcext:value-type="string">
            <text:p>CAUIPE</text:p>
          </table:table-cell>
          <table:table-cell office:value-type="string" calcext:value-type="string">
            <text:p>FORTALEZA II</text:p>
          </table:table-cell>
          <table:table-cell office:value-type="float" office:value="0.49772537833419" calcext:value-type="float">
            <text:p>0,497725</text:p>
          </table:table-cell>
        </table:table-row>
        <table:table-row table:style-name="ro1">
          <table:table-cell office:value-type="string" calcext:value-type="string">
            <text:p>MIRUEIRA II</text:p>
          </table:table-cell>
          <table:table-cell office:value-type="string" calcext:value-type="string">
            <text:p>PAU FERRO</text:p>
          </table:table-cell>
          <table:table-cell office:value-type="float" office:value="0.497259268644952" calcext:value-type="float">
            <text:p>0,497259</text:p>
          </table:table-cell>
        </table:table-row>
        <table:table-row table:style-name="ro1">
          <table:table-cell office:value-type="string" calcext:value-type="string">
            <text:p>BOTUCATU</text:p>
          </table:table-cell>
          <table:table-cell office:value-type="string" calcext:value-type="string">
            <text:p>CHAVANTES</text:p>
          </table:table-cell>
          <table:table-cell office:value-type="float" office:value="0.495533539316684" calcext:value-type="float">
            <text:p>0,495534</text:p>
          </table:table-cell>
        </table:table-row>
        <table:table-row table:style-name="ro1">
          <table:table-cell office:value-type="string" calcext:value-type="string">
            <text:p>CANDELARIA 2</text:p>
          </table:table-cell>
          <table:table-cell office:value-type="string" calcext:value-type="string">
            <text:p>NOVA STA RITA</text:p>
          </table:table-cell>
          <table:table-cell office:value-type="float" office:value="0.494623524985456" calcext:value-type="float">
            <text:p>0,494624</text:p>
          </table:table-cell>
        </table:table-row>
        <table:table-row table:style-name="ro1">
          <table:table-cell office:value-type="string" calcext:value-type="string">
            <text:p>CAMACARI II</text:p>
          </table:table-cell>
          <table:table-cell office:value-type="string" calcext:value-type="string">
            <text:p>COTEGIPE</text:p>
          </table:table-cell>
          <table:table-cell office:value-type="float" office:value="0.494586433940975" calcext:value-type="float">
            <text:p>0,494586</text:p>
          </table:table-cell>
        </table:table-row>
        <table:table-row table:style-name="ro1">
          <table:table-cell office:value-type="string" calcext:value-type="string">
            <text:p>ABDON BATISTA</text:p>
          </table:table-cell>
          <table:table-cell office:value-type="string" calcext:value-type="string">
            <text:p>VIDEIRA</text:p>
          </table:table-cell>
          <table:table-cell office:value-type="float" office:value="0.493297235280295" calcext:value-type="float">
            <text:p>0,493297</text:p>
          </table:table-cell>
        </table:table-row>
        <table:table-row table:style-name="ro1">
          <table:table-cell office:value-type="string" calcext:value-type="string">
            <text:p>CANARANA</text:p>
          </table:table-cell>
          <table:table-cell office:value-type="string" calcext:value-type="string">
            <text:p>PARANATINGA</text:p>
          </table:table-cell>
          <table:table-cell office:value-type="float" office:value="0.49288311647467" calcext:value-type="float">
            <text:p>0,492883</text:p>
          </table:table-cell>
        </table:table-row>
        <table:table-row table:style-name="ro1">
          <table:table-cell office:value-type="string" calcext:value-type="string">
            <text:p>BARRA PEIXE</text:p>
          </table:table-cell>
          <table:table-cell office:value-type="string" calcext:value-type="string">
            <text:p>RIBEIRAOZINHO</text:p>
          </table:table-cell>
          <table:table-cell office:value-type="float" office:value="0.49270619702508" calcext:value-type="float">
            <text:p>0,492706</text:p>
          </table:table-cell>
        </table:table-row>
        <table:table-row table:style-name="ro1">
          <table:table-cell office:value-type="string" calcext:value-type="string">
            <text:p>FEIJO</text:p>
          </table:table-cell>
          <table:table-cell office:value-type="string" calcext:value-type="string">
            <text:p>RIO BRANCO I</text:p>
          </table:table-cell>
          <table:table-cell office:value-type="float" office:value="0.491764665101568" calcext:value-type="float">
            <text:p>0,491765</text:p>
          </table:table-cell>
        </table:table-row>
        <table:table-row table:style-name="ro1">
          <table:table-cell office:value-type="string" calcext:value-type="string">
            <text:p>ANGELIM</text:p>
          </table:table-cell>
          <table:table-cell office:value-type="string" calcext:value-type="string">
            <text:p>GARANHUNS II</text:p>
          </table:table-cell>
          <table:table-cell office:value-type="float" office:value="0.490394117975783" calcext:value-type="float">
            <text:p>0,490394</text:p>
          </table:table-cell>
        </table:table-row>
        <table:table-row table:style-name="ro1">
          <table:table-cell office:value-type="string" calcext:value-type="string">
            <text:p>B. SANTISTA</text:p>
          </table:table-cell>
          <table:table-cell office:value-type="string" calcext:value-type="string">
            <text:p>PBR CUBATAO</text:p>
          </table:table-cell>
          <table:table-cell office:value-type="float" office:value="0.490326588200022" calcext:value-type="float">
            <text:p>0,490327</text:p>
          </table:table-cell>
        </table:table-row>
        <table:table-row table:style-name="ro1">
          <table:table-cell office:value-type="string" calcext:value-type="string">
            <text:p>B. SANTISTA</text:p>
          </table:table-cell>
          <table:table-cell office:value-type="string" calcext:value-type="string">
            <text:p>CARBOCLORO</text:p>
          </table:table-cell>
          <table:table-cell office:value-type="float" office:value="0.490077843994271" calcext:value-type="float">
            <text:p>0,490078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XANXERE ESU</text:p>
          </table:table-cell>
          <table:table-cell office:value-type="float" office:value="0.487288475075005" calcext:value-type="float">
            <text:p>0,487288</text:p>
          </table:table-cell>
        </table:table-row>
        <table:table-row table:style-name="ro1">
          <table:table-cell office:value-type="string" calcext:value-type="string">
            <text:p>LAGOA DO CARRO</text:p>
          </table:table-cell>
          <table:table-cell office:value-type="string" calcext:value-type="string">
            <text:p>PAU FERRO</text:p>
          </table:table-cell>
          <table:table-cell office:value-type="float" office:value="0.486939465390477" calcext:value-type="float">
            <text:p>0,486939</text:p>
          </table:table-cell>
        </table:table-row>
        <table:table-row table:style-name="ro1">
          <table:table-cell office:value-type="string" calcext:value-type="string">
            <text:p>ARIQUEMES</text:p>
          </table:table-cell>
          <table:table-cell office:value-type="string" calcext:value-type="string">
            <text:p>JI-PARANA</text:p>
          </table:table-cell>
          <table:table-cell office:value-type="float" office:value="0.484083187143711" calcext:value-type="float">
            <text:p>0,484083</text:p>
          </table:table-cell>
        </table:table-row>
        <table:table-row table:style-name="ro1">
          <table:table-cell office:value-type="string" calcext:value-type="string">
            <text:p>PIMENTA BUENO</text:p>
          </table:table-cell>
          <table:table-cell office:value-type="string" calcext:value-type="string">
            <text:p>VILHENA</text:p>
          </table:table-cell>
          <table:table-cell office:value-type="float" office:value="0.482403370141224" calcext:value-type="float">
            <text:p>0,482403</text:p>
          </table:table-cell>
        </table:table-row>
        <table:table-row table:style-name="ro1">
          <table:table-cell office:value-type="string" calcext:value-type="string">
            <text:p>MOGI</text:p>
          </table:table-cell>
          <table:table-cell office:value-type="string" calcext:value-type="string">
            <text:p>MOGI CRUZES</text:p>
          </table:table-cell>
          <table:table-cell office:value-type="float" office:value="0.482310239011346" calcext:value-type="float">
            <text:p>0,482310</text:p>
          </table:table-cell>
        </table:table-row>
        <table:table-row table:style-name="ro1">
          <table:table-cell office:value-type="string" calcext:value-type="string">
            <text:p>FORTALEZA II</text:p>
          </table:table-cell>
          <table:table-cell office:value-type="string" calcext:value-type="string">
            <text:p>MARACANAU II</text:p>
          </table:table-cell>
          <table:table-cell office:value-type="float" office:value="0.480481781861823" calcext:value-type="float">
            <text:p>0,480482</text:p>
          </table:table-cell>
        </table:table-row>
        <table:table-row table:style-name="ro1">
          <table:table-cell office:value-type="string" calcext:value-type="string">
            <text:p>ARIQUEMES</text:p>
          </table:table-cell>
          <table:table-cell office:value-type="string" calcext:value-type="string">
            <text:p>SAMUEL</text:p>
          </table:table-cell>
          <table:table-cell office:value-type="float" office:value="0.480307196578256" calcext:value-type="float">
            <text:p>0,480307</text:p>
          </table:table-cell>
        </table:table-row>
        <table:table-row table:style-name="ro1">
          <table:table-cell office:value-type="string" calcext:value-type="string">
            <text:p>IBIAPINA II</text:p>
          </table:table-cell>
          <table:table-cell office:value-type="string" calcext:value-type="string">
            <text:p>MARANGATU</text:p>
          </table:table-cell>
          <table:table-cell office:value-type="float" office:value="0.479672779687851" calcext:value-type="float">
            <text:p>0,479673</text:p>
          </table:table-cell>
        </table:table-row>
        <table:table-row table:style-name="ro1">
          <table:table-cell office:value-type="string" calcext:value-type="string">
            <text:p>PONTA GROSSA</text:p>
          </table:table-cell>
          <table:table-cell office:value-type="string" calcext:value-type="string">
            <text:p>S.MATEUS SUL</text:p>
          </table:table-cell>
          <table:table-cell office:value-type="float" office:value="0.479529429150555" calcext:value-type="float">
            <text:p>0,479529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string" calcext:value-type="string">
            <text:p>PIRAJA</text:p>
          </table:table-cell>
          <table:table-cell office:value-type="float" office:value="0.479478852977679" calcext:value-type="float">
            <text:p>0,479479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string" calcext:value-type="string">
            <text:p>PITUACU</text:p>
          </table:table-cell>
          <table:table-cell office:value-type="float" office:value="0.479268732049117" calcext:value-type="float">
            <text:p>0,479269</text:p>
          </table:table-cell>
        </table:table-row>
        <table:table-row table:style-name="ro1">
          <table:table-cell office:value-type="string" calcext:value-type="string">
            <text:p>SAO LUIS II</text:p>
          </table:table-cell>
          <table:table-cell office:value-type="string" calcext:value-type="string">
            <text:p>SAO LUIS I</text:p>
          </table:table-cell>
          <table:table-cell office:value-type="float" office:value="0.477447890470798" calcext:value-type="float">
            <text:p>0,477448</text:p>
          </table:table-cell>
        </table:table-row>
        <table:table-row table:style-name="ro1">
          <table:table-cell office:value-type="string" calcext:value-type="string">
            <text:p>BANABUIU</text:p>
          </table:table-cell>
          <table:table-cell office:value-type="string" calcext:value-type="string">
            <text:p>MILAGRES</text:p>
          </table:table-cell>
          <table:table-cell office:value-type="float" office:value="0.477039923768551" calcext:value-type="float">
            <text:p>0,477040</text:p>
          </table:table-cell>
        </table:table-row>
        <table:table-row table:style-name="ro1">
          <table:table-cell office:value-type="string" calcext:value-type="string">
            <text:p>N.P.PRIMAVERA</text:p>
          </table:table-cell>
          <table:table-cell office:value-type="string" calcext:value-type="string">
            <text:p>ROSANA</text:p>
          </table:table-cell>
          <table:table-cell office:value-type="float" office:value="0.476211068563919" calcext:value-type="float">
            <text:p>0,476211</text:p>
          </table:table-cell>
        </table:table-row>
        <table:table-row table:style-name="ro1">
          <table:table-cell office:value-type="string" calcext:value-type="string">
            <text:p>ITAJAI 2</text:p>
          </table:table-cell>
          <table:table-cell office:value-type="string" calcext:value-type="string">
            <text:p>ITAJAI</text:p>
          </table:table-cell>
          <table:table-cell office:value-type="float" office:value="0.47599125620614" calcext:value-type="float">
            <text:p>0,475991</text:p>
          </table:table-cell>
        </table:table-row>
        <table:table-row table:style-name="ro1">
          <table:table-cell office:value-type="string" calcext:value-type="string">
            <text:p>MARANGATU</text:p>
          </table:table-cell>
          <table:table-cell office:value-type="string" calcext:value-type="string">
            <text:p>PIRIPIRI</text:p>
          </table:table-cell>
          <table:table-cell office:value-type="float" office:value="0.474166712627071" calcext:value-type="float">
            <text:p>0,474167</text:p>
          </table:table-cell>
        </table:table-row>
        <table:table-row table:style-name="ro1">
          <table:table-cell office:value-type="string" calcext:value-type="string">
            <text:p>ALEGRETE2</text:p>
          </table:table-cell>
          <table:table-cell office:value-type="string" calcext:value-type="string">
            <text:p>LIVRAMENTO 3</text:p>
          </table:table-cell>
          <table:table-cell office:value-type="float" office:value="0.472360254600418" calcext:value-type="float">
            <text:p>0,472360</text:p>
          </table:table-cell>
        </table:table-row>
        <table:table-row table:style-name="ro1">
          <table:table-cell office:value-type="string" calcext:value-type="string">
            <text:p>CAXIAS NORTE</text:p>
          </table:table-cell>
          <table:table-cell office:value-type="string" calcext:value-type="string">
            <text:p>MONTE CLARO</text:p>
          </table:table-cell>
          <table:table-cell office:value-type="float" office:value="0.471658689917088" calcext:value-type="float">
            <text:p>0,471659</text:p>
          </table:table-cell>
        </table:table-row>
        <table:table-row table:style-name="ro1">
          <table:table-cell office:value-type="string" calcext:value-type="string">
            <text:p>SAO LUIS II</text:p>
          </table:table-cell>
          <table:table-cell office:value-type="string" calcext:value-type="string">
            <text:p>SAO LUIS III</text:p>
          </table:table-cell>
          <table:table-cell office:value-type="float" office:value="0.469842621148103" calcext:value-type="float">
            <text:p>0,469843</text:p>
          </table:table-cell>
        </table:table-row>
        <table:table-row table:style-name="ro1">
          <table:table-cell office:value-type="string" calcext:value-type="string">
            <text:p>CAXIAS NORTE</text:p>
          </table:table-cell>
          <table:table-cell office:value-type="string" calcext:value-type="string">
            <text:p>VINHEDOS</text:p>
          </table:table-cell>
          <table:table-cell office:value-type="float" office:value="0.46867748763378" calcext:value-type="float">
            <text:p>0,468677</text:p>
          </table:table-cell>
        </table:table-row>
        <table:table-row table:style-name="ro1">
          <table:table-cell office:value-type="string" calcext:value-type="string">
            <text:p>CAXIAS NORTE</text:p>
          </table:table-cell>
          <table:table-cell office:value-type="string" calcext:value-type="string">
            <text:p>CAXIAS 6</text:p>
          </table:table-cell>
          <table:table-cell office:value-type="float" office:value="0.46807220875739" calcext:value-type="float">
            <text:p>0,468072</text:p>
          </table:table-cell>
        </table:table-row>
        <table:table-row table:style-name="ro1">
          <table:table-cell office:value-type="string" calcext:value-type="string">
            <text:p>ANASTACIO</text:p>
          </table:table-cell>
          <table:table-cell office:value-type="string" calcext:value-type="string">
            <text:p>SIDROLANDIA 2</text:p>
          </table:table-cell>
          <table:table-cell office:value-type="float" office:value="0.467426009828034" calcext:value-type="float">
            <text:p>0,467426</text:p>
          </table:table-cell>
        </table:table-row>
        <table:table-row table:style-name="ro1">
          <table:table-cell office:value-type="string" calcext:value-type="string">
            <text:p>JI-PARANA</text:p>
          </table:table-cell>
          <table:table-cell office:value-type="string" calcext:value-type="string">
            <text:p>PIMENTA BUENO</text:p>
          </table:table-cell>
          <table:table-cell office:value-type="float" office:value="0.467387067067316" calcext:value-type="float">
            <text:p>0,467387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string" calcext:value-type="string">
            <text:p>JAGUARIAIVA</text:p>
          </table:table-cell>
          <table:table-cell office:value-type="float" office:value="0.464038919846681" calcext:value-type="float">
            <text:p>0,464039</text:p>
          </table:table-cell>
        </table:table-row>
        <table:table-row table:style-name="ro1">
          <table:table-cell office:value-type="string" calcext:value-type="string">
            <text:p>GRAVATAI3</text:p>
          </table:table-cell>
          <table:table-cell office:value-type="string" calcext:value-type="string">
            <text:p>OSORIO 3</text:p>
          </table:table-cell>
          <table:table-cell office:value-type="float" office:value="0.463826713549466" calcext:value-type="float">
            <text:p>0,463827</text:p>
          </table:table-cell>
        </table:table-row>
        <table:table-row table:style-name="ro1">
          <table:table-cell office:value-type="string" calcext:value-type="string">
            <text:p>AREIA</text:p>
          </table:table-cell>
          <table:table-cell office:value-type="string" calcext:value-type="string">
            <text:p>U.VITORIA NORTE</text:p>
          </table:table-cell>
          <table:table-cell office:value-type="float" office:value="0.461350539004943" calcext:value-type="float">
            <text:p>0,461351</text:p>
          </table:table-cell>
        </table:table-row>
        <table:table-row table:style-name="ro1">
          <table:table-cell office:value-type="string" calcext:value-type="string">
            <text:p>MIGUEL REALE</text:p>
          </table:table-cell>
          <table:table-cell office:value-type="string" calcext:value-type="string">
            <text:p>S.CAETANO SUL</text:p>
          </table:table-cell>
          <table:table-cell office:value-type="float" office:value="0.459960928069891" calcext:value-type="float">
            <text:p>0,459961</text:p>
          </table:table-cell>
        </table:table-row>
        <table:table-row table:style-name="ro1">
          <table:table-cell office:value-type="string" calcext:value-type="string">
            <text:p>JURUTI</text:p>
          </table:table-cell>
          <table:table-cell office:value-type="string" calcext:value-type="string">
            <text:p>ORIXIMINA</text:p>
          </table:table-cell>
          <table:table-cell office:value-type="float" office:value="0.459905259349895" calcext:value-type="float">
            <text:p>0,459905</text:p>
          </table:table-cell>
        </table:table-row>
        <table:table-row table:style-name="ro1">
          <table:table-cell office:value-type="string" calcext:value-type="string">
            <text:p>ENCRUZO NOVO</text:p>
          </table:table-cell>
          <table:table-cell office:value-type="string" calcext:value-type="string">
            <text:p>MIRANDA II</text:p>
          </table:table-cell>
          <table:table-cell office:value-type="float" office:value="0.459829799666449" calcext:value-type="float">
            <text:p>0,459830</text:p>
          </table:table-cell>
        </table:table-row>
        <table:table-row table:style-name="ro1">
          <table:table-cell office:value-type="string" calcext:value-type="string">
            <text:p>ARCOVERDE II</text:p>
          </table:table-cell>
          <table:table-cell office:value-type="string" calcext:value-type="string">
            <text:p>GARANHUNS II</text:p>
          </table:table-cell>
          <table:table-cell office:value-type="float" office:value="0.457734459562872" calcext:value-type="float">
            <text:p>0,457734</text:p>
          </table:table-cell>
        </table:table-row>
        <table:table-row table:style-name="ro1">
          <table:table-cell office:value-type="string" calcext:value-type="string">
            <text:p>MACAPA</text:p>
          </table:table-cell>
          <table:table-cell office:value-type="string" calcext:value-type="string">
            <text:p>MACAPA III</text:p>
          </table:table-cell>
          <table:table-cell office:value-type="float" office:value="0.457704523175032" calcext:value-type="float">
            <text:p>0,457705</text:p>
          </table:table-cell>
        </table:table-row>
        <table:table-row table:style-name="ro1">
          <table:table-cell office:value-type="string" calcext:value-type="string">
            <text:p>BAIXO IGUACU</text:p>
          </table:table-cell>
          <table:table-cell office:value-type="string" calcext:value-type="string">
            <text:p>CASCAVEL OEST</text:p>
          </table:table-cell>
          <table:table-cell office:value-type="float" office:value="0.457339237056954" calcext:value-type="float">
            <text:p>0,457339</text:p>
          </table:table-cell>
        </table:table-row>
        <table:table-row table:style-name="ro1">
          <table:table-cell office:value-type="string" calcext:value-type="string">
            <text:p>INTEGRADORA</text:p>
          </table:table-cell>
          <table:table-cell office:value-type="string" calcext:value-type="string">
            <text:p>ONCA PUMA</text:p>
          </table:table-cell>
          <table:table-cell office:value-type="float" office:value="0.452402710208232" calcext:value-type="float">
            <text:p>0,452403</text:p>
          </table:table-cell>
        </table:table-row>
        <table:table-row table:style-name="ro1">
          <table:table-cell office:value-type="string" calcext:value-type="string">
            <text:p>LAGOA NOVA II</text:p>
          </table:table-cell>
          <table:table-cell office:value-type="string" calcext:value-type="string">
            <text:p>PARAISO</text:p>
          </table:table-cell>
          <table:table-cell office:value-type="float" office:value="0.448892560720366" calcext:value-type="float">
            <text:p>0,448893</text:p>
          </table:table-cell>
        </table:table-row>
        <table:table-row table:style-name="ro1">
          <table:table-cell office:value-type="string" calcext:value-type="string">
            <text:p>CARBOCLORO</text:p>
          </table:table-cell>
          <table:table-cell office:value-type="string" calcext:value-type="string">
            <text:p>H.BORDEN SUB</text:p>
          </table:table-cell>
          <table:table-cell office:value-type="float" office:value="0.448633891381021" calcext:value-type="float">
            <text:p>0,448634</text:p>
          </table:table-cell>
        </table:table-row>
        <table:table-row table:style-name="ro1">
          <table:table-cell office:value-type="string" calcext:value-type="string">
            <text:p>BOM JESUS II</text:p>
          </table:table-cell>
          <table:table-cell office:value-type="string" calcext:value-type="string">
            <text:p>GILBUES II</text:p>
          </table:table-cell>
          <table:table-cell office:value-type="float" office:value="0.447664958834458" calcext:value-type="float">
            <text:p>0,447665</text:p>
          </table:table-cell>
        </table:table-row>
        <table:table-row table:style-name="ro1">
          <table:table-cell office:value-type="string" calcext:value-type="string">
            <text:p>MIRAMAR</text:p>
          </table:table-cell>
          <table:table-cell office:value-type="string" calcext:value-type="string">
            <text:p>UTINGA</text:p>
          </table:table-cell>
          <table:table-cell office:value-type="float" office:value="0.446787495201372" calcext:value-type="float">
            <text:p>0,446787</text:p>
          </table:table-cell>
        </table:table-row>
        <table:table-row table:style-name="ro1">
          <table:table-cell office:value-type="string" calcext:value-type="string">
            <text:p>PONTA GROSSA</text:p>
          </table:table-cell>
          <table:table-cell office:value-type="string" calcext:value-type="string">
            <text:p>PONTA G SUL</text:p>
          </table:table-cell>
          <table:table-cell office:value-type="float" office:value="0.444470832808792" calcext:value-type="float">
            <text:p>0,444471</text:p>
          </table:table-cell>
        </table:table-row>
        <table:table-row table:style-name="ro1">
          <table:table-cell office:value-type="string" calcext:value-type="string">
            <text:p>IMBIRUSSU</text:p>
          </table:table-cell>
          <table:table-cell office:value-type="string" calcext:value-type="string">
            <text:p>SIDROLANDIA 2</text:p>
          </table:table-cell>
          <table:table-cell office:value-type="float" office:value="0.443142560508782" calcext:value-type="float">
            <text:p>0,443143</text:p>
          </table:table-cell>
        </table:table-row>
        <table:table-row table:style-name="ro1">
          <table:table-cell office:value-type="string" calcext:value-type="string">
            <text:p>CHAPADINHA II</text:p>
          </table:table-cell>
          <table:table-cell office:value-type="string" calcext:value-type="string">
            <text:p>MIRANDA II</text:p>
          </table:table-cell>
          <table:table-cell office:value-type="float" office:value="0.442525687940972" calcext:value-type="float">
            <text:p>0,442526</text:p>
          </table:table-cell>
        </table:table-row>
        <table:table-row table:style-name="ro1">
          <table:table-cell office:value-type="string" calcext:value-type="string">
            <text:p>ALEGRETE2</text:p>
          </table:table-cell>
          <table:table-cell office:value-type="string" calcext:value-type="string">
            <text:p>U.URUGUAIANA</text:p>
          </table:table-cell>
          <table:table-cell office:value-type="float" office:value="0.44130795085742" calcext:value-type="float">
            <text:p>0,441308</text:p>
          </table:table-cell>
        </table:table-row>
        <table:table-row table:style-name="ro1">
          <table:table-cell office:value-type="string" calcext:value-type="string">
            <text:p>MESSIAS</text:p>
          </table:table-cell>
          <table:table-cell office:value-type="string" calcext:value-type="string">
            <text:p>MACEIO</text:p>
          </table:table-cell>
          <table:table-cell office:value-type="float" office:value="0.441153873346324" calcext:value-type="float">
            <text:p>0,441154</text:p>
          </table:table-cell>
        </table:table-row>
        <table:table-row table:style-name="ro1">
          <table:table-cell office:value-type="string" calcext:value-type="string">
            <text:p>AREIA</text:p>
          </table:table-cell>
          <table:table-cell office:value-type="string" calcext:value-type="string">
            <text:p>S. OSORIO</text:p>
          </table:table-cell>
          <table:table-cell office:value-type="float" office:value="0.440227721557454" calcext:value-type="float">
            <text:p>0,440228</text:p>
          </table:table-cell>
        </table:table-row>
        <table:table-row table:style-name="ro1">
          <table:table-cell office:value-type="string" calcext:value-type="string">
            <text:p>FUNIL</text:p>
          </table:table-cell>
          <table:table-cell office:value-type="string" calcext:value-type="string">
            <text:p>SAPEACU</text:p>
          </table:table-cell>
          <table:table-cell office:value-type="float" office:value="0.439800012743172" calcext:value-type="float">
            <text:p>0,439800</text:p>
          </table:table-cell>
        </table:table-row>
        <table:table-row table:style-name="ro1">
          <table:table-cell office:value-type="string" calcext:value-type="string">
            <text:p>PORTO VELHO</text:p>
          </table:table-cell>
          <table:table-cell office:value-type="string" calcext:value-type="string">
            <text:p>SAMUEL</text:p>
          </table:table-cell>
          <table:table-cell office:value-type="float" office:value="0.43972035678654" calcext:value-type="float">
            <text:p>0,439720</text:p>
          </table:table-cell>
        </table:table-row>
        <table:table-row table:style-name="ro1">
          <table:table-cell office:value-type="string" calcext:value-type="string">
            <text:p>RIO DAS EGUAS</text:p>
          </table:table-cell>
          <table:table-cell office:value-type="string" calcext:value-type="string">
            <text:p>RIO GRANDE II</text:p>
          </table:table-cell>
          <table:table-cell office:value-type="float" office:value="0.438694452984942" calcext:value-type="float">
            <text:p>0,438694</text:p>
          </table:table-cell>
        </table:table-row>
        <table:table-row table:style-name="ro1">
          <table:table-cell office:value-type="string" calcext:value-type="string">
            <text:p>FOZ CHAPECO</text:p>
          </table:table-cell>
          <table:table-cell office:value-type="string" calcext:value-type="string">
            <text:p>XANXERE ESU</text:p>
          </table:table-cell>
          <table:table-cell office:value-type="float" office:value="0.438295300042756" calcext:value-type="float">
            <text:p>0,438295</text:p>
          </table:table-cell>
        </table:table-row>
        <table:table-row table:style-name="ro1">
          <table:table-cell office:value-type="string" calcext:value-type="string">
            <text:p>RIO CLARO 2</text:p>
          </table:table-cell>
          <table:table-cell office:value-type="string" calcext:value-type="string">
            <text:p>RONDONOPOLIS</text:p>
          </table:table-cell>
          <table:table-cell office:value-type="float" office:value="0.437168581808446" calcext:value-type="float">
            <text:p>0,437169</text:p>
          </table:table-cell>
        </table:table-row>
        <table:table-row table:style-name="ro1">
          <table:table-cell office:value-type="string" calcext:value-type="string">
            <text:p>FIRMINOPOLIS</text:p>
          </table:table-cell>
          <table:table-cell office:value-type="string" calcext:value-type="string">
            <text:p>TRINDADE</text:p>
          </table:table-cell>
          <table:table-cell office:value-type="float" office:value="0.435949870274917" calcext:value-type="float">
            <text:p>0,435950</text:p>
          </table:table-cell>
        </table:table-row>
        <table:table-row table:style-name="ro1">
          <table:table-cell office:value-type="string" calcext:value-type="string">
            <text:p>EDGARD SOUZA</text:p>
          </table:table-cell>
          <table:table-cell office:value-type="string" calcext:value-type="string">
            <text:p>PIRITUBA</text:p>
          </table:table-cell>
          <table:table-cell office:value-type="float" office:value="0.4356303803424" calcext:value-type="float">
            <text:p>0,435630</text:p>
          </table:table-cell>
        </table:table-row>
        <table:table-row table:style-name="ro1">
          <table:table-cell office:value-type="string" calcext:value-type="string">
            <text:p>LONDRINA ESU</text:p>
          </table:table-cell>
          <table:table-cell office:value-type="string" calcext:value-type="string">
            <text:p>LONDRINA COT</text:p>
          </table:table-cell>
          <table:table-cell office:value-type="float" office:value="0.435137814190952" calcext:value-type="float">
            <text:p>0,435138</text:p>
          </table:table-cell>
        </table:table-row>
        <table:table-row table:style-name="ro1">
          <table:table-cell office:value-type="string" calcext:value-type="string">
            <text:p>GUAIRA</text:p>
          </table:table-cell>
          <table:table-cell office:value-type="string" calcext:value-type="string">
            <text:p>UMUARAMA SUL</text:p>
          </table:table-cell>
          <table:table-cell office:value-type="float" office:value="0.434267501130878" calcext:value-type="float">
            <text:p>0,434268</text:p>
          </table:table-cell>
        </table:table-row>
        <table:table-row table:style-name="ro1">
          <table:table-cell office:value-type="string" calcext:value-type="string">
            <text:p>GASPAR 2</text:p>
          </table:table-cell>
          <table:table-cell office:value-type="string" calcext:value-type="string">
            <text:p>INDAIAL</text:p>
          </table:table-cell>
          <table:table-cell office:value-type="float" office:value="0.433471960708961" calcext:value-type="float">
            <text:p>0,433472</text:p>
          </table:table-cell>
        </table:table-row>
        <table:table-row table:style-name="ro1">
          <table:table-cell office:value-type="string" calcext:value-type="string">
            <text:p>CRUZEIRO SUL</text:p>
          </table:table-cell>
          <table:table-cell office:value-type="string" calcext:value-type="string">
            <text:p>FEIJO</text:p>
          </table:table-cell>
          <table:table-cell office:value-type="float" office:value="0.432426226227589" calcext:value-type="float">
            <text:p>0,432426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CARAUBAS II</text:p>
          </table:table-cell>
          <table:table-cell office:value-type="float" office:value="0.432068167019325" calcext:value-type="float">
            <text:p>0,432068</text:p>
          </table:table-cell>
        </table:table-row>
        <table:table-row table:style-name="ro1">
          <table:table-cell office:value-type="string" calcext:value-type="string">
            <text:p>CRISTIANO ROCHA</text:p>
          </table:table-cell>
          <table:table-cell office:value-type="string" calcext:value-type="string">
            <text:p>PR.FIGUEIREDO</text:p>
          </table:table-cell>
          <table:table-cell office:value-type="float" office:value="0.428730729995359" calcext:value-type="float">
            <text:p>0,428731</text:p>
          </table:table-cell>
        </table:table-row>
        <table:table-row table:style-name="ro1">
          <table:table-cell office:value-type="string" calcext:value-type="string">
            <text:p>BROTAS.MACAUBAS</text:p>
          </table:table-cell>
          <table:table-cell office:value-type="string" calcext:value-type="string">
            <text:p>GENTIO OURO II</text:p>
          </table:table-cell>
          <table:table-cell office:value-type="float" office:value="0.427143745892976" calcext:value-type="float">
            <text:p>0,427144</text:p>
          </table:table-cell>
        </table:table-row>
        <table:table-row table:style-name="ro1">
          <table:table-cell office:value-type="string" calcext:value-type="string">
            <text:p>CERRO CHATO</text:p>
          </table:table-cell>
          <table:table-cell office:value-type="string" calcext:value-type="string">
            <text:p>LIVRAMENTO 3</text:p>
          </table:table-cell>
          <table:table-cell office:value-type="float" office:value="0.426752869833064" calcext:value-type="float">
            <text:p>0,426753</text:p>
          </table:table-cell>
        </table:table-row>
        <table:table-row table:style-name="ro1">
          <table:table-cell office:value-type="string" calcext:value-type="string">
            <text:p>BIGUACU</text:p>
          </table:table-cell>
          <table:table-cell office:value-type="string" calcext:value-type="string">
            <text:p>RATONES</text:p>
          </table:table-cell>
          <table:table-cell office:value-type="float" office:value="0.426117123320293" calcext:value-type="float">
            <text:p>0,426117</text:p>
          </table:table-cell>
        </table:table-row>
        <table:table-row table:style-name="ro1">
          <table:table-cell office:value-type="string" calcext:value-type="string">
            <text:p>MEDEIROS NETOII</text:p>
          </table:table-cell>
          <table:table-cell office:value-type="string" calcext:value-type="string">
            <text:p>TEIX FREITAS II</text:p>
          </table:table-cell>
          <table:table-cell office:value-type="float" office:value="0.425932725262528" calcext:value-type="float">
            <text:p>0,425933</text:p>
          </table:table-cell>
        </table:table-row>
        <table:table-row table:style-name="ro1">
          <table:table-cell office:value-type="string" calcext:value-type="string">
            <text:p>CABREUVA</text:p>
          </table:table-cell>
          <table:table-cell office:value-type="string" calcext:value-type="string">
            <text:p>EDGARD SOUZA</text:p>
          </table:table-cell>
          <table:table-cell office:value-type="float" office:value="0.424146425656393" calcext:value-type="float">
            <text:p>0,424146</text:p>
          </table:table-cell>
        </table:table-row>
        <table:table-row table:style-name="ro1">
          <table:table-cell office:value-type="string" calcext:value-type="string">
            <text:p>LONDRINA ESU</text:p>
          </table:table-cell>
          <table:table-cell office:value-type="string" calcext:value-type="string">
            <text:p>LONDRINA SUL</text:p>
          </table:table-cell>
          <table:table-cell office:value-type="float" office:value="0.423554156910934" calcext:value-type="float">
            <text:p>0,423554</text:p>
          </table:table-cell>
        </table:table-row>
        <table:table-row table:style-name="ro1">
          <table:table-cell office:value-type="string" calcext:value-type="string">
            <text:p>ABDON BATISTA</text:p>
          </table:table-cell>
          <table:table-cell office:value-type="string" calcext:value-type="string">
            <text:p>LAGES</text:p>
          </table:table-cell>
          <table:table-cell office:value-type="float" office:value="0.422536577714626" calcext:value-type="float">
            <text:p>0,422537</text:p>
          </table:table-cell>
        </table:table-row>
        <table:table-row table:style-name="ro1">
          <table:table-cell office:value-type="string" calcext:value-type="string">
            <text:p>G.VALADARES 6</text:p>
          </table:table-cell>
          <table:table-cell office:value-type="string" calcext:value-type="string">
            <text:p>CONSE. PENA</text:p>
          </table:table-cell>
          <table:table-cell office:value-type="float" office:value="0.420719412262371" calcext:value-type="float">
            <text:p>0,420719</text:p>
          </table:table-cell>
        </table:table-row>
        <table:table-row table:style-name="ro1">
          <table:table-cell office:value-type="string" calcext:value-type="string">
            <text:p>MISSOES</text:p>
          </table:table-cell>
          <table:table-cell office:value-type="string" calcext:value-type="string">
            <text:p>SANTO ANGELO</text:p>
          </table:table-cell>
          <table:table-cell office:value-type="float" office:value="0.420389589420788" calcext:value-type="float">
            <text:p>0,420390</text:p>
          </table:table-cell>
        </table:table-row>
        <table:table-row table:style-name="ro1">
          <table:table-cell office:value-type="string" calcext:value-type="string">
            <text:p>G.VALADARES 6</text:p>
          </table:table-cell>
          <table:table-cell office:value-type="string" calcext:value-type="string">
            <text:p>G.VALADARES 2</text:p>
          </table:table-cell>
          <table:table-cell office:value-type="float" office:value="0.419973237064441" calcext:value-type="float">
            <text:p>0,419973</text:p>
          </table:table-cell>
        </table:table-row>
        <table:table-row table:style-name="ro1">
          <table:table-cell office:value-type="string" calcext:value-type="string">
            <text:p>AREIA</text:p>
          </table:table-cell>
          <table:table-cell office:value-type="string" calcext:value-type="string">
            <text:p>GUARAPUAVA OEST</text:p>
          </table:table-cell>
          <table:table-cell office:value-type="float" office:value="0.419213687575842" calcext:value-type="float">
            <text:p>0,419214</text:p>
          </table:table-cell>
        </table:table-row>
        <table:table-row table:style-name="ro1">
          <table:table-cell office:value-type="string" calcext:value-type="string">
            <text:p>PARANAVAI NOR</text:p>
          </table:table-cell>
          <table:table-cell office:value-type="string" calcext:value-type="string">
            <text:p>SARANDI</text:p>
          </table:table-cell>
          <table:table-cell office:value-type="float" office:value="0.416641152476601" calcext:value-type="float">
            <text:p>0,416641</text:p>
          </table:table-cell>
        </table:table-row>
        <table:table-row table:style-name="ro1">
          <table:table-cell office:value-type="string" calcext:value-type="string">
            <text:p>RUROPOLIS</text:p>
          </table:table-cell>
          <table:table-cell office:value-type="string" calcext:value-type="string">
            <text:p>TRANSAMAZONIC</text:p>
          </table:table-cell>
          <table:table-cell office:value-type="float" office:value="0.415836481681008" calcext:value-type="float">
            <text:p>0,415836</text:p>
          </table:table-cell>
        </table:table-row>
        <table:table-row table:style-name="ro1">
          <table:table-cell office:value-type="string" calcext:value-type="string">
            <text:p>LAGOA DO CARRO</text:p>
          </table:table-cell>
          <table:table-cell office:value-type="string" calcext:value-type="string">
            <text:p>COTEMINAS</text:p>
          </table:table-cell>
          <table:table-cell office:value-type="float" office:value="0.415496974371217" calcext:value-type="float">
            <text:p>0,415497</text:p>
          </table:table-cell>
        </table:table-row>
        <table:table-row table:style-name="ro1">
          <table:table-cell office:value-type="string" calcext:value-type="string">
            <text:p>B. ESPERANCA</text:p>
          </table:table-cell>
          <table:table-cell office:value-type="string" calcext:value-type="string">
            <text:p>TERESINA</text:p>
          </table:table-cell>
          <table:table-cell office:value-type="float" office:value="0.415227907572883" calcext:value-type="float">
            <text:p>0,415228</text:p>
          </table:table-cell>
        </table:table-row>
        <table:table-row table:style-name="ro1">
          <table:table-cell office:value-type="string" calcext:value-type="string">
            <text:p>IRATI NORTE</text:p>
          </table:table-cell>
          <table:table-cell office:value-type="string" calcext:value-type="string">
            <text:p>PONTA GROSSA</text:p>
          </table:table-cell>
          <table:table-cell office:value-type="float" office:value="0.414974998781361" calcext:value-type="float">
            <text:p>0,414975</text:p>
          </table:table-cell>
        </table:table-row>
        <table:table-row table:style-name="ro1">
          <table:table-cell office:value-type="string" calcext:value-type="string">
            <text:p>SE BALBINA</text:p>
          </table:table-cell>
          <table:table-cell office:value-type="string" calcext:value-type="string">
            <text:p>PR.FIGUEIREDO</text:p>
          </table:table-cell>
          <table:table-cell office:value-type="float" office:value="0.413973606964054" calcext:value-type="float">
            <text:p>0,413974</text:p>
          </table:table-cell>
        </table:table-row>
        <table:table-row table:style-name="ro1">
          <table:table-cell office:value-type="string" calcext:value-type="string">
            <text:p>ANDIRA LESTE</text:p>
          </table:table-cell>
          <table:table-cell office:value-type="string" calcext:value-type="string">
            <text:p>ASSIS</text:p>
          </table:table-cell>
          <table:table-cell office:value-type="float" office:value="0.413324528759071" calcext:value-type="float">
            <text:p>0,413325</text:p>
          </table:table-cell>
        </table:table-row>
        <table:table-row table:style-name="ro1">
          <table:table-cell office:value-type="string" calcext:value-type="string">
            <text:p>TOME ACU</text:p>
          </table:table-cell>
          <table:table-cell office:value-type="string" calcext:value-type="string">
            <text:p>VILA DO CONDE</text:p>
          </table:table-cell>
          <table:table-cell office:value-type="float" office:value="0.412772094426174" calcext:value-type="float">
            <text:p>0,412772</text:p>
          </table:table-cell>
        </table:table-row>
        <table:table-row table:style-name="ro1">
          <table:table-cell office:value-type="string" calcext:value-type="string">
            <text:p>CAMPO BOM</text:p>
          </table:table-cell>
          <table:table-cell office:value-type="string" calcext:value-type="string">
            <text:p>CAXIAS</text:p>
          </table:table-cell>
          <table:table-cell office:value-type="float" office:value="0.411448956699753" calcext:value-type="float">
            <text:p>0,411449</text:p>
          </table:table-cell>
        </table:table-row>
        <table:table-row table:style-name="ro1">
          <table:table-cell office:value-type="string" calcext:value-type="string">
            <text:p>ITABIRA 2</text:p>
          </table:table-cell>
          <table:table-cell office:value-type="string" calcext:value-type="string">
            <text:p>ITABIRA 5</text:p>
          </table:table-cell>
          <table:table-cell office:value-type="float" office:value="0.411397012772047" calcext:value-type="float">
            <text:p>0,411397</text:p>
          </table:table-cell>
        </table:table-row>
        <table:table-row table:style-name="ro1">
          <table:table-cell office:value-type="string" calcext:value-type="string">
            <text:p>MAURITI II</text:p>
          </table:table-cell>
          <table:table-cell office:value-type="string" calcext:value-type="string">
            <text:p>MILAGRES</text:p>
          </table:table-cell>
          <table:table-cell office:value-type="float" office:value="0.411356263919845" calcext:value-type="float">
            <text:p>0,411356</text:p>
          </table:table-cell>
        </table:table-row>
        <table:table-row table:style-name="ro1">
          <table:table-cell office:value-type="string" calcext:value-type="string">
            <text:p>FIGUEIRA</text:p>
          </table:table-cell>
          <table:table-cell office:value-type="string" calcext:value-type="string">
            <text:p>LONDRINA ESU</text:p>
          </table:table-cell>
          <table:table-cell office:value-type="float" office:value="0.411078836319566" calcext:value-type="float">
            <text:p>0,411079</text:p>
          </table:table-cell>
        </table:table-row>
        <table:table-row table:style-name="ro1">
          <table:table-cell office:value-type="string" calcext:value-type="string">
            <text:p>CASTRO NORTE</text:p>
          </table:table-cell>
          <table:table-cell office:value-type="string" calcext:value-type="string">
            <text:p>PONTA GROSSA</text:p>
          </table:table-cell>
          <table:table-cell office:value-type="float" office:value="0.410817135328785" calcext:value-type="float">
            <text:p>0,410817</text:p>
          </table:table-cell>
        </table:table-row>
        <table:table-row table:style-name="ro1">
          <table:table-cell office:value-type="string" calcext:value-type="string">
            <text:p>BRUMADO II</text:p>
          </table:table-cell>
          <table:table-cell office:value-type="string" calcext:value-type="string">
            <text:p>IBICOARA</text:p>
          </table:table-cell>
          <table:table-cell office:value-type="float" office:value="0.410061358245477" calcext:value-type="float">
            <text:p>0,410061</text:p>
          </table:table-cell>
        </table:table-row>
        <table:table-row table:style-name="ro1">
          <table:table-cell office:value-type="string" calcext:value-type="string">
            <text:p>FORTALEZA II</text:p>
          </table:table-cell>
          <table:table-cell office:value-type="string" calcext:value-type="string">
            <text:p>PICI II</text:p>
          </table:table-cell>
          <table:table-cell office:value-type="float" office:value="0.409899630247014" calcext:value-type="float">
            <text:p>0,409900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PAR.PAULISTA2</text:p>
          </table:table-cell>
          <table:table-cell office:value-type="float" office:value="0.40953015792543" calcext:value-type="float">
            <text:p>0,409530</text:p>
          </table:table-cell>
        </table:table-row>
        <table:table-row table:style-name="ro1">
          <table:table-cell office:value-type="string" calcext:value-type="string">
            <text:p>BIGUACU</text:p>
          </table:table-cell>
          <table:table-cell office:value-type="string" calcext:value-type="string">
            <text:p>J.LACERDA-B</text:p>
          </table:table-cell>
          <table:table-cell office:value-type="float" office:value="0.409386660601364" calcext:value-type="float">
            <text:p>0,409387</text:p>
          </table:table-cell>
        </table:table-row>
        <table:table-row table:style-name="ro1">
          <table:table-cell office:value-type="string" calcext:value-type="string">
            <text:p>C.MOURAO</text:p>
          </table:table-cell>
          <table:table-cell office:value-type="string" calcext:value-type="string">
            <text:p>S. OSORIO</text:p>
          </table:table-cell>
          <table:table-cell office:value-type="float" office:value="0.409360699272579" calcext:value-type="float">
            <text:p>0,409361</text:p>
          </table:table-cell>
        </table:table-row>
        <table:table-row table:style-name="ro1">
          <table:table-cell office:value-type="string" calcext:value-type="string">
            <text:p>ICO</text:p>
          </table:table-cell>
          <table:table-cell office:value-type="string" calcext:value-type="string">
            <text:p>MILAGRES</text:p>
          </table:table-cell>
          <table:table-cell office:value-type="float" office:value="0.408717989503125" calcext:value-type="float">
            <text:p>0,408718</text:p>
          </table:table-cell>
        </table:table-row>
        <table:table-row table:style-name="ro1">
          <table:table-cell office:value-type="string" calcext:value-type="string">
            <text:p>CAXIAS</text:p>
          </table:table-cell>
          <table:table-cell office:value-type="string" calcext:value-type="string">
            <text:p>N.PETROPOLIS2</text:p>
          </table:table-cell>
          <table:table-cell office:value-type="float" office:value="0.408388561630767" calcext:value-type="float">
            <text:p>0,408389</text:p>
          </table:table-cell>
        </table:table-row>
        <table:table-row table:style-name="ro1">
          <table:table-cell office:value-type="string" calcext:value-type="string">
            <text:p>SANT. ARAGUAIA</text:p>
          </table:table-cell>
          <table:table-cell office:value-type="string" calcext:value-type="string">
            <text:p>XINGUARA 2</text:p>
          </table:table-cell>
          <table:table-cell office:value-type="float" office:value="0.407864386162245" calcext:value-type="float">
            <text:p>0,407864</text:p>
          </table:table-cell>
        </table:table-row>
        <table:table-row table:style-name="ro1">
          <table:table-cell office:value-type="string" calcext:value-type="string">
            <text:p>MILAGRES</text:p>
          </table:table-cell>
          <table:table-cell office:value-type="string" calcext:value-type="string">
            <text:p>COREMAS</text:p>
          </table:table-cell>
          <table:table-cell office:value-type="float" office:value="0.4070586318178" calcext:value-type="float">
            <text:p>0,407059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SANTA ROSA 1</text:p>
          </table:table-cell>
          <table:table-cell office:value-type="float" office:value="0.405574518045942" calcext:value-type="float">
            <text:p>0,405575</text:p>
          </table:table-cell>
        </table:table-row>
        <table:table-row table:style-name="ro1">
          <table:table-cell office:value-type="string" calcext:value-type="string">
            <text:p>EXTREMOZ II</text:p>
          </table:table-cell>
          <table:table-cell office:value-type="string" calcext:value-type="string">
            <text:p>NATAL III</text:p>
          </table:table-cell>
          <table:table-cell office:value-type="float" office:value="0.404868842942526" calcext:value-type="float">
            <text:p>0,404869</text:p>
          </table:table-cell>
        </table:table-row>
        <table:table-row table:style-name="ro1">
          <table:table-cell office:value-type="string" calcext:value-type="string">
            <text:p>GASPAR 2</text:p>
          </table:table-cell>
          <table:table-cell office:value-type="string" calcext:value-type="string">
            <text:p>PALHOCA <text:s/>ESU</text:p>
          </table:table-cell>
          <table:table-cell office:value-type="float" office:value="0.404326203522899" calcext:value-type="float">
            <text:p>0,404326</text:p>
          </table:table-cell>
        </table:table-row>
        <table:table-row table:style-name="ro1">
          <table:table-cell office:value-type="string" calcext:value-type="string">
            <text:p>MESQUITA</text:p>
          </table:table-cell>
          <table:table-cell office:value-type="string" calcext:value-type="string">
            <text:p>TIMOTEO 2</text:p>
          </table:table-cell>
          <table:table-cell office:value-type="float" office:value="0.404167488590764" calcext:value-type="float">
            <text:p>0,404167</text:p>
          </table:table-cell>
        </table:table-row>
        <table:table-row table:style-name="ro1">
          <table:table-cell office:value-type="string" calcext:value-type="string">
            <text:p>FORQUILHINHA</text:p>
          </table:table-cell>
          <table:table-cell office:value-type="string" calcext:value-type="string">
            <text:p>SIDEROPOLIS 2</text:p>
          </table:table-cell>
          <table:table-cell office:value-type="float" office:value="0.40391502319606" calcext:value-type="float">
            <text:p>0,403915</text:p>
          </table:table-cell>
        </table:table-row>
        <table:table-row table:style-name="ro1">
          <table:table-cell office:value-type="string" calcext:value-type="string">
            <text:p>ABAIARA</text:p>
          </table:table-cell>
          <table:table-cell office:value-type="string" calcext:value-type="string">
            <text:p>MILAGRES</text:p>
          </table:table-cell>
          <table:table-cell office:value-type="float" office:value="0.403910909293972" calcext:value-type="float">
            <text:p>0,403911</text:p>
          </table:table-cell>
        </table:table-row>
        <table:table-row table:style-name="ro1">
          <table:table-cell office:value-type="string" calcext:value-type="string">
            <text:p>NATAL III</text:p>
          </table:table-cell>
          <table:table-cell office:value-type="string" calcext:value-type="string">
            <text:p>NATAL II</text:p>
          </table:table-cell>
          <table:table-cell office:value-type="float" office:value="0.402856413048683" calcext:value-type="float">
            <text:p>0,402856</text:p>
          </table:table-cell>
        </table:table-row>
        <table:table-row table:style-name="ro1">
          <table:table-cell office:value-type="string" calcext:value-type="string">
            <text:p>MACAMBARA</text:p>
          </table:table-cell>
          <table:table-cell office:value-type="string" calcext:value-type="string">
            <text:p>U.URUGUAIANA</text:p>
          </table:table-cell>
          <table:table-cell office:value-type="float" office:value="0.402594495983461" calcext:value-type="float">
            <text:p>0,402594</text:p>
          </table:table-cell>
        </table:table-row>
        <table:table-row table:style-name="ro1">
          <table:table-cell office:value-type="string" calcext:value-type="string">
            <text:p>IPATINGA 1</text:p>
          </table:table-cell>
          <table:table-cell office:value-type="string" calcext:value-type="string">
            <text:p>MESQUITA</text:p>
          </table:table-cell>
          <table:table-cell office:value-type="float" office:value="0.400273556468003" calcext:value-type="float">
            <text:p>0,400274</text:p>
          </table:table-cell>
        </table:table-row>
        <table:table-row table:style-name="ro1">
          <table:table-cell office:value-type="string" calcext:value-type="string">
            <text:p>S.JOAO PIAUI</text:p>
          </table:table-cell>
          <table:table-cell office:value-type="string" calcext:value-type="string">
            <text:p>ELISEU MARTINS</text:p>
          </table:table-cell>
          <table:table-cell office:value-type="float" office:value="0.398335849724832" calcext:value-type="float">
            <text:p>0,398336</text:p>
          </table:table-cell>
        </table:table-row>
        <table:table-row table:style-name="ro1">
          <table:table-cell office:value-type="string" calcext:value-type="string">
            <text:p>PRE.MEDICI</text:p>
          </table:table-cell>
          <table:table-cell office:value-type="string" calcext:value-type="string">
            <text:p>SANTA CRUZ1</text:p>
          </table:table-cell>
          <table:table-cell office:value-type="float" office:value="0.398320578461811" calcext:value-type="float">
            <text:p>0,398321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string" calcext:value-type="string">
            <text:p>PILARZINHO</text:p>
          </table:table-cell>
          <table:table-cell office:value-type="float" office:value="0.397269325610948" calcext:value-type="float">
            <text:p>0,397269</text:p>
          </table:table-cell>
        </table:table-row>
        <table:table-row table:style-name="ro1">
          <table:table-cell office:value-type="string" calcext:value-type="string">
            <text:p>PITUACU</text:p>
          </table:table-cell>
          <table:table-cell office:value-type="string" calcext:value-type="string">
            <text:p>NARANDIBA</text:p>
          </table:table-cell>
          <table:table-cell office:value-type="float" office:value="0.39690658499163" calcext:value-type="float">
            <text:p>0,396907</text:p>
          </table:table-cell>
        </table:table-row>
        <table:table-row table:style-name="ro1">
          <table:table-cell office:value-type="string" calcext:value-type="string">
            <text:p>TAPAJOS II</text:p>
          </table:table-cell>
          <table:table-cell office:value-type="string" calcext:value-type="string">
            <text:p>TRANSAMAZONIC</text:p>
          </table:table-cell>
          <table:table-cell office:value-type="float" office:value="0.395978610003253" calcext:value-type="float">
            <text:p>0,395979</text:p>
          </table:table-cell>
        </table:table-row>
        <table:table-row table:style-name="ro1">
          <table:table-cell office:value-type="string" calcext:value-type="string">
            <text:p>P.DUTRA</text:p>
          </table:table-cell>
          <table:table-cell office:value-type="string" calcext:value-type="string">
            <text:p>PERITORO</text:p>
          </table:table-cell>
          <table:table-cell office:value-type="float" office:value="0.395848438484903" calcext:value-type="float">
            <text:p>0,395848</text:p>
          </table:table-cell>
        </table:table-row>
        <table:table-row table:style-name="ro1">
          <table:table-cell office:value-type="string" calcext:value-type="string">
            <text:p>PICOS</text:p>
          </table:table-cell>
          <table:table-cell office:value-type="string" calcext:value-type="string">
            <text:p>S.JOAO PIAUI</text:p>
          </table:table-cell>
          <table:table-cell office:value-type="float" office:value="0.394989112491589" calcext:value-type="float">
            <text:p>0,394989</text:p>
          </table:table-cell>
        </table:table-row>
        <table:table-row table:style-name="ro1">
          <table:table-cell office:value-type="string" calcext:value-type="string">
            <text:p>BALSAS</text:p>
          </table:table-cell>
          <table:table-cell office:value-type="string" calcext:value-type="string">
            <text:p>RIB.GONCALVES</text:p>
          </table:table-cell>
          <table:table-cell office:value-type="float" office:value="0.394606513124301" calcext:value-type="float">
            <text:p>0,394607</text:p>
          </table:table-cell>
        </table:table-row>
        <table:table-row table:style-name="ro1">
          <table:table-cell office:value-type="string" calcext:value-type="string">
            <text:p>LONDRINA ESU</text:p>
          </table:table-cell>
          <table:table-cell office:value-type="string" calcext:value-type="string">
            <text:p>MARINGA</text:p>
          </table:table-cell>
          <table:table-cell office:value-type="float" office:value="0.392761207790324" calcext:value-type="float">
            <text:p>0,392761</text:p>
          </table:table-cell>
        </table:table-row>
        <table:table-row table:style-name="ro1">
          <table:table-cell office:value-type="string" calcext:value-type="string">
            <text:p>CURIT.LESTE</text:p>
          </table:table-cell>
          <table:table-cell office:value-type="string" calcext:value-type="string">
            <text:p>SANTA MONICA</text:p>
          </table:table-cell>
          <table:table-cell office:value-type="float" office:value="0.392333345952418" calcext:value-type="float">
            <text:p>0,392333</text:p>
          </table:table-cell>
        </table:table-row>
        <table:table-row table:style-name="ro1">
          <table:table-cell office:value-type="string" calcext:value-type="string">
            <text:p>CASCAVEL</text:p>
          </table:table-cell>
          <table:table-cell office:value-type="string" calcext:value-type="string">
            <text:p>CASCAVEL OEST</text:p>
          </table:table-cell>
          <table:table-cell office:value-type="float" office:value="0.391958570955829" calcext:value-type="float">
            <text:p>0,391959</text:p>
          </table:table-cell>
        </table:table-row>
        <table:table-row table:style-name="ro1">
          <table:table-cell office:value-type="string" calcext:value-type="string">
            <text:p>CASCAVEL OEST</text:p>
          </table:table-cell>
          <table:table-cell office:value-type="string" calcext:value-type="string">
            <text:p>MEDIANEIRA NT</text:p>
          </table:table-cell>
          <table:table-cell office:value-type="float" office:value="0.391706734665059" calcext:value-type="float">
            <text:p>0,391707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MOSSORO II</text:p>
          </table:table-cell>
          <table:table-cell office:value-type="float" office:value="0.391590364269995" calcext:value-type="float">
            <text:p>0,391590</text:p>
          </table:table-cell>
        </table:table-row>
        <table:table-row table:style-name="ro1">
          <table:table-cell office:value-type="string" calcext:value-type="string">
            <text:p>ITAUBA</text:p>
          </table:table-cell>
          <table:table-cell office:value-type="string" calcext:value-type="string">
            <text:p>P.PETROQUIMIC</text:p>
          </table:table-cell>
          <table:table-cell office:value-type="float" office:value="0.39134499121127" calcext:value-type="float">
            <text:p>0,391345</text:p>
          </table:table-cell>
        </table:table-row>
        <table:table-row table:style-name="ro1">
          <table:table-cell office:value-type="string" calcext:value-type="string">
            <text:p>PATO BRANCO</text:p>
          </table:table-cell>
          <table:table-cell office:value-type="string" calcext:value-type="string">
            <text:p>S. OSORIO</text:p>
          </table:table-cell>
          <table:table-cell office:value-type="float" office:value="0.391102319604569" calcext:value-type="float">
            <text:p>0,391102</text:p>
          </table:table-cell>
        </table:table-row>
        <table:table-row table:style-name="ro1">
          <table:table-cell office:value-type="string" calcext:value-type="string">
            <text:p>ITABIRA 5</text:p>
          </table:table-cell>
          <table:table-cell office:value-type="string" calcext:value-type="string">
            <text:p>SABARA 3</text:p>
          </table:table-cell>
          <table:table-cell office:value-type="float" office:value="0.390977523527869" calcext:value-type="float">
            <text:p>0,390978</text:p>
          </table:table-cell>
        </table:table-row>
        <table:table-row table:style-name="ro1">
          <table:table-cell office:value-type="string" calcext:value-type="string">
            <text:p>P.AFONSO III</text:p>
          </table:table-cell>
          <table:table-cell office:value-type="string" calcext:value-type="string">
            <text:p>BOM NOME</text:p>
          </table:table-cell>
          <table:table-cell office:value-type="float" office:value="0.390883561775373" calcext:value-type="float">
            <text:p>0,390884</text:p>
          </table:table-cell>
        </table:table-row>
        <table:table-row table:style-name="ro1">
          <table:table-cell office:value-type="string" calcext:value-type="string">
            <text:p>IBIPORA</text:p>
          </table:table-cell>
          <table:table-cell office:value-type="string" calcext:value-type="string">
            <text:p>LONDRINA ESU</text:p>
          </table:table-cell>
          <table:table-cell office:value-type="float" office:value="0.39038085816778" calcext:value-type="float">
            <text:p>0,390381</text:p>
          </table:table-cell>
        </table:table-row>
        <table:table-row table:style-name="ro1">
          <table:table-cell office:value-type="string" calcext:value-type="string">
            <text:p>CAMPO FORMOSO</text:p>
          </table:table-cell>
          <table:table-cell office:value-type="string" calcext:value-type="string">
            <text:p>OUROLANDIA II</text:p>
          </table:table-cell>
          <table:table-cell office:value-type="float" office:value="0.388812797192542" calcext:value-type="float">
            <text:p>0,388813</text:p>
          </table:table-cell>
        </table:table-row>
        <table:table-row table:style-name="ro1">
          <table:table-cell office:value-type="string" calcext:value-type="string">
            <text:p>INTEGRADORA</text:p>
          </table:table-cell>
          <table:table-cell office:value-type="string" calcext:value-type="string">
            <text:p>XINGUARA 2</text:p>
          </table:table-cell>
          <table:table-cell office:value-type="float" office:value="0.388780268194859" calcext:value-type="float">
            <text:p>0,388780</text:p>
          </table:table-cell>
        </table:table-row>
        <table:table-row table:style-name="ro1">
          <table:table-cell office:value-type="string" calcext:value-type="string">
            <text:p>IMPERATRIZ</text:p>
          </table:table-cell>
          <table:table-cell office:value-type="string" calcext:value-type="string">
            <text:p>PORTO FRANCO</text:p>
          </table:table-cell>
          <table:table-cell office:value-type="float" office:value="0.38851938567754" calcext:value-type="float">
            <text:p>0,388519</text:p>
          </table:table-cell>
        </table:table-row>
        <table:table-row table:style-name="ro1">
          <table:table-cell office:value-type="string" calcext:value-type="string">
            <text:p>SINOP</text:p>
          </table:table-cell>
          <table:table-cell office:value-type="string" calcext:value-type="string">
            <text:p>SORRISO</text:p>
          </table:table-cell>
          <table:table-cell office:value-type="float" office:value="0.3856802334655" calcext:value-type="float">
            <text:p>0,385680</text:p>
          </table:table-cell>
        </table:table-row>
        <table:table-row table:style-name="ro1">
          <table:table-cell office:value-type="string" calcext:value-type="string">
            <text:p>PONTA G NORTE</text:p>
          </table:table-cell>
          <table:table-cell office:value-type="string" calcext:value-type="string">
            <text:p>PONTA GROSSA</text:p>
          </table:table-cell>
          <table:table-cell office:value-type="float" office:value="0.384766013507649" calcext:value-type="float">
            <text:p>0,384766</text:p>
          </table:table-cell>
        </table:table-row>
        <table:table-row table:style-name="ro1">
          <table:table-cell office:value-type="string" calcext:value-type="string">
            <text:p>BIGUACU</text:p>
          </table:table-cell>
          <table:table-cell office:value-type="string" calcext:value-type="string">
            <text:p>DESTERRO</text:p>
          </table:table-cell>
          <table:table-cell office:value-type="float" office:value="0.384376155084768" calcext:value-type="float">
            <text:p>0,384376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office:value-type="string" calcext:value-type="string">
            <text:p>C. DOURADA</text:p>
          </table:table-cell>
          <table:table-cell office:value-type="float" office:value="0.384288540404269" calcext:value-type="float">
            <text:p>0,384289</text:p>
          </table:table-cell>
        </table:table-row>
        <table:table-row table:style-name="ro1">
          <table:table-cell office:value-type="string" calcext:value-type="string">
            <text:p>CAMAQUA</text:p>
          </table:table-cell>
          <table:table-cell office:value-type="string" calcext:value-type="string">
            <text:p>PRE.MEDICI</text:p>
          </table:table-cell>
          <table:table-cell office:value-type="float" office:value="0.384146509567123" calcext:value-type="float">
            <text:p>0,384147</text:p>
          </table:table-cell>
        </table:table-row>
        <table:table-row table:style-name="ro1">
          <table:table-cell office:value-type="string" calcext:value-type="string">
            <text:p>SAPEACU</text:p>
          </table:table-cell>
          <table:table-cell office:value-type="string" calcext:value-type="string">
            <text:p>STO.A.JESUS</text:p>
          </table:table-cell>
          <table:table-cell office:value-type="float" office:value="0.383681903541869" calcext:value-type="float">
            <text:p>0,383682</text:p>
          </table:table-cell>
        </table:table-row>
        <table:table-row table:style-name="ro1">
          <table:table-cell office:value-type="string" calcext:value-type="string">
            <text:p>CASCAVEL NORT</text:p>
          </table:table-cell>
          <table:table-cell office:value-type="string" calcext:value-type="string">
            <text:p>CASCAVEL OEST</text:p>
          </table:table-cell>
          <table:table-cell office:value-type="float" office:value="0.383558383196004" calcext:value-type="float">
            <text:p>0,383558</text:p>
          </table:table-cell>
        </table:table-row>
        <table:table-row table:style-name="ro1">
          <table:table-cell office:value-type="string" calcext:value-type="string">
            <text:p>BAGE2</text:p>
          </table:table-cell>
          <table:table-cell office:value-type="string" calcext:value-type="string">
            <text:p>CANDIOTA 2</text:p>
          </table:table-cell>
          <table:table-cell office:value-type="float" office:value="0.382945450485741" calcext:value-type="float">
            <text:p>0,382945</text:p>
          </table:table-cell>
        </table:table-row>
        <table:table-row table:style-name="ro1">
          <table:table-cell office:value-type="string" calcext:value-type="string">
            <text:p>BARREIRAS II</text:p>
          </table:table-cell>
          <table:table-cell office:value-type="string" calcext:value-type="string">
            <text:p>TABOCAS BRJ VLH</text:p>
          </table:table-cell>
          <table:table-cell office:value-type="float" office:value="0.381975560788437" calcext:value-type="float">
            <text:p>0,381976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string" calcext:value-type="string">
            <text:p>CURITIBA NORT</text:p>
          </table:table-cell>
          <table:table-cell office:value-type="float" office:value="0.381692363501561" calcext:value-type="float">
            <text:p>0,381692</text:p>
          </table:table-cell>
        </table:table-row>
        <table:table-row table:style-name="ro1">
          <table:table-cell office:value-type="string" calcext:value-type="string">
            <text:p>CURIT.LESTE</text:p>
          </table:table-cell>
          <table:table-cell office:value-type="string" calcext:value-type="string">
            <text:p>D.S.J.PINHAIS</text:p>
          </table:table-cell>
          <table:table-cell office:value-type="float" office:value="0.381586041470854" calcext:value-type="float">
            <text:p>0,381586</text:p>
          </table:table-cell>
        </table:table-row>
        <table:table-row table:style-name="ro1">
          <table:table-cell office:value-type="string" calcext:value-type="string">
            <text:p>LAJEADO 2</text:p>
          </table:table-cell>
          <table:table-cell office:value-type="string" calcext:value-type="string">
            <text:p>NOVA STA RITA</text:p>
          </table:table-cell>
          <table:table-cell office:value-type="float" office:value="0.38151069692875" calcext:value-type="float">
            <text:p>0,381511</text:p>
          </table:table-cell>
        </table:table-row>
        <table:table-row table:style-name="ro1">
          <table:table-cell office:value-type="string" calcext:value-type="string">
            <text:p>PELOTAS3</text:p>
          </table:table-cell>
          <table:table-cell office:value-type="string" calcext:value-type="string">
            <text:p>PRE.MEDICI</text:p>
          </table:table-cell>
          <table:table-cell office:value-type="float" office:value="0.381168834645119" calcext:value-type="float">
            <text:p>0,381169</text:p>
          </table:table-cell>
        </table:table-row>
        <table:table-row table:style-name="ro1">
          <table:table-cell office:value-type="string" calcext:value-type="string">
            <text:p>JABOATAO II</text:p>
          </table:table-cell>
          <table:table-cell office:value-type="string" calcext:value-type="string">
            <text:p>RECIFE II</text:p>
          </table:table-cell>
          <table:table-cell office:value-type="float" office:value="0.38099943045887" calcext:value-type="float">
            <text:p>0,380999</text:p>
          </table:table-cell>
        </table:table-row>
        <table:table-row table:style-name="ro1">
          <table:table-cell office:value-type="string" calcext:value-type="string">
            <text:p>MESQUITA</text:p>
          </table:table-cell>
          <table:table-cell office:value-type="string" calcext:value-type="string">
            <text:p>PORTO ESTRELA</text:p>
          </table:table-cell>
          <table:table-cell office:value-type="float" office:value="0.380653501936926" calcext:value-type="float">
            <text:p>0,380654</text:p>
          </table:table-cell>
        </table:table-row>
        <table:table-row table:style-name="ro1">
          <table:table-cell office:value-type="string" calcext:value-type="string">
            <text:p>CAMACARI II</text:p>
          </table:table-cell>
          <table:table-cell office:value-type="string" calcext:value-type="string">
            <text:p>F. SANTANA III</text:p>
          </table:table-cell>
          <table:table-cell office:value-type="float" office:value="0.380317138930818" calcext:value-type="float">
            <text:p>0,380317</text:p>
          </table:table-cell>
        </table:table-row>
        <table:table-row table:style-name="ro1">
          <table:table-cell office:value-type="string" calcext:value-type="string">
            <text:p>CRATO II</text:p>
          </table:table-cell>
          <table:table-cell office:value-type="string" calcext:value-type="string">
            <text:p>TAUA II</text:p>
          </table:table-cell>
          <table:table-cell office:value-type="float" office:value="0.379487766916123" calcext:value-type="float">
            <text:p>0,379488</text:p>
          </table:table-cell>
        </table:table-row>
        <table:table-row table:style-name="ro1">
          <table:table-cell office:value-type="string" calcext:value-type="string">
            <text:p>CHAPADA III</text:p>
          </table:table-cell>
          <table:table-cell office:value-type="string" calcext:value-type="string">
            <text:p>CURRAL PIAUI II</text:p>
          </table:table-cell>
          <table:table-cell office:value-type="float" office:value="0.378961534387871" calcext:value-type="float">
            <text:p>0,378962</text:p>
          </table:table-cell>
        </table:table-row>
        <table:table-row table:style-name="ro1">
          <table:table-cell office:value-type="string" calcext:value-type="string">
            <text:p>CRATO II</text:p>
          </table:table-cell>
          <table:table-cell office:value-type="string" calcext:value-type="string">
            <text:p>MILAGRES</text:p>
          </table:table-cell>
          <table:table-cell office:value-type="float" office:value="0.378435150146109" calcext:value-type="float">
            <text:p>0,378435</text:p>
          </table:table-cell>
        </table:table-row>
        <table:table-row table:style-name="ro1">
          <table:table-cell office:value-type="string" calcext:value-type="string">
            <text:p>ACAILANDIA</text:p>
          </table:table-cell>
          <table:table-cell office:value-type="string" calcext:value-type="string">
            <text:p>DOM ELISEU II</text:p>
          </table:table-cell>
          <table:table-cell office:value-type="float" office:value="0.37821641282245" calcext:value-type="float">
            <text:p>0,378216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string" calcext:value-type="string">
            <text:p>C.COMPRIDO</text:p>
          </table:table-cell>
          <table:table-cell office:value-type="float" office:value="0.376681892262239" calcext:value-type="float">
            <text:p>0,376682</text:p>
          </table:table-cell>
        </table:table-row>
        <table:table-row table:style-name="ro1">
          <table:table-cell office:value-type="string" calcext:value-type="string">
            <text:p>PIRATININGA</text:p>
          </table:table-cell>
          <table:table-cell office:value-type="string" calcext:value-type="string">
            <text:p>INTERLAGOS</text:p>
          </table:table-cell>
          <table:table-cell office:value-type="float" office:value="0.376068943903087" calcext:value-type="float">
            <text:p>0,376069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string" calcext:value-type="string">
            <text:p>JACARACANGA</text:p>
          </table:table-cell>
          <table:table-cell office:value-type="float" office:value="0.375709837446742" calcext:value-type="float">
            <text:p>0,375710</text:p>
          </table:table-cell>
        </table:table-row>
        <table:table-row table:style-name="ro1">
          <table:table-cell office:value-type="string" calcext:value-type="string">
            <text:p>IRECE</text:p>
          </table:table-cell>
          <table:table-cell office:value-type="string" calcext:value-type="string">
            <text:p>OUROLANDIA II</text:p>
          </table:table-cell>
          <table:table-cell office:value-type="float" office:value="0.374863469451264" calcext:value-type="float">
            <text:p>0,374863</text:p>
          </table:table-cell>
        </table:table-row>
        <table:table-row table:style-name="ro1">
          <table:table-cell office:value-type="string" calcext:value-type="string">
            <text:p>CHAPADA I</text:p>
          </table:table-cell>
          <table:table-cell office:value-type="string" calcext:value-type="string">
            <text:p>CURRAL PIAUI II</text:p>
          </table:table-cell>
          <table:table-cell office:value-type="float" office:value="0.374356862561298" calcext:value-type="float">
            <text:p>0,374357</text:p>
          </table:table-cell>
        </table:table-row>
        <table:table-row table:style-name="ro1">
          <table:table-cell office:value-type="string" calcext:value-type="string">
            <text:p>NOVA STA RITA</text:p>
          </table:table-cell>
          <table:table-cell office:value-type="string" calcext:value-type="string">
            <text:p>SCHARLAU 2</text:p>
          </table:table-cell>
          <table:table-cell office:value-type="float" office:value="0.374060238535872" calcext:value-type="float">
            <text:p>0,374060</text:p>
          </table:table-cell>
        </table:table-row>
        <table:table-row table:style-name="ro1">
          <table:table-cell office:value-type="string" calcext:value-type="string">
            <text:p>CAMACARI II</text:p>
          </table:table-cell>
          <table:table-cell office:value-type="string" calcext:value-type="string">
            <text:p>G.MANGABEIRA</text:p>
          </table:table-cell>
          <table:table-cell office:value-type="float" office:value="0.373199706263554" calcext:value-type="float">
            <text:p>0,373200</text:p>
          </table:table-cell>
        </table:table-row>
        <table:table-row table:style-name="ro1">
          <table:table-cell office:value-type="string" calcext:value-type="string">
            <text:p>APUCARANA</text:p>
          </table:table-cell>
          <table:table-cell office:value-type="string" calcext:value-type="string">
            <text:p>LONDRINA ESU</text:p>
          </table:table-cell>
          <table:table-cell office:value-type="float" office:value="0.373142924379957" calcext:value-type="float">
            <text:p>0,373143</text:p>
          </table:table-cell>
        </table:table-row>
        <table:table-row table:style-name="ro1">
          <table:table-cell office:value-type="string" calcext:value-type="string">
            <text:p>RECIFE II</text:p>
          </table:table-cell>
          <table:table-cell office:value-type="string" calcext:value-type="string">
            <text:p>JOAIRAM</text:p>
          </table:table-cell>
          <table:table-cell office:value-type="float" office:value="0.370040551723019" calcext:value-type="float">
            <text:p>0,370041</text:p>
          </table:table-cell>
        </table:table-row>
        <table:table-row table:style-name="ro1">
          <table:table-cell office:value-type="string" calcext:value-type="string">
            <text:p>CURIT.LESTE</text:p>
          </table:table-cell>
          <table:table-cell office:value-type="string" calcext:value-type="string">
            <text:p>UBERABA</text:p>
          </table:table-cell>
          <table:table-cell office:value-type="float" office:value="0.36966386907896" calcext:value-type="float">
            <text:p>0,369664</text:p>
          </table:table-cell>
        </table:table-row>
        <table:table-row table:style-name="ro1">
          <table:table-cell office:value-type="string" calcext:value-type="string">
            <text:p>BAGUARI-SE</text:p>
          </table:table-cell>
          <table:table-cell office:value-type="string" calcext:value-type="string">
            <text:p>MESQUITA</text:p>
          </table:table-cell>
          <table:table-cell office:value-type="float" office:value="0.36965228578206" calcext:value-type="float">
            <text:p>0,369652</text:p>
          </table:table-cell>
        </table:table-row>
        <table:table-row table:style-name="ro1">
          <table:table-cell office:value-type="string" calcext:value-type="string">
            <text:p>CENTRO-CTT</text:p>
          </table:table-cell>
          <table:table-cell office:value-type="string" calcext:value-type="string">
            <text:p>CENTRO-CTR</text:p>
          </table:table-cell>
          <table:table-cell office:value-type="float" office:value="0.369161338870813" calcext:value-type="float">
            <text:p>0,369161</text:p>
          </table:table-cell>
        </table:table-row>
        <table:table-row table:style-name="ro1">
          <table:table-cell office:value-type="string" calcext:value-type="string">
            <text:p>MISSOES</text:p>
          </table:table-cell>
          <table:table-cell office:value-type="string" calcext:value-type="string">
            <text:p>SAO BORJA2</text:p>
          </table:table-cell>
          <table:table-cell office:value-type="float" office:value="0.36766472080612" calcext:value-type="float">
            <text:p>0,367665</text:p>
          </table:table-cell>
        </table:table-row>
        <table:table-row table:style-name="ro1">
          <table:table-cell office:value-type="string" calcext:value-type="string">
            <text:p>GOIANINHA</text:p>
          </table:table-cell>
          <table:table-cell office:value-type="string" calcext:value-type="string">
            <text:p>RECIFE II</text:p>
          </table:table-cell>
          <table:table-cell office:value-type="float" office:value="0.367518756254576" calcext:value-type="float">
            <text:p>0,367519</text:p>
          </table:table-cell>
        </table:table-row>
        <table:table-row table:style-name="ro1">
          <table:table-cell office:value-type="string" calcext:value-type="string">
            <text:p>AQUIRAZ II</text:p>
          </table:table-cell>
          <table:table-cell office:value-type="string" calcext:value-type="string">
            <text:p>BANABUIU</text:p>
          </table:table-cell>
          <table:table-cell office:value-type="float" office:value="0.367143277789237" calcext:value-type="float">
            <text:p>0,367143</text:p>
          </table:table-cell>
        </table:table-row>
        <table:table-row table:style-name="ro1">
          <table:table-cell office:value-type="string" calcext:value-type="string">
            <text:p>FUNIL</text:p>
          </table:table-cell>
          <table:table-cell office:value-type="string" calcext:value-type="string">
            <text:p>ITAPEBI SE</text:p>
          </table:table-cell>
          <table:table-cell office:value-type="float" office:value="0.365818604214846" calcext:value-type="float">
            <text:p>0,365819</text:p>
          </table:table-cell>
        </table:table-row>
        <table:table-row table:style-name="ro1">
          <table:table-cell office:value-type="string" calcext:value-type="string">
            <text:p>SINOP</text:p>
          </table:table-cell>
          <table:table-cell office:value-type="string" calcext:value-type="string">
            <text:p>SORRISO II</text:p>
          </table:table-cell>
          <table:table-cell office:value-type="float" office:value="0.365263311134021" calcext:value-type="float">
            <text:p>0,365263</text:p>
          </table:table-cell>
        </table:table-row>
        <table:table-row table:style-name="ro1">
          <table:table-cell office:value-type="string" calcext:value-type="string">
            <text:p>ITABIRA 4</text:p>
          </table:table-cell>
          <table:table-cell office:value-type="string" calcext:value-type="string">
            <text:p>TAQUARIL</text:p>
          </table:table-cell>
          <table:table-cell office:value-type="float" office:value="0.36502489998214" calcext:value-type="float">
            <text:p>0,365025</text:p>
          </table:table-cell>
        </table:table-row>
        <table:table-row table:style-name="ro1">
          <table:table-cell office:value-type="string" calcext:value-type="string">
            <text:p>C.INDUSTRIAL</text:p>
          </table:table-cell>
          <table:table-cell office:value-type="string" calcext:value-type="string">
            <text:p>NOVA STA RITA</text:p>
          </table:table-cell>
          <table:table-cell office:value-type="float" office:value="0.364728186683723" calcext:value-type="float">
            <text:p>0,364728</text:p>
          </table:table-cell>
        </table:table-row>
        <table:table-row table:style-name="ro1">
          <table:table-cell office:value-type="string" calcext:value-type="string">
            <text:p>CASTRO NORTE</text:p>
          </table:table-cell>
          <table:table-cell office:value-type="string" calcext:value-type="string">
            <text:p>KLABIN CELULOSE</text:p>
          </table:table-cell>
          <table:table-cell office:value-type="float" office:value="0.364651750813217" calcext:value-type="float">
            <text:p>0,364652</text:p>
          </table:table-cell>
        </table:table-row>
        <table:table-row table:style-name="ro1">
          <table:table-cell office:value-type="string" calcext:value-type="string">
            <text:p>CAXIAS NORTE</text:p>
          </table:table-cell>
          <table:table-cell office:value-type="string" calcext:value-type="string">
            <text:p>CAXIAS SUL 2</text:p>
          </table:table-cell>
          <table:table-cell office:value-type="float" office:value="0.363329747986153" calcext:value-type="float">
            <text:p>0,363330</text:p>
          </table:table-cell>
        </table:table-row>
        <table:table-row table:style-name="ro1">
          <table:table-cell office:value-type="string" calcext:value-type="string">
            <text:p>CAXIAS NORTE</text:p>
          </table:table-cell>
          <table:table-cell office:value-type="string" calcext:value-type="string">
            <text:p>FARROUPILHA</text:p>
          </table:table-cell>
          <table:table-cell office:value-type="float" office:value="0.361975555349102" calcext:value-type="float">
            <text:p>0,361976</text:p>
          </table:table-cell>
        </table:table-row>
        <table:table-row table:style-name="ro1">
          <table:table-cell office:value-type="string" calcext:value-type="string">
            <text:p>JURUTI</text:p>
          </table:table-cell>
          <table:table-cell office:value-type="string" calcext:value-type="string">
            <text:p>PARINTINS</text:p>
          </table:table-cell>
          <table:table-cell office:value-type="float" office:value="0.361911947966748" calcext:value-type="float">
            <text:p>0,361912</text:p>
          </table:table-cell>
        </table:table-row>
        <table:table-row table:style-name="ro1">
          <table:table-cell office:value-type="string" calcext:value-type="string">
            <text:p>JAGUARIAIVA</text:p>
          </table:table-cell>
          <table:table-cell office:value-type="string" calcext:value-type="string">
            <text:p>SE.MAUA</text:p>
          </table:table-cell>
          <table:table-cell office:value-type="float" office:value="0.360598140022419" calcext:value-type="float">
            <text:p>0,360598</text:p>
          </table:table-cell>
        </table:table-row>
        <table:table-row table:style-name="ro1">
          <table:table-cell office:value-type="string" calcext:value-type="string">
            <text:p>EUNAPOLIS</text:p>
          </table:table-cell>
          <table:table-cell office:value-type="string" calcext:value-type="string">
            <text:p>TEIX FREITAS II</text:p>
          </table:table-cell>
          <table:table-cell office:value-type="float" office:value="0.360371343003666" calcext:value-type="float">
            <text:p>0,360371</text:p>
          </table:table-cell>
        </table:table-row>
        <table:table-row table:style-name="ro1">
          <table:table-cell office:value-type="string" calcext:value-type="string">
            <text:p>PRE.MEDICI</text:p>
          </table:table-cell>
          <table:table-cell office:value-type="string" calcext:value-type="string">
            <text:p>QUINTA</text:p>
          </table:table-cell>
          <table:table-cell office:value-type="float" office:value="0.360063601620152" calcext:value-type="float">
            <text:p>0,360064</text:p>
          </table:table-cell>
        </table:table-row>
        <table:table-row table:style-name="ro1">
          <table:table-cell office:value-type="string" calcext:value-type="string">
            <text:p>BAGE2</text:p>
          </table:table-cell>
          <table:table-cell office:value-type="string" calcext:value-type="string">
            <text:p>LIVRAMENTO 2</text:p>
          </table:table-cell>
          <table:table-cell office:value-type="float" office:value="0.359140119189172" calcext:value-type="float">
            <text:p>0,359140</text:p>
          </table:table-cell>
        </table:table-row>
        <table:table-row table:style-name="ro1">
          <table:table-cell office:value-type="string" calcext:value-type="string">
            <text:p>BOM NOME</text:p>
          </table:table-cell>
          <table:table-cell office:value-type="string" calcext:value-type="string">
            <text:p>FLORESTA II</text:p>
          </table:table-cell>
          <table:table-cell office:value-type="float" office:value="0.358999730126712" calcext:value-type="float">
            <text:p>0,359000</text:p>
          </table:table-cell>
        </table:table-row>
        <table:table-row table:style-name="ro1">
          <table:table-cell office:value-type="string" calcext:value-type="string">
            <text:p>ACU II</text:p>
          </table:table-cell>
          <table:table-cell office:value-type="string" calcext:value-type="string">
            <text:p>ACU III</text:p>
          </table:table-cell>
          <table:table-cell office:value-type="float" office:value="0.358967499101974" calcext:value-type="float">
            <text:p>0,358967</text:p>
          </table:table-cell>
        </table:table-row>
        <table:table-row table:style-name="ro1">
          <table:table-cell office:value-type="string" calcext:value-type="string">
            <text:p>ARCOVERDE II</text:p>
          </table:table-cell>
          <table:table-cell office:value-type="string" calcext:value-type="string">
            <text:p>CAETES II</text:p>
          </table:table-cell>
          <table:table-cell office:value-type="float" office:value="0.35743098104898" calcext:value-type="float">
            <text:p>0,357431</text:p>
          </table:table-cell>
        </table:table-row>
        <table:table-row table:style-name="ro1">
          <table:table-cell office:value-type="string" calcext:value-type="string">
            <text:p>ACU II</text:p>
          </table:table-cell>
          <table:table-cell office:value-type="string" calcext:value-type="string">
            <text:p>PARAISO</text:p>
          </table:table-cell>
          <table:table-cell office:value-type="float" office:value="0.356769812818643" calcext:value-type="float">
            <text:p>0,356770</text:p>
          </table:table-cell>
        </table:table-row>
        <table:table-row table:style-name="ro1">
          <table:table-cell office:value-type="string" calcext:value-type="string">
            <text:p>INDAIAL</text:p>
          </table:table-cell>
          <table:table-cell office:value-type="string" calcext:value-type="string">
            <text:p>RIO DO SUL</text:p>
          </table:table-cell>
          <table:table-cell office:value-type="float" office:value="0.354926035131191" calcext:value-type="float">
            <text:p>0,354926</text:p>
          </table:table-cell>
        </table:table-row>
        <table:table-row table:style-name="ro1">
          <table:table-cell office:value-type="string" calcext:value-type="string">
            <text:p>CAXIAS</text:p>
          </table:table-cell>
          <table:table-cell office:value-type="string" calcext:value-type="string">
            <text:p>CAXIAS SUL 5</text:p>
          </table:table-cell>
          <table:table-cell office:value-type="float" office:value="0.353442570983913" calcext:value-type="float">
            <text:p>0,353443</text:p>
          </table:table-cell>
        </table:table-row>
        <table:table-row table:style-name="ro1">
          <table:table-cell office:value-type="string" calcext:value-type="string">
            <text:p>GRALHA AZUL</text:p>
          </table:table-cell>
          <table:table-cell office:value-type="string" calcext:value-type="string">
            <text:p>UMBARA</text:p>
          </table:table-cell>
          <table:table-cell office:value-type="float" office:value="0.35300749513277" calcext:value-type="float">
            <text:p>0,353007</text:p>
          </table:table-cell>
        </table:table-row>
        <table:table-row table:style-name="ro1">
          <table:table-cell office:value-type="string" calcext:value-type="string">
            <text:p>OSORIO 2</text:p>
          </table:table-cell>
          <table:table-cell office:value-type="string" calcext:value-type="string">
            <text:p>TAQUARA</text:p>
          </table:table-cell>
          <table:table-cell office:value-type="float" office:value="0.351154155562205" calcext:value-type="float">
            <text:p>0,351154</text:p>
          </table:table-cell>
        </table:table-row>
        <table:table-row table:style-name="ro1">
          <table:table-cell office:value-type="string" calcext:value-type="string">
            <text:p>CAMACARI II</text:p>
          </table:table-cell>
          <table:table-cell office:value-type="string" calcext:value-type="string">
            <text:p>MATATU</text:p>
          </table:table-cell>
          <table:table-cell office:value-type="float" office:value="0.350039329666613" calcext:value-type="float">
            <text:p>0,350039</text:p>
          </table:table-cell>
        </table:table-row>
        <table:table-row table:style-name="ro1">
          <table:table-cell office:value-type="string" calcext:value-type="string">
            <text:p>P.AFONSO III</text:p>
          </table:table-cell>
          <table:table-cell office:value-type="string" calcext:value-type="string">
            <text:p>ITABAIANA</text:p>
          </table:table-cell>
          <table:table-cell office:value-type="float" office:value="0.347583918497736" calcext:value-type="float">
            <text:p>0,347584</text:p>
          </table:table-cell>
        </table:table-row>
        <table:table-row table:style-name="ro1">
          <table:table-cell office:value-type="string" calcext:value-type="string">
            <text:p>FORQUILHINHA</text:p>
          </table:table-cell>
          <table:table-cell office:value-type="string" calcext:value-type="string">
            <text:p>TORRES 2</text:p>
          </table:table-cell>
          <table:table-cell office:value-type="float" office:value="0.347313618805379" calcext:value-type="float">
            <text:p>0,347314</text:p>
          </table:table-cell>
        </table:table-row>
        <table:table-row table:style-name="ro1">
          <table:table-cell office:value-type="string" calcext:value-type="string">
            <text:p>CERQUILHO III</text:p>
          </table:table-cell>
          <table:table-cell office:value-type="string" calcext:value-type="string">
            <text:p>TOYOTA</text:p>
          </table:table-cell>
          <table:table-cell office:value-type="float" office:value="0.347069431563554" calcext:value-type="float">
            <text:p>0,347069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office:value-type="string" calcext:value-type="string">
            <text:p>CENTRO-CTT</text:p>
          </table:table-cell>
          <table:table-cell office:value-type="float" office:value="0.346276138340875" calcext:value-type="float">
            <text:p>0,346276</text:p>
          </table:table-cell>
        </table:table-row>
        <table:table-row table:style-name="ro1">
          <table:table-cell office:value-type="string" calcext:value-type="string">
            <text:p>LINHARES</text:p>
          </table:table-cell>
          <table:table-cell office:value-type="string" calcext:value-type="string">
            <text:p>SAO MATEUS 2</text:p>
          </table:table-cell>
          <table:table-cell office:value-type="float" office:value="0.346148407962019" calcext:value-type="float">
            <text:p>0,346148</text:p>
          </table:table-cell>
        </table:table-row>
        <table:table-row table:style-name="ro1">
          <table:table-cell office:value-type="string" calcext:value-type="string">
            <text:p>BAIXO IGUACU</text:p>
          </table:table-cell>
          <table:table-cell office:value-type="string" calcext:value-type="string">
            <text:p>REALEZA SUL</text:p>
          </table:table-cell>
          <table:table-cell office:value-type="float" office:value="0.345990041349693" calcext:value-type="float">
            <text:p>0,345990</text:p>
          </table:table-cell>
        </table:table-row>
        <table:table-row table:style-name="ro1">
          <table:table-cell office:value-type="string" calcext:value-type="string">
            <text:p>ALEGRETE2</text:p>
          </table:table-cell>
          <table:table-cell office:value-type="string" calcext:value-type="string">
            <text:p>URUGUAIANA5</text:p>
          </table:table-cell>
          <table:table-cell office:value-type="float" office:value="0.345805174347467" calcext:value-type="float">
            <text:p>0,345805</text:p>
          </table:table-cell>
        </table:table-row>
        <table:table-row table:style-name="ro1">
          <table:table-cell office:value-type="string" calcext:value-type="string">
            <text:p>ATLANTIDA 2</text:p>
          </table:table-cell>
          <table:table-cell office:value-type="string" calcext:value-type="string">
            <text:p>TORRES 2</text:p>
          </table:table-cell>
          <table:table-cell office:value-type="float" office:value="0.344501244947412" calcext:value-type="float">
            <text:p>0,344501</text:p>
          </table:table-cell>
        </table:table-row>
        <table:table-row table:style-name="ro1">
          <table:table-cell office:value-type="string" calcext:value-type="string">
            <text:p>AIMORES-SE</text:p>
          </table:table-cell>
          <table:table-cell office:value-type="string" calcext:value-type="string">
            <text:p>CONSE. PENA</text:p>
          </table:table-cell>
          <table:table-cell office:value-type="float" office:value="0.344481089871363" calcext:value-type="float">
            <text:p>0,344481</text:p>
          </table:table-cell>
        </table:table-row>
        <table:table-row table:style-name="ro1">
          <table:table-cell office:value-type="string" calcext:value-type="string">
            <text:p>BARAO COCAIS3</text:p>
          </table:table-cell>
          <table:table-cell office:value-type="string" calcext:value-type="string">
            <text:p>TAQUARIL</text:p>
          </table:table-cell>
          <table:table-cell office:value-type="float" office:value="0.344460117783389" calcext:value-type="float">
            <text:p>0,344460</text:p>
          </table:table-cell>
        </table:table-row>
        <table:table-row table:style-name="ro1">
          <table:table-cell office:value-type="string" calcext:value-type="string">
            <text:p>L.VERMELHA 2</text:p>
          </table:table-cell>
          <table:table-cell office:value-type="string" calcext:value-type="string">
            <text:p>BARRA GRANDE</text:p>
          </table:table-cell>
          <table:table-cell office:value-type="float" office:value="0.344285902107429" calcext:value-type="float">
            <text:p>0,344286</text:p>
          </table:table-cell>
        </table:table-row>
        <table:table-row table:style-name="ro1">
          <table:table-cell office:value-type="string" calcext:value-type="string">
            <text:p>EDGARD SOUZA</text:p>
          </table:table-cell>
          <table:table-cell office:value-type="string" calcext:value-type="string">
            <text:p>TOYOTA</text:p>
          </table:table-cell>
          <table:table-cell office:value-type="float" office:value="0.343595736756232" calcext:value-type="float">
            <text:p>0,343596</text:p>
          </table:table-cell>
        </table:table-row>
        <table:table-row table:style-name="ro1">
          <table:table-cell office:value-type="string" calcext:value-type="string">
            <text:p>RECIFE II</text:p>
          </table:table-cell>
          <table:table-cell office:value-type="string" calcext:value-type="string">
            <text:p>MIRUEIRA</text:p>
          </table:table-cell>
          <table:table-cell office:value-type="float" office:value="0.340995851385694" calcext:value-type="float">
            <text:p>0,340996</text:p>
          </table:table-cell>
        </table:table-row>
        <table:table-row table:style-name="ro1">
          <table:table-cell office:value-type="string" calcext:value-type="string">
            <text:p>NILO PECANHA</text:p>
          </table:table-cell>
          <table:table-cell office:value-type="string" calcext:value-type="string">
            <text:p>SANTA CABECA</text:p>
          </table:table-cell>
          <table:table-cell office:value-type="float" office:value="0.340738045031679" calcext:value-type="float">
            <text:p>0,340738</text:p>
          </table:table-cell>
        </table:table-row>
        <table:table-row table:style-name="ro1">
          <table:table-cell office:value-type="string" calcext:value-type="string">
            <text:p>BARRO ALTO</text:p>
          </table:table-cell>
          <table:table-cell office:value-type="string" calcext:value-type="string">
            <text:p>NIQUELANDIA</text:p>
          </table:table-cell>
          <table:table-cell office:value-type="float" office:value="0.340504820809852" calcext:value-type="float">
            <text:p>0,340505</text:p>
          </table:table-cell>
        </table:table-row>
        <table:table-row table:style-name="ro1">
          <table:table-cell office:value-type="string" calcext:value-type="string">
            <text:p>N.PETROPOLIS2</text:p>
          </table:table-cell>
          <table:table-cell office:value-type="string" calcext:value-type="string">
            <text:p>TAQUARA</text:p>
          </table:table-cell>
          <table:table-cell office:value-type="float" office:value="0.340025766763273" calcext:value-type="float">
            <text:p>0,340026</text:p>
          </table:table-cell>
        </table:table-row>
        <table:table-row table:style-name="ro1">
          <table:table-cell office:value-type="string" calcext:value-type="string">
            <text:p>ITABUNA III</text:p>
          </table:table-cell>
          <table:table-cell office:value-type="string" calcext:value-type="string">
            <text:p>ITAPEBI SE</text:p>
          </table:table-cell>
          <table:table-cell office:value-type="float" office:value="0.340018804345396" calcext:value-type="float">
            <text:p>0,340019</text:p>
          </table:table-cell>
        </table:table-row>
        <table:table-row table:style-name="ro1">
          <table:table-cell office:value-type="string" calcext:value-type="string">
            <text:p>JUAZEIRO II</text:p>
          </table:table-cell>
          <table:table-cell office:value-type="string" calcext:value-type="string">
            <text:p>SR.BONFIM II</text:p>
          </table:table-cell>
          <table:table-cell office:value-type="float" office:value="0.339534967829697" calcext:value-type="float">
            <text:p>0,339535</text:p>
          </table:table-cell>
        </table:table-row>
        <table:table-row table:style-name="ro1">
          <table:table-cell office:value-type="string" calcext:value-type="string">
            <text:p>ALEGRETE2</text:p>
          </table:table-cell>
          <table:table-cell office:value-type="string" calcext:value-type="string">
            <text:p>S.VICENTE SUL</text:p>
          </table:table-cell>
          <table:table-cell office:value-type="float" office:value="0.339065480767745" calcext:value-type="float">
            <text:p>0,339065</text:p>
          </table:table-cell>
        </table:table-row>
        <table:table-row table:style-name="ro1">
          <table:table-cell office:value-type="string" calcext:value-type="string">
            <text:p>MATA NORTE</text:p>
          </table:table-cell>
          <table:table-cell office:value-type="string" calcext:value-type="string">
            <text:p>PAU FERRO</text:p>
          </table:table-cell>
          <table:table-cell office:value-type="float" office:value="0.337863938397963" calcext:value-type="float">
            <text:p>0,337864</text:p>
          </table:table-cell>
        </table:table-row>
        <table:table-row table:style-name="ro1">
          <table:table-cell office:value-type="string" calcext:value-type="string">
            <text:p>CASCAVEL</text:p>
          </table:table-cell>
          <table:table-cell office:value-type="string" calcext:value-type="string">
            <text:p>FOZ DO CHOPIM</text:p>
          </table:table-cell>
          <table:table-cell office:value-type="float" office:value="0.336920543423398" calcext:value-type="float">
            <text:p>0,336921</text:p>
          </table:table-cell>
        </table:table-row>
        <table:table-row table:style-name="ro1">
          <table:table-cell office:value-type="string" calcext:value-type="string">
            <text:p>FOZ CHAPECO</text:p>
          </table:table-cell>
          <table:table-cell office:value-type="string" calcext:value-type="string">
            <text:p>GUARITA</text:p>
          </table:table-cell>
          <table:table-cell office:value-type="float" office:value="0.336470650256212" calcext:value-type="float">
            <text:p>0,336471</text:p>
          </table:table-cell>
        </table:table-row>
        <table:table-row table:style-name="ro1">
          <table:table-cell office:value-type="string" calcext:value-type="string">
            <text:p>CHAPADINHA II</text:p>
          </table:table-cell>
          <table:table-cell office:value-type="string" calcext:value-type="string">
            <text:p>COELHO NETO</text:p>
          </table:table-cell>
          <table:table-cell office:value-type="float" office:value="0.335839308705905" calcext:value-type="float">
            <text:p>0,335839</text:p>
          </table:table-cell>
        </table:table-row>
        <table:table-row table:style-name="ro1">
          <table:table-cell office:value-type="string" calcext:value-type="string">
            <text:p>CRUZ ALTA 2</text:p>
          </table:table-cell>
          <table:table-cell office:value-type="string" calcext:value-type="string">
            <text:p>PASSO REAL</text:p>
          </table:table-cell>
          <table:table-cell office:value-type="float" office:value="0.334677723281687" calcext:value-type="float">
            <text:p>0,334678</text:p>
          </table:table-cell>
        </table:table-row>
        <table:table-row table:style-name="ro1">
          <table:table-cell office:value-type="string" calcext:value-type="string">
            <text:p>BRASNORTE</text:p>
          </table:table-cell>
          <table:table-cell office:value-type="string" calcext:value-type="string">
            <text:p>PARECIS</text:p>
          </table:table-cell>
          <table:table-cell office:value-type="float" office:value="0.333710977400355" calcext:value-type="float">
            <text:p>0,333711</text:p>
          </table:table-cell>
        </table:table-row>
        <table:table-row table:style-name="ro1">
          <table:table-cell office:value-type="string" calcext:value-type="string">
            <text:p>J.LACERDA-A</text:p>
          </table:table-cell>
          <table:table-cell office:value-type="string" calcext:value-type="string">
            <text:p>J.LACERDA-B</text:p>
          </table:table-cell>
          <table:table-cell office:value-type="float" office:value="0.333628552189707" calcext:value-type="float">
            <text:p>0,333629</text:p>
          </table:table-cell>
        </table:table-row>
        <table:table-row table:style-name="ro1">
          <table:table-cell office:value-type="string" calcext:value-type="string">
            <text:p>CURIT. CENTRO</text:p>
          </table:table-cell>
          <table:table-cell office:value-type="string" calcext:value-type="string">
            <text:p>UBERABA</text:p>
          </table:table-cell>
          <table:table-cell office:value-type="float" office:value="0.333417251796366" calcext:value-type="float">
            <text:p>0,333417</text:p>
          </table:table-cell>
        </table:table-row>
        <table:table-row table:style-name="ro1">
          <table:table-cell office:value-type="string" calcext:value-type="string">
            <text:p>C.COMPRIDO</text:p>
          </table:table-cell>
          <table:table-cell office:value-type="string" calcext:value-type="string">
            <text:p>C.I.CURITIBA</text:p>
          </table:table-cell>
          <table:table-cell office:value-type="float" office:value="0.333325864259367" calcext:value-type="float">
            <text:p>0,333326</text:p>
          </table:table-cell>
        </table:table-row>
        <table:table-row table:style-name="ro1">
          <table:table-cell office:value-type="string" calcext:value-type="string">
            <text:p>ITAUBA</text:p>
          </table:table-cell>
          <table:table-cell office:value-type="string" calcext:value-type="string">
            <text:p>U.D.FRANCISCA</text:p>
          </table:table-cell>
          <table:table-cell office:value-type="float" office:value="0.333093286235515" calcext:value-type="float">
            <text:p>0,333093</text:p>
          </table:table-cell>
        </table:table-row>
        <table:table-row table:style-name="ro1">
          <table:table-cell office:value-type="string" calcext:value-type="string">
            <text:p>C.COMPRIDO</text:p>
          </table:table-cell>
          <table:table-cell office:value-type="string" calcext:value-type="string">
            <text:p>SANTAQUITERIA</text:p>
          </table:table-cell>
          <table:table-cell office:value-type="float" office:value="0.332930135856264" calcext:value-type="float">
            <text:p>0,332930</text:p>
          </table:table-cell>
        </table:table-row>
        <table:table-row table:style-name="ro1">
          <table:table-cell office:value-type="string" calcext:value-type="string">
            <text:p>BOTUCATU</text:p>
          </table:table-cell>
          <table:table-cell office:value-type="string" calcext:value-type="string">
            <text:p>CERQUILHO III</text:p>
          </table:table-cell>
          <table:table-cell office:value-type="float" office:value="0.332538512518987" calcext:value-type="float">
            <text:p>0,332539</text:p>
          </table:table-cell>
        </table:table-row>
        <table:table-row table:style-name="ro1">
          <table:table-cell office:value-type="string" calcext:value-type="string">
            <text:p>BARRO ALTO</text:p>
          </table:table-cell>
          <table:table-cell office:value-type="string" calcext:value-type="string">
            <text:p>AGUAS LINDAS</text:p>
          </table:table-cell>
          <table:table-cell office:value-type="float" office:value="0.332196199251584" calcext:value-type="float">
            <text:p>0,332196</text:p>
          </table:table-cell>
        </table:table-row>
        <table:table-row table:style-name="ro1">
          <table:table-cell office:value-type="string" calcext:value-type="string">
            <text:p>LAJEADO 2</text:p>
          </table:table-cell>
          <table:table-cell office:value-type="string" calcext:value-type="string">
            <text:p>PASSO REAL</text:p>
          </table:table-cell>
          <table:table-cell office:value-type="float" office:value="0.332079111676493" calcext:value-type="float">
            <text:p>0,332079</text:p>
          </table:table-cell>
        </table:table-row>
        <table:table-row table:style-name="ro1">
          <table:table-cell office:value-type="string" calcext:value-type="string">
            <text:p>PASSO FUNDO</text:p>
          </table:table-cell>
          <table:table-cell office:value-type="string" calcext:value-type="string">
            <text:p>VILA MARIA</text:p>
          </table:table-cell>
          <table:table-cell office:value-type="float" office:value="0.331707455176962" calcext:value-type="float">
            <text:p>0,331707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office:value-type="string" calcext:value-type="string">
            <text:p>PLANALTO</text:p>
          </table:table-cell>
          <table:table-cell office:value-type="float" office:value="0.331704258906996" calcext:value-type="float">
            <text:p>0,331704</text:p>
          </table:table-cell>
        </table:table-row>
        <table:table-row table:style-name="ro1">
          <table:table-cell office:value-type="string" calcext:value-type="string">
            <text:p>PORTO ALEGRE8</text:p>
          </table:table-cell>
          <table:table-cell office:value-type="string" calcext:value-type="string">
            <text:p>PORTOALEGRE 1</text:p>
          </table:table-cell>
          <table:table-cell office:value-type="float" office:value="0.331586323000696" calcext:value-type="float">
            <text:p>0,331586</text:p>
          </table:table-cell>
        </table:table-row>
        <table:table-row table:style-name="ro1">
          <table:table-cell office:value-type="string" calcext:value-type="string">
            <text:p>JARDIM BOTANICO</text:p>
          </table:table-cell>
          <table:table-cell office:value-type="string" calcext:value-type="string">
            <text:p>PORTOALEGRE 1</text:p>
          </table:table-cell>
          <table:table-cell office:value-type="float" office:value="0.33128032032403" calcext:value-type="float">
            <text:p>0,331280</text:p>
          </table:table-cell>
        </table:table-row>
        <table:table-row table:style-name="ro1">
          <table:table-cell office:value-type="string" calcext:value-type="string">
            <text:p>CHAVANTES</text:p>
          </table:table-cell>
          <table:table-cell office:value-type="string" calcext:value-type="string">
            <text:p>PIRAJU</text:p>
          </table:table-cell>
          <table:table-cell office:value-type="float" office:value="0.331045089390963" calcext:value-type="float">
            <text:p>0,331045</text:p>
          </table:table-cell>
        </table:table-row>
        <table:table-row table:style-name="ro1">
          <table:table-cell office:value-type="string" calcext:value-type="string">
            <text:p>BOM NOME</text:p>
          </table:table-cell>
          <table:table-cell office:value-type="string" calcext:value-type="string">
            <text:p>TACARATU</text:p>
          </table:table-cell>
          <table:table-cell office:value-type="float" office:value="0.33014632261785" calcext:value-type="float">
            <text:p>0,330146</text:p>
          </table:table-cell>
        </table:table-row>
        <table:table-row table:style-name="ro1">
          <table:table-cell office:value-type="string" calcext:value-type="string">
            <text:p>EDEIA</text:p>
          </table:table-cell>
          <table:table-cell office:value-type="string" calcext:value-type="string">
            <text:p>PALMEIRAS</text:p>
          </table:table-cell>
          <table:table-cell office:value-type="float" office:value="0.329894290956682" calcext:value-type="float">
            <text:p>0,329894</text:p>
          </table:table-cell>
        </table:table-row>
        <table:table-row table:style-name="ro1">
          <table:table-cell office:value-type="string" calcext:value-type="string">
            <text:p>ALAGOINHAS II</text:p>
          </table:table-cell>
          <table:table-cell office:value-type="string" calcext:value-type="string">
            <text:p>OLINDINA</text:p>
          </table:table-cell>
          <table:table-cell office:value-type="float" office:value="0.32969210634486" calcext:value-type="float">
            <text:p>0,329692</text:p>
          </table:table-cell>
        </table:table-row>
        <table:table-row table:style-name="ro1">
          <table:table-cell office:value-type="string" calcext:value-type="string">
            <text:p>CHAVANTES</text:p>
          </table:table-cell>
          <table:table-cell office:value-type="string" calcext:value-type="string">
            <text:p>SALTO GRANDE SP</text:p>
          </table:table-cell>
          <table:table-cell office:value-type="float" office:value="0.329561185298949" calcext:value-type="float">
            <text:p>0,329561</text:p>
          </table:table-cell>
        </table:table-row>
        <table:table-row table:style-name="ro1">
          <table:table-cell office:value-type="string" calcext:value-type="string">
            <text:p>BRAUNAS</text:p>
          </table:table-cell>
          <table:table-cell office:value-type="string" calcext:value-type="string">
            <text:p>ITABIRA 2</text:p>
          </table:table-cell>
          <table:table-cell office:value-type="float" office:value="0.328807665118531" calcext:value-type="float">
            <text:p>0,328808</text:p>
          </table:table-cell>
        </table:table-row>
        <table:table-row table:style-name="ro1">
          <table:table-cell office:value-type="string" calcext:value-type="string">
            <text:p>PORTOALEGRE 4</text:p>
          </table:table-cell>
          <table:table-cell office:value-type="string" calcext:value-type="string">
            <text:p>PORTO ALEGRE9</text:p>
          </table:table-cell>
          <table:table-cell office:value-type="float" office:value="0.327134612347924" calcext:value-type="float">
            <text:p>0,327135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string" calcext:value-type="string">
            <text:p>CATU</text:p>
          </table:table-cell>
          <table:table-cell office:value-type="float" office:value="0.327117791762098" calcext:value-type="float">
            <text:p>0,327118</text:p>
          </table:table-cell>
        </table:table-row>
        <table:table-row table:style-name="ro1">
          <table:table-cell office:value-type="string" calcext:value-type="string">
            <text:p>CICERO DANTAS</text:p>
          </table:table-cell>
          <table:table-cell office:value-type="string" calcext:value-type="string">
            <text:p>P.AFONSO III</text:p>
          </table:table-cell>
          <table:table-cell office:value-type="float" office:value="0.326632719803857" calcext:value-type="float">
            <text:p>0,326633</text:p>
          </table:table-cell>
        </table:table-row>
        <table:table-row table:style-name="ro1">
          <table:table-cell office:value-type="string" calcext:value-type="string">
            <text:p>ARAPIRACA III</text:p>
          </table:table-cell>
          <table:table-cell office:value-type="string" calcext:value-type="string">
            <text:p>RIO LARGO II</text:p>
          </table:table-cell>
          <table:table-cell office:value-type="float" office:value="0.326608140826521" calcext:value-type="float">
            <text:p>0,326608</text:p>
          </table:table-cell>
        </table:table-row>
        <table:table-row table:style-name="ro1">
          <table:table-cell office:value-type="string" calcext:value-type="string">
            <text:p>CRUZ ALTA 2</text:p>
          </table:table-cell>
          <table:table-cell office:value-type="string" calcext:value-type="string">
            <text:p>IJUI 2</text:p>
          </table:table-cell>
          <table:table-cell office:value-type="float" office:value="0.326467438198649" calcext:value-type="float">
            <text:p>0,326467</text:p>
          </table:table-cell>
        </table:table-row>
        <table:table-row table:style-name="ro1">
          <table:table-cell office:value-type="string" calcext:value-type="string">
            <text:p>JARDIM BOTANICO</text:p>
          </table:table-cell>
          <table:table-cell office:value-type="string" calcext:value-type="string">
            <text:p>JBO LT GRA2</text:p>
          </table:table-cell>
          <table:table-cell office:value-type="float" office:value="0.325977654507652" calcext:value-type="float">
            <text:p>0,325978</text:p>
          </table:table-cell>
        </table:table-row>
        <table:table-row table:style-name="ro1">
          <table:table-cell office:value-type="string" calcext:value-type="string">
            <text:p>JARDIM BOTANICO</text:p>
          </table:table-cell>
          <table:table-cell office:value-type="string" calcext:value-type="string">
            <text:p>JBO LT PA10</text:p>
          </table:table-cell>
          <table:table-cell office:value-type="float" office:value="0.325977654507652" calcext:value-type="float">
            <text:p>0,325978</text:p>
          </table:table-cell>
        </table:table-row>
        <table:table-row table:style-name="ro1">
          <table:table-cell office:value-type="string" calcext:value-type="string">
            <text:p>BAR.COQUEIROS</text:p>
          </table:table-cell>
          <table:table-cell office:value-type="string" calcext:value-type="string">
            <text:p>QUIRINOPOLIS2</text:p>
          </table:table-cell>
          <table:table-cell office:value-type="float" office:value="0.325930748929232" calcext:value-type="float">
            <text:p>0,325931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string" calcext:value-type="string">
            <text:p>POLO</text:p>
          </table:table-cell>
          <table:table-cell office:value-type="float" office:value="0.324872091449627" calcext:value-type="float">
            <text:p>0,324872</text:p>
          </table:table-cell>
        </table:table-row>
        <table:table-row table:style-name="ro1">
          <table:table-cell office:value-type="string" calcext:value-type="string">
            <text:p>GRAVATAI2</text:p>
          </table:table-cell>
          <table:table-cell office:value-type="string" calcext:value-type="string">
            <text:p>JBO LT GRA2</text:p>
          </table:table-cell>
          <table:table-cell office:value-type="float" office:value="0.324275378822812" calcext:value-type="float">
            <text:p>0,324275</text:p>
          </table:table-cell>
        </table:table-row>
        <table:table-row table:style-name="ro1">
          <table:table-cell office:value-type="string" calcext:value-type="string">
            <text:p>ATLANTIDA 2</text:p>
          </table:table-cell>
          <table:table-cell office:value-type="string" calcext:value-type="string">
            <text:p>GRAVATAI3</text:p>
          </table:table-cell>
          <table:table-cell office:value-type="float" office:value="0.324040047946906" calcext:value-type="float">
            <text:p>0,324040</text:p>
          </table:table-cell>
        </table:table-row>
        <table:table-row table:style-name="ro1">
          <table:table-cell office:value-type="string" calcext:value-type="string">
            <text:p>JURUMIRIM</text:p>
          </table:table-cell>
          <table:table-cell office:value-type="string" calcext:value-type="string">
            <text:p>PIRAJU</text:p>
          </table:table-cell>
          <table:table-cell office:value-type="float" office:value="0.323816090606392" calcext:value-type="float">
            <text:p>0,323816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BANABUIU</text:p>
          </table:table-cell>
          <table:table-cell office:value-type="float" office:value="0.323448618782534" calcext:value-type="float">
            <text:p>0,323449</text:p>
          </table:table-cell>
        </table:table-row>
        <table:table-row table:style-name="ro1">
          <table:table-cell office:value-type="string" calcext:value-type="string">
            <text:p>AVARE NOVA</text:p>
          </table:table-cell>
          <table:table-cell office:value-type="string" calcext:value-type="string">
            <text:p>BOTUCATU</text:p>
          </table:table-cell>
          <table:table-cell office:value-type="float" office:value="0.323383646964245" calcext:value-type="float">
            <text:p>0,323384</text:p>
          </table:table-cell>
        </table:table-row>
        <table:table-row table:style-name="ro1">
          <table:table-cell office:value-type="string" calcext:value-type="string">
            <text:p>CASTERTECH</text:p>
          </table:table-cell>
          <table:table-cell office:value-type="string" calcext:value-type="string">
            <text:p>CAXIAS 6</text:p>
          </table:table-cell>
          <table:table-cell office:value-type="float" office:value="0.322844199611247" calcext:value-type="float">
            <text:p>0,322844</text:p>
          </table:table-cell>
        </table:table-row>
        <table:table-row table:style-name="ro1">
          <table:table-cell office:value-type="string" calcext:value-type="string">
            <text:p>C.GRANDE II</text:p>
          </table:table-cell>
          <table:table-cell office:value-type="string" calcext:value-type="string">
            <text:p>TACAIMBO</text:p>
          </table:table-cell>
          <table:table-cell office:value-type="float" office:value="0.322658285367184" calcext:value-type="float">
            <text:p>0,322658</text:p>
          </table:table-cell>
        </table:table-row>
        <table:table-row table:style-name="ro1">
          <table:table-cell office:value-type="string" calcext:value-type="string">
            <text:p>JOAO PESSOA II</text:p>
          </table:table-cell>
          <table:table-cell office:value-type="string" calcext:value-type="string">
            <text:p>MUSSURE II</text:p>
          </table:table-cell>
          <table:table-cell office:value-type="float" office:value="0.322461888172552" calcext:value-type="float">
            <text:p>0,322462</text:p>
          </table:table-cell>
        </table:table-row>
        <table:table-row table:style-name="ro1">
          <table:table-cell office:value-type="string" calcext:value-type="string">
            <text:p>PARANAIBA</text:p>
          </table:table-cell>
          <table:table-cell office:value-type="string" calcext:value-type="string">
            <text:p>ITUMBIARA</text:p>
          </table:table-cell>
          <table:table-cell office:value-type="float" office:value="0.322451728277515" calcext:value-type="float">
            <text:p>0,322452</text:p>
          </table:table-cell>
        </table:table-row>
        <table:table-row table:style-name="ro1">
          <table:table-cell office:value-type="string" calcext:value-type="string">
            <text:p>L.GRANDE</text:p>
          </table:table-cell>
          <table:table-cell office:value-type="string" calcext:value-type="string">
            <text:p>FORQUILHINHA</text:p>
          </table:table-cell>
          <table:table-cell office:value-type="float" office:value="0.321202439784786" calcext:value-type="float">
            <text:p>0,321202</text:p>
          </table:table-cell>
        </table:table-row>
        <table:table-row table:style-name="ro1">
          <table:table-cell office:value-type="string" calcext:value-type="string">
            <text:p>GRAVATAI2</text:p>
          </table:table-cell>
          <table:table-cell office:value-type="string" calcext:value-type="string">
            <text:p>PORTOALEGRE6</text:p>
          </table:table-cell>
          <table:table-cell office:value-type="float" office:value="0.320819480303966" calcext:value-type="float">
            <text:p>0,320819</text:p>
          </table:table-cell>
        </table:table-row>
        <table:table-row table:style-name="ro1">
          <table:table-cell office:value-type="string" calcext:value-type="string">
            <text:p>CHAPADA II</text:p>
          </table:table-cell>
          <table:table-cell office:value-type="string" calcext:value-type="string">
            <text:p>PICOS</text:p>
          </table:table-cell>
          <table:table-cell office:value-type="float" office:value="0.320217541013636" calcext:value-type="float">
            <text:p>0,320218</text:p>
          </table:table-cell>
        </table:table-row>
        <table:table-row table:style-name="ro1">
          <table:table-cell office:value-type="string" calcext:value-type="string">
            <text:p>GARIBALDI 1</text:p>
          </table:table-cell>
          <table:table-cell office:value-type="string" calcext:value-type="string">
            <text:p>VINHEDOS</text:p>
          </table:table-cell>
          <table:table-cell office:value-type="float" office:value="0.320013703205516" calcext:value-type="float">
            <text:p>0,320014</text:p>
          </table:table-cell>
        </table:table-row>
        <table:table-row table:style-name="ro1">
          <table:table-cell office:value-type="string" calcext:value-type="string">
            <text:p>L.D.RIO VERDE</text:p>
          </table:table-cell>
          <table:table-cell office:value-type="string" calcext:value-type="string">
            <text:p>NOVA MUTUM</text:p>
          </table:table-cell>
          <table:table-cell office:value-type="float" office:value="0.319519605791706" calcext:value-type="float">
            <text:p>0,319520</text:p>
          </table:table-cell>
        </table:table-row>
        <table:table-row table:style-name="ro1">
          <table:table-cell office:value-type="string" calcext:value-type="string">
            <text:p>GARIBALDI 1</text:p>
          </table:table-cell>
          <table:table-cell office:value-type="string" calcext:value-type="string">
            <text:p>LAJEADO III</text:p>
          </table:table-cell>
          <table:table-cell office:value-type="float" office:value="0.319489702658108" calcext:value-type="float">
            <text:p>0,319490</text:p>
          </table:table-cell>
        </table:table-row>
        <table:table-row table:style-name="ro1">
          <table:table-cell office:value-type="string" calcext:value-type="string">
            <text:p>NSA.SRA.SOCORRO</text:p>
          </table:table-cell>
          <table:table-cell office:value-type="string" calcext:value-type="string">
            <text:p>PENEDO</text:p>
          </table:table-cell>
          <table:table-cell office:value-type="float" office:value="0.319261402959297" calcext:value-type="float">
            <text:p>0,319261</text:p>
          </table:table-cell>
        </table:table-row>
        <table:table-row table:style-name="ro1">
          <table:table-cell office:value-type="string" calcext:value-type="string">
            <text:p>PORTO ALEGRE8</text:p>
          </table:table-cell>
          <table:table-cell office:value-type="string" calcext:value-type="string">
            <text:p>PORTO ALEGRE9</text:p>
          </table:table-cell>
          <table:table-cell office:value-type="float" office:value="0.318566382768388" calcext:value-type="float">
            <text:p>0,318566</text:p>
          </table:table-cell>
        </table:table-row>
        <table:table-row table:style-name="ro1">
          <table:table-cell office:value-type="string" calcext:value-type="string">
            <text:p>BRAS. GERAL</text:p>
          </table:table-cell>
          <table:table-cell office:value-type="string" calcext:value-type="string">
            <text:p>BRAS. SUL</text:p>
          </table:table-cell>
          <table:table-cell office:value-type="float" office:value="0.315979213968718" calcext:value-type="float">
            <text:p>0,315979</text:p>
          </table:table-cell>
        </table:table-row>
        <table:table-row table:style-name="ro1">
          <table:table-cell office:value-type="string" calcext:value-type="string">
            <text:p>GUIL AMORIM-SE</text:p>
          </table:table-cell>
          <table:table-cell office:value-type="string" calcext:value-type="string">
            <text:p>IPATINGA 1</text:p>
          </table:table-cell>
          <table:table-cell office:value-type="float" office:value="0.315793716654768" calcext:value-type="float">
            <text:p>0,315794</text:p>
          </table:table-cell>
        </table:table-row>
        <table:table-row table:style-name="ro1">
          <table:table-cell office:value-type="string" calcext:value-type="string">
            <text:p>F.IGUACUNORTE</text:p>
          </table:table-cell>
          <table:table-cell office:value-type="string" calcext:value-type="string">
            <text:p>MEDIANEIRA NT</text:p>
          </table:table-cell>
          <table:table-cell office:value-type="float" office:value="0.315160316657002" calcext:value-type="float">
            <text:p>0,315160</text:p>
          </table:table-cell>
        </table:table-row>
        <table:table-row table:style-name="ro1">
          <table:table-cell office:value-type="string" calcext:value-type="string">
            <text:p>CAXIAS II</text:p>
          </table:table-cell>
          <table:table-cell office:value-type="string" calcext:value-type="string">
            <text:p>PERITORO</text:p>
          </table:table-cell>
          <table:table-cell office:value-type="float" office:value="0.315078578409083" calcext:value-type="float">
            <text:p>0,315079</text:p>
          </table:table-cell>
        </table:table-row>
        <table:table-row table:style-name="ro1">
          <table:table-cell office:value-type="string" calcext:value-type="string">
            <text:p>MASCARENHAS</text:p>
          </table:table-cell>
          <table:table-cell office:value-type="string" calcext:value-type="string">
            <text:p>VERONA</text:p>
          </table:table-cell>
          <table:table-cell office:value-type="float" office:value="0.314736214774475" calcext:value-type="float">
            <text:p>0,314736</text:p>
          </table:table-cell>
        </table:table-row>
        <table:table-row table:style-name="ro1">
          <table:table-cell office:value-type="string" calcext:value-type="string">
            <text:p>PASSO FUNDO</text:p>
          </table:table-cell>
          <table:table-cell office:value-type="string" calcext:value-type="string">
            <text:p>XANXERE ESU</text:p>
          </table:table-cell>
          <table:table-cell office:value-type="float" office:value="0.314651242009969" calcext:value-type="float">
            <text:p>0,314651</text:p>
          </table:table-cell>
        </table:table-row>
        <table:table-row table:style-name="ro1">
          <table:table-cell office:value-type="string" calcext:value-type="string">
            <text:p>PASSO REAL</text:p>
          </table:table-cell>
          <table:table-cell office:value-type="string" calcext:value-type="string">
            <text:p>V.AIRES</text:p>
          </table:table-cell>
          <table:table-cell office:value-type="float" office:value="0.314488098298821" calcext:value-type="float">
            <text:p>0,314488</text:p>
          </table:table-cell>
        </table:table-row>
        <table:table-row table:style-name="ro1">
          <table:table-cell office:value-type="string" calcext:value-type="string">
            <text:p>RECIFE II</text:p>
          </table:table-cell>
          <table:table-cell office:value-type="string" calcext:value-type="string">
            <text:p>RIBEIRAO</text:p>
          </table:table-cell>
          <table:table-cell office:value-type="float" office:value="0.314150290453326" calcext:value-type="float">
            <text:p>0,314150</text:p>
          </table:table-cell>
        </table:table-row>
        <table:table-row table:style-name="ro1">
          <table:table-cell office:value-type="string" calcext:value-type="string">
            <text:p>JAGUARIAIVA</text:p>
          </table:table-cell>
          <table:table-cell office:value-type="string" calcext:value-type="string">
            <text:p>ITARARE II</text:p>
          </table:table-cell>
          <table:table-cell office:value-type="float" office:value="0.313696653218795" calcext:value-type="float">
            <text:p>0,313697</text:p>
          </table:table-cell>
        </table:table-row>
        <table:table-row table:style-name="ro1">
          <table:table-cell office:value-type="string" calcext:value-type="string">
            <text:p>PORTOALEGRE 4</text:p>
          </table:table-cell>
          <table:table-cell office:value-type="string" calcext:value-type="string">
            <text:p>PORTOALEGRE10</text:p>
          </table:table-cell>
          <table:table-cell office:value-type="float" office:value="0.312415310766279" calcext:value-type="float">
            <text:p>0,312415</text:p>
          </table:table-cell>
        </table:table-row>
        <table:table-row table:style-name="ro1">
          <table:table-cell office:value-type="string" calcext:value-type="string">
            <text:p>LINHARES</text:p>
          </table:table-cell>
          <table:table-cell office:value-type="string" calcext:value-type="string">
            <text:p>MASCARENHAS</text:p>
          </table:table-cell>
          <table:table-cell office:value-type="float" office:value="0.31171807821681" calcext:value-type="float">
            <text:p>0,311718</text:p>
          </table:table-cell>
        </table:table-row>
        <table:table-row table:style-name="ro1">
          <table:table-cell office:value-type="string" calcext:value-type="string">
            <text:p>MASCARENHAS</text:p>
          </table:table-cell>
          <table:table-cell office:value-type="string" calcext:value-type="string">
            <text:p>AIMORES-SE</text:p>
          </table:table-cell>
          <table:table-cell office:value-type="float" office:value="0.311517076414314" calcext:value-type="float">
            <text:p>0,311517</text:p>
          </table:table-cell>
        </table:table-row>
        <table:table-row table:style-name="ro1">
          <table:table-cell office:value-type="string" calcext:value-type="string">
            <text:p>SIDEROPOL.ESU</text:p>
          </table:table-cell>
          <table:table-cell office:value-type="string" calcext:value-type="string">
            <text:p>TUBARAO SUL</text:p>
          </table:table-cell>
          <table:table-cell office:value-type="float" office:value="0.310613065718061" calcext:value-type="float">
            <text:p>0,310613</text:p>
          </table:table-cell>
        </table:table-row>
        <table:table-row table:style-name="ro1">
          <table:table-cell office:value-type="string" calcext:value-type="string">
            <text:p>D.S.J.PINHAIS</text:p>
          </table:table-cell>
          <table:table-cell office:value-type="string" calcext:value-type="string">
            <text:p>REPAR</text:p>
          </table:table-cell>
          <table:table-cell office:value-type="float" office:value="0.310307913085953" calcext:value-type="float">
            <text:p>0,310308</text:p>
          </table:table-cell>
        </table:table-row>
        <table:table-row table:style-name="ro1">
          <table:table-cell office:value-type="string" calcext:value-type="string">
            <text:p>CURIT.LESTE</text:p>
          </table:table-cell>
          <table:table-cell office:value-type="string" calcext:value-type="string">
            <text:p>POSTO FISCAL</text:p>
          </table:table-cell>
          <table:table-cell office:value-type="float" office:value="0.31008140276968" calcext:value-type="float">
            <text:p>0,310081</text:p>
          </table:table-cell>
        </table:table-row>
        <table:table-row table:style-name="ro1">
          <table:table-cell office:value-type="string" calcext:value-type="string">
            <text:p>B. ESPERANCA</text:p>
          </table:table-cell>
          <table:table-cell office:value-type="string" calcext:value-type="string">
            <text:p>UB.ESPERANCA</text:p>
          </table:table-cell>
          <table:table-cell office:value-type="float" office:value="0.30839411753623" calcext:value-type="float">
            <text:p>0,308394</text:p>
          </table:table-cell>
        </table:table-row>
        <table:table-row table:style-name="ro1">
          <table:table-cell office:value-type="string" calcext:value-type="string">
            <text:p>BARAO COCAIS3</text:p>
          </table:table-cell>
          <table:table-cell office:value-type="string" calcext:value-type="string">
            <text:p>J.MONLEVADE 2</text:p>
          </table:table-cell>
          <table:table-cell office:value-type="float" office:value="0.308073012938785" calcext:value-type="float">
            <text:p>0,308073</text:p>
          </table:table-cell>
        </table:table-row>
        <table:table-row table:style-name="ro1">
          <table:table-cell office:value-type="string" calcext:value-type="string">
            <text:p>ITAGIBA</text:p>
          </table:table-cell>
          <table:table-cell office:value-type="string" calcext:value-type="string">
            <text:p>POCOES II</text:p>
          </table:table-cell>
          <table:table-cell office:value-type="float" office:value="0.307756562100328" calcext:value-type="float">
            <text:p>0,307757</text:p>
          </table:table-cell>
        </table:table-row>
        <table:table-row table:style-name="ro1">
          <table:table-cell office:value-type="string" calcext:value-type="string">
            <text:p>BOTUCATU</text:p>
          </table:table-cell>
          <table:table-cell office:value-type="string" calcext:value-type="string">
            <text:p>CAPAO BONITO</text:p>
          </table:table-cell>
          <table:table-cell office:value-type="float" office:value="0.307146603943288" calcext:value-type="float">
            <text:p>0,307147</text:p>
          </table:table-cell>
        </table:table-row>
        <table:table-row table:style-name="ro1">
          <table:table-cell office:value-type="string" calcext:value-type="string">
            <text:p>SANTANA II</text:p>
          </table:table-cell>
          <table:table-cell office:value-type="string" calcext:value-type="string">
            <text:p>ANGELIM</text:p>
          </table:table-cell>
          <table:table-cell office:value-type="float" office:value="0.306478097599413" calcext:value-type="float">
            <text:p>0,306478</text:p>
          </table:table-cell>
        </table:table-row>
        <table:table-row table:style-name="ro1">
          <table:table-cell office:value-type="string" calcext:value-type="string">
            <text:p>JAGUARARI-SE</text:p>
          </table:table-cell>
          <table:table-cell office:value-type="string" calcext:value-type="string">
            <text:p>JUAZEIRO II</text:p>
          </table:table-cell>
          <table:table-cell office:value-type="float" office:value="0.305950764583512" calcext:value-type="float">
            <text:p>0,305951</text:p>
          </table:table-cell>
        </table:table-row>
        <table:table-row table:style-name="ro1">
          <table:table-cell office:value-type="string" calcext:value-type="string">
            <text:p>DELM. GOUVEIA</text:p>
          </table:table-cell>
          <table:table-cell office:value-type="string" calcext:value-type="string">
            <text:p>FORTALEZA II</text:p>
          </table:table-cell>
          <table:table-cell office:value-type="float" office:value="0.305290663445901" calcext:value-type="float">
            <text:p>0,305291</text:p>
          </table:table-cell>
        </table:table-row>
        <table:table-row table:style-name="ro1">
          <table:table-cell office:value-type="string" calcext:value-type="string">
            <text:p>ITABIRA 2</text:p>
          </table:table-cell>
          <table:table-cell office:value-type="string" calcext:value-type="string">
            <text:p>J.MONLEVADE 4</text:p>
          </table:table-cell>
          <table:table-cell office:value-type="float" office:value="0.304656362534002" calcext:value-type="float">
            <text:p>0,304656</text:p>
          </table:table-cell>
        </table:table-row>
        <table:table-row table:style-name="ro1">
          <table:table-cell office:value-type="string" calcext:value-type="string">
            <text:p>PASSO FUNDO</text:p>
          </table:table-cell>
          <table:table-cell office:value-type="string" calcext:value-type="string">
            <text:p>SANTA MARTA</text:p>
          </table:table-cell>
          <table:table-cell office:value-type="float" office:value="0.301594474293718" calcext:value-type="float">
            <text:p>0,301594</text:p>
          </table:table-cell>
        </table:table-row>
        <table:table-row table:style-name="ro1">
          <table:table-cell office:value-type="string" calcext:value-type="string">
            <text:p>ARIQUEMES</text:p>
          </table:table-cell>
          <table:table-cell office:value-type="string" calcext:value-type="string">
            <text:p>JARU</text:p>
          </table:table-cell>
          <table:table-cell office:value-type="float" office:value="0.30156406538179" calcext:value-type="float">
            <text:p>0,301564</text:p>
          </table:table-cell>
        </table:table-row>
        <table:table-row table:style-name="ro1">
          <table:table-cell office:value-type="string" calcext:value-type="string">
            <text:p>CHARQUEADAS3</text:p>
          </table:table-cell>
          <table:table-cell office:value-type="string" calcext:value-type="string">
            <text:p>CHARQUEADAS</text:p>
          </table:table-cell>
          <table:table-cell office:value-type="float" office:value="0.30110375007666" calcext:value-type="float">
            <text:p>0,301104</text:p>
          </table:table-cell>
        </table:table-row>
        <table:table-row table:style-name="ro1">
          <table:table-cell office:value-type="string" calcext:value-type="string">
            <text:p>ITABIRA 2</text:p>
          </table:table-cell>
          <table:table-cell office:value-type="string" calcext:value-type="string">
            <text:p>NOVA ERA 2</text:p>
          </table:table-cell>
          <table:table-cell office:value-type="float" office:value="0.30086942192268" calcext:value-type="float">
            <text:p>0,300869</text:p>
          </table:table-cell>
        </table:table-row>
        <table:table-row table:style-name="ro1">
          <table:table-cell office:value-type="string" calcext:value-type="string">
            <text:p>FIBRAPLAC</text:p>
          </table:table-cell>
          <table:table-cell office:value-type="string" calcext:value-type="string">
            <text:p>OSORIO 2</text:p>
          </table:table-cell>
          <table:table-cell office:value-type="float" office:value="0.299825269397689" calcext:value-type="float">
            <text:p>0,299825</text:p>
          </table:table-cell>
        </table:table-row>
        <table:table-row table:style-name="ro1">
          <table:table-cell office:value-type="string" calcext:value-type="string">
            <text:p>S.MATEUS SUL</text:p>
          </table:table-cell>
          <table:table-cell office:value-type="string" calcext:value-type="string">
            <text:p>CANOINHAS ESU</text:p>
          </table:table-cell>
          <table:table-cell office:value-type="float" office:value="0.297731421345299" calcext:value-type="float">
            <text:p>0,297731</text:p>
          </table:table-cell>
        </table:table-row>
        <table:table-row table:style-name="ro1">
          <table:table-cell office:value-type="string" calcext:value-type="string">
            <text:p>CURR NOVOS II</text:p>
          </table:table-cell>
          <table:table-cell office:value-type="string" calcext:value-type="string">
            <text:p>LAGOA NOVA II</text:p>
          </table:table-cell>
          <table:table-cell office:value-type="float" office:value="0.297184871453582" calcext:value-type="float">
            <text:p>0,297185</text:p>
          </table:table-cell>
        </table:table-row>
        <table:table-row table:style-name="ro1">
          <table:table-cell office:value-type="string" calcext:value-type="string">
            <text:p>CATU</text:p>
          </table:table-cell>
          <table:table-cell office:value-type="string" calcext:value-type="string">
            <text:p>ITABAIANINHA</text:p>
          </table:table-cell>
          <table:table-cell office:value-type="float" office:value="0.295724168688016" calcext:value-type="float">
            <text:p>0,295724</text:p>
          </table:table-cell>
        </table:table-row>
        <table:table-row table:style-name="ro1">
          <table:table-cell office:value-type="string" calcext:value-type="string">
            <text:p>BARRO ALTO</text:p>
          </table:table-cell>
          <table:table-cell office:value-type="string" calcext:value-type="string">
            <text:p>ITAPACI</text:p>
          </table:table-cell>
          <table:table-cell office:value-type="float" office:value="0.294954536698794" calcext:value-type="float">
            <text:p>0,294955</text:p>
          </table:table-cell>
        </table:table-row>
        <table:table-row table:style-name="ro1">
          <table:table-cell office:value-type="string" calcext:value-type="string">
            <text:p>ELDORADO SUL</text:p>
          </table:table-cell>
          <table:table-cell office:value-type="string" calcext:value-type="string">
            <text:p>PORTO ALEGRE9</text:p>
          </table:table-cell>
          <table:table-cell office:value-type="float" office:value="0.290284359830485" calcext:value-type="float">
            <text:p>0,290284</text:p>
          </table:table-cell>
        </table:table-row>
        <table:table-row table:style-name="ro1">
          <table:table-cell office:value-type="string" calcext:value-type="string">
            <text:p>QUIXERE</text:p>
          </table:table-cell>
          <table:table-cell office:value-type="string" calcext:value-type="string">
            <text:p>MOSSORO II</text:p>
          </table:table-cell>
          <table:table-cell office:value-type="float" office:value="0.290099509712039" calcext:value-type="float">
            <text:p>0,290100</text:p>
          </table:table-cell>
        </table:table-row>
        <table:table-row table:style-name="ro1">
          <table:table-cell office:value-type="string" calcext:value-type="string">
            <text:p>C.INDUSTRIAL</text:p>
          </table:table-cell>
          <table:table-cell office:value-type="string" calcext:value-type="string">
            <text:p>CACHOEIRINHA3</text:p>
          </table:table-cell>
          <table:table-cell office:value-type="float" office:value="0.290056548626153" calcext:value-type="float">
            <text:p>0,290057</text:p>
          </table:table-cell>
        </table:table-row>
        <table:table-row table:style-name="ro1">
          <table:table-cell office:value-type="string" calcext:value-type="string">
            <text:p>C.INDUSTRIAL</text:p>
          </table:table-cell>
          <table:table-cell office:value-type="string" calcext:value-type="string">
            <text:p>CANOAS 2</text:p>
          </table:table-cell>
          <table:table-cell office:value-type="float" office:value="0.289939646118664" calcext:value-type="float">
            <text:p>0,289940</text:p>
          </table:table-cell>
        </table:table-row>
        <table:table-row table:style-name="ro1">
          <table:table-cell office:value-type="string" calcext:value-type="string">
            <text:p>NOVA PRATA 2</text:p>
          </table:table-cell>
          <table:table-cell office:value-type="string" calcext:value-type="string">
            <text:p>VILA MARIA</text:p>
          </table:table-cell>
          <table:table-cell office:value-type="float" office:value="0.288817040104922" calcext:value-type="float">
            <text:p>0,288817</text:p>
          </table:table-cell>
        </table:table-row>
        <table:table-row table:style-name="ro1">
          <table:table-cell office:value-type="string" calcext:value-type="string">
            <text:p>CARAJAS</text:p>
          </table:table-cell>
          <table:table-cell office:value-type="string" calcext:value-type="string">
            <text:p>PALMEIRAS</text:p>
          </table:table-cell>
          <table:table-cell office:value-type="float" office:value="0.287052936249133" calcext:value-type="float">
            <text:p>0,287053</text:p>
          </table:table-cell>
        </table:table-row>
        <table:table-row table:style-name="ro1">
          <table:table-cell office:value-type="string" calcext:value-type="string">
            <text:p>CAMPO ASSOBIO</text:p>
          </table:table-cell>
          <table:table-cell office:value-type="string" calcext:value-type="string">
            <text:p>UMBARA</text:p>
          </table:table-cell>
          <table:table-cell office:value-type="float" office:value="0.287016373723674" calcext:value-type="float">
            <text:p>0,287016</text:p>
          </table:table-cell>
        </table:table-row>
        <table:table-row table:style-name="ro1">
          <table:table-cell office:value-type="string" calcext:value-type="string">
            <text:p>CASTANHAL</text:p>
          </table:table-cell>
          <table:table-cell office:value-type="string" calcext:value-type="string">
            <text:p>SANTA MARIA</text:p>
          </table:table-cell>
          <table:table-cell office:value-type="float" office:value="0.286213728903339" calcext:value-type="float">
            <text:p>0,286214</text:p>
          </table:table-cell>
        </table:table-row>
        <table:table-row table:style-name="ro1">
          <table:table-cell office:value-type="string" calcext:value-type="string">
            <text:p>C.INDUSTRIAL</text:p>
          </table:table-cell>
          <table:table-cell office:value-type="string" calcext:value-type="string">
            <text:p>CANOAS 1</text:p>
          </table:table-cell>
          <table:table-cell office:value-type="float" office:value="0.282300732776597" calcext:value-type="float">
            <text:p>0,282301</text:p>
          </table:table-cell>
        </table:table-row>
        <table:table-row table:style-name="ro1">
          <table:table-cell office:value-type="string" calcext:value-type="string">
            <text:p>G.MANGABEIRA</text:p>
          </table:table-cell>
          <table:table-cell office:value-type="string" calcext:value-type="string">
            <text:p>TOMBA</text:p>
          </table:table-cell>
          <table:table-cell office:value-type="float" office:value="0.281510340715728" calcext:value-type="float">
            <text:p>0,281510</text:p>
          </table:table-cell>
        </table:table-row>
        <table:table-row table:style-name="ro1">
          <table:table-cell office:value-type="string" calcext:value-type="string">
            <text:p>PORTOALEGRE13</text:p>
          </table:table-cell>
          <table:table-cell office:value-type="string" calcext:value-type="string">
            <text:p>PORTOALEGRE6</text:p>
          </table:table-cell>
          <table:table-cell office:value-type="float" office:value="0.280379317171022" calcext:value-type="float">
            <text:p>0,280379</text:p>
          </table:table-cell>
        </table:table-row>
        <table:table-row table:style-name="ro1">
          <table:table-cell office:value-type="string" calcext:value-type="string">
            <text:p>RESTINGA</text:p>
          </table:table-cell>
          <table:table-cell office:value-type="string" calcext:value-type="string">
            <text:p>VIAMAO 3</text:p>
          </table:table-cell>
          <table:table-cell office:value-type="float" office:value="0.276539379206533" calcext:value-type="float">
            <text:p>0,276539</text:p>
          </table:table-cell>
        </table:table-row>
        <table:table-row table:style-name="ro1">
          <table:table-cell office:value-type="string" calcext:value-type="string">
            <text:p>GOIANIA LESTE</text:p>
          </table:table-cell>
          <table:table-cell office:value-type="string" calcext:value-type="string">
            <text:p>XAVANTES</text:p>
          </table:table-cell>
          <table:table-cell office:value-type="float" office:value="0.276117478350741" calcext:value-type="float">
            <text:p>0,276117</text:p>
          </table:table-cell>
        </table:table-row>
        <table:table-row table:style-name="ro1">
          <table:table-cell office:value-type="string" calcext:value-type="string">
            <text:p>SANTA MARTA</text:p>
          </table:table-cell>
          <table:table-cell office:value-type="string" calcext:value-type="string">
            <text:p>TAPERA 2</text:p>
          </table:table-cell>
          <table:table-cell office:value-type="float" office:value="0.266056515760168" calcext:value-type="float">
            <text:p>0,266057</text:p>
          </table:table-cell>
        </table:table-row>
        <table:table-row table:style-name="ro1">
          <table:table-cell office:value-type="string" calcext:value-type="string">
            <text:p>P.AFONSO III</text:p>
          </table:table-cell>
          <table:table-cell office:value-type="string" calcext:value-type="string">
            <text:p>ZEBU</text:p>
          </table:table-cell>
          <table:table-cell office:value-type="float" office:value="0.263080655541325" calcext:value-type="float">
            <text:p>0,263081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POLO</text:p>
          </table:table-cell>
          <table:table-cell office:value-type="float" office:value="0.260257398657822" calcext:value-type="float">
            <text:p>0,260257</text:p>
          </table:table-cell>
        </table:table-row>
        <table:table-row table:style-name="ro1">
          <table:table-cell office:value-type="string" calcext:value-type="string">
            <text:p>PARIGOT SOUZA</text:p>
          </table:table-cell>
          <table:table-cell office:value-type="string" calcext:value-type="string">
            <text:p>SANTA MONICA</text:p>
          </table:table-cell>
          <table:table-cell office:value-type="float" office:value="0.260199849779139" calcext:value-type="float">
            <text:p>0,260200</text:p>
          </table:table-cell>
        </table:table-row>
        <table:table-row table:style-name="ro1">
          <table:table-cell office:value-type="string" calcext:value-type="string">
            <text:p>GOIANINHA</text:p>
          </table:table-cell>
          <table:table-cell office:value-type="string" calcext:value-type="string">
            <text:p>NORFIL</text:p>
          </table:table-cell>
          <table:table-cell office:value-type="float" office:value="0.259685877925658" calcext:value-type="float">
            <text:p>0,259686</text:p>
          </table:table-cell>
        </table:table-row>
        <table:table-row table:style-name="ro1">
          <table:table-cell office:value-type="string" calcext:value-type="string">
            <text:p>BONGI</text:p>
          </table:table-cell>
          <table:table-cell office:value-type="string" calcext:value-type="string">
            <text:p>JOAIRAM</text:p>
          </table:table-cell>
          <table:table-cell office:value-type="float" office:value="0.258734871723851" calcext:value-type="float">
            <text:p>0,258735</text:p>
          </table:table-cell>
        </table:table-row>
        <table:table-row table:style-name="ro1">
          <table:table-cell office:value-type="string" calcext:value-type="string">
            <text:p>APERAM</text:p>
          </table:table-cell>
          <table:table-cell office:value-type="string" calcext:value-type="string">
            <text:p>TIMOTEO 2</text:p>
          </table:table-cell>
          <table:table-cell office:value-type="float" office:value="0.254113708349989" calcext:value-type="float">
            <text:p>0,254114</text:p>
          </table:table-cell>
        </table:table-row>
        <table:table-row table:style-name="ro1">
          <table:table-cell office:value-type="string" calcext:value-type="string">
            <text:p>PEROXIDOS</text:p>
          </table:table-cell>
          <table:table-cell office:value-type="string" calcext:value-type="string">
            <text:p>UMBARA</text:p>
          </table:table-cell>
          <table:table-cell office:value-type="float" office:value="0.250728685059496" calcext:value-type="float">
            <text:p>0,250729</text:p>
          </table:table-cell>
        </table:table-row>
        <table:table-row table:style-name="ro1">
          <table:table-cell office:value-type="string" calcext:value-type="string">
            <text:p>DARDANELOS</text:p>
          </table:table-cell>
          <table:table-cell office:value-type="string" calcext:value-type="string">
            <text:p>JUINA</text:p>
          </table:table-cell>
          <table:table-cell office:value-type="float" office:value="0.196176762862944" calcext:value-type="float">
            <text:p>0,196177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SIMPLICE</text:p>
          </table:table-cell>
          <table:table-cell office:value-type="float" office:value="0.189625940287564" calcext:value-type="float">
            <text:p>0,189626</text:p>
          </table:table-cell>
        </table:table-row>
        <table:table-row table:style-name="ro1">
          <table:table-cell office:value-type="string" calcext:value-type="string">
            <text:p>ASOLO 2</text:p>
          </table:table-cell>
          <table:table-cell office:value-type="string" calcext:value-type="string">
            <text:p>C. DOURADA</text:p>
          </table:table-cell>
          <table:table-cell office:value-type="float" office:value="0.159700914136278" calcext:value-type="float">
            <text:p>0,159701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office:value-type="string" calcext:value-type="string">
            <text:p>SCALA III</text:p>
          </table:table-cell>
          <table:table-cell office:value-type="float" office:value="0.142762040200576" calcext:value-type="float">
            <text:p>0,142762</text:p>
          </table:table-cell>
        </table:table-row>
      </table:table>
      <table:table table:name="edges_cpmci_social" table:style-name="ta1">
        <table:table-column table:style-name="co7" table:number-columns-repeated="2" table:default-cell-style-name="Default"/>
        <table:table-column table:style-name="co8" table:default-cell-style-name="ce14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style-name="Default"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RIO DAS EGUAS</text:p>
          </table:table-cell>
          <table:table-cell office:value-type="string" calcext:value-type="string">
            <text:p>LUZIANIA</text:p>
          </table:table-cell>
          <table:table-cell office:value-type="float" office:value="2.57979222850736" calcext:value-type="float">
            <text:p>2,579792</text:p>
          </table:table-cell>
        </table:table-row>
        <table:table-row table:style-name="ro1">
          <table:table-cell office:value-type="string" calcext:value-type="string">
            <text:p>TIJUCO PRETO</text:p>
          </table:table-cell>
          <table:table-cell office:value-type="string" calcext:value-type="string">
            <text:p>ITABERA</text:p>
          </table:table-cell>
          <table:table-cell office:value-type="float" office:value="2.48981791096995" calcext:value-type="float">
            <text:p>2,489818</text:p>
          </table:table-cell>
        </table:table-row>
        <table:table-row table:style-name="ro1">
          <table:table-cell office:value-type="string" calcext:value-type="string">
            <text:p>BARREIRAS II</text:p>
          </table:table-cell>
          <table:table-cell office:value-type="string" calcext:value-type="string">
            <text:p>RIO DAS EGUAS</text:p>
          </table:table-cell>
          <table:table-cell office:value-type="float" office:value="2.45054974275673" calcext:value-type="float">
            <text:p>2,450550</text:p>
          </table:table-cell>
        </table:table-row>
        <table:table-row table:style-name="ro1">
          <table:table-cell office:value-type="string" calcext:value-type="string">
            <text:p>ITABERA</text:p>
          </table:table-cell>
          <table:table-cell office:value-type="string" calcext:value-type="string">
            <text:p>IVAIPORA FUR</text:p>
          </table:table-cell>
          <table:table-cell office:value-type="float" office:value="2.41287910037302" calcext:value-type="float">
            <text:p>2,412879</text:p>
          </table:table-cell>
        </table:table-row>
        <table:table-row table:style-name="ro1">
          <table:table-cell office:value-type="string" calcext:value-type="string">
            <text:p>S.JOAO PIAUI</text:p>
          </table:table-cell>
          <table:table-cell office:value-type="string" calcext:value-type="string">
            <text:p>GILBUES II</text:p>
          </table:table-cell>
          <table:table-cell office:value-type="float" office:value="2.3882347748339" calcext:value-type="float">
            <text:p>2,388235</text:p>
          </table:table-cell>
        </table:table-row>
        <table:table-row table:style-name="ro1">
          <table:table-cell office:value-type="string" calcext:value-type="string">
            <text:p>ACAILANDIA</text:p>
          </table:table-cell>
          <table:table-cell office:value-type="string" calcext:value-type="string">
            <text:p>STA LUZIA III</text:p>
          </table:table-cell>
          <table:table-cell office:value-type="float" office:value="2.33516621238834" calcext:value-type="float">
            <text:p>2,335166</text:p>
          </table:table-cell>
        </table:table-row>
        <table:table-row table:style-name="ro1">
          <table:table-cell office:value-type="string" calcext:value-type="string">
            <text:p>P. JUSCELINO</text:p>
          </table:table-cell>
          <table:table-cell office:value-type="string" calcext:value-type="string">
            <text:p>PIRAPORA 2</text:p>
          </table:table-cell>
          <table:table-cell office:value-type="float" office:value="2.30861757974393" calcext:value-type="float">
            <text:p>2,308618</text:p>
          </table:table-cell>
        </table:table-row>
        <table:table-row table:style-name="ro1">
          <table:table-cell office:value-type="string" calcext:value-type="string">
            <text:p>MIRANDA II</text:p>
          </table:table-cell>
          <table:table-cell office:value-type="string" calcext:value-type="string">
            <text:p>STA LUZIA III</text:p>
          </table:table-cell>
          <table:table-cell office:value-type="float" office:value="2.3025884434592" calcext:value-type="float">
            <text:p>2,302588</text:p>
          </table:table-cell>
        </table:table-row>
        <table:table-row table:style-name="ro1">
          <table:table-cell office:value-type="string" calcext:value-type="string">
            <text:p>ITABIRA 5</text:p>
          </table:table-cell>
          <table:table-cell office:value-type="string" calcext:value-type="string">
            <text:p>P. JUSCELINO</text:p>
          </table:table-cell>
          <table:table-cell office:value-type="float" office:value="2.2982720177624" calcext:value-type="float">
            <text:p>2,298272</text:p>
          </table:table-cell>
        </table:table-row>
        <table:table-row table:style-name="ro1">
          <table:table-cell office:value-type="string" calcext:value-type="string">
            <text:p>PIRAPORA 2</text:p>
          </table:table-cell>
          <table:table-cell office:value-type="string" calcext:value-type="string">
            <text:p>LUZIANIA</text:p>
          </table:table-cell>
          <table:table-cell office:value-type="float" office:value="2.26115339413807" calcext:value-type="float">
            <text:p>2,261153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FERNAO DIAS</text:p>
          </table:table-cell>
          <table:table-cell office:value-type="float" office:value="2.2608963809932" calcext:value-type="float">
            <text:p>2,260896</text:p>
          </table:table-cell>
        </table:table-row>
        <table:table-row table:style-name="ro1">
          <table:table-cell office:value-type="string" calcext:value-type="string">
            <text:p>NOVA IGUACU</text:p>
          </table:table-cell>
          <table:table-cell office:value-type="string" calcext:value-type="string">
            <text:p>TERMINAL RIO</text:p>
          </table:table-cell>
          <table:table-cell office:value-type="float" office:value="2.26026075501643" calcext:value-type="float">
            <text:p>2,260261</text:p>
          </table:table-cell>
        </table:table-row>
        <table:table-row table:style-name="ro1">
          <table:table-cell office:value-type="string" calcext:value-type="string">
            <text:p>CASCAVEL OEST</text:p>
          </table:table-cell>
          <table:table-cell office:value-type="string" calcext:value-type="string">
            <text:p>F.IGUACU 60HZ</text:p>
          </table:table-cell>
          <table:table-cell office:value-type="float" office:value="2.2531393721763" calcext:value-type="float">
            <text:p>2,253139</text:p>
          </table:table-cell>
        </table:table-row>
        <table:table-row table:style-name="ro1">
          <table:table-cell office:value-type="string" calcext:value-type="string">
            <text:p>POVO NOVO</text:p>
          </table:table-cell>
          <table:table-cell office:value-type="string" calcext:value-type="string">
            <text:p>GUAIBA 3</text:p>
          </table:table-cell>
          <table:table-cell office:value-type="float" office:value="2.21963730869103" calcext:value-type="float">
            <text:p>2,219637</text:p>
          </table:table-cell>
        </table:table-row>
        <table:table-row table:style-name="ro1">
          <table:table-cell office:value-type="string" calcext:value-type="string">
            <text:p>CANDIOTA 2</text:p>
          </table:table-cell>
          <table:table-cell office:value-type="string" calcext:value-type="string">
            <text:p>GUAIBA 3</text:p>
          </table:table-cell>
          <table:table-cell office:value-type="float" office:value="2.20448846745972" calcext:value-type="float">
            <text:p>2,204488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string" calcext:value-type="string">
            <text:p>ITATIBA</text:p>
          </table:table-cell>
          <table:table-cell office:value-type="float" office:value="2.19750238390479" calcext:value-type="float">
            <text:p>2,197502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MARIMBONDO II</text:p>
          </table:table-cell>
          <table:table-cell office:value-type="float" office:value="2.1946399686964" calcext:value-type="float">
            <text:p>2,194640</text:p>
          </table:table-cell>
        </table:table-row>
        <table:table-row table:style-name="ro1">
          <table:table-cell office:value-type="string" calcext:value-type="string">
            <text:p>ARARAQUARA 2</text:p>
          </table:table-cell>
          <table:table-cell office:value-type="string" calcext:value-type="string">
            <text:p>FERNAO DIAS</text:p>
          </table:table-cell>
          <table:table-cell office:value-type="float" office:value="2.1886805251514" calcext:value-type="float">
            <text:p>2,188681</text:p>
          </table:table-cell>
        </table:table-row>
        <table:table-row table:style-name="ro1">
          <table:table-cell office:value-type="string" calcext:value-type="string">
            <text:p>POVO NOVO</text:p>
          </table:table-cell>
          <table:table-cell office:value-type="string" calcext:value-type="string">
            <text:p>MARMELEIRO 2</text:p>
          </table:table-cell>
          <table:table-cell office:value-type="float" office:value="2.18023645468918" calcext:value-type="float">
            <text:p>2,180236</text:p>
          </table:table-cell>
        </table:table-row>
        <table:table-row table:style-name="ro1">
          <table:table-cell office:value-type="string" calcext:value-type="string">
            <text:p>ARARAQUARA 2</text:p>
          </table:table-cell>
          <table:table-cell office:value-type="string" calcext:value-type="string">
            <text:p>ITATIBA</text:p>
          </table:table-cell>
          <table:table-cell office:value-type="float" office:value="2.1715504438572" calcext:value-type="float">
            <text:p>2,171550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string" calcext:value-type="string">
            <text:p>CURIT.LESTE</text:p>
          </table:table-cell>
          <table:table-cell office:value-type="float" office:value="2.1420119227537" calcext:value-type="float">
            <text:p>2,142012</text:p>
          </table:table-cell>
        </table:table-row>
        <table:table-row table:style-name="ro1">
          <table:table-cell office:value-type="string" calcext:value-type="string">
            <text:p>MARMELEIRO 2</text:p>
          </table:table-cell>
          <table:table-cell office:value-type="string" calcext:value-type="string">
            <text:p>S V PALMAR 2</text:p>
          </table:table-cell>
          <table:table-cell office:value-type="float" office:value="2.13202720927553" calcext:value-type="float">
            <text:p>2,132027</text:p>
          </table:table-cell>
        </table:table-row>
        <table:table-row table:style-name="ro1">
          <table:table-cell office:value-type="string" calcext:value-type="string">
            <text:p>ABDON BATISTA</text:p>
          </table:table-cell>
          <table:table-cell office:value-type="string" calcext:value-type="string">
            <text:p>SIDEROPOLIS 2</text:p>
          </table:table-cell>
          <table:table-cell office:value-type="float" office:value="2.12979337190456" calcext:value-type="float">
            <text:p>2,129793</text:p>
          </table:table-cell>
        </table:table-row>
        <table:table-row table:style-name="ro1">
          <table:table-cell office:value-type="string" calcext:value-type="string">
            <text:p>NOVA STA RITA</text:p>
          </table:table-cell>
          <table:table-cell office:value-type="string" calcext:value-type="string">
            <text:p>GUAIBA 3</text:p>
          </table:table-cell>
          <table:table-cell office:value-type="float" office:value="2.12501793172005" calcext:value-type="float">
            <text:p>2,125018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C. PAULISTA</text:p>
          </table:table-cell>
          <table:table-cell office:value-type="float" office:value="2.09322893329873" calcext:value-type="float">
            <text:p>2,093229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MILAGRES II</text:p>
          </table:table-cell>
          <table:table-cell office:value-type="float" office:value="2.08742270715234" calcext:value-type="float">
            <text:p>2,087423</text:p>
          </table:table-cell>
        </table:table-row>
        <table:table-row table:style-name="ro1">
          <table:table-cell office:value-type="string" calcext:value-type="string">
            <text:p>FERNAO DIAS</text:p>
          </table:table-cell>
          <table:table-cell office:value-type="string" calcext:value-type="string">
            <text:p>TERMINAL RIO</text:p>
          </table:table-cell>
          <table:table-cell office:value-type="float" office:value="2.08569941995616" calcext:value-type="float">
            <text:p>2,085699</text:p>
          </table:table-cell>
        </table:table-row>
        <table:table-row table:style-name="ro1">
          <table:table-cell office:value-type="string" calcext:value-type="string">
            <text:p>BIGUACU</text:p>
          </table:table-cell>
          <table:table-cell office:value-type="string" calcext:value-type="string">
            <text:p>SIDEROPOLIS 2</text:p>
          </table:table-cell>
          <table:table-cell office:value-type="float" office:value="2.08568275958098" calcext:value-type="float">
            <text:p>2,085683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office:value-type="string" calcext:value-type="string">
            <text:p>GUARULHOS</text:p>
          </table:table-cell>
          <table:table-cell office:value-type="float" office:value="2.06225271102911" calcext:value-type="float">
            <text:p>2,062253</text:p>
          </table:table-cell>
        </table:table-row>
        <table:table-row table:style-name="ro1">
          <table:table-cell office:value-type="string" calcext:value-type="string">
            <text:p>MORRO CHAPEU II</text:p>
          </table:table-cell>
          <table:table-cell office:value-type="string" calcext:value-type="string">
            <text:p>POCOES III</text:p>
          </table:table-cell>
          <table:table-cell office:value-type="float" office:value="2.0557069312787" calcext:value-type="float">
            <text:p>2,055707</text:p>
          </table:table-cell>
        </table:table-row>
        <table:table-row table:style-name="ro1">
          <table:table-cell office:value-type="string" calcext:value-type="string">
            <text:p>INTERLAGOS</text:p>
          </table:table-cell>
          <table:table-cell office:value-type="string" calcext:value-type="string">
            <text:p>XAVANTES</text:p>
          </table:table-cell>
          <table:table-cell office:value-type="float" office:value="2.05321612891459" calcext:value-type="float">
            <text:p>2,053216</text:p>
          </table:table-cell>
        </table:table-row>
        <table:table-row table:style-name="ro1">
          <table:table-cell office:value-type="string" calcext:value-type="string">
            <text:p>GUAIRA</text:p>
          </table:table-cell>
          <table:table-cell office:value-type="string" calcext:value-type="string">
            <text:p>F.IGUACU 60HZ</text:p>
          </table:table-cell>
          <table:table-cell office:value-type="float" office:value="2.0523206899054" calcext:value-type="float">
            <text:p>2,052321</text:p>
          </table:table-cell>
        </table:table-row>
        <table:table-row table:style-name="ro1">
          <table:table-cell office:value-type="string" calcext:value-type="string">
            <text:p>PONTA GROSSA</text:p>
          </table:table-cell>
          <table:table-cell office:value-type="string" calcext:value-type="string">
            <text:p>IVAIPORA ELS</text:p>
          </table:table-cell>
          <table:table-cell office:value-type="float" office:value="2.050168518384" calcext:value-type="float">
            <text:p>2,050169</text:p>
          </table:table-cell>
        </table:table-row>
        <table:table-row table:style-name="ro1">
          <table:table-cell office:value-type="string" calcext:value-type="string">
            <text:p>ARARAQUARA 2</text:p>
          </table:table-cell>
          <table:table-cell office:value-type="string" calcext:value-type="string">
            <text:p>NOVA PONTE 3</text:p>
          </table:table-cell>
          <table:table-cell office:value-type="float" office:value="2.04869743991797" calcext:value-type="float">
            <text:p>2,048697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string" calcext:value-type="string">
            <text:p>TERMINAL RIO</text:p>
          </table:table-cell>
          <table:table-cell office:value-type="float" office:value="2.04390960817624" calcext:value-type="float">
            <text:p>2,043910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string" calcext:value-type="string">
            <text:p>PONTA GROSSA</text:p>
          </table:table-cell>
          <table:table-cell office:value-type="float" office:value="2.04353265641709" calcext:value-type="float">
            <text:p>2,043533</text:p>
          </table:table-cell>
        </table:table-row>
        <table:table-row table:style-name="ro1">
          <table:table-cell office:value-type="string" calcext:value-type="string">
            <text:p>GUAIRA</text:p>
          </table:table-cell>
          <table:table-cell office:value-type="string" calcext:value-type="string">
            <text:p>SARANDI</text:p>
          </table:table-cell>
          <table:table-cell office:value-type="float" office:value="2.038674819191" calcext:value-type="float">
            <text:p>2,038675</text:p>
          </table:table-cell>
        </table:table-row>
        <table:table-row table:style-name="ro1">
          <table:table-cell office:value-type="string" calcext:value-type="string">
            <text:p>SERRA PELADA</text:p>
          </table:table-cell>
          <table:table-cell office:value-type="string" calcext:value-type="string">
            <text:p>XINGU</text:p>
          </table:table-cell>
          <table:table-cell office:value-type="float" office:value="2.03161449386328" calcext:value-type="float">
            <text:p>2,031614</text:p>
          </table:table-cell>
        </table:table-row>
        <table:table-row table:style-name="ro1">
          <table:table-cell office:value-type="string" calcext:value-type="string">
            <text:p>AREIA</text:p>
          </table:table-cell>
          <table:table-cell office:value-type="string" calcext:value-type="string">
            <text:p>JOINVILLE SUL</text:p>
          </table:table-cell>
          <table:table-cell office:value-type="float" office:value="2.02851162966124" calcext:value-type="float">
            <text:p>2,028512</text:p>
          </table:table-cell>
        </table:table-row>
        <table:table-row table:style-name="ro1">
          <table:table-cell office:value-type="string" calcext:value-type="string">
            <text:p>GUARULHOS</text:p>
          </table:table-cell>
          <table:table-cell office:value-type="string" calcext:value-type="string">
            <text:p>NORTE</text:p>
          </table:table-cell>
          <table:table-cell office:value-type="float" office:value="2.02456091062903" calcext:value-type="float">
            <text:p>2,024561</text:p>
          </table:table-cell>
        </table:table-row>
        <table:table-row table:style-name="ro1">
          <table:table-cell office:value-type="string" calcext:value-type="string">
            <text:p>BOM.JES.LAPA II</text:p>
          </table:table-cell>
          <table:table-cell office:value-type="string" calcext:value-type="string">
            <text:p>GENTIO OURO II</text:p>
          </table:table-cell>
          <table:table-cell office:value-type="float" office:value="2.02451493792193" calcext:value-type="float">
            <text:p>2,024515</text:p>
          </table:table-cell>
        </table:table-row>
        <table:table-row table:style-name="ro1">
          <table:table-cell office:value-type="string" calcext:value-type="string">
            <text:p>JANAUBA 3</text:p>
          </table:table-cell>
          <table:table-cell office:value-type="string" calcext:value-type="string">
            <text:p>S. DAS ALMAS II</text:p>
          </table:table-cell>
          <table:table-cell office:value-type="float" office:value="2.01248470961438" calcext:value-type="float">
            <text:p>2,012485</text:p>
          </table:table-cell>
        </table:table-row>
        <table:table-row table:style-name="ro1">
          <table:table-cell office:value-type="string" calcext:value-type="string">
            <text:p>JANAUBA 3</text:p>
          </table:table-cell>
          <table:table-cell office:value-type="string" calcext:value-type="string">
            <text:p>P. JUSCELINO</text:p>
          </table:table-cell>
          <table:table-cell office:value-type="float" office:value="2.00963151714178" calcext:value-type="float">
            <text:p>2,009632</text:p>
          </table:table-cell>
        </table:table-row>
        <table:table-row table:style-name="ro1">
          <table:table-cell office:value-type="string" calcext:value-type="string">
            <text:p>GILBUES II</text:p>
          </table:table-cell>
          <table:table-cell office:value-type="string" calcext:value-type="string">
            <text:p>MIRACEMA</text:p>
          </table:table-cell>
          <table:table-cell office:value-type="float" office:value="2.00122370676179" calcext:value-type="float">
            <text:p>2,001224</text:p>
          </table:table-cell>
        </table:table-row>
        <table:table-row table:style-name="ro1">
          <table:table-cell office:value-type="string" calcext:value-type="string">
            <text:p>SERRA PELADA</text:p>
          </table:table-cell>
          <table:table-cell office:value-type="string" calcext:value-type="string">
            <text:p>MIRACEMA</text:p>
          </table:table-cell>
          <table:table-cell office:value-type="float" office:value="1.99999574739127" calcext:value-type="float">
            <text:p>1,999996</text:p>
          </table:table-cell>
        </table:table-row>
        <table:table-row table:style-name="ro1">
          <table:table-cell office:value-type="string" calcext:value-type="string">
            <text:p>MESQUITA</text:p>
          </table:table-cell>
          <table:table-cell office:value-type="string" calcext:value-type="string">
            <text:p>JOAO NEIVA 2</text:p>
          </table:table-cell>
          <table:table-cell office:value-type="float" office:value="1.99978358532625" calcext:value-type="float">
            <text:p>1,999784</text:p>
          </table:table-cell>
        </table:table-row>
        <table:table-row table:style-name="ro1">
          <table:table-cell office:value-type="string" calcext:value-type="string">
            <text:p>MUTUM</text:p>
          </table:table-cell>
          <table:table-cell office:value-type="string" calcext:value-type="string">
            <text:p>CAMPOS 2</text:p>
          </table:table-cell>
          <table:table-cell office:value-type="float" office:value="1.99371226828324" calcext:value-type="float">
            <text:p>1,993712</text:p>
          </table:table-cell>
        </table:table-row>
        <table:table-row table:style-name="ro1">
          <table:table-cell office:value-type="string" calcext:value-type="string">
            <text:p>ITAJAI 2</text:p>
          </table:table-cell>
          <table:table-cell office:value-type="string" calcext:value-type="string">
            <text:p>JOINVILLE SUL</text:p>
          </table:table-cell>
          <table:table-cell office:value-type="float" office:value="1.99238465903039" calcext:value-type="float">
            <text:p>1,992385</text:p>
          </table:table-cell>
        </table:table-row>
        <table:table-row table:style-name="ro1">
          <table:table-cell office:value-type="string" calcext:value-type="string">
            <text:p>IVAIPORA ELS</text:p>
          </table:table-cell>
          <table:table-cell office:value-type="string" calcext:value-type="string">
            <text:p>S.SANTIAGO</text:p>
          </table:table-cell>
          <table:table-cell office:value-type="float" office:value="1.99220327980557" calcext:value-type="float">
            <text:p>1,992203</text:p>
          </table:table-cell>
        </table:table-row>
        <table:table-row table:style-name="ro1">
          <table:table-cell office:value-type="string" calcext:value-type="string">
            <text:p>BIGUACU</text:p>
          </table:table-cell>
          <table:table-cell office:value-type="string" calcext:value-type="string">
            <text:p>ITAJAI 2</text:p>
          </table:table-cell>
          <table:table-cell office:value-type="float" office:value="1.98875736163" calcext:value-type="float">
            <text:p>1,988757</text:p>
          </table:table-cell>
        </table:table-row>
        <table:table-row table:style-name="ro1">
          <table:table-cell office:value-type="string" calcext:value-type="string">
            <text:p>NOVA PONTE 3</text:p>
          </table:table-cell>
          <table:table-cell office:value-type="string" calcext:value-type="string">
            <text:p>PARACATU 4</text:p>
          </table:table-cell>
          <table:table-cell office:value-type="float" office:value="1.98436531246358" calcext:value-type="float">
            <text:p>1,984365</text:p>
          </table:table-cell>
        </table:table-row>
        <table:table-row table:style-name="ro1">
          <table:table-cell office:value-type="string" calcext:value-type="string">
            <text:p>LONDRINA ESU</text:p>
          </table:table-cell>
          <table:table-cell office:value-type="string" calcext:value-type="string">
            <text:p>ASSIS</text:p>
          </table:table-cell>
          <table:table-cell office:value-type="float" office:value="1.98291831369558" calcext:value-type="float">
            <text:p>1,982918</text:p>
          </table:table-cell>
        </table:table-row>
        <table:table-row table:style-name="ro1">
          <table:table-cell office:value-type="string" calcext:value-type="string">
            <text:p>ARARAQUARA 2</text:p>
          </table:table-cell>
          <table:table-cell office:value-type="string" calcext:value-type="string">
            <text:p>TAUBATE</text:p>
          </table:table-cell>
          <table:table-cell office:value-type="float" office:value="1.98078862009593" calcext:value-type="float">
            <text:p>1,980789</text:p>
          </table:table-cell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TIJUCO PRETO</text:p>
          </table:table-cell>
          <table:table-cell office:value-type="float" office:value="1.96386351199149" calcext:value-type="float">
            <text:p>1,963864</text:p>
          </table:table-cell>
        </table:table-row>
        <table:table-row table:style-name="ro1">
          <table:table-cell office:value-type="string" calcext:value-type="string">
            <text:p>JAIBA</text:p>
          </table:table-cell>
          <table:table-cell office:value-type="string" calcext:value-type="string">
            <text:p>JANAUBA 6</text:p>
          </table:table-cell>
          <table:table-cell office:value-type="float" office:value="1.96310642884218" calcext:value-type="float">
            <text:p>1,963106</text:p>
          </table:table-cell>
        </table:table-row>
        <table:table-row table:style-name="ro1">
          <table:table-cell office:value-type="string" calcext:value-type="string">
            <text:p>CAPELINHA 3</text:p>
          </table:table-cell>
          <table:table-cell office:value-type="string" calcext:value-type="string">
            <text:p>JANAUBA 6</text:p>
          </table:table-cell>
          <table:table-cell office:value-type="float" office:value="1.95856411069638" calcext:value-type="float">
            <text:p>1,958564</text:p>
          </table:table-cell>
        </table:table-row>
        <table:table-row table:style-name="ro1">
          <table:table-cell office:value-type="string" calcext:value-type="string">
            <text:p>MARITUBA</text:p>
          </table:table-cell>
          <table:table-cell office:value-type="string" calcext:value-type="string">
            <text:p>VILA DO CONDE</text:p>
          </table:table-cell>
          <table:table-cell office:value-type="float" office:value="1.95516236668491" calcext:value-type="float">
            <text:p>1,955162</text:p>
          </table:table-cell>
        </table:table-row>
        <table:table-row table:style-name="ro1">
          <table:table-cell office:value-type="string" calcext:value-type="string">
            <text:p>LONDRINA ESU</text:p>
          </table:table-cell>
          <table:table-cell office:value-type="string" calcext:value-type="string">
            <text:p>SARANDI</text:p>
          </table:table-cell>
          <table:table-cell office:value-type="float" office:value="1.94767538288081" calcext:value-type="float">
            <text:p>1,947675</text:p>
          </table:table-cell>
        </table:table-row>
        <table:table-row table:style-name="ro1">
          <table:table-cell office:value-type="string" calcext:value-type="string">
            <text:p>R.VERDE NORTE</text:p>
          </table:table-cell>
          <table:table-cell office:value-type="string" calcext:value-type="string">
            <text:p>MARIMBONDO II</text:p>
          </table:table-cell>
          <table:table-cell office:value-type="float" office:value="1.94167206366104" calcext:value-type="float">
            <text:p>1,941672</text:p>
          </table:table-cell>
        </table:table-row>
        <table:table-row table:style-name="ro1">
          <table:table-cell office:value-type="string" calcext:value-type="string">
            <text:p>PIRAPORA 2</text:p>
          </table:table-cell>
          <table:table-cell office:value-type="string" calcext:value-type="string">
            <text:p>ARINOS 2</text:p>
          </table:table-cell>
          <table:table-cell office:value-type="float" office:value="1.93783569696841" calcext:value-type="float">
            <text:p>1,937836</text:p>
          </table:table-cell>
        </table:table-row>
        <table:table-row table:style-name="ro1">
          <table:table-cell office:value-type="string" calcext:value-type="string">
            <text:p>ALTA PAULISTA</text:p>
          </table:table-cell>
          <table:table-cell office:value-type="string" calcext:value-type="string">
            <text:p>MARECH.RONDON</text:p>
          </table:table-cell>
          <table:table-cell office:value-type="float" office:value="1.93729081582201" calcext:value-type="float">
            <text:p>1,937291</text:p>
          </table:table-cell>
        </table:table-row>
        <table:table-row table:style-name="ro1">
          <table:table-cell office:value-type="string" calcext:value-type="string">
            <text:p>ABDON BATISTA</text:p>
          </table:table-cell>
          <table:table-cell office:value-type="string" calcext:value-type="string">
            <text:p>C.NOVOS</text:p>
          </table:table-cell>
          <table:table-cell office:value-type="float" office:value="1.93713102922268" calcext:value-type="float">
            <text:p>1,937131</text:p>
          </table:table-cell>
        </table:table-row>
        <table:table-row table:style-name="ro1">
          <table:table-cell office:value-type="string" calcext:value-type="string">
            <text:p>ARINOS 2</text:p>
          </table:table-cell>
          <table:table-cell office:value-type="string" calcext:value-type="string">
            <text:p>PARACATU 4</text:p>
          </table:table-cell>
          <table:table-cell office:value-type="float" office:value="1.93495393726603" calcext:value-type="float">
            <text:p>1,934954</text:p>
          </table:table-cell>
        </table:table-row>
        <table:table-row table:style-name="ro1">
          <table:table-cell office:value-type="string" calcext:value-type="string">
            <text:p>G.VALADARES 6</text:p>
          </table:table-cell>
          <table:table-cell office:value-type="string" calcext:value-type="string">
            <text:p>PE. PARAISO 2</text:p>
          </table:table-cell>
          <table:table-cell office:value-type="float" office:value="1.93409854029479" calcext:value-type="float">
            <text:p>1,934099</text:p>
          </table:table-cell>
        </table:table-row>
        <table:table-row table:style-name="ro1">
          <table:table-cell office:value-type="string" calcext:value-type="string">
            <text:p>JANAUBA 3</text:p>
          </table:table-cell>
          <table:table-cell office:value-type="string" calcext:value-type="string">
            <text:p>JANAUBA 6</text:p>
          </table:table-cell>
          <table:table-cell office:value-type="float" office:value="1.93302928435945" calcext:value-type="float">
            <text:p>1,933029</text:p>
          </table:table-cell>
        </table:table-row>
        <table:table-row table:style-name="ro1">
          <table:table-cell office:value-type="string" calcext:value-type="string">
            <text:p>BIGUACU</text:p>
          </table:table-cell>
          <table:table-cell office:value-type="string" calcext:value-type="string">
            <text:p>GASPAR 2</text:p>
          </table:table-cell>
          <table:table-cell office:value-type="float" office:value="1.92355366450764" calcext:value-type="float">
            <text:p>1,923554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string" calcext:value-type="string">
            <text:p>CAMPOS 2</text:p>
          </table:table-cell>
          <table:table-cell office:value-type="float" office:value="1.9172742263507" calcext:value-type="float">
            <text:p>1,917274</text:p>
          </table:table-cell>
        </table:table-row>
        <table:table-row table:style-name="ro1">
          <table:table-cell office:value-type="string" calcext:value-type="string">
            <text:p>G.VALADARES 6</text:p>
          </table:table-cell>
          <table:table-cell office:value-type="string" calcext:value-type="string">
            <text:p>CAPELINHA 3</text:p>
          </table:table-cell>
          <table:table-cell office:value-type="float" office:value="1.91271781688713" calcext:value-type="float">
            <text:p>1,912718</text:p>
          </table:table-cell>
        </table:table-row>
        <table:table-row table:style-name="ro1">
          <table:table-cell office:value-type="string" calcext:value-type="string">
            <text:p>TRINDADE</text:p>
          </table:table-cell>
          <table:table-cell office:value-type="string" calcext:value-type="string">
            <text:p>SILVANIA</text:p>
          </table:table-cell>
          <table:table-cell office:value-type="float" office:value="1.91073138204339" calcext:value-type="float">
            <text:p>1,910731</text:p>
          </table:table-cell>
        </table:table-row>
        <table:table-row table:style-name="ro1">
          <table:table-cell office:value-type="string" calcext:value-type="string">
            <text:p>BARREIRAS II</text:p>
          </table:table-cell>
          <table:table-cell office:value-type="string" calcext:value-type="string">
            <text:p>GILBUES II</text:p>
          </table:table-cell>
          <table:table-cell office:value-type="float" office:value="1.90643077384416" calcext:value-type="float">
            <text:p>1,906431</text:p>
          </table:table-cell>
        </table:table-row>
        <table:table-row table:style-name="ro1">
          <table:table-cell office:value-type="string" calcext:value-type="string">
            <text:p>POCOES III</text:p>
          </table:table-cell>
          <table:table-cell office:value-type="string" calcext:value-type="string">
            <text:p>PE. PARAISO 2</text:p>
          </table:table-cell>
          <table:table-cell office:value-type="float" office:value="1.90356689868198" calcext:value-type="float">
            <text:p>1,903567</text:p>
          </table:table-cell>
        </table:table-row>
        <table:table-row table:style-name="ro1">
          <table:table-cell office:value-type="string" calcext:value-type="string">
            <text:p>RIBEIRAOZINHO</text:p>
          </table:table-cell>
          <table:table-cell office:value-type="string" calcext:value-type="string">
            <text:p>PARANATINGA</text:p>
          </table:table-cell>
          <table:table-cell office:value-type="float" office:value="1.90320125642572" calcext:value-type="float">
            <text:p>1,903201</text:p>
          </table:table-cell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PARANATINGA</text:p>
          </table:table-cell>
          <table:table-cell office:value-type="float" office:value="1.90163837467064" calcext:value-type="float">
            <text:p>1,901638</text:p>
          </table:table-cell>
        </table:table-row>
        <table:table-row table:style-name="ro1">
          <table:table-cell office:value-type="string" calcext:value-type="string">
            <text:p>BOM.JES.LAPA II</text:p>
          </table:table-cell>
          <table:table-cell office:value-type="string" calcext:value-type="string">
            <text:p>JANAUBA 3</text:p>
          </table:table-cell>
          <table:table-cell office:value-type="float" office:value="1.90117210078596" calcext:value-type="float">
            <text:p>1,901172</text:p>
          </table:table-cell>
        </table:table-row>
        <table:table-row table:style-name="ro1">
          <table:table-cell office:value-type="string" calcext:value-type="string">
            <text:p>IGAPORA III</text:p>
          </table:table-cell>
          <table:table-cell office:value-type="string" calcext:value-type="string">
            <text:p>S. DAS ALMAS II</text:p>
          </table:table-cell>
          <table:table-cell office:value-type="float" office:value="1.89645111076983" calcext:value-type="float">
            <text:p>1,896451</text:p>
          </table:table-cell>
        </table:table-row>
        <table:table-row table:style-name="ro1">
          <table:table-cell office:value-type="string" calcext:value-type="string">
            <text:p>BLUMENAU</text:p>
          </table:table-cell>
          <table:table-cell office:value-type="string" calcext:value-type="string">
            <text:p>GASPAR 2</text:p>
          </table:table-cell>
          <table:table-cell office:value-type="float" office:value="1.89630984684789" calcext:value-type="float">
            <text:p>1,896310</text:p>
          </table:table-cell>
        </table:table-row>
        <table:table-row table:style-name="ro1">
          <table:table-cell office:value-type="string" calcext:value-type="string">
            <text:p>CAMPINAS</text:p>
          </table:table-cell>
          <table:table-cell office:value-type="string" calcext:value-type="string">
            <text:p>ITATIBA</text:p>
          </table:table-cell>
          <table:table-cell office:value-type="float" office:value="1.89559068896527" calcext:value-type="float">
            <text:p>1,895591</text:p>
          </table:table-cell>
        </table:table-row>
        <table:table-row table:style-name="ro1">
          <table:table-cell office:value-type="string" calcext:value-type="string">
            <text:p>IBIUNA</text:p>
          </table:table-cell>
          <table:table-cell office:value-type="string" calcext:value-type="string">
            <text:p>INTERLAGOS</text:p>
          </table:table-cell>
          <table:table-cell office:value-type="float" office:value="1.88559105708843" calcext:value-type="float">
            <text:p>1,885591</text:p>
          </table:table-cell>
        </table:table-row>
        <table:table-row table:style-name="ro1">
          <table:table-cell office:value-type="string" calcext:value-type="string">
            <text:p>S.DA MESA</text:p>
          </table:table-cell>
          <table:table-cell office:value-type="string" calcext:value-type="string">
            <text:p>SAMAMBAIA</text:p>
          </table:table-cell>
          <table:table-cell office:value-type="float" office:value="1.88264649257471" calcext:value-type="float">
            <text:p>1,882646</text:p>
          </table:table-cell>
        </table:table-row>
        <table:table-row table:style-name="ro1">
          <table:table-cell office:value-type="string" calcext:value-type="string">
            <text:p>BURITIRAMA</text:p>
          </table:table-cell>
          <table:table-cell office:value-type="string" calcext:value-type="string">
            <text:p>GILBUES II</text:p>
          </table:table-cell>
          <table:table-cell office:value-type="float" office:value="1.88224880199071" calcext:value-type="float">
            <text:p>1,882249</text:p>
          </table:table-cell>
        </table:table-row>
        <table:table-row table:style-name="ro1">
          <table:table-cell office:value-type="string" calcext:value-type="string">
            <text:p>ALTA PAULISTA</text:p>
          </table:table-cell>
          <table:table-cell office:value-type="string" calcext:value-type="string">
            <text:p>TAQUARUCU</text:p>
          </table:table-cell>
          <table:table-cell office:value-type="float" office:value="1.88138347102968" calcext:value-type="float">
            <text:p>1,881383</text:p>
          </table:table-cell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PARANAITA</text:p>
          </table:table-cell>
          <table:table-cell office:value-type="float" office:value="1.87751502608183" calcext:value-type="float">
            <text:p>1,877515</text:p>
          </table:table-cell>
        </table:table-row>
        <table:table-row table:style-name="ro1">
          <table:table-cell office:value-type="string" calcext:value-type="string">
            <text:p>IL.SOLTEIRA 2</text:p>
          </table:table-cell>
          <table:table-cell office:value-type="string" calcext:value-type="string">
            <text:p>ILHA SOLTEIRA</text:p>
          </table:table-cell>
          <table:table-cell office:value-type="float" office:value="1.87694587622971" calcext:value-type="float">
            <text:p>1,876946</text:p>
          </table:table-cell>
        </table:table-row>
        <table:table-row table:style-name="ro1">
          <table:table-cell office:value-type="string" calcext:value-type="string">
            <text:p>JOAO NEIVA 2</text:p>
          </table:table-cell>
          <table:table-cell office:value-type="string" calcext:value-type="string">
            <text:p>VIANA 2</text:p>
          </table:table-cell>
          <table:table-cell office:value-type="float" office:value="1.87528492226527" calcext:value-type="float">
            <text:p>1,875285</text:p>
          </table:table-cell>
        </table:table-row>
        <table:table-row table:style-name="ro1">
          <table:table-cell office:value-type="string" calcext:value-type="string">
            <text:p>SINOP</text:p>
          </table:table-cell>
          <table:table-cell office:value-type="string" calcext:value-type="string">
            <text:p>PARANATINGA</text:p>
          </table:table-cell>
          <table:table-cell office:value-type="float" office:value="1.87522559845869" calcext:value-type="float">
            <text:p>1,875226</text:p>
          </table:table-cell>
        </table:table-row>
        <table:table-row table:style-name="ro1">
          <table:table-cell office:value-type="string" calcext:value-type="string">
            <text:p>TUCURUI</text:p>
          </table:table-cell>
          <table:table-cell office:value-type="string" calcext:value-type="string">
            <text:p>XINGU</text:p>
          </table:table-cell>
          <table:table-cell office:value-type="float" office:value="1.8750502223911" calcext:value-type="float">
            <text:p>1,875050</text:p>
          </table:table-cell>
        </table:table-row>
        <table:table-row table:style-name="ro1">
          <table:table-cell office:value-type="string" calcext:value-type="string">
            <text:p>RIBEIRAOZINHO</text:p>
          </table:table-cell>
          <table:table-cell office:value-type="string" calcext:value-type="string">
            <text:p>SE CUIABA</text:p>
          </table:table-cell>
          <table:table-cell office:value-type="float" office:value="1.87313518642059" calcext:value-type="float">
            <text:p>1,873135</text:p>
          </table:table-cell>
        </table:table-row>
        <table:table-row table:style-name="ro1">
          <table:table-cell office:value-type="string" calcext:value-type="string">
            <text:p>MEDEIROS NETOII</text:p>
          </table:table-cell>
          <table:table-cell office:value-type="string" calcext:value-type="string">
            <text:p>JOAO NEIVA 2</text:p>
          </table:table-cell>
          <table:table-cell office:value-type="float" office:value="1.87130272411514" calcext:value-type="float">
            <text:p>1,871303</text:p>
          </table:table-cell>
        </table:table-row>
        <table:table-row table:style-name="ro1">
          <table:table-cell office:value-type="string" calcext:value-type="string">
            <text:p>JURUPARI</text:p>
          </table:table-cell>
          <table:table-cell office:value-type="string" calcext:value-type="string">
            <text:p>XINGU</text:p>
          </table:table-cell>
          <table:table-cell office:value-type="float" office:value="1.86791466607827" calcext:value-type="float">
            <text:p>1,867915</text:p>
          </table:table-cell>
        </table:table-row>
        <table:table-row table:style-name="ro1">
          <table:table-cell office:value-type="string" calcext:value-type="string">
            <text:p>OUROLANDIA II</text:p>
          </table:table-cell>
          <table:table-cell office:value-type="string" calcext:value-type="string">
            <text:p>GENTIO OURO II</text:p>
          </table:table-cell>
          <table:table-cell office:value-type="float" office:value="1.8675047159133" calcext:value-type="float">
            <text:p>1,867505</text:p>
          </table:table-cell>
        </table:table-row>
        <table:table-row table:style-name="ro1">
          <table:table-cell office:value-type="string" calcext:value-type="string">
            <text:p>ORIXIMINA</text:p>
          </table:table-cell>
          <table:table-cell office:value-type="string" calcext:value-type="string">
            <text:p>SILVES</text:p>
          </table:table-cell>
          <table:table-cell office:value-type="float" office:value="1.85580298422968" calcext:value-type="float">
            <text:p>1,855803</text:p>
          </table:table-cell>
        </table:table-row>
        <table:table-row table:style-name="ro1">
          <table:table-cell office:value-type="string" calcext:value-type="string">
            <text:p>JURUPARI</text:p>
          </table:table-cell>
          <table:table-cell office:value-type="string" calcext:value-type="string">
            <text:p>ORIXIMINA</text:p>
          </table:table-cell>
          <table:table-cell office:value-type="float" office:value="1.85566419347775" calcext:value-type="float">
            <text:p>1,855664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office:value-type="string" calcext:value-type="string">
            <text:p>M. FORNASARO</text:p>
          </table:table-cell>
          <table:table-cell office:value-type="float" office:value="1.85315045255948" calcext:value-type="float">
            <text:p>1,853150</text:p>
          </table:table-cell>
        </table:table-row>
        <table:table-row table:style-name="ro1">
          <table:table-cell office:value-type="string" calcext:value-type="string">
            <text:p>MILAGRES II</text:p>
          </table:table-cell>
          <table:table-cell office:value-type="string" calcext:value-type="string">
            <text:p>SANTA LUZIA II</text:p>
          </table:table-cell>
          <table:table-cell office:value-type="float" office:value="1.85178275987338" calcext:value-type="float">
            <text:p>1,851783</text:p>
          </table:table-cell>
        </table:table-row>
        <table:table-row table:style-name="ro1">
          <table:table-cell office:value-type="string" calcext:value-type="string">
            <text:p>RIBEIRAOZINHO</text:p>
          </table:table-cell>
          <table:table-cell office:value-type="string" calcext:value-type="string">
            <text:p>R.VERDE NORTE</text:p>
          </table:table-cell>
          <table:table-cell office:value-type="float" office:value="1.85085512834085" calcext:value-type="float">
            <text:p>1,850855</text:p>
          </table:table-cell>
        </table:table-row>
        <table:table-row table:style-name="ro1">
          <table:table-cell office:value-type="string" calcext:value-type="string">
            <text:p>ITUMBIARA</text:p>
          </table:table-cell>
          <table:table-cell office:value-type="string" calcext:value-type="string">
            <text:p>NOVA PONTE 3</text:p>
          </table:table-cell>
          <table:table-cell office:value-type="float" office:value="1.84690759187469" calcext:value-type="float">
            <text:p>1,846908</text:p>
          </table:table-cell>
        </table:table-row>
        <table:table-row table:style-name="ro1">
          <table:table-cell office:value-type="string" calcext:value-type="string">
            <text:p>MILAGRES II</text:p>
          </table:table-cell>
          <table:table-cell office:value-type="string" calcext:value-type="string">
            <text:p>QUEIMADA NOVA 2</text:p>
          </table:table-cell>
          <table:table-cell office:value-type="float" office:value="1.84490388862629" calcext:value-type="float">
            <text:p>1,844904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J. CAMARA III</text:p>
          </table:table-cell>
          <table:table-cell office:value-type="float" office:value="1.84481486115125" calcext:value-type="float">
            <text:p>1,844815</text:p>
          </table:table-cell>
        </table:table-row>
        <table:table-row table:style-name="ro1">
          <table:table-cell office:value-type="string" calcext:value-type="string">
            <text:p>GARANHUNS II</text:p>
          </table:table-cell>
          <table:table-cell office:value-type="string" calcext:value-type="string">
            <text:p>US. L.GONZAGA</text:p>
          </table:table-cell>
          <table:table-cell office:value-type="float" office:value="1.84114842332483" calcext:value-type="float">
            <text:p>1,841148</text:p>
          </table:table-cell>
        </table:table-row>
        <table:table-row table:style-name="ro1">
          <table:table-cell office:value-type="string" calcext:value-type="string">
            <text:p>JAGUARUANA II</text:p>
          </table:table-cell>
          <table:table-cell office:value-type="string" calcext:value-type="string">
            <text:p>PACATUBA</text:p>
          </table:table-cell>
          <table:table-cell office:value-type="float" office:value="1.84030653419809" calcext:value-type="float">
            <text:p>1,840307</text:p>
          </table:table-cell>
        </table:table-row>
        <table:table-row table:style-name="ro1">
          <table:table-cell office:value-type="string" calcext:value-type="string">
            <text:p>NOVA STA RITA</text:p>
          </table:table-cell>
          <table:table-cell office:value-type="string" calcext:value-type="string">
            <text:p>C.NOVOS</text:p>
          </table:table-cell>
          <table:table-cell office:value-type="float" office:value="1.83771897293996" calcext:value-type="float">
            <text:p>1,837719</text:p>
          </table:table-cell>
        </table:table-row>
        <table:table-row table:style-name="ro1">
          <table:table-cell office:value-type="string" calcext:value-type="string">
            <text:p>GARANHUNS II</text:p>
          </table:table-cell>
          <table:table-cell office:value-type="string" calcext:value-type="string">
            <text:p>PAU FERRO</text:p>
          </table:table-cell>
          <table:table-cell office:value-type="float" office:value="1.83729726002716" calcext:value-type="float">
            <text:p>1,837297</text:p>
          </table:table-cell>
        </table:table-row>
        <table:table-row table:style-name="ro1">
          <table:table-cell office:value-type="string" calcext:value-type="string">
            <text:p>RIO NOVO SUL</text:p>
          </table:table-cell>
          <table:table-cell office:value-type="string" calcext:value-type="string">
            <text:p>MUTUM</text:p>
          </table:table-cell>
          <table:table-cell office:value-type="float" office:value="1.83707740164128" calcext:value-type="float">
            <text:p>1,837077</text:p>
          </table:table-cell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C. PAULISTA</text:p>
          </table:table-cell>
          <table:table-cell office:value-type="float" office:value="1.83520161232979" calcext:value-type="float">
            <text:p>1,835202</text:p>
          </table:table-cell>
        </table:table-row>
        <table:table-row table:style-name="ro1">
          <table:table-cell office:value-type="string" calcext:value-type="string">
            <text:p>OURO PRETO 2</text:p>
          </table:table-cell>
          <table:table-cell office:value-type="string" calcext:value-type="string">
            <text:p>B.DESPACHO 3</text:p>
          </table:table-cell>
          <table:table-cell office:value-type="float" office:value="1.82977383733109" calcext:value-type="float">
            <text:p>1,829774</text:p>
          </table:table-cell>
        </table:table-row>
        <table:table-row table:style-name="ro1">
          <table:table-cell office:value-type="string" calcext:value-type="string">
            <text:p>BURITIRAMA</text:p>
          </table:table-cell>
          <table:table-cell office:value-type="string" calcext:value-type="string">
            <text:p>QUEIMADA NOVA 2</text:p>
          </table:table-cell>
          <table:table-cell office:value-type="float" office:value="1.82694443575377" calcext:value-type="float">
            <text:p>1,826944</text:p>
          </table:table-cell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SILVES</text:p>
          </table:table-cell>
          <table:table-cell office:value-type="float" office:value="1.82340431875727" calcext:value-type="float">
            <text:p>1,823404</text:p>
          </table:table-cell>
        </table:table-row>
        <table:table-row table:style-name="ro1">
          <table:table-cell office:value-type="string" calcext:value-type="string">
            <text:p>C.GRANDE III</text:p>
          </table:table-cell>
          <table:table-cell office:value-type="string" calcext:value-type="string">
            <text:p>CEARA MIRIM 2</text:p>
          </table:table-cell>
          <table:table-cell office:value-type="float" office:value="1.82030220779836" calcext:value-type="float">
            <text:p>1,820302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S.SANTIAGO</text:p>
          </table:table-cell>
          <table:table-cell office:value-type="float" office:value="1.81184639096552" calcext:value-type="float">
            <text:p>1,811846</text:p>
          </table:table-cell>
        </table:table-row>
        <table:table-row table:style-name="ro1">
          <table:table-cell office:value-type="string" calcext:value-type="string">
            <text:p>JAGUARUANA II</text:p>
          </table:table-cell>
          <table:table-cell office:value-type="string" calcext:value-type="string">
            <text:p>ACU III</text:p>
          </table:table-cell>
          <table:table-cell office:value-type="float" office:value="1.8113770933154" calcext:value-type="float">
            <text:p>1,811377</text:p>
          </table:table-cell>
        </table:table-row>
        <table:table-row table:style-name="ro1">
          <table:table-cell office:value-type="string" calcext:value-type="string">
            <text:p>ITACAIUNAS</text:p>
          </table:table-cell>
          <table:table-cell office:value-type="string" calcext:value-type="string">
            <text:p>SERRA PELADA</text:p>
          </table:table-cell>
          <table:table-cell office:value-type="float" office:value="1.8081270836526" calcext:value-type="float">
            <text:p>1,808127</text:p>
          </table:table-cell>
        </table:table-row>
        <table:table-row table:style-name="ro1">
          <table:table-cell office:value-type="string" calcext:value-type="string">
            <text:p>C.GRANDE III</text:p>
          </table:table-cell>
          <table:table-cell office:value-type="string" calcext:value-type="string">
            <text:p>GARANHUNS II</text:p>
          </table:table-cell>
          <table:table-cell office:value-type="float" office:value="1.8080866179723" calcext:value-type="float">
            <text:p>1,808087</text:p>
          </table:table-cell>
        </table:table-row>
        <table:table-row table:style-name="ro1">
          <table:table-cell office:value-type="string" calcext:value-type="string">
            <text:p>MEDEIROS NETOII</text:p>
          </table:table-cell>
          <table:table-cell office:value-type="string" calcext:value-type="string">
            <text:p>POCOES III</text:p>
          </table:table-cell>
          <table:table-cell office:value-type="float" office:value="1.80718643736273" calcext:value-type="float">
            <text:p>1,807186</text:p>
          </table:table-cell>
        </table:table-row>
        <table:table-row table:style-name="ro1">
          <table:table-cell office:value-type="string" calcext:value-type="string">
            <text:p>JAURU</text:p>
          </table:table-cell>
          <table:table-cell office:value-type="string" calcext:value-type="string">
            <text:p>SE CUIABA</text:p>
          </table:table-cell>
          <table:table-cell office:value-type="float" office:value="1.80676072709649" calcext:value-type="float">
            <text:p>1,806761</text:p>
          </table:table-cell>
        </table:table-row>
        <table:table-row table:style-name="ro1">
          <table:table-cell office:value-type="string" calcext:value-type="string">
            <text:p>B. FLUMINENSE</text:p>
          </table:table-cell>
          <table:table-cell office:value-type="string" calcext:value-type="string">
            <text:p>C. PAULISTA</text:p>
          </table:table-cell>
          <table:table-cell office:value-type="float" office:value="1.80602468633774" calcext:value-type="float">
            <text:p>1,806025</text:p>
          </table:table-cell>
        </table:table-row>
        <table:table-row table:style-name="ro1">
          <table:table-cell office:value-type="string" calcext:value-type="string">
            <text:p>ACARAU III</text:p>
          </table:table-cell>
          <table:table-cell office:value-type="string" calcext:value-type="string">
            <text:p>PECEM II</text:p>
          </table:table-cell>
          <table:table-cell office:value-type="float" office:value="1.80498250232334" calcext:value-type="float">
            <text:p>1,804983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QUIXADA</text:p>
          </table:table-cell>
          <table:table-cell office:value-type="float" office:value="1.80168805690206" calcext:value-type="float">
            <text:p>1,801688</text:p>
          </table:table-cell>
        </table:table-row>
        <table:table-row table:style-name="ro1">
          <table:table-cell office:value-type="string" calcext:value-type="string">
            <text:p>S.DA MESA</text:p>
          </table:table-cell>
          <table:table-cell office:value-type="string" calcext:value-type="string">
            <text:p>GURUPI</text:p>
          </table:table-cell>
          <table:table-cell office:value-type="float" office:value="1.80040634096501" calcext:value-type="float">
            <text:p>1,800406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NOVA PONTE</text:p>
          </table:table-cell>
          <table:table-cell office:value-type="float" office:value="1.79980685180629" calcext:value-type="float">
            <text:p>1,799807</text:p>
          </table:table-cell>
        </table:table-row>
        <table:table-row table:style-name="ro1">
          <table:table-cell office:value-type="string" calcext:value-type="string">
            <text:p>SAPEACU</text:p>
          </table:table-cell>
          <table:table-cell office:value-type="string" calcext:value-type="string">
            <text:p>MORRO CHAPEU II</text:p>
          </table:table-cell>
          <table:table-cell office:value-type="float" office:value="1.7979737622358" calcext:value-type="float">
            <text:p>1,797974</text:p>
          </table:table-cell>
        </table:table-row>
        <table:table-row table:style-name="ro1">
          <table:table-cell office:value-type="string" calcext:value-type="string">
            <text:p>MARITUBA</text:p>
          </table:table-cell>
          <table:table-cell office:value-type="string" calcext:value-type="string">
            <text:p>TUCURUI</text:p>
          </table:table-cell>
          <table:table-cell office:value-type="float" office:value="1.79766435254797" calcext:value-type="float">
            <text:p>1,797664</text:p>
          </table:table-cell>
        </table:table-row>
        <table:table-row table:style-name="ro1">
          <table:table-cell office:value-type="string" calcext:value-type="string">
            <text:p>ACARAU III</text:p>
          </table:table-cell>
          <table:table-cell office:value-type="string" calcext:value-type="string">
            <text:p>TIANGUA II</text:p>
          </table:table-cell>
          <table:table-cell office:value-type="float" office:value="1.79753451850511" calcext:value-type="float">
            <text:p>1,797535</text:p>
          </table:table-cell>
        </table:table-row>
        <table:table-row table:style-name="ro1">
          <table:table-cell office:value-type="string" calcext:value-type="string">
            <text:p>SAO GOTARDO 2</text:p>
          </table:table-cell>
          <table:table-cell office:value-type="string" calcext:value-type="string">
            <text:p>EMBORCACAO</text:p>
          </table:table-cell>
          <table:table-cell office:value-type="float" office:value="1.79478946495087" calcext:value-type="float">
            <text:p>1,794789</text:p>
          </table:table-cell>
        </table:table-row>
        <table:table-row table:style-name="ro1">
          <table:table-cell office:value-type="string" calcext:value-type="string">
            <text:p>GURUPI</text:p>
          </table:table-cell>
          <table:table-cell office:value-type="string" calcext:value-type="string">
            <text:p>MIRACEMA</text:p>
          </table:table-cell>
          <table:table-cell office:value-type="float" office:value="1.79393704958549" calcext:value-type="float">
            <text:p>1,793937</text:p>
          </table:table-cell>
        </table:table-row>
        <table:table-row table:style-name="ro1">
          <table:table-cell office:value-type="string" calcext:value-type="string">
            <text:p>EMBORCACAO</text:p>
          </table:table-cell>
          <table:table-cell office:value-type="string" calcext:value-type="string">
            <text:p>PARACATU 4</text:p>
          </table:table-cell>
          <table:table-cell office:value-type="float" office:value="1.79282060818299" calcext:value-type="float">
            <text:p>1,792821</text:p>
          </table:table-cell>
        </table:table-row>
        <table:table-row table:style-name="ro1">
          <table:table-cell office:value-type="string" calcext:value-type="string">
            <text:p>CEARA MIRIM 2</text:p>
          </table:table-cell>
          <table:table-cell office:value-type="string" calcext:value-type="string">
            <text:p>J. CAMARA III</text:p>
          </table:table-cell>
          <table:table-cell office:value-type="float" office:value="1.79096120867287" calcext:value-type="float">
            <text:p>1,790961</text:p>
          </table:table-cell>
        </table:table-row>
        <table:table-row table:style-name="ro1">
          <table:table-cell office:value-type="string" calcext:value-type="string">
            <text:p>NOVA STA RITA</text:p>
          </table:table-cell>
          <table:table-cell office:value-type="string" calcext:value-type="string">
            <text:p>ITA</text:p>
          </table:table-cell>
          <table:table-cell office:value-type="float" office:value="1.7884476820382" calcext:value-type="float">
            <text:p>1,788448</text:p>
          </table:table-cell>
        </table:table-row>
        <table:table-row table:style-name="ro1">
          <table:table-cell office:value-type="string" calcext:value-type="string">
            <text:p>JAGUARA-500</text:p>
          </table:table-cell>
          <table:table-cell office:value-type="string" calcext:value-type="string">
            <text:p>B.DESPACHO 3</text:p>
          </table:table-cell>
          <table:table-cell office:value-type="float" office:value="1.78736160789097" calcext:value-type="float">
            <text:p>1,787362</text:p>
          </table:table-cell>
        </table:table-row>
        <table:table-row table:style-name="ro1">
          <table:table-cell office:value-type="string" calcext:value-type="string">
            <text:p>ADRIANOPOLIS</text:p>
          </table:table-cell>
          <table:table-cell office:value-type="string" calcext:value-type="string">
            <text:p>GRAJAU</text:p>
          </table:table-cell>
          <table:table-cell office:value-type="float" office:value="1.78225113110297" calcext:value-type="float">
            <text:p>1,782251</text:p>
          </table:table-cell>
        </table:table-row>
        <table:table-row table:style-name="ro1">
          <table:table-cell office:value-type="string" calcext:value-type="string">
            <text:p>IMPERATRIZ</text:p>
          </table:table-cell>
          <table:table-cell office:value-type="string" calcext:value-type="string">
            <text:p>COLINAS</text:p>
          </table:table-cell>
          <table:table-cell office:value-type="float" office:value="1.78067955772158" calcext:value-type="float">
            <text:p>1,780680</text:p>
          </table:table-cell>
        </table:table-row>
        <table:table-row table:style-name="ro1">
          <table:table-cell office:value-type="string" calcext:value-type="string">
            <text:p>LUZIANIA</text:p>
          </table:table-cell>
          <table:table-cell office:value-type="string" calcext:value-type="string">
            <text:p>SERRA MESA 2</text:p>
          </table:table-cell>
          <table:table-cell office:value-type="float" office:value="1.77445154128032" calcext:value-type="float">
            <text:p>1,774452</text:p>
          </table:table-cell>
        </table:table-row>
        <table:table-row table:style-name="ro1">
          <table:table-cell office:value-type="string" calcext:value-type="string">
            <text:p>ADRIANOPOLIS</text:p>
          </table:table-cell>
          <table:table-cell office:value-type="string" calcext:value-type="string">
            <text:p>SAO JOSE</text:p>
          </table:table-cell>
          <table:table-cell office:value-type="float" office:value="1.77198861289171" calcext:value-type="float">
            <text:p>1,771989</text:p>
          </table:table-cell>
        </table:table-row>
        <table:table-row table:style-name="ro1">
          <table:table-cell office:value-type="string" calcext:value-type="string">
            <text:p>ITABIRITO 2</text:p>
          </table:table-cell>
          <table:table-cell office:value-type="string" calcext:value-type="string">
            <text:p>VESPASIANO 2</text:p>
          </table:table-cell>
          <table:table-cell office:value-type="float" office:value="1.77117459223844" calcext:value-type="float">
            <text:p>1,771175</text:p>
          </table:table-cell>
        </table:table-row>
        <table:table-row table:style-name="ro1">
          <table:table-cell office:value-type="string" calcext:value-type="string">
            <text:p>ACARAU III</text:p>
          </table:table-cell>
          <table:table-cell office:value-type="string" calcext:value-type="string">
            <text:p>PARNAIBA III</text:p>
          </table:table-cell>
          <table:table-cell office:value-type="float" office:value="1.76691406669893" calcext:value-type="float">
            <text:p>1,766914</text:p>
          </table:table-cell>
        </table:table-row>
        <table:table-row table:style-name="ro1">
          <table:table-cell office:value-type="string" calcext:value-type="string">
            <text:p>JAGUARA-500</text:p>
          </table:table-cell>
          <table:table-cell office:value-type="string" calcext:value-type="string">
            <text:p>SAO SIMAO-SE</text:p>
          </table:table-cell>
          <table:table-cell office:value-type="float" office:value="1.7636688472623" calcext:value-type="float">
            <text:p>1,763669</text:p>
          </table:table-cell>
        </table:table-row>
        <table:table-row table:style-name="ro1">
          <table:table-cell office:value-type="string" calcext:value-type="string">
            <text:p>PECEM II</text:p>
          </table:table-cell>
          <table:table-cell office:value-type="string" calcext:value-type="string">
            <text:p>SOBRAL III</text:p>
          </table:table-cell>
          <table:table-cell office:value-type="float" office:value="1.76307424699395" calcext:value-type="float">
            <text:p>1,763074</text:p>
          </table:table-cell>
        </table:table-row>
        <table:table-row table:style-name="ro1">
          <table:table-cell office:value-type="string" calcext:value-type="string">
            <text:p>COLINAS</text:p>
          </table:table-cell>
          <table:table-cell office:value-type="string" calcext:value-type="string">
            <text:p>MIRACEMA</text:p>
          </table:table-cell>
          <table:table-cell office:value-type="float" office:value="1.76241770629519" calcext:value-type="float">
            <text:p>1,762418</text:p>
          </table:table-cell>
        </table:table-row>
        <table:table-row table:style-name="ro1">
          <table:table-cell office:value-type="string" calcext:value-type="string">
            <text:p>GURUPI</text:p>
          </table:table-cell>
          <table:table-cell office:value-type="string" calcext:value-type="string">
            <text:p>PEIXE 2</text:p>
          </table:table-cell>
          <table:table-cell office:value-type="float" office:value="1.76185667029918" calcext:value-type="float">
            <text:p>1,761857</text:p>
          </table:table-cell>
        </table:table-row>
        <table:table-row table:style-name="ro1">
          <table:table-cell office:value-type="string" calcext:value-type="string">
            <text:p>TRINDADE</text:p>
          </table:table-cell>
          <table:table-cell office:value-type="string" calcext:value-type="string">
            <text:p>R.VERDE NORTE</text:p>
          </table:table-cell>
          <table:table-cell office:value-type="float" office:value="1.75540026769219" calcext:value-type="float">
            <text:p>1,755400</text:p>
          </table:table-cell>
        </table:table-row>
        <table:table-row table:style-name="ro1">
          <table:table-cell office:value-type="string" calcext:value-type="string">
            <text:p>AREIA</text:p>
          </table:table-cell>
          <table:table-cell office:value-type="string" calcext:value-type="string">
            <text:p>CURITIBA</text:p>
          </table:table-cell>
          <table:table-cell office:value-type="float" office:value="1.75454746437849" calcext:value-type="float">
            <text:p>1,754547</text:p>
          </table:table-cell>
        </table:table-row>
        <table:table-row table:style-name="ro1">
          <table:table-cell office:value-type="string" calcext:value-type="string">
            <text:p>C.GRANDE III</text:p>
          </table:table-cell>
          <table:table-cell office:value-type="string" calcext:value-type="string">
            <text:p>JOAO PESSOA II</text:p>
          </table:table-cell>
          <table:table-cell office:value-type="float" office:value="1.75428492798246" calcext:value-type="float">
            <text:p>1,754285</text:p>
          </table:table-cell>
        </table:table-row>
        <table:table-row table:style-name="ro1">
          <table:table-cell office:value-type="string" calcext:value-type="string">
            <text:p>BACABEIRA</text:p>
          </table:table-cell>
          <table:table-cell office:value-type="string" calcext:value-type="string">
            <text:p>PARNAIBA III</text:p>
          </table:table-cell>
          <table:table-cell office:value-type="float" office:value="1.75325579816015" calcext:value-type="float">
            <text:p>1,753256</text:p>
          </table:table-cell>
        </table:table-row>
        <table:table-row table:style-name="ro1">
          <table:table-cell office:value-type="string" calcext:value-type="string">
            <text:p>PACATUBA</text:p>
          </table:table-cell>
          <table:table-cell office:value-type="string" calcext:value-type="string">
            <text:p>PECEM II</text:p>
          </table:table-cell>
          <table:table-cell office:value-type="float" office:value="1.75074708098701" calcext:value-type="float">
            <text:p>1,750747</text:p>
          </table:table-cell>
        </table:table-row>
        <table:table-row table:style-name="ro1">
          <table:table-cell office:value-type="string" calcext:value-type="string">
            <text:p>NEVES 1</text:p>
          </table:table-cell>
          <table:table-cell office:value-type="string" calcext:value-type="string">
            <text:p>B.DESPACHO 3</text:p>
          </table:table-cell>
          <table:table-cell office:value-type="float" office:value="1.74035220740411" calcext:value-type="float">
            <text:p>1,740352</text:p>
          </table:table-cell>
        </table:table-row>
        <table:table-row table:style-name="ro1">
          <table:table-cell office:value-type="string" calcext:value-type="string">
            <text:p>MIRANDA II</text:p>
          </table:table-cell>
          <table:table-cell office:value-type="string" calcext:value-type="string">
            <text:p>SAO LUIS II</text:p>
          </table:table-cell>
          <table:table-cell office:value-type="float" office:value="1.73745941797188" calcext:value-type="float">
            <text:p>1,737459</text:p>
          </table:table-cell>
        </table:table-row>
        <table:table-row table:style-name="ro1">
          <table:table-cell office:value-type="string" calcext:value-type="string">
            <text:p>ITABIRITO 2</text:p>
          </table:table-cell>
          <table:table-cell office:value-type="string" calcext:value-type="string">
            <text:p>S. G. DO PARA</text:p>
          </table:table-cell>
          <table:table-cell office:value-type="float" office:value="1.73723595462162" calcext:value-type="float">
            <text:p>1,737236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MONTE VERDE</text:p>
          </table:table-cell>
          <table:table-cell office:value-type="float" office:value="1.73458162322458" calcext:value-type="float">
            <text:p>1,734582</text:p>
          </table:table-cell>
        </table:table-row>
        <table:table-row table:style-name="ro1">
          <table:table-cell office:value-type="string" calcext:value-type="string">
            <text:p>ITABIRA 5</text:p>
          </table:table-cell>
          <table:table-cell office:value-type="string" calcext:value-type="string">
            <text:p>NEVES 1</text:p>
          </table:table-cell>
          <table:table-cell office:value-type="float" office:value="1.73415501352197" calcext:value-type="float">
            <text:p>1,734155</text:p>
          </table:table-cell>
        </table:table-row>
        <table:table-row table:style-name="ro1">
          <table:table-cell office:value-type="string" calcext:value-type="string">
            <text:p>IMPERATRIZ</text:p>
          </table:table-cell>
          <table:table-cell office:value-type="string" calcext:value-type="string">
            <text:p>P.DUTRA</text:p>
          </table:table-cell>
          <table:table-cell office:value-type="float" office:value="1.731806876313" calcext:value-type="float">
            <text:p>1,731807</text:p>
          </table:table-cell>
        </table:table-row>
        <table:table-row table:style-name="ro1">
          <table:table-cell office:value-type="string" calcext:value-type="string">
            <text:p>OLINDINA</text:p>
          </table:table-cell>
          <table:table-cell office:value-type="string" calcext:value-type="string">
            <text:p>PORTO SERGIPE I</text:p>
          </table:table-cell>
          <table:table-cell office:value-type="float" office:value="1.72985271828721" calcext:value-type="float">
            <text:p>1,729853</text:p>
          </table:table-cell>
        </table:table-row>
        <table:table-row table:style-name="ro1">
          <table:table-cell office:value-type="string" calcext:value-type="string">
            <text:p>SAPEACU</text:p>
          </table:table-cell>
          <table:table-cell office:value-type="string" calcext:value-type="string">
            <text:p>OLINDINA</text:p>
          </table:table-cell>
          <table:table-cell office:value-type="float" office:value="1.72751868523043" calcext:value-type="float">
            <text:p>1,727519</text:p>
          </table:table-cell>
        </table:table-row>
        <table:table-row table:style-name="ro1">
          <table:table-cell office:value-type="string" calcext:value-type="string">
            <text:p>FORTALEZA II</text:p>
          </table:table-cell>
          <table:table-cell office:value-type="string" calcext:value-type="string">
            <text:p>PACATUBA</text:p>
          </table:table-cell>
          <table:table-cell office:value-type="float" office:value="1.7229203639514" calcext:value-type="float">
            <text:p>1,722920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ITA</text:p>
          </table:table-cell>
          <table:table-cell office:value-type="float" office:value="1.721229284248" calcext:value-type="float">
            <text:p>1,721229</text:p>
          </table:table-cell>
        </table:table-row>
        <table:table-row table:style-name="ro1">
          <table:table-cell office:value-type="string" calcext:value-type="string">
            <text:p>BOM.JES.LAPA II</text:p>
          </table:table-cell>
          <table:table-cell office:value-type="string" calcext:value-type="string">
            <text:p>SOL DO SERTAO</text:p>
          </table:table-cell>
          <table:table-cell office:value-type="float" office:value="1.72121407958489" calcext:value-type="float">
            <text:p>1,721214</text:p>
          </table:table-cell>
        </table:table-row>
        <table:table-row table:style-name="ro1">
          <table:table-cell office:value-type="string" calcext:value-type="string">
            <text:p>ITABIRA 5</text:p>
          </table:table-cell>
          <table:table-cell office:value-type="string" calcext:value-type="string">
            <text:p>VESPASIANO 2</text:p>
          </table:table-cell>
          <table:table-cell office:value-type="float" office:value="1.71002732661916" calcext:value-type="float">
            <text:p>1,710027</text:p>
          </table:table-cell>
        </table:table-row>
        <table:table-row table:style-name="ro1">
          <table:table-cell office:value-type="string" calcext:value-type="string">
            <text:p>CURRAL PIAUI II</text:p>
          </table:table-cell>
          <table:table-cell office:value-type="string" calcext:value-type="string">
            <text:p>QUEIMADA NOVA 2</text:p>
          </table:table-cell>
          <table:table-cell office:value-type="float" office:value="1.70391911797244" calcext:value-type="float">
            <text:p>1,703919</text:p>
          </table:table-cell>
        </table:table-row>
        <table:table-row table:style-name="ro1">
          <table:table-cell office:value-type="string" calcext:value-type="string">
            <text:p>LONDRINA ESU</text:p>
          </table:table-cell>
          <table:table-cell office:value-type="string" calcext:value-type="string">
            <text:p>IVAIPORA ELS</text:p>
          </table:table-cell>
          <table:table-cell office:value-type="float" office:value="1.70033703099881" calcext:value-type="float">
            <text:p>1,700337</text:p>
          </table:table-cell>
        </table:table-row>
        <table:table-row table:style-name="ro1">
          <table:table-cell office:value-type="string" calcext:value-type="string">
            <text:p>BRAS.LESTE</text:p>
          </table:table-cell>
          <table:table-cell office:value-type="string" calcext:value-type="string">
            <text:p>LUZIANIA</text:p>
          </table:table-cell>
          <table:table-cell office:value-type="float" office:value="1.69988956503026" calcext:value-type="float">
            <text:p>1,699890</text:p>
          </table:table-cell>
        </table:table-row>
        <table:table-row table:style-name="ro1">
          <table:table-cell office:value-type="string" calcext:value-type="string">
            <text:p>ADRIANOPOLIS</text:p>
          </table:table-cell>
          <table:table-cell office:value-type="string" calcext:value-type="string">
            <text:p>B. FLUMINENSE</text:p>
          </table:table-cell>
          <table:table-cell office:value-type="float" office:value="1.69555741391465" calcext:value-type="float">
            <text:p>1,695557</text:p>
          </table:table-cell>
        </table:table-row>
        <table:table-row table:style-name="ro1">
          <table:table-cell office:value-type="string" calcext:value-type="string">
            <text:p>SAO LUIS II</text:p>
          </table:table-cell>
          <table:table-cell office:value-type="string" calcext:value-type="string">
            <text:p>SAO LUIS IV</text:p>
          </table:table-cell>
          <table:table-cell office:value-type="float" office:value="1.69128320409498" calcext:value-type="float">
            <text:p>1,691283</text:p>
          </table:table-cell>
        </table:table-row>
        <table:table-row table:style-name="ro1">
          <table:table-cell office:value-type="string" calcext:value-type="string">
            <text:p>TUCURUI</text:p>
          </table:table-cell>
          <table:table-cell office:value-type="string" calcext:value-type="string">
            <text:p>MARABA</text:p>
          </table:table-cell>
          <table:table-cell office:value-type="float" office:value="1.68969309649082" calcext:value-type="float">
            <text:p>1,689693</text:p>
          </table:table-cell>
        </table:table-row>
        <table:table-row table:style-name="ro1">
          <table:table-cell office:value-type="string" calcext:value-type="string">
            <text:p>GRAVATAI</text:p>
          </table:table-cell>
          <table:table-cell office:value-type="string" calcext:value-type="string">
            <text:p>GUAIBA 3</text:p>
          </table:table-cell>
          <table:table-cell office:value-type="float" office:value="1.67932943418469" calcext:value-type="float">
            <text:p>1,679329</text:p>
          </table:table-cell>
        </table:table-row>
        <table:table-row table:style-name="ro1">
          <table:table-cell office:value-type="string" calcext:value-type="string">
            <text:p>AGUA VERMELHA</text:p>
          </table:table-cell>
          <table:table-cell office:value-type="string" calcext:value-type="string">
            <text:p>SAO SIMAO-SE</text:p>
          </table:table-cell>
          <table:table-cell office:value-type="float" office:value="1.6786010644254" calcext:value-type="float">
            <text:p>1,678601</text:p>
          </table:table-cell>
        </table:table-row>
        <table:table-row table:style-name="ro1">
          <table:table-cell office:value-type="string" calcext:value-type="string">
            <text:p>JANDAIRA II</text:p>
          </table:table-cell>
          <table:table-cell office:value-type="string" calcext:value-type="string">
            <text:p>J. CAMARA III</text:p>
          </table:table-cell>
          <table:table-cell office:value-type="float" office:value="1.67738859506237" calcext:value-type="float">
            <text:p>1,677389</text:p>
          </table:table-cell>
        </table:table-row>
        <table:table-row table:style-name="ro1">
          <table:table-cell office:value-type="string" calcext:value-type="string">
            <text:p>CAPIVARI SUL</text:p>
          </table:table-cell>
          <table:table-cell office:value-type="string" calcext:value-type="string">
            <text:p>GRAVATAI</text:p>
          </table:table-cell>
          <table:table-cell office:value-type="float" office:value="1.67687012171077" calcext:value-type="float">
            <text:p>1,676870</text:p>
          </table:table-cell>
        </table:table-row>
        <table:table-row table:style-name="ro1">
          <table:table-cell office:value-type="string" calcext:value-type="string">
            <text:p>GUARULHOS</text:p>
          </table:table-cell>
          <table:table-cell office:value-type="string" calcext:value-type="string">
            <text:p>IBIUNA</text:p>
          </table:table-cell>
          <table:table-cell office:value-type="float" office:value="1.67374917034909" calcext:value-type="float">
            <text:p>1,673749</text:p>
          </table:table-cell>
        </table:table-row>
        <table:table-row table:style-name="ro1">
          <table:table-cell office:value-type="string" calcext:value-type="string">
            <text:p>S.SANTIAGO</text:p>
          </table:table-cell>
          <table:table-cell office:value-type="string" calcext:value-type="string">
            <text:p>SEGREDO</text:p>
          </table:table-cell>
          <table:table-cell office:value-type="float" office:value="1.67241734770165" calcext:value-type="float">
            <text:p>1,672417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CAPIVARA</text:p>
          </table:table-cell>
          <table:table-cell office:value-type="float" office:value="1.67054266225721" calcext:value-type="float">
            <text:p>1,670543</text:p>
          </table:table-cell>
        </table:table-row>
        <table:table-row table:style-name="ro1">
          <table:table-cell office:value-type="string" calcext:value-type="string">
            <text:p>ACAILANDIA</text:p>
          </table:table-cell>
          <table:table-cell office:value-type="string" calcext:value-type="string">
            <text:p>MARABA</text:p>
          </table:table-cell>
          <table:table-cell office:value-type="float" office:value="1.66829620268826" calcext:value-type="float">
            <text:p>1,668296</text:p>
          </table:table-cell>
        </table:table-row>
        <table:table-row table:style-name="ro1">
          <table:table-cell office:value-type="string" calcext:value-type="string">
            <text:p>ARARAQUARA CTP</text:p>
          </table:table-cell>
          <table:table-cell office:value-type="string" calcext:value-type="string">
            <text:p>MIRASSOL II</text:p>
          </table:table-cell>
          <table:table-cell office:value-type="float" office:value="1.66638066789797" calcext:value-type="float">
            <text:p>1,666381</text:p>
          </table:table-cell>
        </table:table-row>
        <table:table-row table:style-name="ro1">
          <table:table-cell office:value-type="string" calcext:value-type="string">
            <text:p>GETULINA</text:p>
          </table:table-cell>
          <table:table-cell office:value-type="string" calcext:value-type="string">
            <text:p>MARECH.RONDON</text:p>
          </table:table-cell>
          <table:table-cell office:value-type="float" office:value="1.66578144128563" calcext:value-type="float">
            <text:p>1,665781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SUMARE</text:p>
          </table:table-cell>
          <table:table-cell office:value-type="float" office:value="1.66256389435348" calcext:value-type="float">
            <text:p>1,662564</text:p>
          </table:table-cell>
        </table:table-row>
        <table:table-row table:style-name="ro1">
          <table:table-cell office:value-type="string" calcext:value-type="string">
            <text:p>ITAGUACU</text:p>
          </table:table-cell>
          <table:table-cell office:value-type="string" calcext:value-type="string">
            <text:p>SAO SIMAO-SE</text:p>
          </table:table-cell>
          <table:table-cell office:value-type="float" office:value="1.66162271753191" calcext:value-type="float">
            <text:p>1,661623</text:p>
          </table:table-cell>
        </table:table-row>
        <table:table-row table:style-name="ro1">
          <table:table-cell office:value-type="string" calcext:value-type="string">
            <text:p>IBICOARA</text:p>
          </table:table-cell>
          <table:table-cell office:value-type="string" calcext:value-type="string">
            <text:p>POCOES III</text:p>
          </table:table-cell>
          <table:table-cell office:value-type="float" office:value="1.66159695073967" calcext:value-type="float">
            <text:p>1,661597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CV.GARABI 2</text:p>
          </table:table-cell>
          <table:table-cell office:value-type="float" office:value="1.6548293567846" calcext:value-type="float">
            <text:p>1,654829</text:p>
          </table:table-cell>
        </table:table-row>
        <table:table-row table:style-name="ro1">
          <table:table-cell office:value-type="string" calcext:value-type="string">
            <text:p>BAURU</text:p>
          </table:table-cell>
          <table:table-cell office:value-type="string" calcext:value-type="string">
            <text:p>GETULINA</text:p>
          </table:table-cell>
          <table:table-cell office:value-type="float" office:value="1.65161632779429" calcext:value-type="float">
            <text:p>1,651616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CV.GARABI 1</text:p>
          </table:table-cell>
          <table:table-cell office:value-type="float" office:value="1.6514398247821" calcext:value-type="float">
            <text:p>1,651440</text:p>
          </table:table-cell>
        </table:table-row>
        <table:table-row table:style-name="ro1">
          <table:table-cell office:value-type="string" calcext:value-type="string">
            <text:p>LESTE</text:p>
          </table:table-cell>
          <table:table-cell office:value-type="string" calcext:value-type="string">
            <text:p>RAM REBERT F</text:p>
          </table:table-cell>
          <table:table-cell office:value-type="float" office:value="1.65139351869191" calcext:value-type="float">
            <text:p>1,651394</text:p>
          </table:table-cell>
        </table:table-row>
        <table:table-row table:style-name="ro1">
          <table:table-cell office:value-type="string" calcext:value-type="string">
            <text:p>ILHA SOLTEIRA</text:p>
          </table:table-cell>
          <table:table-cell office:value-type="string" calcext:value-type="string">
            <text:p>TRES IRMAOS</text:p>
          </table:table-cell>
          <table:table-cell office:value-type="float" office:value="1.64367416278251" calcext:value-type="float">
            <text:p>1,643674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string" calcext:value-type="string">
            <text:p>SAPEACU</text:p>
          </table:table-cell>
          <table:table-cell office:value-type="float" office:value="1.64186734191078" calcext:value-type="float">
            <text:p>1,641867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RIBEIRAOPRETO</text:p>
          </table:table-cell>
          <table:table-cell office:value-type="float" office:value="1.63627833747096" calcext:value-type="float">
            <text:p>1,636278</text:p>
          </table:table-cell>
        </table:table-row>
        <table:table-row table:style-name="ro1">
          <table:table-cell office:value-type="string" calcext:value-type="string">
            <text:p>MILAGRES</text:p>
          </table:table-cell>
          <table:table-cell office:value-type="string" calcext:value-type="string">
            <text:p>US. L.GONZAGA</text:p>
          </table:table-cell>
          <table:table-cell office:value-type="float" office:value="1.63255162929257" calcext:value-type="float">
            <text:p>1,632552</text:p>
          </table:table-cell>
        </table:table-row>
        <table:table-row table:style-name="ro1">
          <table:table-cell office:value-type="string" calcext:value-type="string">
            <text:p>GERDAU SP</text:p>
          </table:table-cell>
          <table:table-cell office:value-type="string" calcext:value-type="string">
            <text:p>JANDIRA</text:p>
          </table:table-cell>
          <table:table-cell office:value-type="float" office:value="1.62216847650308" calcext:value-type="float">
            <text:p>1,622168</text:p>
          </table:table-cell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EQUADOR</text:p>
          </table:table-cell>
          <table:table-cell office:value-type="float" office:value="1.61161186233139" calcext:value-type="float">
            <text:p>1,611612</text:p>
          </table:table-cell>
        </table:table-row>
        <table:table-row table:style-name="ro1">
          <table:table-cell office:value-type="string" calcext:value-type="string">
            <text:p>ARARAQUARA 2</text:p>
          </table:table-cell>
          <table:table-cell office:value-type="string" calcext:value-type="string">
            <text:p>ARARAQUARA FUR</text:p>
          </table:table-cell>
          <table:table-cell office:value-type="float" office:value="1.61079058414708" calcext:value-type="float">
            <text:p>1,610791</text:p>
          </table:table-cell>
        </table:table-row>
        <table:table-row table:style-name="ro1">
          <table:table-cell office:value-type="string" calcext:value-type="string">
            <text:p>INTEGRADORA</text:p>
          </table:table-cell>
          <table:table-cell office:value-type="string" calcext:value-type="string">
            <text:p>SERRA PELADA</text:p>
          </table:table-cell>
          <table:table-cell office:value-type="float" office:value="1.60669119807476" calcext:value-type="float">
            <text:p>1,606691</text:p>
          </table:table-cell>
        </table:table-row>
        <table:table-row table:style-name="ro1">
          <table:table-cell office:value-type="string" calcext:value-type="string">
            <text:p>AGUA VERMELHA</text:p>
          </table:table-cell>
          <table:table-cell office:value-type="string" calcext:value-type="string">
            <text:p>ARARAQUARA CTP</text:p>
          </table:table-cell>
          <table:table-cell office:value-type="float" office:value="1.60436171366773" calcext:value-type="float">
            <text:p>1,604362</text:p>
          </table:table-cell>
        </table:table-row>
        <table:table-row table:style-name="ro1">
          <table:table-cell office:value-type="string" calcext:value-type="string">
            <text:p>RIBEIRAOPRETO</text:p>
          </table:table-cell>
          <table:table-cell office:value-type="string" calcext:value-type="string">
            <text:p>POCOS CALDAS</text:p>
          </table:table-cell>
          <table:table-cell office:value-type="float" office:value="1.59202120461006" calcext:value-type="float">
            <text:p>1,592021</text:p>
          </table:table-cell>
        </table:table-row>
        <table:table-row table:style-name="ro1">
          <table:table-cell office:value-type="string" calcext:value-type="string">
            <text:p>MARIMBONDO</text:p>
          </table:table-cell>
          <table:table-cell office:value-type="string" calcext:value-type="string">
            <text:p>MORRO AGUDO</text:p>
          </table:table-cell>
          <table:table-cell office:value-type="float" office:value="1.5908834102775" calcext:value-type="float">
            <text:p>1,590883</text:p>
          </table:table-cell>
        </table:table-row>
        <table:table-row table:style-name="ro1">
          <table:table-cell office:value-type="string" calcext:value-type="string">
            <text:p>TERESINA II</text:p>
          </table:table-cell>
          <table:table-cell office:value-type="string" calcext:value-type="string">
            <text:p>TIANGUA II</text:p>
          </table:table-cell>
          <table:table-cell office:value-type="float" office:value="1.58960045458586" calcext:value-type="float">
            <text:p>1,589600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TAQUARUCU</text:p>
          </table:table-cell>
          <table:table-cell office:value-type="float" office:value="1.58823441775944" calcext:value-type="float">
            <text:p>1,588234</text:p>
          </table:table-cell>
        </table:table-row>
        <table:table-row table:style-name="ro1">
          <table:table-cell office:value-type="string" calcext:value-type="string">
            <text:p>ILHA SOLTEIRA</text:p>
          </table:table-cell>
          <table:table-cell office:value-type="string" calcext:value-type="string">
            <text:p>MIRASSOL II</text:p>
          </table:table-cell>
          <table:table-cell office:value-type="float" office:value="1.5882023712045" calcext:value-type="float">
            <text:p>1,588202</text:p>
          </table:table-cell>
        </table:table-row>
        <table:table-row table:style-name="ro1">
          <table:table-cell office:value-type="string" calcext:value-type="string">
            <text:p>RIBEIRAOPRETO</text:p>
          </table:table-cell>
          <table:table-cell office:value-type="string" calcext:value-type="string">
            <text:p>MORRO AGUDO</text:p>
          </table:table-cell>
          <table:table-cell office:value-type="float" office:value="1.5864571438395" calcext:value-type="float">
            <text:p>1,586457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string" calcext:value-type="string">
            <text:p>JARDIM</text:p>
          </table:table-cell>
          <table:table-cell office:value-type="float" office:value="1.58468945880137" calcext:value-type="float">
            <text:p>1,584689</text:p>
          </table:table-cell>
        </table:table-row>
        <table:table-row table:style-name="ro1">
          <table:table-cell office:value-type="string" calcext:value-type="string">
            <text:p>BOA VISTA</text:p>
          </table:table-cell>
          <table:table-cell office:value-type="string" calcext:value-type="string">
            <text:p>EQUADOR</text:p>
          </table:table-cell>
          <table:table-cell office:value-type="float" office:value="1.58340246733817" calcext:value-type="float">
            <text:p>1,583402</text:p>
          </table:table-cell>
        </table:table-row>
        <table:table-row table:style-name="ro1">
          <table:table-cell office:value-type="string" calcext:value-type="string">
            <text:p>BRACELL</text:p>
          </table:table-cell>
          <table:table-cell office:value-type="string" calcext:value-type="string">
            <text:p>OESTE</text:p>
          </table:table-cell>
          <table:table-cell office:value-type="float" office:value="1.5828576290151" calcext:value-type="float">
            <text:p>1,582858</text:p>
          </table:table-cell>
        </table:table-row>
        <table:table-row table:style-name="ro1">
          <table:table-cell office:value-type="string" calcext:value-type="string">
            <text:p>RIB.GONCALVES</text:p>
          </table:table-cell>
          <table:table-cell office:value-type="string" calcext:value-type="string">
            <text:p>COLINAS</text:p>
          </table:table-cell>
          <table:table-cell office:value-type="float" office:value="1.57580899607611" calcext:value-type="float">
            <text:p>1,575809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MACHADINHO</text:p>
          </table:table-cell>
          <table:table-cell office:value-type="float" office:value="1.56619568474449" calcext:value-type="float">
            <text:p>1,566196</text:p>
          </table:table-cell>
        </table:table-row>
        <table:table-row table:style-name="ro1">
          <table:table-cell office:value-type="string" calcext:value-type="string">
            <text:p>IBIUNA</text:p>
          </table:table-cell>
          <table:table-cell office:value-type="string" calcext:value-type="string">
            <text:p>ITATIBA</text:p>
          </table:table-cell>
          <table:table-cell office:value-type="float" office:value="1.56537445545732" calcext:value-type="float">
            <text:p>1,565374</text:p>
          </table:table-cell>
        </table:table-row>
        <table:table-row table:style-name="ro1">
          <table:table-cell office:value-type="string" calcext:value-type="string">
            <text:p>SUAPE II</text:p>
          </table:table-cell>
          <table:table-cell office:value-type="string" calcext:value-type="string">
            <text:p>ANGELIM II</text:p>
          </table:table-cell>
          <table:table-cell office:value-type="float" office:value="1.56092430852776" calcext:value-type="float">
            <text:p>1,560924</text:p>
          </table:table-cell>
        </table:table-row>
        <table:table-row table:style-name="ro1">
          <table:table-cell office:value-type="string" calcext:value-type="string">
            <text:p>JUAZEIRO III</text:p>
          </table:table-cell>
          <table:table-cell office:value-type="string" calcext:value-type="string">
            <text:p>US. L.GONZAGA</text:p>
          </table:table-cell>
          <table:table-cell office:value-type="float" office:value="1.55968662194226" calcext:value-type="float">
            <text:p>1,559687</text:p>
          </table:table-cell>
        </table:table-row>
        <table:table-row table:style-name="ro1">
          <table:table-cell office:value-type="string" calcext:value-type="string">
            <text:p>CAXIAS</text:p>
          </table:table-cell>
          <table:table-cell office:value-type="string" calcext:value-type="string">
            <text:p>GRAVATAI</text:p>
          </table:table-cell>
          <table:table-cell office:value-type="float" office:value="1.55849518902003" calcext:value-type="float">
            <text:p>1,558495</text:p>
          </table:table-cell>
        </table:table-row>
        <table:table-row table:style-name="ro1">
          <table:table-cell office:value-type="string" calcext:value-type="string">
            <text:p>CABREUVA</text:p>
          </table:table-cell>
          <table:table-cell office:value-type="string" calcext:value-type="string">
            <text:p>BAURU</text:p>
          </table:table-cell>
          <table:table-cell office:value-type="float" office:value="1.55782321669143" calcext:value-type="float">
            <text:p>1,557823</text:p>
          </table:table-cell>
        </table:table-row>
        <table:table-row table:style-name="ro1">
          <table:table-cell office:value-type="string" calcext:value-type="string">
            <text:p>P. PRIMAVERA</text:p>
          </table:table-cell>
          <table:table-cell office:value-type="string" calcext:value-type="string">
            <text:p>TAQUARUCU</text:p>
          </table:table-cell>
          <table:table-cell office:value-type="float" office:value="1.55780137105525" calcext:value-type="float">
            <text:p>1,557801</text:p>
          </table:table-cell>
        </table:table-row>
        <table:table-row table:style-name="ro1">
          <table:table-cell office:value-type="string" calcext:value-type="string">
            <text:p>BAGUACU</text:p>
          </table:table-cell>
          <table:table-cell office:value-type="string" calcext:value-type="string">
            <text:p>ILHA SOLTEIRA</text:p>
          </table:table-cell>
          <table:table-cell office:value-type="float" office:value="1.5570600196576" calcext:value-type="float">
            <text:p>1,557060</text:p>
          </table:table-cell>
        </table:table-row>
        <table:table-row table:style-name="ro1">
          <table:table-cell office:value-type="string" calcext:value-type="string">
            <text:p>BAURU</text:p>
          </table:table-cell>
          <table:table-cell office:value-type="string" calcext:value-type="string">
            <text:p>OESTE</text:p>
          </table:table-cell>
          <table:table-cell office:value-type="float" office:value="1.55401852918584" calcext:value-type="float">
            <text:p>1,554019</text:p>
          </table:table-cell>
        </table:table-row>
        <table:table-row table:style-name="ro1">
          <table:table-cell office:value-type="string" calcext:value-type="string">
            <text:p>GETULINA</text:p>
          </table:table-cell>
          <table:table-cell office:value-type="string" calcext:value-type="string">
            <text:p>JUPIA</text:p>
          </table:table-cell>
          <table:table-cell office:value-type="float" office:value="1.55088028717051" calcext:value-type="float">
            <text:p>1,550880</text:p>
          </table:table-cell>
        </table:table-row>
        <table:table-row table:style-name="ro1">
          <table:table-cell office:value-type="string" calcext:value-type="string">
            <text:p>BAURU</text:p>
          </table:table-cell>
          <table:table-cell office:value-type="string" calcext:value-type="string">
            <text:p>SALTO</text:p>
          </table:table-cell>
          <table:table-cell office:value-type="float" office:value="1.55040045657021" calcext:value-type="float">
            <text:p>1,550400</text:p>
          </table:table-cell>
        </table:table-row>
        <table:table-row table:style-name="ro1">
          <table:table-cell office:value-type="string" calcext:value-type="string">
            <text:p>JARDIM</text:p>
          </table:table-cell>
          <table:table-cell office:value-type="string" calcext:value-type="string">
            <text:p>USINA XINGO</text:p>
          </table:table-cell>
          <table:table-cell office:value-type="float" office:value="1.54104061281404" calcext:value-type="float">
            <text:p>1,541041</text:p>
          </table:table-cell>
        </table:table-row>
        <table:table-row table:style-name="ro1">
          <table:table-cell office:value-type="string" calcext:value-type="string">
            <text:p>RIBEIRAOPRETO</text:p>
          </table:table-cell>
          <table:table-cell office:value-type="string" calcext:value-type="string">
            <text:p>SANTA BARBARA</text:p>
          </table:table-cell>
          <table:table-cell office:value-type="float" office:value="1.53850927779724" calcext:value-type="float">
            <text:p>1,538509</text:p>
          </table:table-cell>
        </table:table-row>
        <table:table-row table:style-name="ro1">
          <table:table-cell office:value-type="string" calcext:value-type="string">
            <text:p>P. AFONSO IV_SE</text:p>
          </table:table-cell>
          <table:table-cell office:value-type="string" calcext:value-type="string">
            <text:p>ANGELIM II</text:p>
          </table:table-cell>
          <table:table-cell office:value-type="float" office:value="1.53625230474868" calcext:value-type="float">
            <text:p>1,536252</text:p>
          </table:table-cell>
        </table:table-row>
        <table:table-row table:style-name="ro1">
          <table:table-cell office:value-type="string" calcext:value-type="string">
            <text:p>RECIFE II</text:p>
          </table:table-cell>
          <table:table-cell office:value-type="string" calcext:value-type="string">
            <text:p>SUAPE II</text:p>
          </table:table-cell>
          <table:table-cell office:value-type="float" office:value="1.53615690408018" calcext:value-type="float">
            <text:p>1,536157</text:p>
          </table:table-cell>
        </table:table-row>
        <table:table-row table:style-name="ro1">
          <table:table-cell office:value-type="string" calcext:value-type="string">
            <text:p>ARARAQUARA CTP</text:p>
          </table:table-cell>
          <table:table-cell office:value-type="string" calcext:value-type="string">
            <text:p>PIRACICABA</text:p>
          </table:table-cell>
          <table:table-cell office:value-type="float" office:value="1.53598417539831" calcext:value-type="float">
            <text:p>1,535984</text:p>
          </table:table-cell>
        </table:table-row>
        <table:table-row table:style-name="ro1">
          <table:table-cell office:value-type="string" calcext:value-type="string">
            <text:p>AGUA AZUL</text:p>
          </table:table-cell>
          <table:table-cell office:value-type="string" calcext:value-type="string">
            <text:p>BOM JARDIM</text:p>
          </table:table-cell>
          <table:table-cell office:value-type="float" office:value="1.52809872933082" calcext:value-type="float">
            <text:p>1,528099</text:p>
          </table:table-cell>
        </table:table-row>
        <table:table-row table:style-name="ro1">
          <table:table-cell office:value-type="string" calcext:value-type="string">
            <text:p>ARARAQUARA CTP</text:p>
          </table:table-cell>
          <table:table-cell office:value-type="string" calcext:value-type="string">
            <text:p>MOGI MIRIM 3</text:p>
          </table:table-cell>
          <table:table-cell office:value-type="float" office:value="1.52451676255473" calcext:value-type="float">
            <text:p>1,524517</text:p>
          </table:table-cell>
        </table:table-row>
        <table:table-row table:style-name="ro1">
          <table:table-cell office:value-type="string" calcext:value-type="string">
            <text:p>TERMINAL RIO</text:p>
          </table:table-cell>
          <table:table-cell office:value-type="string" calcext:value-type="string">
            <text:p>RESENDE</text:p>
          </table:table-cell>
          <table:table-cell office:value-type="float" office:value="1.52329471709265" calcext:value-type="float">
            <text:p>1,523295</text:p>
          </table:table-cell>
        </table:table-row>
        <table:table-row table:style-name="ro1">
          <table:table-cell office:value-type="string" calcext:value-type="string">
            <text:p>POCOS CALDAS</text:p>
          </table:table-cell>
          <table:table-cell office:value-type="string" calcext:value-type="string">
            <text:p>ITAJUBA 3</text:p>
          </table:table-cell>
          <table:table-cell office:value-type="float" office:value="1.52013155623898" calcext:value-type="float">
            <text:p>1,520132</text:p>
          </table:table-cell>
        </table:table-row>
        <table:table-row table:style-name="ro1">
          <table:table-cell office:value-type="string" calcext:value-type="string">
            <text:p>ANGRA FUR</text:p>
          </table:table-cell>
          <table:table-cell office:value-type="string" calcext:value-type="string">
            <text:p>C. PAULISTA</text:p>
          </table:table-cell>
          <table:table-cell office:value-type="float" office:value="1.51819474976226" calcext:value-type="float">
            <text:p>1,518195</text:p>
          </table:table-cell>
        </table:table-row>
        <table:table-row table:style-name="ro1">
          <table:table-cell office:value-type="string" calcext:value-type="string">
            <text:p>N.P.PRIMAVERA</text:p>
          </table:table-cell>
          <table:table-cell office:value-type="string" calcext:value-type="string">
            <text:p>P. PRIMAVERA</text:p>
          </table:table-cell>
          <table:table-cell office:value-type="float" office:value="1.51747557836089" calcext:value-type="float">
            <text:p>1,517476</text:p>
          </table:table-cell>
        </table:table-row>
        <table:table-row table:style-name="ro1">
          <table:table-cell office:value-type="string" calcext:value-type="string">
            <text:p>MESSIAS</text:p>
          </table:table-cell>
          <table:table-cell office:value-type="string" calcext:value-type="string">
            <text:p>SUAPE II</text:p>
          </table:table-cell>
          <table:table-cell office:value-type="float" office:value="1.51063291286466" calcext:value-type="float">
            <text:p>1,510633</text:p>
          </table:table-cell>
        </table:table-row>
        <table:table-row table:style-name="ro1">
          <table:table-cell office:value-type="string" calcext:value-type="string">
            <text:p>P. AFONSO IV_SE</text:p>
          </table:table-cell>
          <table:table-cell office:value-type="string" calcext:value-type="string">
            <text:p>US. L.GONZAGA</text:p>
          </table:table-cell>
          <table:table-cell office:value-type="float" office:value="1.50927051837603" calcext:value-type="float">
            <text:p>1,509271</text:p>
          </table:table-cell>
        </table:table-row>
        <table:table-row table:style-name="ro1">
          <table:table-cell office:value-type="string" calcext:value-type="string">
            <text:p>ARARAQUARA CTP</text:p>
          </table:table-cell>
          <table:table-cell office:value-type="string" calcext:value-type="string">
            <text:p>ARARAS</text:p>
          </table:table-cell>
          <table:table-cell office:value-type="float" office:value="1.4963555774329" calcext:value-type="float">
            <text:p>1,496356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REPLAN</text:p>
          </table:table-cell>
          <table:table-cell office:value-type="float" office:value="1.49176539728988" calcext:value-type="float">
            <text:p>1,491765</text:p>
          </table:table-cell>
        </table:table-row>
        <table:table-row table:style-name="ro1">
          <table:table-cell office:value-type="string" calcext:value-type="string">
            <text:p>CABREUVA</text:p>
          </table:table-cell>
          <table:table-cell office:value-type="string" calcext:value-type="string">
            <text:p>GERDAU SP</text:p>
          </table:table-cell>
          <table:table-cell office:value-type="float" office:value="1.48579230890158" calcext:value-type="float">
            <text:p>1,485792</text:p>
          </table:table-cell>
        </table:table-row>
        <table:table-row table:style-name="ro1">
          <table:table-cell office:value-type="string" calcext:value-type="string">
            <text:p>EMBU-GUACU</text:p>
          </table:table-cell>
          <table:table-cell office:value-type="string" calcext:value-type="string">
            <text:p>OESTE</text:p>
          </table:table-cell>
          <table:table-cell office:value-type="float" office:value="1.48345561570215" calcext:value-type="float">
            <text:p>1,483456</text:p>
          </table:table-cell>
        </table:table-row>
        <table:table-row table:style-name="ro1">
          <table:table-cell office:value-type="string" calcext:value-type="string">
            <text:p>FUTURA</text:p>
          </table:table-cell>
          <table:table-cell office:value-type="string" calcext:value-type="string">
            <text:p>JUAZEIRO III</text:p>
          </table:table-cell>
          <table:table-cell office:value-type="float" office:value="1.4819000737385" calcext:value-type="float">
            <text:p>1,481900</text:p>
          </table:table-cell>
        </table:table-row>
        <table:table-row table:style-name="ro1">
          <table:table-cell office:value-type="string" calcext:value-type="string">
            <text:p>BOM JARDIM</text:p>
          </table:table-cell>
          <table:table-cell office:value-type="string" calcext:value-type="string">
            <text:p>FERNAO DIAS</text:p>
          </table:table-cell>
          <table:table-cell office:value-type="float" office:value="1.48139580627292" calcext:value-type="float">
            <text:p>1,481396</text:p>
          </table:table-cell>
        </table:table-row>
        <table:table-row table:style-name="ro1">
          <table:table-cell office:value-type="string" calcext:value-type="string">
            <text:p>SE LAJEADO</text:p>
          </table:table-cell>
          <table:table-cell office:value-type="string" calcext:value-type="string">
            <text:p>MIRACEMA</text:p>
          </table:table-cell>
          <table:table-cell office:value-type="float" office:value="1.48005086286446" calcext:value-type="float">
            <text:p>1,480051</text:p>
          </table:table-cell>
        </table:table-row>
        <table:table-row table:style-name="ro1">
          <table:table-cell office:value-type="string" calcext:value-type="string">
            <text:p>CAMACARI II</text:p>
          </table:table-cell>
          <table:table-cell office:value-type="string" calcext:value-type="string">
            <text:p>OLINDINA</text:p>
          </table:table-cell>
          <table:table-cell office:value-type="float" office:value="1.4799025849578" calcext:value-type="float">
            <text:p>1,479903</text:p>
          </table:table-cell>
        </table:table-row>
        <table:table-row table:style-name="ro1">
          <table:table-cell office:value-type="string" calcext:value-type="string">
            <text:p>ANGRA FUR</text:p>
          </table:table-cell>
          <table:table-cell office:value-type="string" calcext:value-type="string">
            <text:p>ZONA OESTE</text:p>
          </table:table-cell>
          <table:table-cell office:value-type="float" office:value="1.4787431055567" calcext:value-type="float">
            <text:p>1,478743</text:p>
          </table:table-cell>
        </table:table-row>
        <table:table-row table:style-name="ro1">
          <table:table-cell office:value-type="string" calcext:value-type="string">
            <text:p>EMBU-GUACU</text:p>
          </table:table-cell>
          <table:table-cell office:value-type="string" calcext:value-type="string">
            <text:p>CBA2 CIA.B.ALUM</text:p>
          </table:table-cell>
          <table:table-cell office:value-type="float" office:value="1.47499980665577" calcext:value-type="float">
            <text:p>1,475000</text:p>
          </table:table-cell>
        </table:table-row>
        <table:table-row table:style-name="ro1">
          <table:table-cell office:value-type="string" calcext:value-type="string">
            <text:p>JEREMOABO</text:p>
          </table:table-cell>
          <table:table-cell office:value-type="string" calcext:value-type="string">
            <text:p>OLINDINA</text:p>
          </table:table-cell>
          <table:table-cell office:value-type="float" office:value="1.47140309276552" calcext:value-type="float">
            <text:p>1,471403</text:p>
          </table:table-cell>
        </table:table-row>
        <table:table-row table:style-name="ro1">
          <table:table-cell office:value-type="string" calcext:value-type="string">
            <text:p>EMBU-GUACU</text:p>
          </table:table-cell>
          <table:table-cell office:value-type="string" calcext:value-type="string">
            <text:p>SOLVAY</text:p>
          </table:table-cell>
          <table:table-cell office:value-type="float" office:value="1.46556995282943" calcext:value-type="float">
            <text:p>1,465570</text:p>
          </table:table-cell>
        </table:table-row>
        <table:table-row table:style-name="ro1">
          <table:table-cell office:value-type="string" calcext:value-type="string">
            <text:p>BETIM 6</text:p>
          </table:table-cell>
          <table:table-cell office:value-type="string" calcext:value-type="string">
            <text:p>SARZEDO</text:p>
          </table:table-cell>
          <table:table-cell office:value-type="float" office:value="1.43629123197825" calcext:value-type="float">
            <text:p>1,436291</text:p>
          </table:table-cell>
        </table:table-row>
        <table:table-row table:style-name="ro1">
          <table:table-cell office:value-type="string" calcext:value-type="string">
            <text:p>U.SOBRADINHO</text:p>
          </table:table-cell>
          <table:table-cell office:value-type="string" calcext:value-type="string">
            <text:p>FUTURA</text:p>
          </table:table-cell>
          <table:table-cell office:value-type="float" office:value="1.43153303208604" calcext:value-type="float">
            <text:p>1,431533</text:p>
          </table:table-cell>
        </table:table-row>
        <table:table-row table:style-name="ro1">
          <table:table-cell office:value-type="string" calcext:value-type="string">
            <text:p>P.DUTRA</text:p>
          </table:table-cell>
          <table:table-cell office:value-type="string" calcext:value-type="string">
            <text:p>S.ANTON LOPES</text:p>
          </table:table-cell>
          <table:table-cell office:value-type="float" office:value="1.4175965148702" calcext:value-type="float">
            <text:p>1,417597</text:p>
          </table:table-cell>
        </table:table-row>
        <table:table-row table:style-name="ro1">
          <table:table-cell office:value-type="string" calcext:value-type="string">
            <text:p>S.SANTIAGO</text:p>
          </table:table-cell>
          <table:table-cell office:value-type="string" calcext:value-type="string">
            <text:p>SALTO CAXIAS</text:p>
          </table:table-cell>
          <table:table-cell office:value-type="float" office:value="1.37008523417078" calcext:value-type="float">
            <text:p>1,370085</text:p>
          </table:table-cell>
        </table:table-row>
        <table:table-row table:style-name="ro1">
          <table:table-cell office:value-type="string" calcext:value-type="string">
            <text:p>P.DUTRA</text:p>
          </table:table-cell>
          <table:table-cell office:value-type="string" calcext:value-type="string">
            <text:p>B. ESPERANCA</text:p>
          </table:table-cell>
          <table:table-cell office:value-type="float" office:value="1.36699249136007" calcext:value-type="float">
            <text:p>1,366992</text:p>
          </table:table-cell>
        </table:table-row>
        <table:table-row table:style-name="ro1">
          <table:table-cell office:value-type="string" calcext:value-type="string">
            <text:p>SUL</text:p>
          </table:table-cell>
          <table:table-cell office:value-type="string" calcext:value-type="string">
            <text:p>TIJUCO PRETO</text:p>
          </table:table-cell>
          <table:table-cell office:value-type="float" office:value="1.36592686792647" calcext:value-type="float">
            <text:p>1,365927</text:p>
          </table:table-cell>
        </table:table-row>
        <table:table-row table:style-name="ro1">
          <table:table-cell office:value-type="string" calcext:value-type="string">
            <text:p>ITAPETI</text:p>
          </table:table-cell>
          <table:table-cell office:value-type="string" calcext:value-type="string">
            <text:p>TIJUCO PRETO</text:p>
          </table:table-cell>
          <table:table-cell office:value-type="float" office:value="1.32127393053274" calcext:value-type="float">
            <text:p>1,321274</text:p>
          </table:table-cell>
        </table:table-row>
        <table:table-row table:style-name="ro1">
          <table:table-cell office:value-type="string" calcext:value-type="string">
            <text:p>INTERLAGOS</text:p>
          </table:table-cell>
          <table:table-cell office:value-type="string" calcext:value-type="string">
            <text:p>PIRATININGA 2</text:p>
          </table:table-cell>
          <table:table-cell office:value-type="float" office:value="1.28465222765653" calcext:value-type="float">
            <text:p>1,284652</text:p>
          </table:table-cell>
        </table:table-row>
        <table:table-row table:style-name="ro1">
          <table:table-cell office:value-type="string" calcext:value-type="string">
            <text:p>ITAPETI</text:p>
          </table:table-cell>
          <table:table-cell office:value-type="string" calcext:value-type="string">
            <text:p>NORDESTE</text:p>
          </table:table-cell>
          <table:table-cell office:value-type="float" office:value="1.26574876887039" calcext:value-type="float">
            <text:p>1,265749</text:p>
          </table:table-cell>
        </table:table-row>
        <table:table-row table:style-name="ro1">
          <table:table-cell office:value-type="string" calcext:value-type="string">
            <text:p>B. SANTISTA</text:p>
          </table:table-cell>
          <table:table-cell office:value-type="string" calcext:value-type="string">
            <text:p>TIJUCO PRETO</text:p>
          </table:table-cell>
          <table:table-cell office:value-type="float" office:value="1.26511657590492" calcext:value-type="float">
            <text:p>1,265117</text:p>
          </table:table-cell>
        </table:table-row>
        <table:table-row table:style-name="ro1">
          <table:table-cell office:value-type="string" calcext:value-type="string">
            <text:p>MONTESCLAROS2</text:p>
          </table:table-cell>
          <table:table-cell office:value-type="string" calcext:value-type="string">
            <text:p>PIRAPORA 2</text:p>
          </table:table-cell>
          <table:table-cell office:value-type="float" office:value="1.22713049431957" calcext:value-type="float">
            <text:p>1,227130</text:p>
          </table:table-cell>
        </table:table-row>
        <table:table-row table:style-name="ro1">
          <table:table-cell office:value-type="string" calcext:value-type="string">
            <text:p>SAO GOTARDO 2</text:p>
          </table:table-cell>
          <table:table-cell office:value-type="string" calcext:value-type="string">
            <text:p>TRES MARIAS-SE</text:p>
          </table:table-cell>
          <table:table-cell office:value-type="float" office:value="1.21653472456425" calcext:value-type="float">
            <text:p>1,216535</text:p>
          </table:table-cell>
        </table:table-row>
        <table:table-row table:style-name="ro1">
          <table:table-cell office:value-type="string" calcext:value-type="string">
            <text:p>CURITIBA</text:p>
          </table:table-cell>
          <table:table-cell office:value-type="string" calcext:value-type="string">
            <text:p>UMBARA</text:p>
          </table:table-cell>
          <table:table-cell office:value-type="float" office:value="1.21130257941874" calcext:value-type="float">
            <text:p>1,211303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string" calcext:value-type="string">
            <text:p>LEOPOLDINA2</text:p>
          </table:table-cell>
          <table:table-cell office:value-type="float" office:value="1.19320715964269" calcext:value-type="float">
            <text:p>1,193207</text:p>
          </table:table-cell>
        </table:table-row>
        <table:table-row table:style-name="ro1">
          <table:table-cell office:value-type="string" calcext:value-type="string">
            <text:p>ITUTINGA</text:p>
          </table:table-cell>
          <table:table-cell office:value-type="string" calcext:value-type="string">
            <text:p>JECEABA</text:p>
          </table:table-cell>
          <table:table-cell office:value-type="float" office:value="1.18024021152849" calcext:value-type="float">
            <text:p>1,180240</text:p>
          </table:table-cell>
        </table:table-row>
        <table:table-row table:style-name="ro1">
          <table:table-cell office:value-type="string" calcext:value-type="string">
            <text:p>ITABIRITO 2</text:p>
          </table:table-cell>
          <table:table-cell office:value-type="string" calcext:value-type="string">
            <text:p>JECEABA</text:p>
          </table:table-cell>
          <table:table-cell office:value-type="float" office:value="1.16883135765363" calcext:value-type="float">
            <text:p>1,168831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string" calcext:value-type="string">
            <text:p>MACAE MERCHAN</text:p>
          </table:table-cell>
          <table:table-cell office:value-type="float" office:value="1.16878589560329" calcext:value-type="float">
            <text:p>1,168786</text:p>
          </table:table-cell>
        </table:table-row>
        <table:table-row table:style-name="ro1">
          <table:table-cell office:value-type="string" calcext:value-type="string">
            <text:p>P. JUSCELINO</text:p>
          </table:table-cell>
          <table:table-cell office:value-type="string" calcext:value-type="string">
            <text:p>SETE LAGOAS 4</text:p>
          </table:table-cell>
          <table:table-cell office:value-type="float" office:value="1.1605018421145" calcext:value-type="float">
            <text:p>1,160502</text:p>
          </table:table-cell>
        </table:table-row>
        <table:table-row table:style-name="ro1">
          <table:table-cell office:value-type="string" calcext:value-type="string">
            <text:p>ITUTINGA</text:p>
          </table:table-cell>
          <table:table-cell office:value-type="string" calcext:value-type="string">
            <text:p>JUIZ DE FORA1</text:p>
          </table:table-cell>
          <table:table-cell office:value-type="float" office:value="1.15820219146731" calcext:value-type="float">
            <text:p>1,158202</text:p>
          </table:table-cell>
        </table:table-row>
        <table:table-row table:style-name="ro1">
          <table:table-cell office:value-type="string" calcext:value-type="string">
            <text:p>TAQUARIL</text:p>
          </table:table-cell>
          <table:table-cell office:value-type="string" calcext:value-type="string">
            <text:p>NEVES 1</text:p>
          </table:table-cell>
          <table:table-cell office:value-type="float" office:value="1.15132456929658" calcext:value-type="float">
            <text:p>1,151325</text:p>
          </table:table-cell>
        </table:table-row>
        <table:table-row table:style-name="ro1">
          <table:table-cell office:value-type="string" calcext:value-type="string">
            <text:p>SANT.DUMONT 2</text:p>
          </table:table-cell>
          <table:table-cell office:value-type="string" calcext:value-type="string">
            <text:p>LEOPOLDINA2</text:p>
          </table:table-cell>
          <table:table-cell office:value-type="float" office:value="1.15087196386197" calcext:value-type="float">
            <text:p>1,150872</text:p>
          </table:table-cell>
        </table:table-row>
        <table:table-row table:style-name="ro1">
          <table:table-cell office:value-type="string" calcext:value-type="string">
            <text:p>BARBACENA 2</text:p>
          </table:table-cell>
          <table:table-cell office:value-type="string" calcext:value-type="string">
            <text:p>SANT.DUMONT 2</text:p>
          </table:table-cell>
          <table:table-cell office:value-type="float" office:value="1.13839056639979" calcext:value-type="float">
            <text:p>1,138391</text:p>
          </table:table-cell>
        </table:table-row>
        <table:table-row table:style-name="ro1">
          <table:table-cell office:value-type="string" calcext:value-type="string">
            <text:p>GERDAU O.BRANCO</text:p>
          </table:table-cell>
          <table:table-cell office:value-type="string" calcext:value-type="string">
            <text:p>ITABIRITO 2</text:p>
          </table:table-cell>
          <table:table-cell office:value-type="float" office:value="1.12312463364069" calcext:value-type="float">
            <text:p>1,123125</text:p>
          </table:table-cell>
        </table:table-row>
        <table:table-row table:style-name="ro1">
          <table:table-cell office:value-type="string" calcext:value-type="string">
            <text:p>IRAPE-SE</text:p>
          </table:table-cell>
          <table:table-cell office:value-type="string" calcext:value-type="string">
            <text:p>MONTESCLAROS2</text:p>
          </table:table-cell>
          <table:table-cell office:value-type="float" office:value="1.12011955427228" calcext:value-type="float">
            <text:p>1,120120</text:p>
          </table:table-cell>
        </table:table-row>
        <table:table-row table:style-name="ro1">
          <table:table-cell office:value-type="string" calcext:value-type="string">
            <text:p>BARRO BRANCO</text:p>
          </table:table-cell>
          <table:table-cell office:value-type="string" calcext:value-type="string">
            <text:p>GERDAU O.BRANCO</text:p>
          </table:table-cell>
          <table:table-cell office:value-type="float" office:value="1.11461926425965" calcext:value-type="float">
            <text:p>1,114619</text:p>
          </table:table-cell>
        </table:table-row>
        <table:table-row table:style-name="ro1">
          <table:table-cell office:value-type="string" calcext:value-type="string">
            <text:p>TRES MARIAS-SE</text:p>
          </table:table-cell>
          <table:table-cell office:value-type="string" calcext:value-type="string">
            <text:p>VARZEA PALMA1</text:p>
          </table:table-cell>
          <table:table-cell office:value-type="float" office:value="1.11333830575368" calcext:value-type="float">
            <text:p>1,113338</text:p>
          </table:table-cell>
        </table:table-row>
        <table:table-row table:style-name="ro1">
          <table:table-cell office:value-type="string" calcext:value-type="string">
            <text:p>BETIM 6</text:p>
          </table:table-cell>
          <table:table-cell office:value-type="string" calcext:value-type="string">
            <text:p>SETE LAGOAS 4</text:p>
          </table:table-cell>
          <table:table-cell office:value-type="float" office:value="1.11140774555211" calcext:value-type="float">
            <text:p>1,111408</text:p>
          </table:table-cell>
        </table:table-row>
        <table:table-row table:style-name="ro1">
          <table:table-cell office:value-type="string" calcext:value-type="string">
            <text:p>PIRAPORA 2</text:p>
          </table:table-cell>
          <table:table-cell office:value-type="string" calcext:value-type="string">
            <text:p>VARZEA PALMA 4</text:p>
          </table:table-cell>
          <table:table-cell office:value-type="float" office:value="1.10444756171941" calcext:value-type="float">
            <text:p>1,104448</text:p>
          </table:table-cell>
        </table:table-row>
        <table:table-row table:style-name="ro1">
          <table:table-cell office:value-type="string" calcext:value-type="string">
            <text:p>FURNAS</text:p>
          </table:table-cell>
          <table:table-cell office:value-type="string" calcext:value-type="string">
            <text:p>PIMENTA</text:p>
          </table:table-cell>
          <table:table-cell office:value-type="float" office:value="1.10025146134252" calcext:value-type="float">
            <text:p>1,100251</text:p>
          </table:table-cell>
        </table:table-row>
        <table:table-row table:style-name="ro1">
          <table:table-cell office:value-type="string" calcext:value-type="string">
            <text:p>CAMPOS</text:p>
          </table:table-cell>
          <table:table-cell office:value-type="string" calcext:value-type="string">
            <text:p>MACAE MERCHAN</text:p>
          </table:table-cell>
          <table:table-cell office:value-type="float" office:value="1.10018146177414" calcext:value-type="float">
            <text:p>1,100181</text:p>
          </table:table-cell>
        </table:table-row>
        <table:table-row table:style-name="ro1">
          <table:table-cell office:value-type="string" calcext:value-type="string">
            <text:p>NOVA PONTE</text:p>
          </table:table-cell>
          <table:table-cell office:value-type="string" calcext:value-type="string">
            <text:p>ARAXA 3</text:p>
          </table:table-cell>
          <table:table-cell office:value-type="float" office:value="1.09514765268498" calcext:value-type="float">
            <text:p>1,095148</text:p>
          </table:table-cell>
        </table:table-row>
        <table:table-row table:style-name="ro1">
          <table:table-cell office:value-type="string" calcext:value-type="string">
            <text:p>L.C.BARRETO</text:p>
          </table:table-cell>
          <table:table-cell office:value-type="string" calcext:value-type="string">
            <text:p>POCOS CALDAS</text:p>
          </table:table-cell>
          <table:table-cell office:value-type="float" office:value="1.08656294768266" calcext:value-type="float">
            <text:p>1,086563</text:p>
          </table:table-cell>
        </table:table-row>
        <table:table-row table:style-name="ro1">
          <table:table-cell office:value-type="string" calcext:value-type="string">
            <text:p>VIANA</text:p>
          </table:table-cell>
          <table:table-cell office:value-type="string" calcext:value-type="string">
            <text:p>VIANA 2</text:p>
          </table:table-cell>
          <table:table-cell office:value-type="float" office:value="1.08538778259897" calcext:value-type="float">
            <text:p>1,085388</text:p>
          </table:table-cell>
        </table:table-row>
        <table:table-row table:style-name="ro1">
          <table:table-cell office:value-type="string" calcext:value-type="string">
            <text:p>JAGUARA-345</text:p>
          </table:table-cell>
          <table:table-cell office:value-type="string" calcext:value-type="string">
            <text:p>L.C.BARRETO</text:p>
          </table:table-cell>
          <table:table-cell office:value-type="float" office:value="1.08364801518805" calcext:value-type="float">
            <text:p>1,083648</text:p>
          </table:table-cell>
        </table:table-row>
        <table:table-row table:style-name="ro1">
          <table:table-cell office:value-type="string" calcext:value-type="string">
            <text:p>DOME.RANGONI</text:p>
          </table:table-cell>
          <table:table-cell office:value-type="string" calcext:value-type="string">
            <text:p>TIJUCO PRETO</text:p>
          </table:table-cell>
          <table:table-cell office:value-type="float" office:value="1.08310898774512" calcext:value-type="float">
            <text:p>1,083109</text:p>
          </table:table-cell>
        </table:table-row>
        <table:table-row table:style-name="ro1">
          <table:table-cell office:value-type="string" calcext:value-type="string">
            <text:p>LESTE</text:p>
          </table:table-cell>
          <table:table-cell office:value-type="string" calcext:value-type="string">
            <text:p>TIJUCO PRETO</text:p>
          </table:table-cell>
          <table:table-cell office:value-type="float" office:value="1.07836972083518" calcext:value-type="float">
            <text:p>1,078370</text:p>
          </table:table-cell>
        </table:table-row>
        <table:table-row table:style-name="ro1">
          <table:table-cell office:value-type="string" calcext:value-type="string">
            <text:p>BRAS. SUL</text:p>
          </table:table-cell>
          <table:table-cell office:value-type="string" calcext:value-type="string">
            <text:p>CORUMBA</text:p>
          </table:table-cell>
          <table:table-cell office:value-type="float" office:value="1.07774363872572" calcext:value-type="float">
            <text:p>1,077744</text:p>
          </table:table-cell>
        </table:table-row>
        <table:table-row table:style-name="ro1">
          <table:table-cell office:value-type="string" calcext:value-type="string">
            <text:p>ITUMBIARA</text:p>
          </table:table-cell>
          <table:table-cell office:value-type="string" calcext:value-type="string">
            <text:p>BANDEIRANTES</text:p>
          </table:table-cell>
          <table:table-cell office:value-type="float" office:value="1.07709843559412" calcext:value-type="float">
            <text:p>1,077098</text:p>
          </table:table-cell>
        </table:table-row>
        <table:table-row table:style-name="ro1">
          <table:table-cell office:value-type="string" calcext:value-type="string">
            <text:p>TAQUARIL</text:p>
          </table:table-cell>
          <table:table-cell office:value-type="string" calcext:value-type="string">
            <text:p>PIMENTA</text:p>
          </table:table-cell>
          <table:table-cell office:value-type="float" office:value="1.06858506477828" calcext:value-type="float">
            <text:p>1,068585</text:p>
          </table:table-cell>
        </table:table-row>
        <table:table-row table:style-name="ro1">
          <table:table-cell office:value-type="string" calcext:value-type="string">
            <text:p>NOVA PONTE</text:p>
          </table:table-cell>
          <table:table-cell office:value-type="string" calcext:value-type="string">
            <text:p>UBERLANDIA 10</text:p>
          </table:table-cell>
          <table:table-cell office:value-type="float" office:value="1.06662313428921" calcext:value-type="float">
            <text:p>1,066623</text:p>
          </table:table-cell>
        </table:table-row>
        <table:table-row table:style-name="ro1">
          <table:table-cell office:value-type="string" calcext:value-type="string">
            <text:p>PADRE FIALHO</text:p>
          </table:table-cell>
          <table:table-cell office:value-type="string" calcext:value-type="string">
            <text:p>VITORIA</text:p>
          </table:table-cell>
          <table:table-cell office:value-type="float" office:value="1.05855840686865" calcext:value-type="float">
            <text:p>1,058558</text:p>
          </table:table-cell>
        </table:table-row>
        <table:table-row table:style-name="ro1">
          <table:table-cell office:value-type="string" calcext:value-type="string">
            <text:p>ATIBAIA II</text:p>
          </table:table-cell>
          <table:table-cell office:value-type="string" calcext:value-type="string">
            <text:p>POCOS CALDAS</text:p>
          </table:table-cell>
          <table:table-cell office:value-type="float" office:value="1.05678600318324" calcext:value-type="float">
            <text:p>1,056786</text:p>
          </table:table-cell>
        </table:table-row>
        <table:table-row table:style-name="ro1">
          <table:table-cell office:value-type="string" calcext:value-type="string">
            <text:p>BAR.COQUEIROS</text:p>
          </table:table-cell>
          <table:table-cell office:value-type="string" calcext:value-type="string">
            <text:p>ITAGUACU</text:p>
          </table:table-cell>
          <table:table-cell office:value-type="float" office:value="1.04069305848886" calcext:value-type="float">
            <text:p>1,040693</text:p>
          </table:table-cell>
        </table:table-row>
        <table:table-row table:style-name="ro1">
          <table:table-cell office:value-type="string" calcext:value-type="string">
            <text:p>CAMPO GRANDE2</text:p>
          </table:table-cell>
          <table:table-cell office:value-type="string" calcext:value-type="string">
            <text:p>PARAISO 2</text:p>
          </table:table-cell>
          <table:table-cell office:value-type="float" office:value="1.03277407629021" calcext:value-type="float">
            <text:p>1,032774</text:p>
          </table:table-cell>
        </table:table-row>
        <table:table-row table:style-name="ro1">
          <table:table-cell office:value-type="string" calcext:value-type="string">
            <text:p>FURNAS</text:p>
          </table:table-cell>
          <table:table-cell office:value-type="string" calcext:value-type="string">
            <text:p>VARGINHA 4</text:p>
          </table:table-cell>
          <table:table-cell office:value-type="float" office:value="1.02851539664425" calcext:value-type="float">
            <text:p>1,028515</text:p>
          </table:table-cell>
        </table:table-row>
        <table:table-row table:style-name="ro1">
          <table:table-cell office:value-type="string" calcext:value-type="string">
            <text:p>MONTE ALEGRE2</text:p>
          </table:table-cell>
          <table:table-cell office:value-type="string" calcext:value-type="string">
            <text:p>P. COLOMBIA</text:p>
          </table:table-cell>
          <table:table-cell office:value-type="float" office:value="1.02655040436729" calcext:value-type="float">
            <text:p>1,026550</text:p>
          </table:table-cell>
        </table:table-row>
        <table:table-row table:style-name="ro1">
          <table:table-cell office:value-type="string" calcext:value-type="string">
            <text:p>ANASTACIO</text:p>
          </table:table-cell>
          <table:table-cell office:value-type="string" calcext:value-type="string">
            <text:p>CORUMBA 2</text:p>
          </table:table-cell>
          <table:table-cell office:value-type="float" office:value="1.02617205379515" calcext:value-type="float">
            <text:p>1,026172</text:p>
          </table:table-cell>
        </table:table-row>
        <table:table-row table:style-name="ro1">
          <table:table-cell office:value-type="string" calcext:value-type="string">
            <text:p>N.P.PRIMAVERA</text:p>
          </table:table-cell>
          <table:table-cell office:value-type="string" calcext:value-type="string">
            <text:p>RIO BRILHANTE</text:p>
          </table:table-cell>
          <table:table-cell office:value-type="float" office:value="1.02438803369603" calcext:value-type="float">
            <text:p>1,024388</text:p>
          </table:table-cell>
        </table:table-row>
        <table:table-row table:style-name="ro1">
          <table:table-cell office:value-type="string" calcext:value-type="string">
            <text:p>L.C.BARRETO</text:p>
          </table:table-cell>
          <table:table-cell office:value-type="string" calcext:value-type="string">
            <text:p>VOLTA GRANDE-SE</text:p>
          </table:table-cell>
          <table:table-cell office:value-type="float" office:value="1.02326216196493" calcext:value-type="float">
            <text:p>1,023262</text:p>
          </table:table-cell>
        </table:table-row>
        <table:table-row table:style-name="ro1">
          <table:table-cell office:value-type="string" calcext:value-type="string">
            <text:p>BRAS. SUL</text:p>
          </table:table-cell>
          <table:table-cell office:value-type="string" calcext:value-type="string">
            <text:p>SAMAMBAIA</text:p>
          </table:table-cell>
          <table:table-cell office:value-type="float" office:value="1.01810819041772" calcext:value-type="float">
            <text:p>1,018108</text:p>
          </table:table-cell>
        </table:table-row>
        <table:table-row table:style-name="ro1">
          <table:table-cell office:value-type="string" calcext:value-type="string">
            <text:p>BLUMENAU</text:p>
          </table:table-cell>
          <table:table-cell office:value-type="string" calcext:value-type="string">
            <text:p>JARAGUA DO SUL</text:p>
          </table:table-cell>
          <table:table-cell office:value-type="float" office:value="1.01693983356055" calcext:value-type="float">
            <text:p>1,016940</text:p>
          </table:table-cell>
        </table:table-row>
        <table:table-row table:style-name="ro1">
          <table:table-cell office:value-type="string" calcext:value-type="string">
            <text:p>ITAPETI</text:p>
          </table:table-cell>
          <table:table-cell office:value-type="string" calcext:value-type="string">
            <text:p>MOGI CRUZES</text:p>
          </table:table-cell>
          <table:table-cell office:value-type="float" office:value="1.0156152969743" calcext:value-type="float">
            <text:p>1,015615</text:p>
          </table:table-cell>
        </table:table-row>
        <table:table-row table:style-name="ro1">
          <table:table-cell office:value-type="string" calcext:value-type="string">
            <text:p>COMPERJ</text:p>
          </table:table-cell>
          <table:table-cell office:value-type="string" calcext:value-type="string">
            <text:p>LAGOS</text:p>
          </table:table-cell>
          <table:table-cell office:value-type="float" office:value="1.00640050613993" calcext:value-type="float">
            <text:p>1,006401</text:p>
          </table:table-cell>
        </table:table-row>
        <table:table-row table:style-name="ro1">
          <table:table-cell office:value-type="string" calcext:value-type="string">
            <text:p>PIRINEUS</text:p>
          </table:table-cell>
          <table:table-cell office:value-type="string" calcext:value-type="string">
            <text:p>SAMAMBAIA</text:p>
          </table:table-cell>
          <table:table-cell office:value-type="float" office:value="1.00628084295079" calcext:value-type="float">
            <text:p>1,006281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M. MORAES</text:p>
          </table:table-cell>
          <table:table-cell office:value-type="float" office:value="1.00454514734831" calcext:value-type="float">
            <text:p>1,004545</text:p>
          </table:table-cell>
        </table:table-row>
        <table:table-row table:style-name="ro1">
          <table:table-cell office:value-type="string" calcext:value-type="string">
            <text:p>ADRIANOPOLIS</text:p>
          </table:table-cell>
          <table:table-cell office:value-type="string" calcext:value-type="string">
            <text:p>VENDA PEDRAS</text:p>
          </table:table-cell>
          <table:table-cell office:value-type="float" office:value="1.00439399250713" calcext:value-type="float">
            <text:p>1,004394</text:p>
          </table:table-cell>
        </table:table-row>
        <table:table-row table:style-name="ro1">
          <table:table-cell office:value-type="string" calcext:value-type="string">
            <text:p>BARRO BRANCO</text:p>
          </table:table-cell>
          <table:table-cell office:value-type="string" calcext:value-type="string">
            <text:p>PADRE FIALHO</text:p>
          </table:table-cell>
          <table:table-cell office:value-type="float" office:value="1.00103532721733" calcext:value-type="float">
            <text:p>1,001035</text:p>
          </table:table-cell>
        </table:table-row>
        <table:table-row table:style-name="ro1">
          <table:table-cell office:value-type="string" calcext:value-type="string">
            <text:p>JAURU</text:p>
          </table:table-cell>
          <table:table-cell office:value-type="string" calcext:value-type="string">
            <text:p>VARZ.GRANDE 2</text:p>
          </table:table-cell>
          <table:table-cell office:value-type="float" office:value="0.994260236494423" calcext:value-type="float">
            <text:p>0,994260</text:p>
          </table:table-cell>
        </table:table-row>
        <table:table-row table:style-name="ro1">
          <table:table-cell office:value-type="string" calcext:value-type="string">
            <text:p>OURO PRETO 2</text:p>
          </table:table-cell>
          <table:table-cell office:value-type="string" calcext:value-type="string">
            <text:p>NOVA LIMA 6</text:p>
          </table:table-cell>
          <table:table-cell office:value-type="float" office:value="0.993395888295364" calcext:value-type="float">
            <text:p>0,993396</text:p>
          </table:table-cell>
        </table:table-row>
        <table:table-row table:style-name="ro1">
          <table:table-cell office:value-type="string" calcext:value-type="string">
            <text:p>CHAPADAO</text:p>
          </table:table-cell>
          <table:table-cell office:value-type="string" calcext:value-type="string">
            <text:p>INOCENCIA</text:p>
          </table:table-cell>
          <table:table-cell office:value-type="float" office:value="0.98915429173592" calcext:value-type="float">
            <text:p>0,989154</text:p>
          </table:table-cell>
        </table:table-row>
        <table:table-row table:style-name="ro1">
          <table:table-cell office:value-type="string" calcext:value-type="string">
            <text:p>ITUMBIARA</text:p>
          </table:table-cell>
          <table:table-cell office:value-type="string" calcext:value-type="string">
            <text:p>MONTE ALEGRE2</text:p>
          </table:table-cell>
          <table:table-cell office:value-type="float" office:value="0.988071692698366" calcext:value-type="float">
            <text:p>0,988072</text:p>
          </table:table-cell>
        </table:table-row>
        <table:table-row table:style-name="ro1">
          <table:table-cell office:value-type="string" calcext:value-type="string">
            <text:p>JAURU</text:p>
          </table:table-cell>
          <table:table-cell office:value-type="string" calcext:value-type="string">
            <text:p>VILHENA</text:p>
          </table:table-cell>
          <table:table-cell office:value-type="float" office:value="0.986571473044446" calcext:value-type="float">
            <text:p>0,986571</text:p>
          </table:table-cell>
        </table:table-row>
        <table:table-row table:style-name="ro1">
          <table:table-cell office:value-type="string" calcext:value-type="string">
            <text:p>JATAI</text:p>
          </table:table-cell>
          <table:table-cell office:value-type="string" calcext:value-type="string">
            <text:p>R.VERDE NORTE</text:p>
          </table:table-cell>
          <table:table-cell office:value-type="float" office:value="0.984170116725991" calcext:value-type="float">
            <text:p>0,984170</text:p>
          </table:table-cell>
        </table:table-row>
        <table:table-row table:style-name="ro1">
          <table:table-cell office:value-type="string" calcext:value-type="string">
            <text:p>GV DO BRASIL</text:p>
          </table:table-cell>
          <table:table-cell office:value-type="string" calcext:value-type="string">
            <text:p>TAUBATE</text:p>
          </table:table-cell>
          <table:table-cell office:value-type="float" office:value="0.983971490009062" calcext:value-type="float">
            <text:p>0,983971</text:p>
          </table:table-cell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SANTA CABECA</text:p>
          </table:table-cell>
          <table:table-cell office:value-type="float" office:value="0.982242055358342" calcext:value-type="float">
            <text:p>0,982242</text:p>
          </table:table-cell>
        </table:table-row>
        <table:table-row table:style-name="ro1">
          <table:table-cell office:value-type="string" calcext:value-type="string">
            <text:p>RIO BRANCO I</text:p>
          </table:table-cell>
          <table:table-cell office:value-type="string" calcext:value-type="string">
            <text:p>ABUNA</text:p>
          </table:table-cell>
          <table:table-cell office:value-type="float" office:value="0.977606920566425" calcext:value-type="float">
            <text:p>0,977607</text:p>
          </table:table-cell>
        </table:table-row>
        <table:table-row table:style-name="ro1">
          <table:table-cell office:value-type="string" calcext:value-type="string">
            <text:p>IL.SOLTEIRA 2</text:p>
          </table:table-cell>
          <table:table-cell office:value-type="string" calcext:value-type="string">
            <text:p>INOCENCIA</text:p>
          </table:table-cell>
          <table:table-cell office:value-type="float" office:value="0.975598336715562" calcext:value-type="float">
            <text:p>0,975598</text:p>
          </table:table-cell>
        </table:table-row>
        <table:table-row table:style-name="ro1">
          <table:table-cell office:value-type="string" calcext:value-type="string">
            <text:p>JACAREPAGUA</text:p>
          </table:table-cell>
          <table:table-cell office:value-type="string" calcext:value-type="string">
            <text:p>NOVA IGUACU</text:p>
          </table:table-cell>
          <table:table-cell office:value-type="float" office:value="0.968833214844915" calcext:value-type="float">
            <text:p>0,968833</text:p>
          </table:table-cell>
        </table:table-row>
        <table:table-row table:style-name="ro1">
          <table:table-cell office:value-type="string" calcext:value-type="string">
            <text:p>CAMPO GRANDE2</text:p>
          </table:table-cell>
          <table:table-cell office:value-type="string" calcext:value-type="string">
            <text:p>RIO BRILHANTE</text:p>
          </table:table-cell>
          <table:table-cell office:value-type="float" office:value="0.968450228752896" calcext:value-type="float">
            <text:p>0,968450</text:p>
          </table:table-cell>
        </table:table-row>
        <table:table-row table:style-name="ro1">
          <table:table-cell office:value-type="string" calcext:value-type="string">
            <text:p>IVINHEMA 2</text:p>
          </table:table-cell>
          <table:table-cell office:value-type="string" calcext:value-type="string">
            <text:p>N.P.PRIMAVERA</text:p>
          </table:table-cell>
          <table:table-cell office:value-type="float" office:value="0.967877427176928" calcext:value-type="float">
            <text:p>0,967877</text:p>
          </table:table-cell>
        </table:table-row>
        <table:table-row table:style-name="ro1">
          <table:table-cell office:value-type="string" calcext:value-type="string">
            <text:p>JUAZEIRO II</text:p>
          </table:table-cell>
          <table:table-cell office:value-type="string" calcext:value-type="string">
            <text:p>JUAZEIRO III</text:p>
          </table:table-cell>
          <table:table-cell office:value-type="float" office:value="0.967609503148707" calcext:value-type="float">
            <text:p>0,967610</text:p>
          </table:table-cell>
        </table:table-row>
        <table:table-row table:style-name="ro1">
          <table:table-cell office:value-type="string" calcext:value-type="string">
            <text:p>ABUNA</text:p>
          </table:table-cell>
          <table:table-cell office:value-type="string" calcext:value-type="string">
            <text:p>TUCUMA</text:p>
          </table:table-cell>
          <table:table-cell office:value-type="float" office:value="0.963498021096087" calcext:value-type="float">
            <text:p>0,963498</text:p>
          </table:table-cell>
        </table:table-row>
        <table:table-row table:style-name="ro1">
          <table:table-cell office:value-type="string" calcext:value-type="string">
            <text:p>BARRA GRANDE</text:p>
          </table:table-cell>
          <table:table-cell office:value-type="string" calcext:value-type="string">
            <text:p>C.NOVOS</text:p>
          </table:table-cell>
          <table:table-cell office:value-type="float" office:value="0.962872178212909" calcext:value-type="float">
            <text:p>0,962872</text:p>
          </table:table-cell>
        </table:table-row>
        <table:table-row table:style-name="ro1">
          <table:table-cell office:value-type="string" calcext:value-type="string">
            <text:p>JARAGUA DO SUL</text:p>
          </table:table-cell>
          <table:table-cell office:value-type="string" calcext:value-type="string">
            <text:p>JOINV.NORTE</text:p>
          </table:table-cell>
          <table:table-cell office:value-type="float" office:value="0.962568000247447" calcext:value-type="float">
            <text:p>0,962568</text:p>
          </table:table-cell>
        </table:table-row>
        <table:table-row table:style-name="ro1">
          <table:table-cell office:value-type="string" calcext:value-type="string">
            <text:p>JORG.TEIXEIRA</text:p>
          </table:table-cell>
          <table:table-cell office:value-type="string" calcext:value-type="string">
            <text:p>LECHUGA</text:p>
          </table:table-cell>
          <table:table-cell office:value-type="float" office:value="0.960850573755624" calcext:value-type="float">
            <text:p>0,960851</text:p>
          </table:table-cell>
        </table:table-row>
        <table:table-row table:style-name="ro1">
          <table:table-cell office:value-type="string" calcext:value-type="string">
            <text:p>CARAJAS</text:p>
          </table:table-cell>
          <table:table-cell office:value-type="string" calcext:value-type="string">
            <text:p>ITACAIUNAS</text:p>
          </table:table-cell>
          <table:table-cell office:value-type="float" office:value="0.957230279286472" calcext:value-type="float">
            <text:p>0,957230</text:p>
          </table:table-cell>
        </table:table-row>
        <table:table-row table:style-name="ro1">
          <table:table-cell office:value-type="string" calcext:value-type="string">
            <text:p>JARAGUA DO SUL</text:p>
          </table:table-cell>
          <table:table-cell office:value-type="string" calcext:value-type="string">
            <text:p>JOINVILLE</text:p>
          </table:table-cell>
          <table:table-cell office:value-type="float" office:value="0.956535502990053" calcext:value-type="float">
            <text:p>0,956536</text:p>
          </table:table-cell>
        </table:table-row>
        <table:table-row table:style-name="ro1">
          <table:table-cell office:value-type="string" calcext:value-type="string">
            <text:p>DIANOPOLIS II</text:p>
          </table:table-cell>
          <table:table-cell office:value-type="string" calcext:value-type="string">
            <text:p>GURUPI</text:p>
          </table:table-cell>
          <table:table-cell office:value-type="float" office:value="0.954651512377739" calcext:value-type="float">
            <text:p>0,954652</text:p>
          </table:table-cell>
        </table:table-row>
        <table:table-row table:style-name="ro1">
          <table:table-cell office:value-type="string" calcext:value-type="string">
            <text:p>JORG.TEIXEIRA</text:p>
          </table:table-cell>
          <table:table-cell office:value-type="string" calcext:value-type="string">
            <text:p>MAUA III</text:p>
          </table:table-cell>
          <table:table-cell office:value-type="float" office:value="0.951461658892771" calcext:value-type="float">
            <text:p>0,951462</text:p>
          </table:table-cell>
        </table:table-row>
        <table:table-row table:style-name="ro1">
          <table:table-cell office:value-type="string" calcext:value-type="string">
            <text:p>DOURADOS 2</text:p>
          </table:table-cell>
          <table:table-cell office:value-type="string" calcext:value-type="string">
            <text:p>RIO BRILHANTE</text:p>
          </table:table-cell>
          <table:table-cell office:value-type="float" office:value="0.950241156254256" calcext:value-type="float">
            <text:p>0,950241</text:p>
          </table:table-cell>
        </table:table-row>
        <table:table-row table:style-name="ro1">
          <table:table-cell office:value-type="string" calcext:value-type="string">
            <text:p>H.BORDEN SUB</text:p>
          </table:table-cell>
          <table:table-cell office:value-type="string" calcext:value-type="string">
            <text:p>MANOE.NOBREGA</text:p>
          </table:table-cell>
          <table:table-cell office:value-type="float" office:value="0.948909311610107" calcext:value-type="float">
            <text:p>0,948909</text:p>
          </table:table-cell>
        </table:table-row>
        <table:table-row table:style-name="ro1">
          <table:table-cell office:value-type="string" calcext:value-type="string">
            <text:p>S.JOSE CAMPOS</text:p>
          </table:table-cell>
          <table:table-cell office:value-type="string" calcext:value-type="string">
            <text:p>TAUBATE</text:p>
          </table:table-cell>
          <table:table-cell office:value-type="float" office:value="0.946297639950259" calcext:value-type="float">
            <text:p>0,946298</text:p>
          </table:table-cell>
        </table:table-row>
        <table:table-row table:style-name="ro1">
          <table:table-cell office:value-type="string" calcext:value-type="string">
            <text:p>GUAIBA 2</text:p>
          </table:table-cell>
          <table:table-cell office:value-type="string" calcext:value-type="string">
            <text:p>GUAIBA 3</text:p>
          </table:table-cell>
          <table:table-cell office:value-type="float" office:value="0.945908986889234" calcext:value-type="float">
            <text:p>0,945909</text:p>
          </table:table-cell>
        </table:table-row>
        <table:table-row table:style-name="ro1">
          <table:table-cell office:value-type="string" calcext:value-type="string">
            <text:p>LIVRAMENTO 3</text:p>
          </table:table-cell>
          <table:table-cell office:value-type="string" calcext:value-type="string">
            <text:p>SANTA MARIA 3</text:p>
          </table:table-cell>
          <table:table-cell office:value-type="float" office:value="0.942844600242402" calcext:value-type="float">
            <text:p>0,942845</text:p>
          </table:table-cell>
        </table:table-row>
        <table:table-row table:style-name="ro1">
          <table:table-cell office:value-type="string" calcext:value-type="string">
            <text:p>BOTUCATU</text:p>
          </table:table-cell>
          <table:table-cell office:value-type="string" calcext:value-type="string">
            <text:p>CHAVANTES</text:p>
          </table:table-cell>
          <table:table-cell office:value-type="float" office:value="0.938419259276766" calcext:value-type="float">
            <text:p>0,938419</text:p>
          </table:table-cell>
        </table:table-row>
        <table:table-row table:style-name="ro1">
          <table:table-cell office:value-type="string" calcext:value-type="string">
            <text:p>CHARQUEADAS3</text:p>
          </table:table-cell>
          <table:table-cell office:value-type="string" calcext:value-type="string">
            <text:p>GUAIBA 3</text:p>
          </table:table-cell>
          <table:table-cell office:value-type="float" office:value="0.928185832408135" calcext:value-type="float">
            <text:p>0,928186</text:p>
          </table:table-cell>
        </table:table-row>
        <table:table-row table:style-name="ro1">
          <table:table-cell office:value-type="string" calcext:value-type="string">
            <text:p>CAMAQUA 3</text:p>
          </table:table-cell>
          <table:table-cell office:value-type="string" calcext:value-type="string">
            <text:p>POVO NOVO</text:p>
          </table:table-cell>
          <table:table-cell office:value-type="float" office:value="0.922994177176824" calcext:value-type="float">
            <text:p>0,922994</text:p>
          </table:table-cell>
        </table:table-row>
        <table:table-row table:style-name="ro1">
          <table:table-cell office:value-type="string" calcext:value-type="string">
            <text:p>IMBIRUSSU</text:p>
          </table:table-cell>
          <table:table-cell office:value-type="string" calcext:value-type="string">
            <text:p>RIO BRILHANTE</text:p>
          </table:table-cell>
          <table:table-cell office:value-type="float" office:value="0.91839715343962" calcext:value-type="float">
            <text:p>0,918397</text:p>
          </table:table-cell>
        </table:table-row>
        <table:table-row table:style-name="ro1">
          <table:table-cell office:value-type="string" calcext:value-type="string">
            <text:p>DIANOPOLIS II</text:p>
          </table:table-cell>
          <table:table-cell office:value-type="string" calcext:value-type="string">
            <text:p>PALMAS</text:p>
          </table:table-cell>
          <table:table-cell office:value-type="float" office:value="0.918107942871236" calcext:value-type="float">
            <text:p>0,918108</text:p>
          </table:table-cell>
        </table:table-row>
        <table:table-row table:style-name="ro1">
          <table:table-cell office:value-type="string" calcext:value-type="string">
            <text:p>BRASNORTE</text:p>
          </table:table-cell>
          <table:table-cell office:value-type="string" calcext:value-type="string">
            <text:p>JUBA</text:p>
          </table:table-cell>
          <table:table-cell office:value-type="float" office:value="0.91772522343576" calcext:value-type="float">
            <text:p>0,917725</text:p>
          </table:table-cell>
        </table:table-row>
        <table:table-row table:style-name="ro1">
          <table:table-cell office:value-type="string" calcext:value-type="string">
            <text:p>SANTA MARIA 3</text:p>
          </table:table-cell>
          <table:table-cell office:value-type="string" calcext:value-type="string">
            <text:p>SANTO ANGELO2</text:p>
          </table:table-cell>
          <table:table-cell office:value-type="float" office:value="0.915707757059737" calcext:value-type="float">
            <text:p>0,915708</text:p>
          </table:table-cell>
        </table:table-row>
        <table:table-row table:style-name="ro1">
          <table:table-cell office:value-type="string" calcext:value-type="string">
            <text:p>APARECIDA</text:p>
          </table:table-cell>
          <table:table-cell office:value-type="string" calcext:value-type="string">
            <text:p>LORENA</text:p>
          </table:table-cell>
          <table:table-cell office:value-type="float" office:value="0.914505705316144" calcext:value-type="float">
            <text:p>0,914506</text:p>
          </table:table-cell>
        </table:table-row>
        <table:table-row table:style-name="ro1">
          <table:table-cell office:value-type="string" calcext:value-type="string">
            <text:p>S.DA MESA</text:p>
          </table:table-cell>
          <table:table-cell office:value-type="string" calcext:value-type="string">
            <text:p>NIQUELANDIA</text:p>
          </table:table-cell>
          <table:table-cell office:value-type="float" office:value="0.913660454824889" calcext:value-type="float">
            <text:p>0,913660</text:p>
          </table:table-cell>
        </table:table-row>
        <table:table-row table:style-name="ro1">
          <table:table-cell office:value-type="string" calcext:value-type="string">
            <text:p>LIVRAMENTO 3</text:p>
          </table:table-cell>
          <table:table-cell office:value-type="string" calcext:value-type="string">
            <text:p>MACAMBARA 3</text:p>
          </table:table-cell>
          <table:table-cell office:value-type="float" office:value="0.91065354344846" calcext:value-type="float">
            <text:p>0,910654</text:p>
          </table:table-cell>
        </table:table-row>
        <table:table-row table:style-name="ro1">
          <table:table-cell office:value-type="string" calcext:value-type="string">
            <text:p>BARREIRO 1</text:p>
          </table:table-cell>
          <table:table-cell office:value-type="string" calcext:value-type="string">
            <text:p>SARZEDO</text:p>
          </table:table-cell>
          <table:table-cell office:value-type="float" office:value="0.906107998530694" calcext:value-type="float">
            <text:p>0,906108</text:p>
          </table:table-cell>
        </table:table-row>
        <table:table-row table:style-name="ro1">
          <table:table-cell office:value-type="string" calcext:value-type="string">
            <text:p>B.JESUS LAPA</text:p>
          </table:table-cell>
          <table:table-cell office:value-type="string" calcext:value-type="string">
            <text:p>BOM.JES.LAPA II</text:p>
          </table:table-cell>
          <table:table-cell office:value-type="float" office:value="0.903998613546403" calcext:value-type="float">
            <text:p>0,903999</text:p>
          </table:table-cell>
        </table:table-row>
        <table:table-row table:style-name="ro1">
          <table:table-cell office:value-type="string" calcext:value-type="string">
            <text:p>ABUNA</text:p>
          </table:table-cell>
          <table:table-cell office:value-type="string" calcext:value-type="string">
            <text:p>PORTO VELHO</text:p>
          </table:table-cell>
          <table:table-cell office:value-type="float" office:value="0.903704497464796" calcext:value-type="float">
            <text:p>0,903704</text:p>
          </table:table-cell>
        </table:table-row>
        <table:table-row table:style-name="ro1">
          <table:table-cell office:value-type="string" calcext:value-type="string">
            <text:p>ALTAMIRA</text:p>
          </table:table-cell>
          <table:table-cell office:value-type="string" calcext:value-type="string">
            <text:p>TRANSAMAZONIC</text:p>
          </table:table-cell>
          <table:table-cell office:value-type="float" office:value="0.902331140016008" calcext:value-type="float">
            <text:p>0,902331</text:p>
          </table:table-cell>
        </table:table-row>
        <table:table-row table:style-name="ro1">
          <table:table-cell office:value-type="string" calcext:value-type="string">
            <text:p>DOURADOS</text:p>
          </table:table-cell>
          <table:table-cell office:value-type="string" calcext:value-type="string">
            <text:p>DOURADOS 2</text:p>
          </table:table-cell>
          <table:table-cell office:value-type="float" office:value="0.90018645191673" calcext:value-type="float">
            <text:p>0,900186</text:p>
          </table:table-cell>
        </table:table-row>
        <table:table-row table:style-name="ro1">
          <table:table-cell office:value-type="string" calcext:value-type="string">
            <text:p>BRASNORTE</text:p>
          </table:table-cell>
          <table:table-cell office:value-type="string" calcext:value-type="string">
            <text:p>JUINA</text:p>
          </table:table-cell>
          <table:table-cell office:value-type="float" office:value="0.899320415681817" calcext:value-type="float">
            <text:p>0,899320</text:p>
          </table:table-cell>
        </table:table-row>
        <table:table-row table:style-name="ro1">
          <table:table-cell office:value-type="string" calcext:value-type="string">
            <text:p>JAURU</text:p>
          </table:table-cell>
          <table:table-cell office:value-type="string" calcext:value-type="string">
            <text:p>JUBA</text:p>
          </table:table-cell>
          <table:table-cell office:value-type="float" office:value="0.895530628953508" calcext:value-type="float">
            <text:p>0,895531</text:p>
          </table:table-cell>
        </table:table-row>
        <table:table-row table:style-name="ro1">
          <table:table-cell office:value-type="string" calcext:value-type="string">
            <text:p>SIDEROPOL.ESU</text:p>
          </table:table-cell>
          <table:table-cell office:value-type="string" calcext:value-type="string">
            <text:p>SIDEROPOLIS 2</text:p>
          </table:table-cell>
          <table:table-cell office:value-type="float" office:value="0.894379232832512" calcext:value-type="float">
            <text:p>0,894379</text:p>
          </table:table-cell>
        </table:table-row>
        <table:table-row table:style-name="ro1">
          <table:table-cell office:value-type="string" calcext:value-type="string">
            <text:p>P. AFONSO IV_SE</text:p>
          </table:table-cell>
          <table:table-cell office:value-type="string" calcext:value-type="string">
            <text:p>P.AFONSO III</text:p>
          </table:table-cell>
          <table:table-cell office:value-type="float" office:value="0.887454459429431" calcext:value-type="float">
            <text:p>0,887454</text:p>
          </table:table-cell>
        </table:table-row>
        <table:table-row table:style-name="ro1">
          <table:table-cell office:value-type="string" calcext:value-type="string">
            <text:p>CASTANHAL</text:p>
          </table:table-cell>
          <table:table-cell office:value-type="string" calcext:value-type="string">
            <text:p>MARITUBA</text:p>
          </table:table-cell>
          <table:table-cell office:value-type="float" office:value="0.887136356102615" calcext:value-type="float">
            <text:p>0,887136</text:p>
          </table:table-cell>
        </table:table-row>
        <table:table-row table:style-name="ro1">
          <table:table-cell office:value-type="string" calcext:value-type="string">
            <text:p>BRASNORTE</text:p>
          </table:table-cell>
          <table:table-cell office:value-type="string" calcext:value-type="string">
            <text:p>NOVA MUTUM</text:p>
          </table:table-cell>
          <table:table-cell office:value-type="float" office:value="0.887125387883916" calcext:value-type="float">
            <text:p>0,887125</text:p>
          </table:table-cell>
        </table:table-row>
        <table:table-row table:style-name="ro1">
          <table:table-cell office:value-type="string" calcext:value-type="string">
            <text:p>BOM.JES.LAPA II</text:p>
          </table:table-cell>
          <table:table-cell office:value-type="string" calcext:value-type="string">
            <text:p>IGAPORA II</text:p>
          </table:table-cell>
          <table:table-cell office:value-type="float" office:value="0.886753377487974" calcext:value-type="float">
            <text:p>0,886753</text:p>
          </table:table-cell>
        </table:table-row>
        <table:table-row table:style-name="ro1">
          <table:table-cell office:value-type="string" calcext:value-type="string">
            <text:p>RIO VERDE FUR</text:p>
          </table:table-cell>
          <table:table-cell office:value-type="string" calcext:value-type="string">
            <text:p>ITUMBIARA</text:p>
          </table:table-cell>
          <table:table-cell office:value-type="float" office:value="0.883386397095215" calcext:value-type="float">
            <text:p>0,883386</text:p>
          </table:table-cell>
        </table:table-row>
        <table:table-row table:style-name="ro1">
          <table:table-cell office:value-type="string" calcext:value-type="string">
            <text:p>PAU FERRO</text:p>
          </table:table-cell>
          <table:table-cell office:value-type="string" calcext:value-type="string">
            <text:p>SANTA RITA II</text:p>
          </table:table-cell>
          <table:table-cell office:value-type="float" office:value="0.881533445916871" calcext:value-type="float">
            <text:p>0,881533</text:p>
          </table:table-cell>
        </table:table-row>
        <table:table-row table:style-name="ro1">
          <table:table-cell office:value-type="string" calcext:value-type="string">
            <text:p>CEARA MIRIM 2</text:p>
          </table:table-cell>
          <table:table-cell office:value-type="string" calcext:value-type="string">
            <text:p>TOUROS</text:p>
          </table:table-cell>
          <table:table-cell office:value-type="float" office:value="0.880904975530932" calcext:value-type="float">
            <text:p>0,880905</text:p>
          </table:table-cell>
        </table:table-row>
        <table:table-row table:style-name="ro1">
          <table:table-cell office:value-type="string" calcext:value-type="string">
            <text:p>ARACUAI 2</text:p>
          </table:table-cell>
          <table:table-cell office:value-type="string" calcext:value-type="string">
            <text:p>IRAPE-SE</text:p>
          </table:table-cell>
          <table:table-cell office:value-type="float" office:value="0.879797519732235" calcext:value-type="float">
            <text:p>0,879798</text:p>
          </table:table-cell>
        </table:table-row>
        <table:table-row table:style-name="ro1">
          <table:table-cell office:value-type="string" calcext:value-type="string">
            <text:p>CAPIVARI SUL</text:p>
          </table:table-cell>
          <table:table-cell office:value-type="string" calcext:value-type="string">
            <text:p>VIAMAO 3</text:p>
          </table:table-cell>
          <table:table-cell office:value-type="float" office:value="0.878792975987043" calcext:value-type="float">
            <text:p>0,878793</text:p>
          </table:table-cell>
        </table:table-row>
        <table:table-row table:style-name="ro1">
          <table:table-cell office:value-type="string" calcext:value-type="string">
            <text:p>ALTAMIRA</text:p>
          </table:table-cell>
          <table:table-cell office:value-type="string" calcext:value-type="string">
            <text:p>XINGU</text:p>
          </table:table-cell>
          <table:table-cell office:value-type="float" office:value="0.878551571329753" calcext:value-type="float">
            <text:p>0,878552</text:p>
          </table:table-cell>
        </table:table-row>
        <table:table-row table:style-name="ro1">
          <table:table-cell office:value-type="string" calcext:value-type="string">
            <text:p>PIRIPIRI</text:p>
          </table:table-cell>
          <table:table-cell office:value-type="string" calcext:value-type="string">
            <text:p>TERESINA III</text:p>
          </table:table-cell>
          <table:table-cell office:value-type="float" office:value="0.871041004070237" calcext:value-type="float">
            <text:p>0,871041</text:p>
          </table:table-cell>
        </table:table-row>
        <table:table-row table:style-name="ro1">
          <table:table-cell office:value-type="string" calcext:value-type="string">
            <text:p>NOBRES</text:p>
          </table:table-cell>
          <table:table-cell office:value-type="string" calcext:value-type="string">
            <text:p>SE CUIABA</text:p>
          </table:table-cell>
          <table:table-cell office:value-type="float" office:value="0.869845253718349" calcext:value-type="float">
            <text:p>0,869845</text:p>
          </table:table-cell>
        </table:table-row>
        <table:table-row table:style-name="ro1">
          <table:table-cell office:value-type="string" calcext:value-type="string">
            <text:p>MACAMBARA 3</text:p>
          </table:table-cell>
          <table:table-cell office:value-type="string" calcext:value-type="string">
            <text:p>SANTO ANGELO</text:p>
          </table:table-cell>
          <table:table-cell office:value-type="float" office:value="0.868165670165861" calcext:value-type="float">
            <text:p>0,868166</text:p>
          </table:table-cell>
        </table:table-row>
        <table:table-row table:style-name="ro1">
          <table:table-cell office:value-type="string" calcext:value-type="string">
            <text:p>IBIAPINA II</text:p>
          </table:table-cell>
          <table:table-cell office:value-type="string" calcext:value-type="string">
            <text:p>TIANGUA II</text:p>
          </table:table-cell>
          <table:table-cell office:value-type="float" office:value="0.867076573490615" calcext:value-type="float">
            <text:p>0,867077</text:p>
          </table:table-cell>
        </table:table-row>
        <table:table-row table:style-name="ro1">
          <table:table-cell office:value-type="string" calcext:value-type="string">
            <text:p>ALEGRETE2</text:p>
          </table:table-cell>
          <table:table-cell office:value-type="string" calcext:value-type="string">
            <text:p>LIVRAMENTO 3</text:p>
          </table:table-cell>
          <table:table-cell office:value-type="float" office:value="0.866503563982837" calcext:value-type="float">
            <text:p>0,866504</text:p>
          </table:table-cell>
        </table:table-row>
        <table:table-row table:style-name="ro1">
          <table:table-cell office:value-type="string" calcext:value-type="string">
            <text:p>LARANJAL</text:p>
          </table:table-cell>
          <table:table-cell office:value-type="string" calcext:value-type="string">
            <text:p>MACAPA</text:p>
          </table:table-cell>
          <table:table-cell office:value-type="float" office:value="0.865064249466112" calcext:value-type="float">
            <text:p>0,865064</text:p>
          </table:table-cell>
        </table:table-row>
        <table:table-row table:style-name="ro1">
          <table:table-cell office:value-type="string" calcext:value-type="string">
            <text:p>RIO VERDE FUR</text:p>
          </table:table-cell>
          <table:table-cell office:value-type="string" calcext:value-type="string">
            <text:p>BARRA PEIXE</text:p>
          </table:table-cell>
          <table:table-cell office:value-type="float" office:value="0.863449670505679" calcext:value-type="float">
            <text:p>0,863450</text:p>
          </table:table-cell>
        </table:table-row>
        <table:table-row table:style-name="ro1">
          <table:table-cell office:value-type="string" calcext:value-type="string">
            <text:p>BARRA PEIXE</text:p>
          </table:table-cell>
          <table:table-cell office:value-type="string" calcext:value-type="string">
            <text:p>RONDONOPOLIS</text:p>
          </table:table-cell>
          <table:table-cell office:value-type="float" office:value="0.862289452305359" calcext:value-type="float">
            <text:p>0,862289</text:p>
          </table:table-cell>
        </table:table-row>
        <table:table-row table:style-name="ro1">
          <table:table-cell office:value-type="string" calcext:value-type="string">
            <text:p>B. SANTISTA</text:p>
          </table:table-cell>
          <table:table-cell office:value-type="string" calcext:value-type="string">
            <text:p>PBR CUBATAO</text:p>
          </table:table-cell>
          <table:table-cell office:value-type="float" office:value="0.859098674857592" calcext:value-type="float">
            <text:p>0,859099</text:p>
          </table:table-cell>
        </table:table-row>
        <table:table-row table:style-name="ro1">
          <table:table-cell office:value-type="string" calcext:value-type="string">
            <text:p>BARBACENA 2</text:p>
          </table:table-cell>
          <table:table-cell office:value-type="string" calcext:value-type="string">
            <text:p>LAFAIETE 1</text:p>
          </table:table-cell>
          <table:table-cell office:value-type="float" office:value="0.858819003338099" calcext:value-type="float">
            <text:p>0,858819</text:p>
          </table:table-cell>
        </table:table-row>
        <table:table-row table:style-name="ro1">
          <table:table-cell office:value-type="string" calcext:value-type="string">
            <text:p>B. SANTISTA</text:p>
          </table:table-cell>
          <table:table-cell office:value-type="string" calcext:value-type="string">
            <text:p>CARBOCLORO</text:p>
          </table:table-cell>
          <table:table-cell office:value-type="float" office:value="0.858662851423412" calcext:value-type="float">
            <text:p>0,858663</text:p>
          </table:table-cell>
        </table:table-row>
        <table:table-row table:style-name="ro1">
          <table:table-cell office:value-type="string" calcext:value-type="string">
            <text:p>ACARAU II</text:p>
          </table:table-cell>
          <table:table-cell office:value-type="string" calcext:value-type="string">
            <text:p>ACARAU III</text:p>
          </table:table-cell>
          <table:table-cell office:value-type="float" office:value="0.853047931749332" calcext:value-type="float">
            <text:p>0,853048</text:p>
          </table:table-cell>
        </table:table-row>
        <table:table-row table:style-name="ro1">
          <table:table-cell office:value-type="string" calcext:value-type="string">
            <text:p>FEIJO</text:p>
          </table:table-cell>
          <table:table-cell office:value-type="string" calcext:value-type="string">
            <text:p>RIO BRANCO I</text:p>
          </table:table-cell>
          <table:table-cell office:value-type="float" office:value="0.851856376068452" calcext:value-type="float">
            <text:p>0,851856</text:p>
          </table:table-cell>
        </table:table-row>
        <table:table-row table:style-name="ro1">
          <table:table-cell office:value-type="string" calcext:value-type="string">
            <text:p>GRAVATAI3</text:p>
          </table:table-cell>
          <table:table-cell office:value-type="string" calcext:value-type="string">
            <text:p>OSORIO 3</text:p>
          </table:table-cell>
          <table:table-cell office:value-type="float" office:value="0.85084952945722" calcext:value-type="float">
            <text:p>0,850850</text:p>
          </table:table-cell>
        </table:table-row>
        <table:table-row table:style-name="ro1">
          <table:table-cell office:value-type="string" calcext:value-type="string">
            <text:p>JOAO CAMARA 2</text:p>
          </table:table-cell>
          <table:table-cell office:value-type="string" calcext:value-type="string">
            <text:p>J. CAMARA III</text:p>
          </table:table-cell>
          <table:table-cell office:value-type="float" office:value="0.850382134296407" calcext:value-type="float">
            <text:p>0,850382</text:p>
          </table:table-cell>
        </table:table-row>
        <table:table-row table:style-name="ro1">
          <table:table-cell office:value-type="string" calcext:value-type="string">
            <text:p>CARBOCLORO</text:p>
          </table:table-cell>
          <table:table-cell office:value-type="string" calcext:value-type="string">
            <text:p>H.BORDEN SUB</text:p>
          </table:table-cell>
          <table:table-cell office:value-type="float" office:value="0.849602803105472" calcext:value-type="float">
            <text:p>0,849603</text:p>
          </table:table-cell>
        </table:table-row>
        <table:table-row table:style-name="ro1">
          <table:table-cell office:value-type="string" calcext:value-type="string">
            <text:p>JAGUARUANA II</text:p>
          </table:table-cell>
          <table:table-cell office:value-type="string" calcext:value-type="string">
            <text:p>MOSSORO IV</text:p>
          </table:table-cell>
          <table:table-cell office:value-type="float" office:value="0.847704433304129" calcext:value-type="float">
            <text:p>0,847704</text:p>
          </table:table-cell>
        </table:table-row>
        <table:table-row table:style-name="ro1">
          <table:table-cell office:value-type="string" calcext:value-type="string">
            <text:p>C.GRANDE III</text:p>
          </table:table-cell>
          <table:table-cell office:value-type="string" calcext:value-type="string">
            <text:p>EXTREMOZ II</text:p>
          </table:table-cell>
          <table:table-cell office:value-type="float" office:value="0.846148332927756" calcext:value-type="float">
            <text:p>0,846148</text:p>
          </table:table-cell>
        </table:table-row>
        <table:table-row table:style-name="ro1">
          <table:table-cell office:value-type="string" calcext:value-type="string">
            <text:p>MOGI</text:p>
          </table:table-cell>
          <table:table-cell office:value-type="string" calcext:value-type="string">
            <text:p>MOGI CRUZES</text:p>
          </table:table-cell>
          <table:table-cell office:value-type="float" office:value="0.845053270975928" calcext:value-type="float">
            <text:p>0,845053</text:p>
          </table:table-cell>
        </table:table-row>
        <table:table-row table:style-name="ro1">
          <table:table-cell office:value-type="string" calcext:value-type="string">
            <text:p>IGAPORA III</text:p>
          </table:table-cell>
          <table:table-cell office:value-type="string" calcext:value-type="string">
            <text:p>PINDAI II</text:p>
          </table:table-cell>
          <table:table-cell office:value-type="float" office:value="0.836940066234727" calcext:value-type="float">
            <text:p>0,836940</text:p>
          </table:table-cell>
        </table:table-row>
        <table:table-row table:style-name="ro1">
          <table:table-cell office:value-type="string" calcext:value-type="string">
            <text:p>ANASTACIO</text:p>
          </table:table-cell>
          <table:table-cell office:value-type="string" calcext:value-type="string">
            <text:p>SIDROLANDIA 2</text:p>
          </table:table-cell>
          <table:table-cell office:value-type="float" office:value="0.834653447881784" calcext:value-type="float">
            <text:p>0,834653</text:p>
          </table:table-cell>
        </table:table-row>
        <table:table-row table:style-name="ro1">
          <table:table-cell office:value-type="string" calcext:value-type="string">
            <text:p>POCOES II</text:p>
          </table:table-cell>
          <table:table-cell office:value-type="string" calcext:value-type="string">
            <text:p>POCOES III</text:p>
          </table:table-cell>
          <table:table-cell office:value-type="float" office:value="0.833410298991205" calcext:value-type="float">
            <text:p>0,833410</text:p>
          </table:table-cell>
        </table:table-row>
        <table:table-row table:style-name="ro1">
          <table:table-cell office:value-type="string" calcext:value-type="string">
            <text:p>IBIAPINA II</text:p>
          </table:table-cell>
          <table:table-cell office:value-type="string" calcext:value-type="string">
            <text:p>MARANGATU</text:p>
          </table:table-cell>
          <table:table-cell office:value-type="float" office:value="0.832371856500976" calcext:value-type="float">
            <text:p>0,832372</text:p>
          </table:table-cell>
        </table:table-row>
        <table:table-row table:style-name="ro1">
          <table:table-cell office:value-type="string" calcext:value-type="string">
            <text:p>ARIQUEMES</text:p>
          </table:table-cell>
          <table:table-cell office:value-type="string" calcext:value-type="string">
            <text:p>JI-PARANA</text:p>
          </table:table-cell>
          <table:table-cell office:value-type="float" office:value="0.830518414827306" calcext:value-type="float">
            <text:p>0,830518</text:p>
          </table:table-cell>
        </table:table-row>
        <table:table-row table:style-name="ro1">
          <table:table-cell office:value-type="string" calcext:value-type="string">
            <text:p>BARREIRAS</text:p>
          </table:table-cell>
          <table:table-cell office:value-type="string" calcext:value-type="string">
            <text:p>BARREIRAS II</text:p>
          </table:table-cell>
          <table:table-cell office:value-type="float" office:value="0.829126585003787" calcext:value-type="float">
            <text:p>0,829127</text:p>
          </table:table-cell>
        </table:table-row>
        <table:table-row table:style-name="ro1">
          <table:table-cell office:value-type="string" calcext:value-type="string">
            <text:p>PIMENTA BUENO</text:p>
          </table:table-cell>
          <table:table-cell office:value-type="string" calcext:value-type="string">
            <text:p>VILHENA</text:p>
          </table:table-cell>
          <table:table-cell office:value-type="float" office:value="0.82763643298791" calcext:value-type="float">
            <text:p>0,827636</text:p>
          </table:table-cell>
        </table:table-row>
        <table:table-row table:style-name="ro1">
          <table:table-cell office:value-type="string" calcext:value-type="string">
            <text:p>JAGUARUANA II</text:p>
          </table:table-cell>
          <table:table-cell office:value-type="string" calcext:value-type="string">
            <text:p>RUSSAS II</text:p>
          </table:table-cell>
          <table:table-cell office:value-type="float" office:value="0.827431478854539" calcext:value-type="float">
            <text:p>0,827431</text:p>
          </table:table-cell>
        </table:table-row>
        <table:table-row table:style-name="ro1">
          <table:table-cell office:value-type="string" calcext:value-type="string">
            <text:p>EDGARD SOUZA</text:p>
          </table:table-cell>
          <table:table-cell office:value-type="string" calcext:value-type="string">
            <text:p>PIRITUBA</text:p>
          </table:table-cell>
          <table:table-cell office:value-type="float" office:value="0.824977335344627" calcext:value-type="float">
            <text:p>0,824977</text:p>
          </table:table-cell>
        </table:table-row>
        <table:table-row table:style-name="ro1">
          <table:table-cell office:value-type="string" calcext:value-type="string">
            <text:p>POVO NOVO</text:p>
          </table:table-cell>
          <table:table-cell office:value-type="string" calcext:value-type="string">
            <text:p>QUINTA</text:p>
          </table:table-cell>
          <table:table-cell office:value-type="float" office:value="0.824398647131395" calcext:value-type="float">
            <text:p>0,824399</text:p>
          </table:table-cell>
        </table:table-row>
        <table:table-row table:style-name="ro1">
          <table:table-cell office:value-type="string" calcext:value-type="string">
            <text:p>ARIQUEMES</text:p>
          </table:table-cell>
          <table:table-cell office:value-type="string" calcext:value-type="string">
            <text:p>SAMUEL</text:p>
          </table:table-cell>
          <table:table-cell office:value-type="float" office:value="0.82404012807389" calcext:value-type="float">
            <text:p>0,824040</text:p>
          </table:table-cell>
        </table:table-row>
        <table:table-row table:style-name="ro1">
          <table:table-cell office:value-type="string" calcext:value-type="string">
            <text:p>SUL</text:p>
          </table:table-cell>
          <table:table-cell office:value-type="string" calcext:value-type="string">
            <text:p>S.CAETANO SUL</text:p>
          </table:table-cell>
          <table:table-cell office:value-type="float" office:value="0.819849250636373" calcext:value-type="float">
            <text:p>0,819849</text:p>
          </table:table-cell>
        </table:table-row>
        <table:table-row table:style-name="ro1">
          <table:table-cell office:value-type="string" calcext:value-type="string">
            <text:p>JARDIM</text:p>
          </table:table-cell>
          <table:table-cell office:value-type="string" calcext:value-type="string">
            <text:p>NSA.SRA.SOCORRO</text:p>
          </table:table-cell>
          <table:table-cell office:value-type="float" office:value="0.813840242881706" calcext:value-type="float">
            <text:p>0,813840</text:p>
          </table:table-cell>
        </table:table-row>
        <table:table-row table:style-name="ro1">
          <table:table-cell office:value-type="string" calcext:value-type="string">
            <text:p>FOZ CHAPECO</text:p>
          </table:table-cell>
          <table:table-cell office:value-type="string" calcext:value-type="string">
            <text:p>XANXERE ESU</text:p>
          </table:table-cell>
          <table:table-cell office:value-type="float" office:value="0.81176640645141" calcext:value-type="float">
            <text:p>0,811766</text:p>
          </table:table-cell>
        </table:table-row>
        <table:table-row table:style-name="ro1">
          <table:table-cell office:value-type="string" calcext:value-type="string">
            <text:p>ALEGRETE2</text:p>
          </table:table-cell>
          <table:table-cell office:value-type="string" calcext:value-type="string">
            <text:p>U.URUGUAIANA</text:p>
          </table:table-cell>
          <table:table-cell office:value-type="float" office:value="0.809540829288009" calcext:value-type="float">
            <text:p>0,809541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PINHALZINHO 2</text:p>
          </table:table-cell>
          <table:table-cell office:value-type="float" office:value="0.808836467589179" calcext:value-type="float">
            <text:p>0,808836</text:p>
          </table:table-cell>
        </table:table-row>
        <table:table-row table:style-name="ro1">
          <table:table-cell office:value-type="string" calcext:value-type="string">
            <text:p>LARANJAL</text:p>
          </table:table-cell>
          <table:table-cell office:value-type="string" calcext:value-type="string">
            <text:p>JURUPARI</text:p>
          </table:table-cell>
          <table:table-cell office:value-type="float" office:value="0.808817628195574" calcext:value-type="float">
            <text:p>0,808818</text:p>
          </table:table-cell>
        </table:table-row>
        <table:table-row table:style-name="ro1">
          <table:table-cell office:value-type="string" calcext:value-type="string">
            <text:p>RIO DAS EGUAS</text:p>
          </table:table-cell>
          <table:table-cell office:value-type="string" calcext:value-type="string">
            <text:p>RIO FORMOSO II</text:p>
          </table:table-cell>
          <table:table-cell office:value-type="float" office:value="0.808400742464656" calcext:value-type="float">
            <text:p>0,808401</text:p>
          </table:table-cell>
        </table:table-row>
        <table:table-row table:style-name="ro1">
          <table:table-cell office:value-type="string" calcext:value-type="string">
            <text:p>CRISTIANO ROCHA</text:p>
          </table:table-cell>
          <table:table-cell office:value-type="string" calcext:value-type="string">
            <text:p>LECHUGA</text:p>
          </table:table-cell>
          <table:table-cell office:value-type="float" office:value="0.807058854379863" calcext:value-type="float">
            <text:p>0,807059</text:p>
          </table:table-cell>
        </table:table-row>
        <table:table-row table:style-name="ro1">
          <table:table-cell office:value-type="string" calcext:value-type="string">
            <text:p>GUAMA</text:p>
          </table:table-cell>
          <table:table-cell office:value-type="string" calcext:value-type="string">
            <text:p>VILA DO CONDE</text:p>
          </table:table-cell>
          <table:table-cell office:value-type="float" office:value="0.806146891914573" calcext:value-type="float">
            <text:p>0,806147</text:p>
          </table:table-cell>
        </table:table-row>
        <table:table-row table:style-name="ro1">
          <table:table-cell office:value-type="string" calcext:value-type="string">
            <text:p>MARANGATU</text:p>
          </table:table-cell>
          <table:table-cell office:value-type="string" calcext:value-type="string">
            <text:p>PIRIPIRI</text:p>
          </table:table-cell>
          <table:table-cell office:value-type="float" office:value="0.805659455734677" calcext:value-type="float">
            <text:p>0,805659</text:p>
          </table:table-cell>
        </table:table-row>
        <table:table-row table:style-name="ro1">
          <table:table-cell office:value-type="string" calcext:value-type="string">
            <text:p>S. OSORIO</text:p>
          </table:table-cell>
          <table:table-cell office:value-type="string" calcext:value-type="string">
            <text:p>XANXERE ESU</text:p>
          </table:table-cell>
          <table:table-cell office:value-type="float" office:value="0.805626503963585" calcext:value-type="float">
            <text:p>0,805627</text:p>
          </table:table-cell>
        </table:table-row>
        <table:table-row table:style-name="ro1">
          <table:table-cell office:value-type="string" calcext:value-type="string">
            <text:p>JI-PARANA</text:p>
          </table:table-cell>
          <table:table-cell office:value-type="string" calcext:value-type="string">
            <text:p>PIMENTA BUENO</text:p>
          </table:table-cell>
          <table:table-cell office:value-type="float" office:value="0.801873678658237" calcext:value-type="float">
            <text:p>0,801874</text:p>
          </table:table-cell>
        </table:table-row>
        <table:table-row table:style-name="ro1">
          <table:table-cell office:value-type="string" calcext:value-type="string">
            <text:p>SOBRAL II</text:p>
          </table:table-cell>
          <table:table-cell office:value-type="string" calcext:value-type="string">
            <text:p>SOBRAL III</text:p>
          </table:table-cell>
          <table:table-cell office:value-type="float" office:value="0.801008623630749" calcext:value-type="float">
            <text:p>0,801009</text:p>
          </table:table-cell>
        </table:table-row>
        <table:table-row table:style-name="ro1">
          <table:table-cell office:value-type="string" calcext:value-type="string">
            <text:p>IMBIRUSSU</text:p>
          </table:table-cell>
          <table:table-cell office:value-type="string" calcext:value-type="string">
            <text:p>SIDROLANDIA 2</text:p>
          </table:table-cell>
          <table:table-cell office:value-type="float" office:value="0.79129200826435" calcext:value-type="float">
            <text:p>0,791292</text:p>
          </table:table-cell>
        </table:table-row>
        <table:table-row table:style-name="ro1">
          <table:table-cell office:value-type="string" calcext:value-type="string">
            <text:p>LAGOA NOVA II</text:p>
          </table:table-cell>
          <table:table-cell office:value-type="string" calcext:value-type="string">
            <text:p>PARAISO</text:p>
          </table:table-cell>
          <table:table-cell office:value-type="float" office:value="0.791048370807438" calcext:value-type="float">
            <text:p>0,791048</text:p>
          </table:table-cell>
        </table:table-row>
        <table:table-row table:style-name="ro1">
          <table:table-cell office:value-type="string" calcext:value-type="string">
            <text:p>NOVA STA RITA</text:p>
          </table:table-cell>
          <table:table-cell office:value-type="string" calcext:value-type="string">
            <text:p>PORTO ALEGRE9</text:p>
          </table:table-cell>
          <table:table-cell office:value-type="float" office:value="0.788982600300455" calcext:value-type="float">
            <text:p>0,788983</text:p>
          </table:table-cell>
        </table:table-row>
        <table:table-row table:style-name="ro1">
          <table:table-cell office:value-type="string" calcext:value-type="string">
            <text:p>NOVA STA RITA</text:p>
          </table:table-cell>
          <table:table-cell office:value-type="string" calcext:value-type="string">
            <text:p>P.PETROQUIMIC</text:p>
          </table:table-cell>
          <table:table-cell office:value-type="float" office:value="0.788355048000506" calcext:value-type="float">
            <text:p>0,788355</text:p>
          </table:table-cell>
        </table:table-row>
        <table:table-row table:style-name="ro1">
          <table:table-cell office:value-type="string" calcext:value-type="string">
            <text:p>MESSIAS</text:p>
          </table:table-cell>
          <table:table-cell office:value-type="string" calcext:value-type="string">
            <text:p>MACEIO II</text:p>
          </table:table-cell>
          <table:table-cell office:value-type="float" office:value="0.788333217633494" calcext:value-type="float">
            <text:p>0,788333</text:p>
          </table:table-cell>
        </table:table-row>
        <table:table-row table:style-name="ro1">
          <table:table-cell office:value-type="string" calcext:value-type="string">
            <text:p>N.P.PRIMAVERA</text:p>
          </table:table-cell>
          <table:table-cell office:value-type="string" calcext:value-type="string">
            <text:p>ROSANA</text:p>
          </table:table-cell>
          <table:table-cell office:value-type="float" office:value="0.786887587113052" calcext:value-type="float">
            <text:p>0,786888</text:p>
          </table:table-cell>
        </table:table-row>
        <table:table-row table:style-name="ro1">
          <table:table-cell office:value-type="string" calcext:value-type="string">
            <text:p>CERRO CHATO</text:p>
          </table:table-cell>
          <table:table-cell office:value-type="string" calcext:value-type="string">
            <text:p>LIVRAMENTO 3</text:p>
          </table:table-cell>
          <table:table-cell office:value-type="float" office:value="0.782840806458331" calcext:value-type="float">
            <text:p>0,782841</text:p>
          </table:table-cell>
        </table:table-row>
        <table:table-row table:style-name="ro1">
          <table:table-cell office:value-type="string" calcext:value-type="string">
            <text:p>MARITUBA</text:p>
          </table:table-cell>
          <table:table-cell office:value-type="string" calcext:value-type="string">
            <text:p>UTINGA</text:p>
          </table:table-cell>
          <table:table-cell office:value-type="float" office:value="0.778799935121345" calcext:value-type="float">
            <text:p>0,778800</text:p>
          </table:table-cell>
        </table:table-row>
        <table:table-row table:style-name="ro1">
          <table:table-cell office:value-type="string" calcext:value-type="string">
            <text:p>BANABUIU</text:p>
          </table:table-cell>
          <table:table-cell office:value-type="string" calcext:value-type="string">
            <text:p>RUSSAS II</text:p>
          </table:table-cell>
          <table:table-cell office:value-type="float" office:value="0.778329974146591" calcext:value-type="float">
            <text:p>0,778330</text:p>
          </table:table-cell>
        </table:table-row>
        <table:table-row table:style-name="ro1">
          <table:table-cell office:value-type="string" calcext:value-type="string">
            <text:p>ABDON BATISTA</text:p>
          </table:table-cell>
          <table:table-cell office:value-type="string" calcext:value-type="string">
            <text:p>VIDEIRA</text:p>
          </table:table-cell>
          <table:table-cell office:value-type="float" office:value="0.77742568497636" calcext:value-type="float">
            <text:p>0,777426</text:p>
          </table:table-cell>
        </table:table-row>
        <table:table-row table:style-name="ro1">
          <table:table-cell office:value-type="string" calcext:value-type="string">
            <text:p>RIO CLARO 2</text:p>
          </table:table-cell>
          <table:table-cell office:value-type="string" calcext:value-type="string">
            <text:p>RONDONOPOLIS</text:p>
          </table:table-cell>
          <table:table-cell office:value-type="float" office:value="0.776598598792113" calcext:value-type="float">
            <text:p>0,776599</text:p>
          </table:table-cell>
        </table:table-row>
        <table:table-row table:style-name="ro1">
          <table:table-cell office:value-type="string" calcext:value-type="string">
            <text:p>MACAPA</text:p>
          </table:table-cell>
          <table:table-cell office:value-type="string" calcext:value-type="string">
            <text:p>MACAPA III</text:p>
          </table:table-cell>
          <table:table-cell office:value-type="float" office:value="0.77617628926533" calcext:value-type="float">
            <text:p>0,776176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XANXERE ESU</text:p>
          </table:table-cell>
          <table:table-cell office:value-type="float" office:value="0.767956009931858" calcext:value-type="float">
            <text:p>0,767956</text:p>
          </table:table-cell>
        </table:table-row>
        <table:table-row table:style-name="ro1">
          <table:table-cell office:value-type="string" calcext:value-type="string">
            <text:p>C.GRANDE III</text:p>
          </table:table-cell>
          <table:table-cell office:value-type="string" calcext:value-type="string">
            <text:p>RIACHAO II</text:p>
          </table:table-cell>
          <table:table-cell office:value-type="float" office:value="0.765274515796541" calcext:value-type="float">
            <text:p>0,765275</text:p>
          </table:table-cell>
        </table:table-row>
        <table:table-row table:style-name="ro1">
          <table:table-cell office:value-type="string" calcext:value-type="string">
            <text:p>CANDELARIA 2</text:p>
          </table:table-cell>
          <table:table-cell office:value-type="string" calcext:value-type="string">
            <text:p>NOVA STA RITA</text:p>
          </table:table-cell>
          <table:table-cell office:value-type="float" office:value="0.764707691879379" calcext:value-type="float">
            <text:p>0,764708</text:p>
          </table:table-cell>
        </table:table-row>
        <table:table-row table:style-name="ro1">
          <table:table-cell office:value-type="string" calcext:value-type="string">
            <text:p>C.GRANDE II</text:p>
          </table:table-cell>
          <table:table-cell office:value-type="string" calcext:value-type="string">
            <text:p>PAU FERRO</text:p>
          </table:table-cell>
          <table:table-cell office:value-type="float" office:value="0.761808845626031" calcext:value-type="float">
            <text:p>0,761809</text:p>
          </table:table-cell>
        </table:table-row>
        <table:table-row table:style-name="ro1">
          <table:table-cell office:value-type="string" calcext:value-type="string">
            <text:p>MIRAMAR</text:p>
          </table:table-cell>
          <table:table-cell office:value-type="string" calcext:value-type="string">
            <text:p>UTINGA</text:p>
          </table:table-cell>
          <table:table-cell office:value-type="float" office:value="0.75913926605831" calcext:value-type="float">
            <text:p>0,759139</text:p>
          </table:table-cell>
        </table:table-row>
        <table:table-row table:style-name="ro1">
          <table:table-cell office:value-type="string" calcext:value-type="string">
            <text:p>MESSIAS</text:p>
          </table:table-cell>
          <table:table-cell office:value-type="string" calcext:value-type="string">
            <text:p>RIO LARGO II</text:p>
          </table:table-cell>
          <table:table-cell office:value-type="float" office:value="0.757658957292212" calcext:value-type="float">
            <text:p>0,757659</text:p>
          </table:table-cell>
        </table:table-row>
        <table:table-row table:style-name="ro1">
          <table:table-cell office:value-type="string" calcext:value-type="string">
            <text:p>COXIPO</text:p>
          </table:table-cell>
          <table:table-cell office:value-type="string" calcext:value-type="string">
            <text:p>VARZ.GRANDE 2</text:p>
          </table:table-cell>
          <table:table-cell office:value-type="float" office:value="0.755461616030523" calcext:value-type="float">
            <text:p>0,755462</text:p>
          </table:table-cell>
        </table:table-row>
        <table:table-row table:style-name="ro1">
          <table:table-cell office:value-type="string" calcext:value-type="string">
            <text:p>PIRAPAMA II</text:p>
          </table:table-cell>
          <table:table-cell office:value-type="string" calcext:value-type="string">
            <text:p>SUAPE II</text:p>
          </table:table-cell>
          <table:table-cell office:value-type="float" office:value="0.754986447694971" calcext:value-type="float">
            <text:p>0,754986</text:p>
          </table:table-cell>
        </table:table-row>
        <table:table-row table:style-name="ro1">
          <table:table-cell office:value-type="string" calcext:value-type="string">
            <text:p>PORTO VELHO</text:p>
          </table:table-cell>
          <table:table-cell office:value-type="string" calcext:value-type="string">
            <text:p>SAMUEL</text:p>
          </table:table-cell>
          <table:table-cell office:value-type="float" office:value="0.754407224593897" calcext:value-type="float">
            <text:p>0,754407</text:p>
          </table:table-cell>
        </table:table-row>
        <table:table-row table:style-name="ro1">
          <table:table-cell office:value-type="string" calcext:value-type="string">
            <text:p>ITAJAI 2</text:p>
          </table:table-cell>
          <table:table-cell office:value-type="string" calcext:value-type="string">
            <text:p>ITAJAI</text:p>
          </table:table-cell>
          <table:table-cell office:value-type="float" office:value="0.750151839364259" calcext:value-type="float">
            <text:p>0,750152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FORTALEZA II</text:p>
          </table:table-cell>
          <table:table-cell office:value-type="float" office:value="0.750096851185185" calcext:value-type="float">
            <text:p>0,750097</text:p>
          </table:table-cell>
        </table:table-row>
        <table:table-row table:style-name="ro1">
          <table:table-cell office:value-type="string" calcext:value-type="string">
            <text:p>C.MOURAO</text:p>
          </table:table-cell>
          <table:table-cell office:value-type="string" calcext:value-type="string">
            <text:p>S. OSORIO</text:p>
          </table:table-cell>
          <table:table-cell office:value-type="float" office:value="0.749554635048025" calcext:value-type="float">
            <text:p>0,749555</text:p>
          </table:table-cell>
        </table:table-row>
        <table:table-row table:style-name="ro1">
          <table:table-cell office:value-type="string" calcext:value-type="string">
            <text:p>CRUZEIRO SUL</text:p>
          </table:table-cell>
          <table:table-cell office:value-type="string" calcext:value-type="string">
            <text:p>FEIJO</text:p>
          </table:table-cell>
          <table:table-cell office:value-type="float" office:value="0.749067723105134" calcext:value-type="float">
            <text:p>0,749068</text:p>
          </table:table-cell>
        </table:table-row>
        <table:table-row table:style-name="ro1">
          <table:table-cell office:value-type="string" calcext:value-type="string">
            <text:p>MIGUEL REALE</text:p>
          </table:table-cell>
          <table:table-cell office:value-type="string" calcext:value-type="string">
            <text:p>S.CAETANO SUL</text:p>
          </table:table-cell>
          <table:table-cell office:value-type="float" office:value="0.745610979240582" calcext:value-type="float">
            <text:p>0,745611</text:p>
          </table:table-cell>
        </table:table-row>
        <table:table-row table:style-name="ro1">
          <table:table-cell office:value-type="string" calcext:value-type="string">
            <text:p>CAUIPE</text:p>
          </table:table-cell>
          <table:table-cell office:value-type="string" calcext:value-type="string">
            <text:p>FORTALEZA II</text:p>
          </table:table-cell>
          <table:table-cell office:value-type="float" office:value="0.743440272591764" calcext:value-type="float">
            <text:p>0,743440</text:p>
          </table:table-cell>
        </table:table-row>
        <table:table-row table:style-name="ro1">
          <table:table-cell office:value-type="string" calcext:value-type="string">
            <text:p>SUAPE II</text:p>
          </table:table-cell>
          <table:table-cell office:value-type="string" calcext:value-type="string">
            <text:p>SUAPE III</text:p>
          </table:table-cell>
          <table:table-cell office:value-type="float" office:value="0.742893526941944" calcext:value-type="float">
            <text:p>0,742894</text:p>
          </table:table-cell>
        </table:table-row>
        <table:table-row table:style-name="ro1">
          <table:table-cell office:value-type="string" calcext:value-type="string">
            <text:p>PONTA GROSSA</text:p>
          </table:table-cell>
          <table:table-cell office:value-type="string" calcext:value-type="string">
            <text:p>S.MATEUS SUL</text:p>
          </table:table-cell>
          <table:table-cell office:value-type="float" office:value="0.740008259266136" calcext:value-type="float">
            <text:p>0,740008</text:p>
          </table:table-cell>
        </table:table-row>
        <table:table-row table:style-name="ro1">
          <table:table-cell office:value-type="string" calcext:value-type="string">
            <text:p>MACAMBARA</text:p>
          </table:table-cell>
          <table:table-cell office:value-type="string" calcext:value-type="string">
            <text:p>U.URUGUAIANA</text:p>
          </table:table-cell>
          <table:table-cell office:value-type="float" office:value="0.738524383057257" calcext:value-type="float">
            <text:p>0,738524</text:p>
          </table:table-cell>
        </table:table-row>
        <table:table-row table:style-name="ro1">
          <table:table-cell office:value-type="string" calcext:value-type="string">
            <text:p>CANARANA</text:p>
          </table:table-cell>
          <table:table-cell office:value-type="string" calcext:value-type="string">
            <text:p>PARANATINGA</text:p>
          </table:table-cell>
          <table:table-cell office:value-type="float" office:value="0.737596328847877" calcext:value-type="float">
            <text:p>0,737596</text:p>
          </table:table-cell>
        </table:table-row>
        <table:table-row table:style-name="ro1">
          <table:table-cell office:value-type="string" calcext:value-type="string">
            <text:p>C.PORTO VELHO</text:p>
          </table:table-cell>
          <table:table-cell office:value-type="string" calcext:value-type="string">
            <text:p>PORTO VELHO</text:p>
          </table:table-cell>
          <table:table-cell office:value-type="float" office:value="0.736151388153815" calcext:value-type="float">
            <text:p>0,736151</text:p>
          </table:table-cell>
        </table:table-row>
        <table:table-row table:style-name="ro1">
          <table:table-cell office:value-type="string" calcext:value-type="string">
            <text:p>CRISTIANO ROCHA</text:p>
          </table:table-cell>
          <table:table-cell office:value-type="string" calcext:value-type="string">
            <text:p>PR.FIGUEIREDO</text:p>
          </table:table-cell>
          <table:table-cell office:value-type="float" office:value="0.73555284653543" calcext:value-type="float">
            <text:p>0,735553</text:p>
          </table:table-cell>
        </table:table-row>
        <table:table-row table:style-name="ro1">
          <table:table-cell office:value-type="string" calcext:value-type="string">
            <text:p>MIRUEIRA II</text:p>
          </table:table-cell>
          <table:table-cell office:value-type="string" calcext:value-type="string">
            <text:p>PAU FERRO</text:p>
          </table:table-cell>
          <table:table-cell office:value-type="float" office:value="0.732258825354369" calcext:value-type="float">
            <text:p>0,732259</text:p>
          </table:table-cell>
        </table:table-row>
        <table:table-row table:style-name="ro1">
          <table:table-cell office:value-type="string" calcext:value-type="string">
            <text:p>PRE.MEDICI</text:p>
          </table:table-cell>
          <table:table-cell office:value-type="string" calcext:value-type="string">
            <text:p>SANTA CRUZ1</text:p>
          </table:table-cell>
          <table:table-cell office:value-type="float" office:value="0.730684255255202" calcext:value-type="float">
            <text:p>0,730684</text:p>
          </table:table-cell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MANAUS</text:p>
          </table:table-cell>
          <table:table-cell office:value-type="float" office:value="0.729735755700697" calcext:value-type="float">
            <text:p>0,729736</text:p>
          </table:table-cell>
        </table:table-row>
        <table:table-row table:style-name="ro1">
          <table:table-cell office:value-type="string" calcext:value-type="string">
            <text:p>CAXIAS NORTE</text:p>
          </table:table-cell>
          <table:table-cell office:value-type="string" calcext:value-type="string">
            <text:p>MONTE CLARO</text:p>
          </table:table-cell>
          <table:table-cell office:value-type="float" office:value="0.729203141180868" calcext:value-type="float">
            <text:p>0,729203</text:p>
          </table:table-cell>
        </table:table-row>
        <table:table-row table:style-name="ro1">
          <table:table-cell office:value-type="string" calcext:value-type="string">
            <text:p>S.MATEUS SUL</text:p>
          </table:table-cell>
          <table:table-cell office:value-type="string" calcext:value-type="string">
            <text:p>U.VITORIA NORTE</text:p>
          </table:table-cell>
          <table:table-cell office:value-type="float" office:value="0.726923929910697" calcext:value-type="float">
            <text:p>0,726924</text:p>
          </table:table-cell>
        </table:table-row>
        <table:table-row table:style-name="ro1">
          <table:table-cell office:value-type="string" calcext:value-type="string">
            <text:p>CAXIAS NORTE</text:p>
          </table:table-cell>
          <table:table-cell office:value-type="string" calcext:value-type="string">
            <text:p>VINHEDOS</text:p>
          </table:table-cell>
          <table:table-cell office:value-type="float" office:value="0.724594083580625" calcext:value-type="float">
            <text:p>0,724594</text:p>
          </table:table-cell>
        </table:table-row>
        <table:table-row table:style-name="ro1">
          <table:table-cell office:value-type="string" calcext:value-type="string">
            <text:p>CAXIAS NORTE</text:p>
          </table:table-cell>
          <table:table-cell office:value-type="string" calcext:value-type="string">
            <text:p>CAXIAS 6</text:p>
          </table:table-cell>
          <table:table-cell office:value-type="float" office:value="0.723658298303284" calcext:value-type="float">
            <text:p>0,723658</text:p>
          </table:table-cell>
        </table:table-row>
        <table:table-row table:style-name="ro1">
          <table:table-cell office:value-type="string" calcext:value-type="string">
            <text:p>ANGELIM</text:p>
          </table:table-cell>
          <table:table-cell office:value-type="string" calcext:value-type="string">
            <text:p>GARANHUNS II</text:p>
          </table:table-cell>
          <table:table-cell office:value-type="float" office:value="0.72214927590628" calcext:value-type="float">
            <text:p>0,722149</text:p>
          </table:table-cell>
        </table:table-row>
        <table:table-row table:style-name="ro1">
          <table:table-cell office:value-type="string" calcext:value-type="string">
            <text:p>LAGOA DO CARRO</text:p>
          </table:table-cell>
          <table:table-cell office:value-type="string" calcext:value-type="string">
            <text:p>COTEMINAS</text:p>
          </table:table-cell>
          <table:table-cell office:value-type="float" office:value="0.718680650938299" calcext:value-type="float">
            <text:p>0,718681</text:p>
          </table:table-cell>
        </table:table-row>
        <table:table-row table:style-name="ro1">
          <table:table-cell office:value-type="string" calcext:value-type="string">
            <text:p>ITAUBA</text:p>
          </table:table-cell>
          <table:table-cell office:value-type="string" calcext:value-type="string">
            <text:p>P.PETROQUIMIC</text:p>
          </table:table-cell>
          <table:table-cell office:value-type="float" office:value="0.717888150683322" calcext:value-type="float">
            <text:p>0,717888</text:p>
          </table:table-cell>
        </table:table-row>
        <table:table-row table:style-name="ro1">
          <table:table-cell office:value-type="string" calcext:value-type="string">
            <text:p>FORTALEZA II</text:p>
          </table:table-cell>
          <table:table-cell office:value-type="string" calcext:value-type="string">
            <text:p>MARACANAU II</text:p>
          </table:table-cell>
          <table:table-cell office:value-type="float" office:value="0.717683932610097" calcext:value-type="float">
            <text:p>0,717684</text:p>
          </table:table-cell>
        </table:table-row>
        <table:table-row table:style-name="ro1">
          <table:table-cell office:value-type="string" calcext:value-type="string">
            <text:p>LAGOA DO CARRO</text:p>
          </table:table-cell>
          <table:table-cell office:value-type="string" calcext:value-type="string">
            <text:p>PAU FERRO</text:p>
          </table:table-cell>
          <table:table-cell office:value-type="float" office:value="0.717061990452523" calcext:value-type="float">
            <text:p>0,717062</text:p>
          </table:table-cell>
        </table:table-row>
        <table:table-row table:style-name="ro1">
          <table:table-cell office:value-type="string" calcext:value-type="string">
            <text:p>PATO BRANCO</text:p>
          </table:table-cell>
          <table:table-cell office:value-type="string" calcext:value-type="string">
            <text:p>XANXERE ESU</text:p>
          </table:table-cell>
          <table:table-cell office:value-type="float" office:value="0.716842557978272" calcext:value-type="float">
            <text:p>0,716843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string" calcext:value-type="string">
            <text:p>JAGUARIAIVA</text:p>
          </table:table-cell>
          <table:table-cell office:value-type="float" office:value="0.716103355566249" calcext:value-type="float">
            <text:p>0,716103</text:p>
          </table:table-cell>
        </table:table-row>
        <table:table-row table:style-name="ro1">
          <table:table-cell office:value-type="string" calcext:value-type="string">
            <text:p>EXTREMOZ II</text:p>
          </table:table-cell>
          <table:table-cell office:value-type="string" calcext:value-type="string">
            <text:p>NATAL III</text:p>
          </table:table-cell>
          <table:table-cell office:value-type="float" office:value="0.713468804398137" calcext:value-type="float">
            <text:p>0,713469</text:p>
          </table:table-cell>
        </table:table-row>
        <table:table-row table:style-name="ro1">
          <table:table-cell office:value-type="string" calcext:value-type="string">
            <text:p>SE BALBINA</text:p>
          </table:table-cell>
          <table:table-cell office:value-type="string" calcext:value-type="string">
            <text:p>PR.FIGUEIREDO</text:p>
          </table:table-cell>
          <table:table-cell office:value-type="float" office:value="0.710234755032011" calcext:value-type="float">
            <text:p>0,710235</text:p>
          </table:table-cell>
        </table:table-row>
        <table:table-row table:style-name="ro1">
          <table:table-cell office:value-type="string" calcext:value-type="string">
            <text:p>NATAL III</text:p>
          </table:table-cell>
          <table:table-cell office:value-type="string" calcext:value-type="string">
            <text:p>NATAL II</text:p>
          </table:table-cell>
          <table:table-cell office:value-type="float" office:value="0.709922456055152" calcext:value-type="float">
            <text:p>0,709922</text:p>
          </table:table-cell>
        </table:table-row>
        <table:table-row table:style-name="ro1">
          <table:table-cell office:value-type="string" calcext:value-type="string">
            <text:p>CAMACARI II</text:p>
          </table:table-cell>
          <table:table-cell office:value-type="string" calcext:value-type="string">
            <text:p>COTEGIPE</text:p>
          </table:table-cell>
          <table:table-cell office:value-type="float" office:value="0.70896714545907" calcext:value-type="float">
            <text:p>0,708967</text:p>
          </table:table-cell>
        </table:table-row>
        <table:table-row table:style-name="ro1">
          <table:table-cell office:value-type="string" calcext:value-type="string">
            <text:p>RUROPOLIS</text:p>
          </table:table-cell>
          <table:table-cell office:value-type="string" calcext:value-type="string">
            <text:p>TRANSAMAZONIC</text:p>
          </table:table-cell>
          <table:table-cell office:value-type="float" office:value="0.706550216588563" calcext:value-type="float">
            <text:p>0,706550</text:p>
          </table:table-cell>
        </table:table-row>
        <table:table-row table:style-name="ro1">
          <table:table-cell office:value-type="string" calcext:value-type="string">
            <text:p>BAIXO IGUACU</text:p>
          </table:table-cell>
          <table:table-cell office:value-type="string" calcext:value-type="string">
            <text:p>CASCAVEL OEST</text:p>
          </table:table-cell>
          <table:table-cell office:value-type="float" office:value="0.705764426821786" calcext:value-type="float">
            <text:p>0,705764</text:p>
          </table:table-cell>
        </table:table-row>
        <table:table-row table:style-name="ro1">
          <table:table-cell office:value-type="string" calcext:value-type="string">
            <text:p>CAMAQUA</text:p>
          </table:table-cell>
          <table:table-cell office:value-type="string" calcext:value-type="string">
            <text:p>PRE.MEDICI</text:p>
          </table:table-cell>
          <table:table-cell office:value-type="float" office:value="0.704683165845649" calcext:value-type="float">
            <text:p>0,704683</text:p>
          </table:table-cell>
        </table:table-row>
        <table:table-row table:style-name="ro1">
          <table:table-cell office:value-type="string" calcext:value-type="string">
            <text:p>CABREUVA</text:p>
          </table:table-cell>
          <table:table-cell office:value-type="string" calcext:value-type="string">
            <text:p>EDGARD SOUZA</text:p>
          </table:table-cell>
          <table:table-cell office:value-type="float" office:value="0.700856362860004" calcext:value-type="float">
            <text:p>0,700856</text:p>
          </table:table-cell>
        </table:table-row>
        <table:table-row table:style-name="ro1">
          <table:table-cell office:value-type="string" calcext:value-type="string">
            <text:p>PELOTAS3</text:p>
          </table:table-cell>
          <table:table-cell office:value-type="string" calcext:value-type="string">
            <text:p>PRE.MEDICI</text:p>
          </table:table-cell>
          <table:table-cell office:value-type="float" office:value="0.699220881694578" calcext:value-type="float">
            <text:p>0,699221</text:p>
          </table:table-cell>
        </table:table-row>
        <table:table-row table:style-name="ro1">
          <table:table-cell office:value-type="string" calcext:value-type="string">
            <text:p>CENTRO-CTT</text:p>
          </table:table-cell>
          <table:table-cell office:value-type="string" calcext:value-type="string">
            <text:p>CENTRO-CTR</text:p>
          </table:table-cell>
          <table:table-cell office:value-type="float" office:value="0.699101236728546" calcext:value-type="float">
            <text:p>0,699101</text:p>
          </table:table-cell>
        </table:table-row>
        <table:table-row table:style-name="ro1">
          <table:table-cell office:value-type="string" calcext:value-type="string">
            <text:p>SANT. ARAGUAIA</text:p>
          </table:table-cell>
          <table:table-cell office:value-type="string" calcext:value-type="string">
            <text:p>XINGUARA 2</text:p>
          </table:table-cell>
          <table:table-cell office:value-type="float" office:value="0.693004782112306" calcext:value-type="float">
            <text:p>0,693005</text:p>
          </table:table-cell>
        </table:table-row>
        <table:table-row table:style-name="ro1">
          <table:table-cell office:value-type="string" calcext:value-type="string">
            <text:p>CAXIAS NORTE</text:p>
          </table:table-cell>
          <table:table-cell office:value-type="string" calcext:value-type="string">
            <text:p>ITA</text:p>
          </table:table-cell>
          <table:table-cell office:value-type="float" office:value="0.691146933961914" calcext:value-type="float">
            <text:p>0,691147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string" calcext:value-type="string">
            <text:p>PIRAJA</text:p>
          </table:table-cell>
          <table:table-cell office:value-type="float" office:value="0.687311115662632" calcext:value-type="float">
            <text:p>0,687311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string" calcext:value-type="string">
            <text:p>PITUACU</text:p>
          </table:table-cell>
          <table:table-cell office:value-type="float" office:value="0.687009916873704" calcext:value-type="float">
            <text:p>0,687010</text:p>
          </table:table-cell>
        </table:table-row>
        <table:table-row table:style-name="ro1">
          <table:table-cell office:value-type="string" calcext:value-type="string">
            <text:p>PONTA GROSSA</text:p>
          </table:table-cell>
          <table:table-cell office:value-type="string" calcext:value-type="string">
            <text:p>PONTA G SUL</text:p>
          </table:table-cell>
          <table:table-cell office:value-type="float" office:value="0.685905947136641" calcext:value-type="float">
            <text:p>0,685906</text:p>
          </table:table-cell>
        </table:table-row>
        <table:table-row table:style-name="ro1">
          <table:table-cell office:value-type="string" calcext:value-type="string">
            <text:p>GASPAR 2</text:p>
          </table:table-cell>
          <table:table-cell office:value-type="string" calcext:value-type="string">
            <text:p>INDAIAL</text:p>
          </table:table-cell>
          <table:table-cell office:value-type="float" office:value="0.683142356921439" calcext:value-type="float">
            <text:p>0,683142</text:p>
          </table:table-cell>
        </table:table-row>
        <table:table-row table:style-name="ro1">
          <table:table-cell office:value-type="string" calcext:value-type="string">
            <text:p>PITUACU</text:p>
          </table:table-cell>
          <table:table-cell office:value-type="string" calcext:value-type="string">
            <text:p>NARANDIBA</text:p>
          </table:table-cell>
          <table:table-cell office:value-type="float" office:value="0.675042239555662" calcext:value-type="float">
            <text:p>0,675042</text:p>
          </table:table-cell>
        </table:table-row>
        <table:table-row table:style-name="ro1">
          <table:table-cell office:value-type="string" calcext:value-type="string">
            <text:p>MISSOES</text:p>
          </table:table-cell>
          <table:table-cell office:value-type="string" calcext:value-type="string">
            <text:p>SAO BORJA2</text:p>
          </table:table-cell>
          <table:table-cell office:value-type="float" office:value="0.674448766225591" calcext:value-type="float">
            <text:p>0,674449</text:p>
          </table:table-cell>
        </table:table-row>
        <table:table-row table:style-name="ro1">
          <table:table-cell office:value-type="string" calcext:value-type="string">
            <text:p>SAO LUIS II</text:p>
          </table:table-cell>
          <table:table-cell office:value-type="string" calcext:value-type="string">
            <text:p>SAO LUIS I</text:p>
          </table:table-cell>
          <table:table-cell office:value-type="float" office:value="0.67444868458928" calcext:value-type="float">
            <text:p>0,674449</text:p>
          </table:table-cell>
        </table:table-row>
        <table:table-row table:style-name="ro1">
          <table:table-cell office:value-type="string" calcext:value-type="string">
            <text:p>ARCOVERDE II</text:p>
          </table:table-cell>
          <table:table-cell office:value-type="string" calcext:value-type="string">
            <text:p>GARANHUNS II</text:p>
          </table:table-cell>
          <table:table-cell office:value-type="float" office:value="0.674055002729466" calcext:value-type="float">
            <text:p>0,674055</text:p>
          </table:table-cell>
        </table:table-row>
        <table:table-row table:style-name="ro1">
          <table:table-cell office:value-type="string" calcext:value-type="string">
            <text:p>P.AFONSO III</text:p>
          </table:table-cell>
          <table:table-cell office:value-type="string" calcext:value-type="string">
            <text:p>BOM NOME</text:p>
          </table:table-cell>
          <table:table-cell office:value-type="float" office:value="0.673816897825116" calcext:value-type="float">
            <text:p>0,673817</text:p>
          </table:table-cell>
        </table:table-row>
        <table:table-row table:style-name="ro1">
          <table:table-cell office:value-type="string" calcext:value-type="string">
            <text:p>TAPAJOS II</text:p>
          </table:table-cell>
          <table:table-cell office:value-type="string" calcext:value-type="string">
            <text:p>TRANSAMAZONIC</text:p>
          </table:table-cell>
          <table:table-cell office:value-type="float" office:value="0.672809589796542" calcext:value-type="float">
            <text:p>0,672810</text:p>
          </table:table-cell>
        </table:table-row>
        <table:table-row table:style-name="ro1">
          <table:table-cell office:value-type="string" calcext:value-type="string">
            <text:p>CRATO II</text:p>
          </table:table-cell>
          <table:table-cell office:value-type="string" calcext:value-type="string">
            <text:p>TAUA II</text:p>
          </table:table-cell>
          <table:table-cell office:value-type="float" office:value="0.672545950467585" calcext:value-type="float">
            <text:p>0,672546</text:p>
          </table:table-cell>
        </table:table-row>
        <table:table-row table:style-name="ro1">
          <table:table-cell office:value-type="string" calcext:value-type="string">
            <text:p>BIGUACU</text:p>
          </table:table-cell>
          <table:table-cell office:value-type="string" calcext:value-type="string">
            <text:p>RATONES</text:p>
          </table:table-cell>
          <table:table-cell office:value-type="float" office:value="0.671551293591181" calcext:value-type="float">
            <text:p>0,671551</text:p>
          </table:table-cell>
        </table:table-row>
        <table:table-row table:style-name="ro1">
          <table:table-cell office:value-type="string" calcext:value-type="string">
            <text:p>LONDRINA ESU</text:p>
          </table:table-cell>
          <table:table-cell office:value-type="string" calcext:value-type="string">
            <text:p>LONDRINA COT</text:p>
          </table:table-cell>
          <table:table-cell office:value-type="float" office:value="0.671503263085903" calcext:value-type="float">
            <text:p>0,671503</text:p>
          </table:table-cell>
        </table:table-row>
        <table:table-row table:style-name="ro1">
          <table:table-cell office:value-type="string" calcext:value-type="string">
            <text:p>GUAIRA</text:p>
          </table:table-cell>
          <table:table-cell office:value-type="string" calcext:value-type="string">
            <text:p>UMUARAMA SUL</text:p>
          </table:table-cell>
          <table:table-cell office:value-type="float" office:value="0.670160198795265" calcext:value-type="float">
            <text:p>0,670160</text:p>
          </table:table-cell>
        </table:table-row>
        <table:table-row table:style-name="ro1">
          <table:table-cell office:value-type="string" calcext:value-type="string">
            <text:p>CASTRO NORTE</text:p>
          </table:table-cell>
          <table:table-cell office:value-type="string" calcext:value-type="string">
            <text:p>KLABIN CELULOSE</text:p>
          </table:table-cell>
          <table:table-cell office:value-type="float" office:value="0.667690890908963" calcext:value-type="float">
            <text:p>0,667691</text:p>
          </table:table-cell>
        </table:table-row>
        <table:table-row table:style-name="ro1">
          <table:table-cell office:value-type="string" calcext:value-type="string">
            <text:p>ABDON BATISTA</text:p>
          </table:table-cell>
          <table:table-cell office:value-type="string" calcext:value-type="string">
            <text:p>LAGES</text:p>
          </table:table-cell>
          <table:table-cell office:value-type="float" office:value="0.665908431801182" calcext:value-type="float">
            <text:p>0,665908</text:p>
          </table:table-cell>
        </table:table-row>
        <table:table-row table:style-name="ro1">
          <table:table-cell office:value-type="string" calcext:value-type="string">
            <text:p>CASCAVEL NORT</text:p>
          </table:table-cell>
          <table:table-cell office:value-type="string" calcext:value-type="string">
            <text:p>UMUARAMA SUL</text:p>
          </table:table-cell>
          <table:table-cell office:value-type="float" office:value="0.663915602651357" calcext:value-type="float">
            <text:p>0,663916</text:p>
          </table:table-cell>
        </table:table-row>
        <table:table-row table:style-name="ro1">
          <table:table-cell office:value-type="string" calcext:value-type="string">
            <text:p>SAO LUIS II</text:p>
          </table:table-cell>
          <table:table-cell office:value-type="string" calcext:value-type="string">
            <text:p>SAO LUIS III</text:p>
          </table:table-cell>
          <table:table-cell office:value-type="float" office:value="0.663705388843264" calcext:value-type="float">
            <text:p>0,663705</text:p>
          </table:table-cell>
        </table:table-row>
        <table:table-row table:style-name="ro1">
          <table:table-cell office:value-type="string" calcext:value-type="string">
            <text:p>INDAIAL</text:p>
          </table:table-cell>
          <table:table-cell office:value-type="string" calcext:value-type="string">
            <text:p>RIO DO SUL</text:p>
          </table:table-cell>
          <table:table-cell office:value-type="float" office:value="0.663696266648484" calcext:value-type="float">
            <text:p>0,663696</text:p>
          </table:table-cell>
        </table:table-row>
        <table:table-row table:style-name="ro1">
          <table:table-cell office:value-type="string" calcext:value-type="string">
            <text:p>PRE.MEDICI</text:p>
          </table:table-cell>
          <table:table-cell office:value-type="string" calcext:value-type="string">
            <text:p>QUINTA</text:p>
          </table:table-cell>
          <table:table-cell office:value-type="float" office:value="0.660505178041035" calcext:value-type="float">
            <text:p>0,660505</text:p>
          </table:table-cell>
        </table:table-row>
        <table:table-row table:style-name="ro1">
          <table:table-cell office:value-type="string" calcext:value-type="string">
            <text:p>JAGUARIAIVA</text:p>
          </table:table-cell>
          <table:table-cell office:value-type="string" calcext:value-type="string">
            <text:p>SE.MAUA</text:p>
          </table:table-cell>
          <table:table-cell office:value-type="float" office:value="0.660268579088793" calcext:value-type="float">
            <text:p>0,660269</text:p>
          </table:table-cell>
        </table:table-row>
        <table:table-row table:style-name="ro1">
          <table:table-cell office:value-type="string" calcext:value-type="string">
            <text:p>PIRATININGA</text:p>
          </table:table-cell>
          <table:table-cell office:value-type="string" calcext:value-type="string">
            <text:p>INTERLAGOS</text:p>
          </table:table-cell>
          <table:table-cell office:value-type="float" office:value="0.658908448241113" calcext:value-type="float">
            <text:p>0,658908</text:p>
          </table:table-cell>
        </table:table-row>
        <table:table-row table:style-name="ro1">
          <table:table-cell office:value-type="string" calcext:value-type="string">
            <text:p>BAGE2</text:p>
          </table:table-cell>
          <table:table-cell office:value-type="string" calcext:value-type="string">
            <text:p>LIVRAMENTO 2</text:p>
          </table:table-cell>
          <table:table-cell office:value-type="float" office:value="0.658811130309614" calcext:value-type="float">
            <text:p>0,658811</text:p>
          </table:table-cell>
        </table:table-row>
        <table:table-row table:style-name="ro1">
          <table:table-cell office:value-type="string" calcext:value-type="string">
            <text:p>JURUTI</text:p>
          </table:table-cell>
          <table:table-cell office:value-type="string" calcext:value-type="string">
            <text:p>ORIXIMINA</text:p>
          </table:table-cell>
          <table:table-cell office:value-type="float" office:value="0.658612988986426" calcext:value-type="float">
            <text:p>0,658613</text:p>
          </table:table-cell>
        </table:table-row>
        <table:table-row table:style-name="ro1">
          <table:table-cell office:value-type="string" calcext:value-type="string">
            <text:p>GUARAPUAVA OEST</text:p>
          </table:table-cell>
          <table:table-cell office:value-type="string" calcext:value-type="string">
            <text:p>IRATI NORTE</text:p>
          </table:table-cell>
          <table:table-cell office:value-type="float" office:value="0.657978712573265" calcext:value-type="float">
            <text:p>0,657979</text:p>
          </table:table-cell>
        </table:table-row>
        <table:table-row table:style-name="ro1">
          <table:table-cell office:value-type="string" calcext:value-type="string">
            <text:p>CERQUILHO III</text:p>
          </table:table-cell>
          <table:table-cell office:value-type="string" calcext:value-type="string">
            <text:p>TOYOTA</text:p>
          </table:table-cell>
          <table:table-cell office:value-type="float" office:value="0.657264570496274" calcext:value-type="float">
            <text:p>0,657265</text:p>
          </table:table-cell>
        </table:table-row>
        <table:table-row table:style-name="ro1">
          <table:table-cell office:value-type="string" calcext:value-type="string">
            <text:p>LONDRINA ESU</text:p>
          </table:table-cell>
          <table:table-cell office:value-type="string" calcext:value-type="string">
            <text:p>LONDRINA SUL</text:p>
          </table:table-cell>
          <table:table-cell office:value-type="float" office:value="0.653627400753728" calcext:value-type="float">
            <text:p>0,653627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PAR.PAULISTA2</text:p>
          </table:table-cell>
          <table:table-cell office:value-type="float" office:value="0.653619528866489" calcext:value-type="float">
            <text:p>0,653620</text:p>
          </table:table-cell>
        </table:table-row>
        <table:table-row table:style-name="ro1">
          <table:table-cell office:value-type="string" calcext:value-type="string">
            <text:p>FIRMINOPOLIS</text:p>
          </table:table-cell>
          <table:table-cell office:value-type="string" calcext:value-type="string">
            <text:p>TRINDADE</text:p>
          </table:table-cell>
          <table:table-cell office:value-type="float" office:value="0.653010542745947" calcext:value-type="float">
            <text:p>0,653011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office:value-type="string" calcext:value-type="string">
            <text:p>C. DOURADA</text:p>
          </table:table-cell>
          <table:table-cell office:value-type="float" office:value="0.652272703798613" calcext:value-type="float">
            <text:p>0,652273</text:p>
          </table:table-cell>
        </table:table-row>
        <table:table-row table:style-name="ro1">
          <table:table-cell office:value-type="string" calcext:value-type="string">
            <text:p>G.VALADARES 6</text:p>
          </table:table-cell>
          <table:table-cell office:value-type="string" calcext:value-type="string">
            <text:p>CONSE. PENA</text:p>
          </table:table-cell>
          <table:table-cell office:value-type="float" office:value="0.652244343207615" calcext:value-type="float">
            <text:p>0,652244</text:p>
          </table:table-cell>
        </table:table-row>
        <table:table-row table:style-name="ro1">
          <table:table-cell office:value-type="string" calcext:value-type="string">
            <text:p>G.VALADARES 6</text:p>
          </table:table-cell>
          <table:table-cell office:value-type="string" calcext:value-type="string">
            <text:p>G.VALADARES 2</text:p>
          </table:table-cell>
          <table:table-cell office:value-type="float" office:value="0.651087542409491" calcext:value-type="float">
            <text:p>0,651088</text:p>
          </table:table-cell>
        </table:table-row>
        <table:table-row table:style-name="ro1">
          <table:table-cell office:value-type="string" calcext:value-type="string">
            <text:p>EDGARD SOUZA</text:p>
          </table:table-cell>
          <table:table-cell office:value-type="string" calcext:value-type="string">
            <text:p>TOYOTA</text:p>
          </table:table-cell>
          <table:table-cell office:value-type="float" office:value="0.65068624259432" calcext:value-type="float">
            <text:p>0,650686</text:p>
          </table:table-cell>
        </table:table-row>
        <table:table-row table:style-name="ro1">
          <table:table-cell office:value-type="string" calcext:value-type="string">
            <text:p>AQUIRAZ II</text:p>
          </table:table-cell>
          <table:table-cell office:value-type="string" calcext:value-type="string">
            <text:p>BANABUIU</text:p>
          </table:table-cell>
          <table:table-cell office:value-type="float" office:value="0.650668470093592" calcext:value-type="float">
            <text:p>0,650668</text:p>
          </table:table-cell>
        </table:table-row>
        <table:table-row table:style-name="ro1">
          <table:table-cell office:value-type="string" calcext:value-type="string">
            <text:p>APUCARANA</text:p>
          </table:table-cell>
          <table:table-cell office:value-type="string" calcext:value-type="string">
            <text:p>LONDRINA SUL</text:p>
          </table:table-cell>
          <table:table-cell office:value-type="float" office:value="0.650177657616877" calcext:value-type="float">
            <text:p>0,650178</text:p>
          </table:table-cell>
        </table:table-row>
        <table:table-row table:style-name="ro1">
          <table:table-cell office:value-type="string" calcext:value-type="string">
            <text:p>MISSOES</text:p>
          </table:table-cell>
          <table:table-cell office:value-type="string" calcext:value-type="string">
            <text:p>SANTO ANGELO</text:p>
          </table:table-cell>
          <table:table-cell office:value-type="float" office:value="0.649939067547472" calcext:value-type="float">
            <text:p>0,649939</text:p>
          </table:table-cell>
        </table:table-row>
        <table:table-row table:style-name="ro1">
          <table:table-cell office:value-type="string" calcext:value-type="string">
            <text:p>ENCRUZO NOVO</text:p>
          </table:table-cell>
          <table:table-cell office:value-type="string" calcext:value-type="string">
            <text:p>MIRANDA II</text:p>
          </table:table-cell>
          <table:table-cell office:value-type="float" office:value="0.649561155698429" calcext:value-type="float">
            <text:p>0,649561</text:p>
          </table:table-cell>
        </table:table-row>
        <table:table-row table:style-name="ro1">
          <table:table-cell office:value-type="string" calcext:value-type="string">
            <text:p>ANDIRA LESTE</text:p>
          </table:table-cell>
          <table:table-cell office:value-type="string" calcext:value-type="string">
            <text:p>ASSIS</text:p>
          </table:table-cell>
          <table:table-cell office:value-type="float" office:value="0.648659757127348" calcext:value-type="float">
            <text:p>0,648660</text:p>
          </table:table-cell>
        </table:table-row>
        <table:table-row table:style-name="ro1">
          <table:table-cell office:value-type="string" calcext:value-type="string">
            <text:p>INTEGRADORA</text:p>
          </table:table-cell>
          <table:table-cell office:value-type="string" calcext:value-type="string">
            <text:p>ONCA PUMA</text:p>
          </table:table-cell>
          <table:table-cell office:value-type="float" office:value="0.647868871117035" calcext:value-type="float">
            <text:p>0,647869</text:p>
          </table:table-cell>
        </table:table-row>
        <table:table-row table:style-name="ro1">
          <table:table-cell office:value-type="string" calcext:value-type="string">
            <text:p>AREIA</text:p>
          </table:table-cell>
          <table:table-cell office:value-type="string" calcext:value-type="string">
            <text:p>GUARAPUAVA OEST</text:p>
          </table:table-cell>
          <table:table-cell office:value-type="float" office:value="0.646929202558157" calcext:value-type="float">
            <text:p>0,646929</text:p>
          </table:table-cell>
        </table:table-row>
        <table:table-row table:style-name="ro1">
          <table:table-cell office:value-type="string" calcext:value-type="string">
            <text:p>GRALHA AZUL</text:p>
          </table:table-cell>
          <table:table-cell office:value-type="string" calcext:value-type="string">
            <text:p>UMBARA</text:p>
          </table:table-cell>
          <table:table-cell office:value-type="float" office:value="0.646369826545742" calcext:value-type="float">
            <text:p>0,646370</text:p>
          </table:table-cell>
        </table:table-row>
        <table:table-row table:style-name="ro1">
          <table:table-cell office:value-type="string" calcext:value-type="string">
            <text:p>BIGUACU</text:p>
          </table:table-cell>
          <table:table-cell office:value-type="string" calcext:value-type="string">
            <text:p>J.LACERDA-B</text:p>
          </table:table-cell>
          <table:table-cell office:value-type="float" office:value="0.645184449204055" calcext:value-type="float">
            <text:p>0,645184</text:p>
          </table:table-cell>
        </table:table-row>
        <table:table-row table:style-name="ro1">
          <table:table-cell office:value-type="string" calcext:value-type="string">
            <text:p>OSORIO 2</text:p>
          </table:table-cell>
          <table:table-cell office:value-type="string" calcext:value-type="string">
            <text:p>TAQUARA</text:p>
          </table:table-cell>
          <table:table-cell office:value-type="float" office:value="0.644161578665057" calcext:value-type="float">
            <text:p>0,644162</text:p>
          </table:table-cell>
        </table:table-row>
        <table:table-row table:style-name="ro1">
          <table:table-cell office:value-type="string" calcext:value-type="string">
            <text:p>FORQUILHINHA</text:p>
          </table:table-cell>
          <table:table-cell office:value-type="string" calcext:value-type="string">
            <text:p>TORRES 2</text:p>
          </table:table-cell>
          <table:table-cell office:value-type="float" office:value="0.643259300799653" calcext:value-type="float">
            <text:p>0,643259</text:p>
          </table:table-cell>
        </table:table-row>
        <table:table-row table:style-name="ro1">
          <table:table-cell office:value-type="string" calcext:value-type="string">
            <text:p>PARANAVAI NOR</text:p>
          </table:table-cell>
          <table:table-cell office:value-type="string" calcext:value-type="string">
            <text:p>SARANDI</text:p>
          </table:table-cell>
          <table:table-cell office:value-type="float" office:value="0.642959274739416" calcext:value-type="float">
            <text:p>0,642959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CARAUBAS II</text:p>
          </table:table-cell>
          <table:table-cell office:value-type="float" office:value="0.64172112951899" calcext:value-type="float">
            <text:p>0,641721</text:p>
          </table:table-cell>
        </table:table-row>
        <table:table-row table:style-name="ro1">
          <table:table-cell office:value-type="string" calcext:value-type="string">
            <text:p>BOM JESUS II</text:p>
          </table:table-cell>
          <table:table-cell office:value-type="string" calcext:value-type="string">
            <text:p>GILBUES II</text:p>
          </table:table-cell>
          <table:table-cell office:value-type="float" office:value="0.641084115931224" calcext:value-type="float">
            <text:p>0,641084</text:p>
          </table:table-cell>
        </table:table-row>
        <table:table-row table:style-name="ro1">
          <table:table-cell office:value-type="string" calcext:value-type="string">
            <text:p>ITABIRA 2</text:p>
          </table:table-cell>
          <table:table-cell office:value-type="string" calcext:value-type="string">
            <text:p>ITABIRA 5</text:p>
          </table:table-cell>
          <table:table-cell office:value-type="float" office:value="0.637791759952689" calcext:value-type="float">
            <text:p>0,637792</text:p>
          </table:table-cell>
        </table:table-row>
        <table:table-row table:style-name="ro1">
          <table:table-cell office:value-type="string" calcext:value-type="string">
            <text:p>L.VERMELHA 2</text:p>
          </table:table-cell>
          <table:table-cell office:value-type="string" calcext:value-type="string">
            <text:p>BARRA GRANDE</text:p>
          </table:table-cell>
          <table:table-cell office:value-type="float" office:value="0.637651668905339" calcext:value-type="float">
            <text:p>0,637652</text:p>
          </table:table-cell>
        </table:table-row>
        <table:table-row table:style-name="ro1">
          <table:table-cell office:value-type="string" calcext:value-type="string">
            <text:p>GASPAR 2</text:p>
          </table:table-cell>
          <table:table-cell office:value-type="string" calcext:value-type="string">
            <text:p>PALHOCA <text:s/>ESU</text:p>
          </table:table-cell>
          <table:table-cell office:value-type="float" office:value="0.637209279206835" calcext:value-type="float">
            <text:p>0,637209</text:p>
          </table:table-cell>
        </table:table-row>
        <table:table-row table:style-name="ro1">
          <table:table-cell office:value-type="string" calcext:value-type="string">
            <text:p>FORQUILHINHA</text:p>
          </table:table-cell>
          <table:table-cell office:value-type="string" calcext:value-type="string">
            <text:p>SIDEROPOLIS 2</text:p>
          </table:table-cell>
          <table:table-cell office:value-type="float" office:value="0.636561267978756" calcext:value-type="float">
            <text:p>0,636561</text:p>
          </table:table-cell>
        </table:table-row>
        <table:table-row table:style-name="ro1">
          <table:table-cell office:value-type="string" calcext:value-type="string">
            <text:p>CAMPO BOM</text:p>
          </table:table-cell>
          <table:table-cell office:value-type="string" calcext:value-type="string">
            <text:p>CAXIAS</text:p>
          </table:table-cell>
          <table:table-cell office:value-type="float" office:value="0.636116492868589" calcext:value-type="float">
            <text:p>0,636116</text:p>
          </table:table-cell>
        </table:table-row>
        <table:table-row table:style-name="ro1">
          <table:table-cell office:value-type="string" calcext:value-type="string">
            <text:p>ALEGRETE2</text:p>
          </table:table-cell>
          <table:table-cell office:value-type="string" calcext:value-type="string">
            <text:p>LIVRAMENTO 2</text:p>
          </table:table-cell>
          <table:table-cell office:value-type="float" office:value="0.635288737519455" calcext:value-type="float">
            <text:p>0,635289</text:p>
          </table:table-cell>
        </table:table-row>
        <table:table-row table:style-name="ro1">
          <table:table-cell office:value-type="string" calcext:value-type="string">
            <text:p>LINHARES</text:p>
          </table:table-cell>
          <table:table-cell office:value-type="string" calcext:value-type="string">
            <text:p>SAO MATEUS 2</text:p>
          </table:table-cell>
          <table:table-cell office:value-type="float" office:value="0.634978972605984" calcext:value-type="float">
            <text:p>0,634979</text:p>
          </table:table-cell>
        </table:table-row>
        <table:table-row table:style-name="ro1">
          <table:table-cell office:value-type="string" calcext:value-type="string">
            <text:p>FIGUEIRA</text:p>
          </table:table-cell>
          <table:table-cell office:value-type="string" calcext:value-type="string">
            <text:p>LONDRINA ESU</text:p>
          </table:table-cell>
          <table:table-cell office:value-type="float" office:value="0.634375526492417" calcext:value-type="float">
            <text:p>0,634376</text:p>
          </table:table-cell>
        </table:table-row>
        <table:table-row table:style-name="ro1">
          <table:table-cell office:value-type="string" calcext:value-type="string">
            <text:p>ALEGRETE2</text:p>
          </table:table-cell>
          <table:table-cell office:value-type="string" calcext:value-type="string">
            <text:p>URUGUAIANA5</text:p>
          </table:table-cell>
          <table:table-cell office:value-type="float" office:value="0.634349340566895" calcext:value-type="float">
            <text:p>0,634349</text:p>
          </table:table-cell>
        </table:table-row>
        <table:table-row table:style-name="ro1">
          <table:table-cell office:value-type="string" calcext:value-type="string">
            <text:p>CASTRO NORTE</text:p>
          </table:table-cell>
          <table:table-cell office:value-type="string" calcext:value-type="string">
            <text:p>PONTA GROSSA</text:p>
          </table:table-cell>
          <table:table-cell office:value-type="float" office:value="0.633971670372513" calcext:value-type="float">
            <text:p>0,633972</text:p>
          </table:table-cell>
        </table:table-row>
        <table:table-row table:style-name="ro1">
          <table:table-cell office:value-type="string" calcext:value-type="string">
            <text:p>B.JESUS LAPA</text:p>
          </table:table-cell>
          <table:table-cell office:value-type="string" calcext:value-type="string">
            <text:p>BROTAS.MACAUBAS</text:p>
          </table:table-cell>
          <table:table-cell office:value-type="float" office:value="0.633794861362619" calcext:value-type="float">
            <text:p>0,633795</text:p>
          </table:table-cell>
        </table:table-row>
        <table:table-row table:style-name="ro1">
          <table:table-cell office:value-type="string" calcext:value-type="string">
            <text:p>AIMORES-SE</text:p>
          </table:table-cell>
          <table:table-cell office:value-type="string" calcext:value-type="string">
            <text:p>CONSE. PENA</text:p>
          </table:table-cell>
          <table:table-cell office:value-type="float" office:value="0.633665666182364" calcext:value-type="float">
            <text:p>0,633666</text:p>
          </table:table-cell>
        </table:table-row>
        <table:table-row table:style-name="ro1">
          <table:table-cell office:value-type="string" calcext:value-type="string">
            <text:p>BAIXO IGUACU</text:p>
          </table:table-cell>
          <table:table-cell office:value-type="string" calcext:value-type="string">
            <text:p>REALEZA SUL</text:p>
          </table:table-cell>
          <table:table-cell office:value-type="float" office:value="0.633520608194573" calcext:value-type="float">
            <text:p>0,633521</text:p>
          </table:table-cell>
        </table:table-row>
        <table:table-row table:style-name="ro1">
          <table:table-cell office:value-type="string" calcext:value-type="string">
            <text:p>MAURITI II</text:p>
          </table:table-cell>
          <table:table-cell office:value-type="string" calcext:value-type="string">
            <text:p>BOM NOME</text:p>
          </table:table-cell>
          <table:table-cell office:value-type="float" office:value="0.63298790972005" calcext:value-type="float">
            <text:p>0,632988</text:p>
          </table:table-cell>
        </table:table-row>
        <table:table-row table:style-name="ro1">
          <table:table-cell office:value-type="string" calcext:value-type="string">
            <text:p>NILO PECANHA</text:p>
          </table:table-cell>
          <table:table-cell office:value-type="string" calcext:value-type="string">
            <text:p>SANTA CABECA</text:p>
          </table:table-cell>
          <table:table-cell office:value-type="float" office:value="0.632451400898824" calcext:value-type="float">
            <text:p>0,632451</text:p>
          </table:table-cell>
        </table:table-row>
        <table:table-row table:style-name="ro1">
          <table:table-cell office:value-type="string" calcext:value-type="string">
            <text:p>BANABUIU</text:p>
          </table:table-cell>
          <table:table-cell office:value-type="string" calcext:value-type="string">
            <text:p>MOSSORO II</text:p>
          </table:table-cell>
          <table:table-cell office:value-type="float" office:value="0.63199904711181" calcext:value-type="float">
            <text:p>0,631999</text:p>
          </table:table-cell>
        </table:table-row>
        <table:table-row table:style-name="ro1">
          <table:table-cell office:value-type="string" calcext:value-type="string">
            <text:p>ATLANTIDA 2</text:p>
          </table:table-cell>
          <table:table-cell office:value-type="string" calcext:value-type="string">
            <text:p>TORRES 2</text:p>
          </table:table-cell>
          <table:table-cell office:value-type="float" office:value="0.631957396153018" calcext:value-type="float">
            <text:p>0,631957</text:p>
          </table:table-cell>
        </table:table-row>
        <table:table-row table:style-name="ro1">
          <table:table-cell office:value-type="string" calcext:value-type="string">
            <text:p>CAXIAS</text:p>
          </table:table-cell>
          <table:table-cell office:value-type="string" calcext:value-type="string">
            <text:p>N.PETROPOLIS2</text:p>
          </table:table-cell>
          <table:table-cell office:value-type="float" office:value="0.63138500006401" calcext:value-type="float">
            <text:p>0,631385</text:p>
          </table:table-cell>
        </table:table-row>
        <table:table-row table:style-name="ro1">
          <table:table-cell office:value-type="string" calcext:value-type="string">
            <text:p>FUNIL</text:p>
          </table:table-cell>
          <table:table-cell office:value-type="string" calcext:value-type="string">
            <text:p>SAPEACU</text:p>
          </table:table-cell>
          <table:table-cell office:value-type="float" office:value="0.630433303887589" calcext:value-type="float">
            <text:p>0,630433</text:p>
          </table:table-cell>
        </table:table-row>
        <table:table-row table:style-name="ro1">
          <table:table-cell office:value-type="string" calcext:value-type="string">
            <text:p>BOTUCATU</text:p>
          </table:table-cell>
          <table:table-cell office:value-type="string" calcext:value-type="string">
            <text:p>CERQUILHO III</text:p>
          </table:table-cell>
          <table:table-cell office:value-type="float" office:value="0.629746565750889" calcext:value-type="float">
            <text:p>0,629747</text:p>
          </table:table-cell>
        </table:table-row>
        <table:table-row table:style-name="ro1">
          <table:table-cell office:value-type="string" calcext:value-type="string">
            <text:p>ABAIARA</text:p>
          </table:table-cell>
          <table:table-cell office:value-type="string" calcext:value-type="string">
            <text:p>BOM NOME</text:p>
          </table:table-cell>
          <table:table-cell office:value-type="float" office:value="0.628855029531884" calcext:value-type="float">
            <text:p>0,628855</text:p>
          </table:table-cell>
        </table:table-row>
        <table:table-row table:style-name="ro1">
          <table:table-cell office:value-type="string" calcext:value-type="string">
            <text:p>RIO DAS EGUAS</text:p>
          </table:table-cell>
          <table:table-cell office:value-type="string" calcext:value-type="string">
            <text:p>RIO GRANDE II</text:p>
          </table:table-cell>
          <table:table-cell office:value-type="float" office:value="0.628848534285881" calcext:value-type="float">
            <text:p>0,628849</text:p>
          </table:table-cell>
        </table:table-row>
        <table:table-row table:style-name="ro1">
          <table:table-cell office:value-type="string" calcext:value-type="string">
            <text:p>ACU II</text:p>
          </table:table-cell>
          <table:table-cell office:value-type="string" calcext:value-type="string">
            <text:p>PARAISO</text:p>
          </table:table-cell>
          <table:table-cell office:value-type="float" office:value="0.628707632691801" calcext:value-type="float">
            <text:p>0,628708</text:p>
          </table:table-cell>
        </table:table-row>
        <table:table-row table:style-name="ro1">
          <table:table-cell office:value-type="string" calcext:value-type="string">
            <text:p>C.COMPRIDO</text:p>
          </table:table-cell>
          <table:table-cell office:value-type="string" calcext:value-type="string">
            <text:p>PILARZINHO</text:p>
          </table:table-cell>
          <table:table-cell office:value-type="float" office:value="0.628290908548808" calcext:value-type="float">
            <text:p>0,628291</text:p>
          </table:table-cell>
        </table:table-row>
        <table:table-row table:style-name="ro1">
          <table:table-cell office:value-type="string" calcext:value-type="string">
            <text:p>MESSIAS</text:p>
          </table:table-cell>
          <table:table-cell office:value-type="string" calcext:value-type="string">
            <text:p>MACEIO</text:p>
          </table:table-cell>
          <table:table-cell office:value-type="float" office:value="0.628078393325791" calcext:value-type="float">
            <text:p>0,628078</text:p>
          </table:table-cell>
        </table:table-row>
        <table:table-row table:style-name="ro1">
          <table:table-cell office:value-type="string" calcext:value-type="string">
            <text:p>BOM NOME</text:p>
          </table:table-cell>
          <table:table-cell office:value-type="string" calcext:value-type="string">
            <text:p>FLORESTA II</text:p>
          </table:table-cell>
          <table:table-cell office:value-type="float" office:value="0.627249695763156" calcext:value-type="float">
            <text:p>0,627250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SANTA ROSA 1</text:p>
          </table:table-cell>
          <table:table-cell office:value-type="float" office:value="0.627034376476784" calcext:value-type="float">
            <text:p>0,627034</text:p>
          </table:table-cell>
        </table:table-row>
        <table:table-row table:style-name="ro1">
          <table:table-cell office:value-type="string" calcext:value-type="string">
            <text:p>CHAVANTES</text:p>
          </table:table-cell>
          <table:table-cell office:value-type="string" calcext:value-type="string">
            <text:p>PIRAJU</text:p>
          </table:table-cell>
          <table:table-cell office:value-type="float" office:value="0.626918387808545" calcext:value-type="float">
            <text:p>0,626918</text:p>
          </table:table-cell>
        </table:table-row>
        <table:table-row table:style-name="ro1">
          <table:table-cell office:value-type="string" calcext:value-type="string">
            <text:p>MESQUITA</text:p>
          </table:table-cell>
          <table:table-cell office:value-type="string" calcext:value-type="string">
            <text:p>TIMOTEO 2</text:p>
          </table:table-cell>
          <table:table-cell office:value-type="float" office:value="0.626583776403826" calcext:value-type="float">
            <text:p>0,626584</text:p>
          </table:table-cell>
        </table:table-row>
        <table:table-row table:style-name="ro1">
          <table:table-cell office:value-type="string" calcext:value-type="string">
            <text:p>NOVA MUTUM</text:p>
          </table:table-cell>
          <table:table-cell office:value-type="string" calcext:value-type="string">
            <text:p>SORRISO</text:p>
          </table:table-cell>
          <table:table-cell office:value-type="float" office:value="0.625139822656352" calcext:value-type="float">
            <text:p>0,625140</text:p>
          </table:table-cell>
        </table:table-row>
        <table:table-row table:style-name="ro1">
          <table:table-cell office:value-type="string" calcext:value-type="string">
            <text:p>CHAPADINHA II</text:p>
          </table:table-cell>
          <table:table-cell office:value-type="string" calcext:value-type="string">
            <text:p>MIRANDA II</text:p>
          </table:table-cell>
          <table:table-cell office:value-type="float" office:value="0.625117157464976" calcext:value-type="float">
            <text:p>0,625117</text:p>
          </table:table-cell>
        </table:table-row>
        <table:table-row table:style-name="ro1">
          <table:table-cell office:value-type="string" calcext:value-type="string">
            <text:p>ARCOVERDE II</text:p>
          </table:table-cell>
          <table:table-cell office:value-type="string" calcext:value-type="string">
            <text:p>CAETES II</text:p>
          </table:table-cell>
          <table:table-cell office:value-type="float" office:value="0.624508753920696" calcext:value-type="float">
            <text:p>0,624509</text:p>
          </table:table-cell>
        </table:table-row>
        <table:table-row table:style-name="ro1">
          <table:table-cell office:value-type="string" calcext:value-type="string">
            <text:p>CHAVANTES</text:p>
          </table:table-cell>
          <table:table-cell office:value-type="string" calcext:value-type="string">
            <text:p>SALTO GRANDE SP</text:p>
          </table:table-cell>
          <table:table-cell office:value-type="float" office:value="0.62410823659096" calcext:value-type="float">
            <text:p>0,624108</text:p>
          </table:table-cell>
        </table:table-row>
        <table:table-row table:style-name="ro1">
          <table:table-cell office:value-type="string" calcext:value-type="string">
            <text:p>J.LACERDA-A</text:p>
          </table:table-cell>
          <table:table-cell office:value-type="string" calcext:value-type="string">
            <text:p>J.LACERDA-B</text:p>
          </table:table-cell>
          <table:table-cell office:value-type="float" office:value="0.623870898774166" calcext:value-type="float">
            <text:p>0,623871</text:p>
          </table:table-cell>
        </table:table-row>
        <table:table-row table:style-name="ro1">
          <table:table-cell office:value-type="string" calcext:value-type="string">
            <text:p>N.PETROPOLIS2</text:p>
          </table:table-cell>
          <table:table-cell office:value-type="string" calcext:value-type="string">
            <text:p>TAQUARA</text:p>
          </table:table-cell>
          <table:table-cell office:value-type="float" office:value="0.623747522948584" calcext:value-type="float">
            <text:p>0,623748</text:p>
          </table:table-cell>
        </table:table-row>
        <table:table-row table:style-name="ro1">
          <table:table-cell office:value-type="string" calcext:value-type="string">
            <text:p>FUNIL</text:p>
          </table:table-cell>
          <table:table-cell office:value-type="string" calcext:value-type="string">
            <text:p>ITAPEBI SE</text:p>
          </table:table-cell>
          <table:table-cell office:value-type="float" office:value="0.62216909267334" calcext:value-type="float">
            <text:p>0,622169</text:p>
          </table:table-cell>
        </table:table-row>
        <table:table-row table:style-name="ro1">
          <table:table-cell office:value-type="string" calcext:value-type="string">
            <text:p>ALEGRETE2</text:p>
          </table:table-cell>
          <table:table-cell office:value-type="string" calcext:value-type="string">
            <text:p>S.VICENTE SUL</text:p>
          </table:table-cell>
          <table:table-cell office:value-type="float" office:value="0.621985962297653" calcext:value-type="float">
            <text:p>0,621986</text:p>
          </table:table-cell>
        </table:table-row>
        <table:table-row table:style-name="ro1">
          <table:table-cell office:value-type="string" calcext:value-type="string">
            <text:p>C.COMPRIDO</text:p>
          </table:table-cell>
          <table:table-cell office:value-type="string" calcext:value-type="string">
            <text:p>GRALHA AZUL</text:p>
          </table:table-cell>
          <table:table-cell office:value-type="float" office:value="0.621962340692532" calcext:value-type="float">
            <text:p>0,621962</text:p>
          </table:table-cell>
        </table:table-row>
        <table:table-row table:style-name="ro1">
          <table:table-cell office:value-type="string" calcext:value-type="string">
            <text:p>ITABIRA 4</text:p>
          </table:table-cell>
          <table:table-cell office:value-type="string" calcext:value-type="string">
            <text:p>TAQUARIL</text:p>
          </table:table-cell>
          <table:table-cell office:value-type="float" office:value="0.621234069622381" calcext:value-type="float">
            <text:p>0,621234</text:p>
          </table:table-cell>
        </table:table-row>
        <table:table-row table:style-name="ro1">
          <table:table-cell office:value-type="string" calcext:value-type="string">
            <text:p>IPATINGA 1</text:p>
          </table:table-cell>
          <table:table-cell office:value-type="string" calcext:value-type="string">
            <text:p>MESQUITA</text:p>
          </table:table-cell>
          <table:table-cell office:value-type="float" office:value="0.620546985312472" calcext:value-type="float">
            <text:p>0,620547</text:p>
          </table:table-cell>
        </table:table-row>
        <table:table-row table:style-name="ro1">
          <table:table-cell office:value-type="string" calcext:value-type="string">
            <text:p>JURUTI</text:p>
          </table:table-cell>
          <table:table-cell office:value-type="string" calcext:value-type="string">
            <text:p>PARINTINS</text:p>
          </table:table-cell>
          <table:table-cell office:value-type="float" office:value="0.617913633578149" calcext:value-type="float">
            <text:p>0,617914</text:p>
          </table:table-cell>
        </table:table-row>
        <table:table-row table:style-name="ro1">
          <table:table-cell office:value-type="string" calcext:value-type="string">
            <text:p>BOM JESUS II</text:p>
          </table:table-cell>
          <table:table-cell office:value-type="string" calcext:value-type="string">
            <text:p>ELISEU MARTINS</text:p>
          </table:table-cell>
          <table:table-cell office:value-type="float" office:value="0.617638344665204" calcext:value-type="float">
            <text:p>0,617638</text:p>
          </table:table-cell>
        </table:table-row>
        <table:table-row table:style-name="ro1">
          <table:table-cell office:value-type="string" calcext:value-type="string">
            <text:p>FOZ CHAPECO</text:p>
          </table:table-cell>
          <table:table-cell office:value-type="string" calcext:value-type="string">
            <text:p>GUARITA</text:p>
          </table:table-cell>
          <table:table-cell office:value-type="float" office:value="0.617225972725547" calcext:value-type="float">
            <text:p>0,617226</text:p>
          </table:table-cell>
        </table:table-row>
        <table:table-row table:style-name="ro1">
          <table:table-cell office:value-type="string" calcext:value-type="string">
            <text:p>CASCAVEL</text:p>
          </table:table-cell>
          <table:table-cell office:value-type="string" calcext:value-type="string">
            <text:p>FOZ DO CHOPIM</text:p>
          </table:table-cell>
          <table:table-cell office:value-type="float" office:value="0.61691402084925" calcext:value-type="float">
            <text:p>0,616914</text:p>
          </table:table-cell>
        </table:table-row>
        <table:table-row table:style-name="ro1">
          <table:table-cell office:value-type="string" calcext:value-type="string">
            <text:p>PICOS</text:p>
          </table:table-cell>
          <table:table-cell office:value-type="string" calcext:value-type="string">
            <text:p>TAUA II</text:p>
          </table:table-cell>
          <table:table-cell office:value-type="float" office:value="0.616296893094552" calcext:value-type="float">
            <text:p>0,616297</text:p>
          </table:table-cell>
        </table:table-row>
        <table:table-row table:style-name="ro1">
          <table:table-cell office:value-type="string" calcext:value-type="string">
            <text:p>CRUZ ALTA 2</text:p>
          </table:table-cell>
          <table:table-cell office:value-type="string" calcext:value-type="string">
            <text:p>PASSO REAL</text:p>
          </table:table-cell>
          <table:table-cell office:value-type="float" office:value="0.613937005039853" calcext:value-type="float">
            <text:p>0,613937</text:p>
          </table:table-cell>
        </table:table-row>
        <table:table-row table:style-name="ro1">
          <table:table-cell office:value-type="string" calcext:value-type="string">
            <text:p>JURUMIRIM</text:p>
          </table:table-cell>
          <table:table-cell office:value-type="string" calcext:value-type="string">
            <text:p>PIRAJU</text:p>
          </table:table-cell>
          <table:table-cell office:value-type="float" office:value="0.613228433150613" calcext:value-type="float">
            <text:p>0,613228</text:p>
          </table:table-cell>
        </table:table-row>
        <table:table-row table:style-name="ro1">
          <table:table-cell office:value-type="string" calcext:value-type="string">
            <text:p>EUNAPOLIS</text:p>
          </table:table-cell>
          <table:table-cell office:value-type="string" calcext:value-type="string">
            <text:p>TEIX FREITAS II</text:p>
          </table:table-cell>
          <table:table-cell office:value-type="float" office:value="0.612904616984389" calcext:value-type="float">
            <text:p>0,612905</text:p>
          </table:table-cell>
        </table:table-row>
        <table:table-row table:style-name="ro1">
          <table:table-cell office:value-type="string" calcext:value-type="string">
            <text:p>AVARE NOVA</text:p>
          </table:table-cell>
          <table:table-cell office:value-type="string" calcext:value-type="string">
            <text:p>BOTUCATU</text:p>
          </table:table-cell>
          <table:table-cell office:value-type="float" office:value="0.612409490717571" calcext:value-type="float">
            <text:p>0,612409</text:p>
          </table:table-cell>
        </table:table-row>
        <table:table-row table:style-name="ro1">
          <table:table-cell office:value-type="string" calcext:value-type="string">
            <text:p>FORTALEZA II</text:p>
          </table:table-cell>
          <table:table-cell office:value-type="string" calcext:value-type="string">
            <text:p>PICI II</text:p>
          </table:table-cell>
          <table:table-cell office:value-type="float" office:value="0.612257092186071" calcext:value-type="float">
            <text:p>0,612257</text:p>
          </table:table-cell>
        </table:table-row>
        <table:table-row table:style-name="ro1">
          <table:table-cell office:value-type="string" calcext:value-type="string">
            <text:p>ITAUBA</text:p>
          </table:table-cell>
          <table:table-cell office:value-type="string" calcext:value-type="string">
            <text:p>U.D.FRANCISCA</text:p>
          </table:table-cell>
          <table:table-cell office:value-type="float" office:value="0.61103049388858" calcext:value-type="float">
            <text:p>0,611030</text:p>
          </table:table-cell>
        </table:table-row>
        <table:table-row table:style-name="ro1">
          <table:table-cell office:value-type="string" calcext:value-type="string">
            <text:p>MEDEIROS NETOII</text:p>
          </table:table-cell>
          <table:table-cell office:value-type="string" calcext:value-type="string">
            <text:p>TEIX FREITAS II</text:p>
          </table:table-cell>
          <table:table-cell office:value-type="float" office:value="0.610555178355367" calcext:value-type="float">
            <text:p>0,610555</text:p>
          </table:table-cell>
        </table:table-row>
        <table:table-row table:style-name="ro1">
          <table:table-cell office:value-type="string" calcext:value-type="string">
            <text:p>CURIT. CENTRO</text:p>
          </table:table-cell>
          <table:table-cell office:value-type="string" calcext:value-type="string">
            <text:p>UBERABA</text:p>
          </table:table-cell>
          <table:table-cell office:value-type="float" office:value="0.610499363844723" calcext:value-type="float">
            <text:p>0,610499</text:p>
          </table:table-cell>
        </table:table-row>
        <table:table-row table:style-name="ro1">
          <table:table-cell office:value-type="string" calcext:value-type="string">
            <text:p>ICO</text:p>
          </table:table-cell>
          <table:table-cell office:value-type="string" calcext:value-type="string">
            <text:p>MILAGRES</text:p>
          </table:table-cell>
          <table:table-cell office:value-type="float" office:value="0.610492104192727" calcext:value-type="float">
            <text:p>0,610492</text:p>
          </table:table-cell>
        </table:table-row>
        <table:table-row table:style-name="ro1">
          <table:table-cell office:value-type="string" calcext:value-type="string">
            <text:p>C.COMPRIDO</text:p>
          </table:table-cell>
          <table:table-cell office:value-type="string" calcext:value-type="string">
            <text:p>C.I.CURITIBA</text:p>
          </table:table-cell>
          <table:table-cell office:value-type="float" office:value="0.610332029872348" calcext:value-type="float">
            <text:p>0,610332</text:p>
          </table:table-cell>
        </table:table-row>
        <table:table-row table:style-name="ro1">
          <table:table-cell office:value-type="string" calcext:value-type="string">
            <text:p>C.COMPRIDO</text:p>
          </table:table-cell>
          <table:table-cell office:value-type="string" calcext:value-type="string">
            <text:p>SANTAQUITERIA</text:p>
          </table:table-cell>
          <table:table-cell office:value-type="float" office:value="0.609607436477593" calcext:value-type="float">
            <text:p>0,609607</text:p>
          </table:table-cell>
        </table:table-row>
        <table:table-row table:style-name="ro1">
          <table:table-cell office:value-type="string" calcext:value-type="string">
            <text:p>LAJEADO 2</text:p>
          </table:table-cell>
          <table:table-cell office:value-type="string" calcext:value-type="string">
            <text:p>PASSO REAL</text:p>
          </table:table-cell>
          <table:table-cell office:value-type="float" office:value="0.609170079382205" calcext:value-type="float">
            <text:p>0,609170</text:p>
          </table:table-cell>
        </table:table-row>
        <table:table-row table:style-name="ro1">
          <table:table-cell office:value-type="string" calcext:value-type="string">
            <text:p>PASSO FUNDO</text:p>
          </table:table-cell>
          <table:table-cell office:value-type="string" calcext:value-type="string">
            <text:p>VILA MARIA</text:p>
          </table:table-cell>
          <table:table-cell office:value-type="float" office:value="0.608488308047119" calcext:value-type="float">
            <text:p>0,608488</text:p>
          </table:table-cell>
        </table:table-row>
        <table:table-row table:style-name="ro1">
          <table:table-cell office:value-type="string" calcext:value-type="string">
            <text:p>PORTO ALEGRE8</text:p>
          </table:table-cell>
          <table:table-cell office:value-type="string" calcext:value-type="string">
            <text:p>PORTOALEGRE 1</text:p>
          </table:table-cell>
          <table:table-cell office:value-type="float" office:value="0.60826610166666" calcext:value-type="float">
            <text:p>0,608266</text:p>
          </table:table-cell>
        </table:table-row>
        <table:table-row table:style-name="ro1">
          <table:table-cell office:value-type="string" calcext:value-type="string">
            <text:p>JARDIM BOTANICO</text:p>
          </table:table-cell>
          <table:table-cell office:value-type="string" calcext:value-type="string">
            <text:p>PORTOALEGRE 1</text:p>
          </table:table-cell>
          <table:table-cell office:value-type="float" office:value="0.607704766526082" calcext:value-type="float">
            <text:p>0,607705</text:p>
          </table:table-cell>
        </table:table-row>
        <table:table-row table:style-name="ro1">
          <table:table-cell office:value-type="string" calcext:value-type="string">
            <text:p>COTEGIPE</text:p>
          </table:table-cell>
          <table:table-cell office:value-type="string" calcext:value-type="string">
            <text:p>JACARACANGA</text:p>
          </table:table-cell>
          <table:table-cell office:value-type="float" office:value="0.606752456277909" calcext:value-type="float">
            <text:p>0,606752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office:value-type="string" calcext:value-type="string">
            <text:p>CENTRO-CTT</text:p>
          </table:table-cell>
          <table:table-cell office:value-type="float" office:value="0.606708627968782" calcext:value-type="float">
            <text:p>0,606709</text:p>
          </table:table-cell>
        </table:table-row>
        <table:table-row table:style-name="ro1">
          <table:table-cell office:value-type="string" calcext:value-type="string">
            <text:p>ITABIRA 5</text:p>
          </table:table-cell>
          <table:table-cell office:value-type="string" calcext:value-type="string">
            <text:p>SABARA 3</text:p>
          </table:table-cell>
          <table:table-cell office:value-type="float" office:value="0.606135278310721" calcext:value-type="float">
            <text:p>0,606135</text:p>
          </table:table-cell>
        </table:table-row>
        <table:table-row table:style-name="ro1">
          <table:table-cell office:value-type="string" calcext:value-type="string">
            <text:p>LONDRINA ESU</text:p>
          </table:table-cell>
          <table:table-cell office:value-type="string" calcext:value-type="string">
            <text:p>MARINGA</text:p>
          </table:table-cell>
          <table:table-cell office:value-type="float" office:value="0.606107821576327" calcext:value-type="float">
            <text:p>0,606108</text:p>
          </table:table-cell>
        </table:table-row>
        <table:table-row table:style-name="ro1">
          <table:table-cell office:value-type="string" calcext:value-type="string">
            <text:p>BIGUACU</text:p>
          </table:table-cell>
          <table:table-cell office:value-type="string" calcext:value-type="string">
            <text:p>DESTERRO</text:p>
          </table:table-cell>
          <table:table-cell office:value-type="float" office:value="0.605768437938967" calcext:value-type="float">
            <text:p>0,605768</text:p>
          </table:table-cell>
        </table:table-row>
        <table:table-row table:style-name="ro1">
          <table:table-cell office:value-type="string" calcext:value-type="string">
            <text:p>CURIT.LESTE</text:p>
          </table:table-cell>
          <table:table-cell office:value-type="string" calcext:value-type="string">
            <text:p>SANTA MONICA</text:p>
          </table:table-cell>
          <table:table-cell office:value-type="float" office:value="0.605447546576239" calcext:value-type="float">
            <text:p>0,605448</text:p>
          </table:table-cell>
        </table:table-row>
        <table:table-row table:style-name="ro1">
          <table:table-cell office:value-type="string" calcext:value-type="string">
            <text:p>BARRO ALTO</text:p>
          </table:table-cell>
          <table:table-cell office:value-type="string" calcext:value-type="string">
            <text:p>NIQUELANDIA</text:p>
          </table:table-cell>
          <table:table-cell office:value-type="float" office:value="0.60516730077548" calcext:value-type="float">
            <text:p>0,605167</text:p>
          </table:table-cell>
        </table:table-row>
        <table:table-row table:style-name="ro1">
          <table:table-cell office:value-type="string" calcext:value-type="string">
            <text:p>CASCAVEL</text:p>
          </table:table-cell>
          <table:table-cell office:value-type="string" calcext:value-type="string">
            <text:p>CASCAVEL OEST</text:p>
          </table:table-cell>
          <table:table-cell office:value-type="float" office:value="0.604869195017433" calcext:value-type="float">
            <text:p>0,604869</text:p>
          </table:table-cell>
        </table:table-row>
        <table:table-row table:style-name="ro1">
          <table:table-cell office:value-type="string" calcext:value-type="string">
            <text:p>BRAUNAS</text:p>
          </table:table-cell>
          <table:table-cell office:value-type="string" calcext:value-type="string">
            <text:p>ITABIRA 2</text:p>
          </table:table-cell>
          <table:table-cell office:value-type="float" office:value="0.60483473342762" calcext:value-type="float">
            <text:p>0,604835</text:p>
          </table:table-cell>
        </table:table-row>
        <table:table-row table:style-name="ro1">
          <table:table-cell office:value-type="string" calcext:value-type="string">
            <text:p>CASCAVEL OEST</text:p>
          </table:table-cell>
          <table:table-cell office:value-type="string" calcext:value-type="string">
            <text:p>MEDIANEIRA NT</text:p>
          </table:table-cell>
          <table:table-cell office:value-type="float" office:value="0.604480562070582" calcext:value-type="float">
            <text:p>0,604481</text:p>
          </table:table-cell>
        </table:table-row>
        <table:table-row table:style-name="ro1">
          <table:table-cell office:value-type="string" calcext:value-type="string">
            <text:p>IBIPORA</text:p>
          </table:table-cell>
          <table:table-cell office:value-type="string" calcext:value-type="string">
            <text:p>LONDRINA ESU</text:p>
          </table:table-cell>
          <table:table-cell office:value-type="float" office:value="0.602434473761692" calcext:value-type="float">
            <text:p>0,602434</text:p>
          </table:table-cell>
        </table:table-row>
        <table:table-row table:style-name="ro1">
          <table:table-cell office:value-type="string" calcext:value-type="string">
            <text:p>PORTOALEGRE 4</text:p>
          </table:table-cell>
          <table:table-cell office:value-type="string" calcext:value-type="string">
            <text:p>PORTO ALEGRE9</text:p>
          </table:table-cell>
          <table:table-cell office:value-type="float" office:value="0.600099827919283" calcext:value-type="float">
            <text:p>0,600100</text:p>
          </table:table-cell>
        </table:table-row>
        <table:table-row table:style-name="ro1">
          <table:table-cell office:value-type="string" calcext:value-type="string">
            <text:p>CRUZ ALTA 2</text:p>
          </table:table-cell>
          <table:table-cell office:value-type="string" calcext:value-type="string">
            <text:p>IJUI 2</text:p>
          </table:table-cell>
          <table:table-cell office:value-type="float" office:value="0.598875955308254" calcext:value-type="float">
            <text:p>0,598876</text:p>
          </table:table-cell>
        </table:table-row>
        <table:table-row table:style-name="ro1">
          <table:table-cell office:value-type="string" calcext:value-type="string">
            <text:p>JARDIM BOTANICO</text:p>
          </table:table-cell>
          <table:table-cell office:value-type="string" calcext:value-type="string">
            <text:p>JBO LT GRA2</text:p>
          </table:table-cell>
          <table:table-cell office:value-type="float" office:value="0.597977489974442" calcext:value-type="float">
            <text:p>0,597977</text:p>
          </table:table-cell>
        </table:table-row>
        <table:table-row table:style-name="ro1">
          <table:table-cell office:value-type="string" calcext:value-type="string">
            <text:p>JARDIM BOTANICO</text:p>
          </table:table-cell>
          <table:table-cell office:value-type="string" calcext:value-type="string">
            <text:p>JBO LT PA10</text:p>
          </table:table-cell>
          <table:table-cell office:value-type="float" office:value="0.597977489974442" calcext:value-type="float">
            <text:p>0,597977</text:p>
          </table:table-cell>
        </table:table-row>
        <table:table-row table:style-name="ro1">
          <table:table-cell office:value-type="string" calcext:value-type="string">
            <text:p>MILAGRES</text:p>
          </table:table-cell>
          <table:table-cell office:value-type="string" calcext:value-type="string">
            <text:p>COREMAS</text:p>
          </table:table-cell>
          <table:table-cell office:value-type="float" office:value="0.597648858123532" calcext:value-type="float">
            <text:p>0,597649</text:p>
          </table:table-cell>
        </table:table-row>
        <table:table-row table:style-name="ro1">
          <table:table-cell office:value-type="string" calcext:value-type="string">
            <text:p>IJUI 2</text:p>
          </table:table-cell>
          <table:table-cell office:value-type="string" calcext:value-type="string">
            <text:p>SANTO ANGELO2</text:p>
          </table:table-cell>
          <table:table-cell office:value-type="float" office:value="0.597509067762628" calcext:value-type="float">
            <text:p>0,597509</text:p>
          </table:table-cell>
        </table:table-row>
        <table:table-row table:style-name="ro1">
          <table:table-cell office:value-type="string" calcext:value-type="string">
            <text:p>L.GRANDE</text:p>
          </table:table-cell>
          <table:table-cell office:value-type="string" calcext:value-type="string">
            <text:p>FORQUILHINHA</text:p>
          </table:table-cell>
          <table:table-cell office:value-type="float" office:value="0.594898805125415" calcext:value-type="float">
            <text:p>0,594899</text:p>
          </table:table-cell>
        </table:table-row>
        <table:table-row table:style-name="ro1">
          <table:table-cell office:value-type="string" calcext:value-type="string">
            <text:p>GRAVATAI2</text:p>
          </table:table-cell>
          <table:table-cell office:value-type="string" calcext:value-type="string">
            <text:p>JBO LT GRA2</text:p>
          </table:table-cell>
          <table:table-cell office:value-type="float" office:value="0.594854814149308" calcext:value-type="float">
            <text:p>0,594855</text:p>
          </table:table-cell>
        </table:table-row>
        <table:table-row table:style-name="ro1">
          <table:table-cell office:value-type="string" calcext:value-type="string">
            <text:p>B. ESPERANCA</text:p>
          </table:table-cell>
          <table:table-cell office:value-type="string" calcext:value-type="string">
            <text:p>TERESINA</text:p>
          </table:table-cell>
          <table:table-cell office:value-type="float" office:value="0.594632237308461" calcext:value-type="float">
            <text:p>0,594632</text:p>
          </table:table-cell>
        </table:table-row>
        <table:table-row table:style-name="ro1">
          <table:table-cell office:value-type="string" calcext:value-type="string">
            <text:p>ATLANTIDA 2</text:p>
          </table:table-cell>
          <table:table-cell office:value-type="string" calcext:value-type="string">
            <text:p>GRAVATAI3</text:p>
          </table:table-cell>
          <table:table-cell office:value-type="float" office:value="0.594423120244704" calcext:value-type="float">
            <text:p>0,594423</text:p>
          </table:table-cell>
        </table:table-row>
        <table:table-row table:style-name="ro1">
          <table:table-cell office:value-type="string" calcext:value-type="string">
            <text:p>P.AFONSO III</text:p>
          </table:table-cell>
          <table:table-cell office:value-type="string" calcext:value-type="string">
            <text:p>ITABAIANA</text:p>
          </table:table-cell>
          <table:table-cell office:value-type="float" office:value="0.594312364213331" calcext:value-type="float">
            <text:p>0,594312</text:p>
          </table:table-cell>
        </table:table-row>
        <table:table-row table:style-name="ro1">
          <table:table-cell office:value-type="string" calcext:value-type="string">
            <text:p>PONTA G NORTE</text:p>
          </table:table-cell>
          <table:table-cell office:value-type="string" calcext:value-type="string">
            <text:p>PONTA GROSSA</text:p>
          </table:table-cell>
          <table:table-cell office:value-type="float" office:value="0.593769663699141" calcext:value-type="float">
            <text:p>0,593770</text:p>
          </table:table-cell>
        </table:table-row>
        <table:table-row table:style-name="ro1">
          <table:table-cell office:value-type="string" calcext:value-type="string">
            <text:p>BRASNORTE</text:p>
          </table:table-cell>
          <table:table-cell office:value-type="string" calcext:value-type="string">
            <text:p>PARECIS</text:p>
          </table:table-cell>
          <table:table-cell office:value-type="float" office:value="0.592534475548218" calcext:value-type="float">
            <text:p>0,592534</text:p>
          </table:table-cell>
        </table:table-row>
        <table:table-row table:style-name="ro1">
          <table:table-cell office:value-type="string" calcext:value-type="string">
            <text:p>CASTERTECH</text:p>
          </table:table-cell>
          <table:table-cell office:value-type="string" calcext:value-type="string">
            <text:p>CAXIAS 6</text:p>
          </table:table-cell>
          <table:table-cell office:value-type="float" office:value="0.592229441088298" calcext:value-type="float">
            <text:p>0,592229</text:p>
          </table:table-cell>
        </table:table-row>
        <table:table-row table:style-name="ro1">
          <table:table-cell office:value-type="string" calcext:value-type="string">
            <text:p>TOME ACU</text:p>
          </table:table-cell>
          <table:table-cell office:value-type="string" calcext:value-type="string">
            <text:p>VILA DO CONDE</text:p>
          </table:table-cell>
          <table:table-cell office:value-type="float" office:value="0.591115359855847" calcext:value-type="float">
            <text:p>0,591115</text:p>
          </table:table-cell>
        </table:table-row>
        <table:table-row table:style-name="ro1">
          <table:table-cell office:value-type="string" calcext:value-type="string">
            <text:p>FUNIL</text:p>
          </table:table-cell>
          <table:table-cell office:value-type="string" calcext:value-type="string">
            <text:p>STO.A.JESUS</text:p>
          </table:table-cell>
          <table:table-cell office:value-type="float" office:value="0.590541894514489" calcext:value-type="float">
            <text:p>0,590542</text:p>
          </table:table-cell>
        </table:table-row>
        <table:table-row table:style-name="ro1">
          <table:table-cell office:value-type="string" calcext:value-type="string">
            <text:p>BARRO ALTO</text:p>
          </table:table-cell>
          <table:table-cell office:value-type="string" calcext:value-type="string">
            <text:p>AGUAS LINDAS</text:p>
          </table:table-cell>
          <table:table-cell office:value-type="float" office:value="0.590400678471503" calcext:value-type="float">
            <text:p>0,590401</text:p>
          </table:table-cell>
        </table:table-row>
        <table:table-row table:style-name="ro1">
          <table:table-cell office:value-type="string" calcext:value-type="string">
            <text:p>MESQUITA</text:p>
          </table:table-cell>
          <table:table-cell office:value-type="string" calcext:value-type="string">
            <text:p>PORTO ESTRELA</text:p>
          </table:table-cell>
          <table:table-cell office:value-type="float" office:value="0.590129873079628" calcext:value-type="float">
            <text:p>0,590130</text:p>
          </table:table-cell>
        </table:table-row>
        <table:table-row table:style-name="ro1">
          <table:table-cell office:value-type="string" calcext:value-type="string">
            <text:p>CASTERTECH</text:p>
          </table:table-cell>
          <table:table-cell office:value-type="string" calcext:value-type="string">
            <text:p>CAXIAS SUL 2</text:p>
          </table:table-cell>
          <table:table-cell office:value-type="float" office:value="0.589934396668918" calcext:value-type="float">
            <text:p>0,589934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string" calcext:value-type="string">
            <text:p>CURITIBA NORT</text:p>
          </table:table-cell>
          <table:table-cell office:value-type="float" office:value="0.589026416981985" calcext:value-type="float">
            <text:p>0,589026</text:p>
          </table:table-cell>
        </table:table-row>
        <table:table-row table:style-name="ro1">
          <table:table-cell office:value-type="string" calcext:value-type="string">
            <text:p>CURIT.LESTE</text:p>
          </table:table-cell>
          <table:table-cell office:value-type="string" calcext:value-type="string">
            <text:p>D.S.J.PINHAIS</text:p>
          </table:table-cell>
          <table:table-cell office:value-type="float" office:value="0.588862341169151" calcext:value-type="float">
            <text:p>0,588862</text:p>
          </table:table-cell>
        </table:table-row>
        <table:table-row table:style-name="ro1">
          <table:table-cell office:value-type="string" calcext:value-type="string">
            <text:p>GRAVATAI2</text:p>
          </table:table-cell>
          <table:table-cell office:value-type="string" calcext:value-type="string">
            <text:p>PORTOALEGRE6</text:p>
          </table:table-cell>
          <table:table-cell office:value-type="float" office:value="0.58851527064585" calcext:value-type="float">
            <text:p>0,588515</text:p>
          </table:table-cell>
        </table:table-row>
        <table:table-row table:style-name="ro1">
          <table:table-cell office:value-type="string" calcext:value-type="string">
            <text:p>BRUMADO II</text:p>
          </table:table-cell>
          <table:table-cell office:value-type="string" calcext:value-type="string">
            <text:p>IBICOARA</text:p>
          </table:table-cell>
          <table:table-cell office:value-type="float" office:value="0.587804296009179" calcext:value-type="float">
            <text:p>0,587804</text:p>
          </table:table-cell>
        </table:table-row>
        <table:table-row table:style-name="ro1">
          <table:table-cell office:value-type="string" calcext:value-type="string">
            <text:p>GARIBALDI 1</text:p>
          </table:table-cell>
          <table:table-cell office:value-type="string" calcext:value-type="string">
            <text:p>VINHEDOS</text:p>
          </table:table-cell>
          <table:table-cell office:value-type="float" office:value="0.587037143049842" calcext:value-type="float">
            <text:p>0,587037</text:p>
          </table:table-cell>
        </table:table-row>
        <table:table-row table:style-name="ro1">
          <table:table-cell office:value-type="string" calcext:value-type="string">
            <text:p>EDEIA</text:p>
          </table:table-cell>
          <table:table-cell office:value-type="string" calcext:value-type="string">
            <text:p>PALMEIRAS</text:p>
          </table:table-cell>
          <table:table-cell office:value-type="float" office:value="0.586309577422932" calcext:value-type="float">
            <text:p>0,586310</text:p>
          </table:table-cell>
        </table:table-row>
        <table:table-row table:style-name="ro1">
          <table:table-cell office:value-type="string" calcext:value-type="string">
            <text:p>BARAO COCAIS3</text:p>
          </table:table-cell>
          <table:table-cell office:value-type="string" calcext:value-type="string">
            <text:p>TAQUARIL</text:p>
          </table:table-cell>
          <table:table-cell office:value-type="float" office:value="0.586234968638164" calcext:value-type="float">
            <text:p>0,586235</text:p>
          </table:table-cell>
        </table:table-row>
        <table:table-row table:style-name="ro1">
          <table:table-cell office:value-type="string" calcext:value-type="string">
            <text:p>GARIBALDI 1</text:p>
          </table:table-cell>
          <table:table-cell office:value-type="string" calcext:value-type="string">
            <text:p>LAJEADO III</text:p>
          </table:table-cell>
          <table:table-cell office:value-type="float" office:value="0.586075909886307" calcext:value-type="float">
            <text:p>0,586076</text:p>
          </table:table-cell>
        </table:table-row>
        <table:table-row table:style-name="ro1">
          <table:table-cell office:value-type="string" calcext:value-type="string">
            <text:p>PORTO ALEGRE8</text:p>
          </table:table-cell>
          <table:table-cell office:value-type="string" calcext:value-type="string">
            <text:p>PORTO ALEGRE9</text:p>
          </table:table-cell>
          <table:table-cell office:value-type="float" office:value="0.584382160322607" calcext:value-type="float">
            <text:p>0,584382</text:p>
          </table:table-cell>
        </table:table-row>
        <table:table-row table:style-name="ro1">
          <table:table-cell office:value-type="string" calcext:value-type="string">
            <text:p>JAGUARIAIVA</text:p>
          </table:table-cell>
          <table:table-cell office:value-type="string" calcext:value-type="string">
            <text:p>ITARARE II</text:p>
          </table:table-cell>
          <table:table-cell office:value-type="float" office:value="0.584144629743762" calcext:value-type="float">
            <text:p>0,584145</text:p>
          </table:table-cell>
        </table:table-row>
        <table:table-row table:style-name="ro1">
          <table:table-cell office:value-type="string" calcext:value-type="string">
            <text:p>PASSO FUNDO</text:p>
          </table:table-cell>
          <table:table-cell office:value-type="string" calcext:value-type="string">
            <text:p>XANXERE ESU</text:p>
          </table:table-cell>
          <table:table-cell office:value-type="float" office:value="0.582765336491148" calcext:value-type="float">
            <text:p>0,582765</text:p>
          </table:table-cell>
        </table:table-row>
        <table:table-row table:style-name="ro1">
          <table:table-cell office:value-type="string" calcext:value-type="string">
            <text:p>BOTUCATU</text:p>
          </table:table-cell>
          <table:table-cell office:value-type="string" calcext:value-type="string">
            <text:p>CAPAO BONITO</text:p>
          </table:table-cell>
          <table:table-cell office:value-type="float" office:value="0.581660504673998" calcext:value-type="float">
            <text:p>0,581661</text:p>
          </table:table-cell>
        </table:table-row>
        <table:table-row table:style-name="ro1">
          <table:table-cell office:value-type="string" calcext:value-type="string">
            <text:p>GUIL AMORIM-SE</text:p>
          </table:table-cell>
          <table:table-cell office:value-type="string" calcext:value-type="string">
            <text:p>IPATINGA 1</text:p>
          </table:table-cell>
          <table:table-cell office:value-type="float" office:value="0.580895850959404" calcext:value-type="float">
            <text:p>0,580896</text:p>
          </table:table-cell>
        </table:table-row>
        <table:table-row table:style-name="ro1">
          <table:table-cell office:value-type="string" calcext:value-type="string">
            <text:p>SIDEROPOL.ESU</text:p>
          </table:table-cell>
          <table:table-cell office:value-type="string" calcext:value-type="string">
            <text:p>TUBARAO SUL</text:p>
          </table:table-cell>
          <table:table-cell office:value-type="float" office:value="0.580832938933648" calcext:value-type="float">
            <text:p>0,580833</text:p>
          </table:table-cell>
        </table:table-row>
        <table:table-row table:style-name="ro1">
          <table:table-cell office:value-type="string" calcext:value-type="string">
            <text:p>BAR.COQUEIROS</text:p>
          </table:table-cell>
          <table:table-cell office:value-type="string" calcext:value-type="string">
            <text:p>QUIRINOPOLIS2</text:p>
          </table:table-cell>
          <table:table-cell office:value-type="float" office:value="0.579265312896641" calcext:value-type="float">
            <text:p>0,579265</text:p>
          </table:table-cell>
        </table:table-row>
        <table:table-row table:style-name="ro1">
          <table:table-cell office:value-type="string" calcext:value-type="string">
            <text:p>NOVA STA RITA</text:p>
          </table:table-cell>
          <table:table-cell office:value-type="string" calcext:value-type="string">
            <text:p>SCHARLAU 2</text:p>
          </table:table-cell>
          <table:table-cell office:value-type="float" office:value="0.57831204377719" calcext:value-type="float">
            <text:p>0,578312</text:p>
          </table:table-cell>
        </table:table-row>
        <table:table-row table:style-name="ro1">
          <table:table-cell office:value-type="string" calcext:value-type="string">
            <text:p>ITABUNA III</text:p>
          </table:table-cell>
          <table:table-cell office:value-type="string" calcext:value-type="string">
            <text:p>ITAPEBI SE</text:p>
          </table:table-cell>
          <table:table-cell office:value-type="float" office:value="0.578289864304456" calcext:value-type="float">
            <text:p>0,578290</text:p>
          </table:table-cell>
        </table:table-row>
        <table:table-row table:style-name="ro1">
          <table:table-cell office:value-type="string" calcext:value-type="string">
            <text:p>JUAZEIRO II</text:p>
          </table:table-cell>
          <table:table-cell office:value-type="string" calcext:value-type="string">
            <text:p>SR.BONFIM II</text:p>
          </table:table-cell>
          <table:table-cell office:value-type="float" office:value="0.577466975248223" calcext:value-type="float">
            <text:p>0,577467</text:p>
          </table:table-cell>
        </table:table-row>
        <table:table-row table:style-name="ro1">
          <table:table-cell office:value-type="string" calcext:value-type="string">
            <text:p>MASCARENHAS</text:p>
          </table:table-cell>
          <table:table-cell office:value-type="string" calcext:value-type="string">
            <text:p>VERONA</text:p>
          </table:table-cell>
          <table:table-cell office:value-type="float" office:value="0.577356052209031" calcext:value-type="float">
            <text:p>0,577356</text:p>
          </table:table-cell>
        </table:table-row>
        <table:table-row table:style-name="ro1">
          <table:table-cell office:value-type="string" calcext:value-type="string">
            <text:p>F.IGUACUNORTE</text:p>
          </table:table-cell>
          <table:table-cell office:value-type="string" calcext:value-type="string">
            <text:p>MEDIANEIRA NT</text:p>
          </table:table-cell>
          <table:table-cell office:value-type="float" office:value="0.577070237942314" calcext:value-type="float">
            <text:p>0,577070</text:p>
          </table:table-cell>
        </table:table-row>
        <table:table-row table:style-name="ro1">
          <table:table-cell office:value-type="string" calcext:value-type="string">
            <text:p>PASSO REAL</text:p>
          </table:table-cell>
          <table:table-cell office:value-type="string" calcext:value-type="string">
            <text:p>V.AIRES</text:p>
          </table:table-cell>
          <table:table-cell office:value-type="float" office:value="0.576900904240202" calcext:value-type="float">
            <text:p>0,576901</text:p>
          </table:table-cell>
        </table:table-row>
        <table:table-row table:style-name="ro1">
          <table:table-cell office:value-type="string" calcext:value-type="string">
            <text:p>BOM NOME</text:p>
          </table:table-cell>
          <table:table-cell office:value-type="string" calcext:value-type="string">
            <text:p>TACARATU</text:p>
          </table:table-cell>
          <table:table-cell office:value-type="float" office:value="0.576836590785957" calcext:value-type="float">
            <text:p>0,576837</text:p>
          </table:table-cell>
        </table:table-row>
        <table:table-row table:style-name="ro1">
          <table:table-cell office:value-type="string" calcext:value-type="string">
            <text:p>FARROUPILHA</text:p>
          </table:table-cell>
          <table:table-cell office:value-type="string" calcext:value-type="string">
            <text:p>GARIBALDI 1</text:p>
          </table:table-cell>
          <table:table-cell office:value-type="float" office:value="0.57541815467461" calcext:value-type="float">
            <text:p>0,575418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BANABUIU</text:p>
          </table:table-cell>
          <table:table-cell office:value-type="float" office:value="0.573230753956314" calcext:value-type="float">
            <text:p>0,573231</text:p>
          </table:table-cell>
        </table:table-row>
        <table:table-row table:style-name="ro1">
          <table:table-cell office:value-type="string" calcext:value-type="string">
            <text:p>PORTOALEGRE 4</text:p>
          </table:table-cell>
          <table:table-cell office:value-type="string" calcext:value-type="string">
            <text:p>PORTOALEGRE10</text:p>
          </table:table-cell>
          <table:table-cell office:value-type="float" office:value="0.573098556843624" calcext:value-type="float">
            <text:p>0,573099</text:p>
          </table:table-cell>
        </table:table-row>
        <table:table-row table:style-name="ro1">
          <table:table-cell office:value-type="string" calcext:value-type="string">
            <text:p>BAGUARI-SE</text:p>
          </table:table-cell>
          <table:table-cell office:value-type="string" calcext:value-type="string">
            <text:p>MESQUITA</text:p>
          </table:table-cell>
          <table:table-cell office:value-type="float" office:value="0.573074608225482" calcext:value-type="float">
            <text:p>0,573075</text:p>
          </table:table-cell>
        </table:table-row>
        <table:table-row table:style-name="ro1">
          <table:table-cell office:value-type="string" calcext:value-type="string">
            <text:p>MASCARENHAS</text:p>
          </table:table-cell>
          <table:table-cell office:value-type="string" calcext:value-type="string">
            <text:p>AIMORES-SE</text:p>
          </table:table-cell>
          <table:table-cell office:value-type="float" office:value="0.572239399078609" calcext:value-type="float">
            <text:p>0,572239</text:p>
          </table:table-cell>
        </table:table-row>
        <table:table-row table:style-name="ro1">
          <table:table-cell office:value-type="string" calcext:value-type="string">
            <text:p>LINHARES</text:p>
          </table:table-cell>
          <table:table-cell office:value-type="string" calcext:value-type="string">
            <text:p>MASCARENHAS</text:p>
          </table:table-cell>
          <table:table-cell office:value-type="float" office:value="0.571819544727012" calcext:value-type="float">
            <text:p>0,571820</text:p>
          </table:table-cell>
        </table:table-row>
        <table:table-row table:style-name="ro1">
          <table:table-cell office:value-type="string" calcext:value-type="string">
            <text:p>CURIT.LESTE</text:p>
          </table:table-cell>
          <table:table-cell office:value-type="string" calcext:value-type="string">
            <text:p>UBERABA</text:p>
          </table:table-cell>
          <table:table-cell office:value-type="float" office:value="0.570464083414618" calcext:value-type="float">
            <text:p>0,570464</text:p>
          </table:table-cell>
        </table:table-row>
        <table:table-row table:style-name="ro1">
          <table:table-cell office:value-type="string" calcext:value-type="string">
            <text:p>BROTAS.MACAUBAS</text:p>
          </table:table-cell>
          <table:table-cell office:value-type="string" calcext:value-type="string">
            <text:p>IRECE</text:p>
          </table:table-cell>
          <table:table-cell office:value-type="float" office:value="0.568290087146621" calcext:value-type="float">
            <text:p>0,568290</text:p>
          </table:table-cell>
        </table:table-row>
        <table:table-row table:style-name="ro1">
          <table:table-cell office:value-type="string" calcext:value-type="string">
            <text:p>D.S.J.PINHAIS</text:p>
          </table:table-cell>
          <table:table-cell office:value-type="string" calcext:value-type="string">
            <text:p>REPAR</text:p>
          </table:table-cell>
          <table:table-cell office:value-type="float" office:value="0.568185306891857" calcext:value-type="float">
            <text:p>0,568185</text:p>
          </table:table-cell>
        </table:table-row>
        <table:table-row table:style-name="ro1">
          <table:table-cell office:value-type="string" calcext:value-type="string">
            <text:p>L.D.RIO VERDE</text:p>
          </table:table-cell>
          <table:table-cell office:value-type="string" calcext:value-type="string">
            <text:p>NOVA MUTUM</text:p>
          </table:table-cell>
          <table:table-cell office:value-type="float" office:value="0.567336392467623" calcext:value-type="float">
            <text:p>0,567336</text:p>
          </table:table-cell>
        </table:table-row>
        <table:table-row table:style-name="ro1">
          <table:table-cell office:value-type="string" calcext:value-type="string">
            <text:p>BARAO COCAIS3</text:p>
          </table:table-cell>
          <table:table-cell office:value-type="string" calcext:value-type="string">
            <text:p>J.MONLEVADE 2</text:p>
          </table:table-cell>
          <table:table-cell office:value-type="float" office:value="0.566693780054984" calcext:value-type="float">
            <text:p>0,566694</text:p>
          </table:table-cell>
        </table:table-row>
        <table:table-row table:style-name="ro1">
          <table:table-cell office:value-type="string" calcext:value-type="string">
            <text:p>PICOS</text:p>
          </table:table-cell>
          <table:table-cell office:value-type="string" calcext:value-type="string">
            <text:p>S.JOAO PIAUI</text:p>
          </table:table-cell>
          <table:table-cell office:value-type="float" office:value="0.565649021633091" calcext:value-type="float">
            <text:p>0,565649</text:p>
          </table:table-cell>
        </table:table-row>
        <table:table-row table:style-name="ro1">
          <table:table-cell office:value-type="string" calcext:value-type="string">
            <text:p>C.GRANDE II</text:p>
          </table:table-cell>
          <table:table-cell office:value-type="string" calcext:value-type="string">
            <text:p>PARAISO</text:p>
          </table:table-cell>
          <table:table-cell office:value-type="float" office:value="0.564322667388878" calcext:value-type="float">
            <text:p>0,564323</text:p>
          </table:table-cell>
        </table:table-row>
        <table:table-row table:style-name="ro1">
          <table:table-cell office:value-type="string" calcext:value-type="string">
            <text:p>C.INDUSTRIAL</text:p>
          </table:table-cell>
          <table:table-cell office:value-type="string" calcext:value-type="string">
            <text:p>NOVA STA RITA</text:p>
          </table:table-cell>
          <table:table-cell office:value-type="float" office:value="0.563884319514447" calcext:value-type="float">
            <text:p>0,563884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office:value-type="string" calcext:value-type="string">
            <text:p>PLANALTO</text:p>
          </table:table-cell>
          <table:table-cell office:value-type="float" office:value="0.563018698374847" calcext:value-type="float">
            <text:p>0,563019</text:p>
          </table:table-cell>
        </table:table-row>
        <table:table-row table:style-name="ro1">
          <table:table-cell office:value-type="string" calcext:value-type="string">
            <text:p>CHAPADINHA II</text:p>
          </table:table-cell>
          <table:table-cell office:value-type="string" calcext:value-type="string">
            <text:p>COELHO NETO</text:p>
          </table:table-cell>
          <table:table-cell office:value-type="float" office:value="0.562872693364421" calcext:value-type="float">
            <text:p>0,562873</text:p>
          </table:table-cell>
        </table:table-row>
        <table:table-row table:style-name="ro1">
          <table:table-cell office:value-type="string" calcext:value-type="string">
            <text:p>BALSAS</text:p>
          </table:table-cell>
          <table:table-cell office:value-type="string" calcext:value-type="string">
            <text:p>RIB.GONCALVES</text:p>
          </table:table-cell>
          <table:table-cell office:value-type="float" office:value="0.561248596497777" calcext:value-type="float">
            <text:p>0,561249</text:p>
          </table:table-cell>
        </table:table-row>
        <table:table-row table:style-name="ro1">
          <table:table-cell office:value-type="string" calcext:value-type="string">
            <text:p>JABOATAO II</text:p>
          </table:table-cell>
          <table:table-cell office:value-type="string" calcext:value-type="string">
            <text:p>PIRAPAMA II</text:p>
          </table:table-cell>
          <table:table-cell office:value-type="float" office:value="0.561209071561565" calcext:value-type="float">
            <text:p>0,561209</text:p>
          </table:table-cell>
        </table:table-row>
        <table:table-row table:style-name="ro1">
          <table:table-cell office:value-type="string" calcext:value-type="string">
            <text:p>ITABIRA 2</text:p>
          </table:table-cell>
          <table:table-cell office:value-type="string" calcext:value-type="string">
            <text:p>J.MONLEVADE 4</text:p>
          </table:table-cell>
          <table:table-cell office:value-type="float" office:value="0.5604089240251" calcext:value-type="float">
            <text:p>0,560409</text:p>
          </table:table-cell>
        </table:table-row>
        <table:table-row table:style-name="ro1">
          <table:table-cell office:value-type="string" calcext:value-type="string">
            <text:p>P.DUTRA</text:p>
          </table:table-cell>
          <table:table-cell office:value-type="string" calcext:value-type="string">
            <text:p>PERITORO</text:p>
          </table:table-cell>
          <table:table-cell office:value-type="float" office:value="0.559180308388424" calcext:value-type="float">
            <text:p>0,559180</text:p>
          </table:table-cell>
        </table:table-row>
        <table:table-row table:style-name="ro1">
          <table:table-cell office:value-type="string" calcext:value-type="string">
            <text:p>C.GRANDE II</text:p>
          </table:table-cell>
          <table:table-cell office:value-type="string" calcext:value-type="string">
            <text:p>TACAIMBO</text:p>
          </table:table-cell>
          <table:table-cell office:value-type="float" office:value="0.55809856836923" calcext:value-type="float">
            <text:p>0,558099</text:p>
          </table:table-cell>
        </table:table-row>
        <table:table-row table:style-name="ro1">
          <table:table-cell office:value-type="string" calcext:value-type="string">
            <text:p>BRAS. GERAL</text:p>
          </table:table-cell>
          <table:table-cell office:value-type="string" calcext:value-type="string">
            <text:p>BRAS. SUL</text:p>
          </table:table-cell>
          <table:table-cell office:value-type="float" office:value="0.557610452612286" calcext:value-type="float">
            <text:p>0,557610</text:p>
          </table:table-cell>
        </table:table-row>
        <table:table-row table:style-name="ro1">
          <table:table-cell office:value-type="string" calcext:value-type="string">
            <text:p>CAMPO FORMOSO</text:p>
          </table:table-cell>
          <table:table-cell office:value-type="string" calcext:value-type="string">
            <text:p>OUROLANDIA II</text:p>
          </table:table-cell>
          <table:table-cell office:value-type="float" office:value="0.557345450717418" calcext:value-type="float">
            <text:p>0,557345</text:p>
          </table:table-cell>
        </table:table-row>
        <table:table-row table:style-name="ro1">
          <table:table-cell office:value-type="string" calcext:value-type="string">
            <text:p>INTEGRADORA</text:p>
          </table:table-cell>
          <table:table-cell office:value-type="string" calcext:value-type="string">
            <text:p>XINGUARA 2</text:p>
          </table:table-cell>
          <table:table-cell office:value-type="float" office:value="0.556757569714927" calcext:value-type="float">
            <text:p>0,556758</text:p>
          </table:table-cell>
        </table:table-row>
        <table:table-row table:style-name="ro1">
          <table:table-cell office:value-type="string" calcext:value-type="string">
            <text:p>CICERO DANTAS</text:p>
          </table:table-cell>
          <table:table-cell office:value-type="string" calcext:value-type="string">
            <text:p>P.AFONSO III</text:p>
          </table:table-cell>
          <table:table-cell office:value-type="float" office:value="0.55552336752791" calcext:value-type="float">
            <text:p>0,555523</text:p>
          </table:table-cell>
        </table:table-row>
        <table:table-row table:style-name="ro1">
          <table:table-cell office:value-type="string" calcext:value-type="string">
            <text:p>B.JESUS LAPA</text:p>
          </table:table-cell>
          <table:table-cell office:value-type="string" calcext:value-type="string">
            <text:p>TABOCAS BRJ VLH</text:p>
          </table:table-cell>
          <table:table-cell office:value-type="float" office:value="0.554953945523621" calcext:value-type="float">
            <text:p>0,554954</text:p>
          </table:table-cell>
        </table:table-row>
        <table:table-row table:style-name="ro1">
          <table:table-cell office:value-type="string" calcext:value-type="string">
            <text:p>CATU</text:p>
          </table:table-cell>
          <table:table-cell office:value-type="string" calcext:value-type="string">
            <text:p>CICERO DANTAS</text:p>
          </table:table-cell>
          <table:table-cell office:value-type="float" office:value="0.554686495401565" calcext:value-type="float">
            <text:p>0,554686</text:p>
          </table:table-cell>
        </table:table-row>
        <table:table-row table:style-name="ro1">
          <table:table-cell office:value-type="string" calcext:value-type="string">
            <text:p>ITABIRA 2</text:p>
          </table:table-cell>
          <table:table-cell office:value-type="string" calcext:value-type="string">
            <text:p>NOVA ERA 2</text:p>
          </table:table-cell>
          <table:table-cell office:value-type="float" office:value="0.553442927005751" calcext:value-type="float">
            <text:p>0,553443</text:p>
          </table:table-cell>
        </table:table-row>
        <table:table-row table:style-name="ro1">
          <table:table-cell office:value-type="string" calcext:value-type="string">
            <text:p>PASSO FUNDO</text:p>
          </table:table-cell>
          <table:table-cell office:value-type="string" calcext:value-type="string">
            <text:p>SANTA MARTA</text:p>
          </table:table-cell>
          <table:table-cell office:value-type="float" office:value="0.553248678964543" calcext:value-type="float">
            <text:p>0,553249</text:p>
          </table:table-cell>
        </table:table-row>
        <table:table-row table:style-name="ro1">
          <table:table-cell office:value-type="string" calcext:value-type="string">
            <text:p>CHARQUEADAS3</text:p>
          </table:table-cell>
          <table:table-cell office:value-type="string" calcext:value-type="string">
            <text:p>CHARQUEADAS</text:p>
          </table:table-cell>
          <table:table-cell office:value-type="float" office:value="0.552348488317951" calcext:value-type="float">
            <text:p>0,552348</text:p>
          </table:table-cell>
        </table:table-row>
        <table:table-row table:style-name="ro1">
          <table:table-cell office:value-type="string" calcext:value-type="string">
            <text:p>ARAPIRACA III</text:p>
          </table:table-cell>
          <table:table-cell office:value-type="string" calcext:value-type="string">
            <text:p>RIO LARGO II</text:p>
          </table:table-cell>
          <table:table-cell office:value-type="float" office:value="0.551706471330735" calcext:value-type="float">
            <text:p>0,551706</text:p>
          </table:table-cell>
        </table:table-row>
        <table:table-row table:style-name="ro1">
          <table:table-cell office:value-type="string" calcext:value-type="string">
            <text:p>S.MATEUS SUL</text:p>
          </table:table-cell>
          <table:table-cell office:value-type="string" calcext:value-type="string">
            <text:p>CANOINHAS ESU</text:p>
          </table:table-cell>
          <table:table-cell office:value-type="float" office:value="0.550920589316862" calcext:value-type="float">
            <text:p>0,550921</text:p>
          </table:table-cell>
        </table:table-row>
        <table:table-row table:style-name="ro1">
          <table:table-cell office:value-type="string" calcext:value-type="string">
            <text:p>FIBRAPLAC</text:p>
          </table:table-cell>
          <table:table-cell office:value-type="string" calcext:value-type="string">
            <text:p>OSORIO 2</text:p>
          </table:table-cell>
          <table:table-cell office:value-type="float" office:value="0.550003227356592" calcext:value-type="float">
            <text:p>0,550003</text:p>
          </table:table-cell>
        </table:table-row>
        <table:table-row table:style-name="ro1">
          <table:table-cell office:value-type="string" calcext:value-type="string">
            <text:p>IMPERATRIZ</text:p>
          </table:table-cell>
          <table:table-cell office:value-type="string" calcext:value-type="string">
            <text:p>PORTO FRANCO</text:p>
          </table:table-cell>
          <table:table-cell office:value-type="float" office:value="0.548827199444247" calcext:value-type="float">
            <text:p>0,548827</text:p>
          </table:table-cell>
        </table:table-row>
        <table:table-row table:style-name="ro1">
          <table:table-cell office:value-type="string" calcext:value-type="string">
            <text:p>SINOP</text:p>
          </table:table-cell>
          <table:table-cell office:value-type="string" calcext:value-type="string">
            <text:p>SORRISO II</text:p>
          </table:table-cell>
          <table:table-cell office:value-type="float" office:value="0.546614132945492" calcext:value-type="float">
            <text:p>0,546614</text:p>
          </table:table-cell>
        </table:table-row>
        <table:table-row table:style-name="ro1">
          <table:table-cell office:value-type="string" calcext:value-type="string">
            <text:p>CAXIAS</text:p>
          </table:table-cell>
          <table:table-cell office:value-type="string" calcext:value-type="string">
            <text:p>CAXIAS SUL 5</text:p>
          </table:table-cell>
          <table:table-cell office:value-type="float" office:value="0.546436307648266" calcext:value-type="float">
            <text:p>0,546436</text:p>
          </table:table-cell>
        </table:table-row>
        <table:table-row table:style-name="ro1">
          <table:table-cell office:value-type="string" calcext:value-type="string">
            <text:p>CAMACARI II</text:p>
          </table:table-cell>
          <table:table-cell office:value-type="string" calcext:value-type="string">
            <text:p>F. SANTANA III</text:p>
          </table:table-cell>
          <table:table-cell office:value-type="float" office:value="0.545167311218895" calcext:value-type="float">
            <text:p>0,545167</text:p>
          </table:table-cell>
        </table:table-row>
        <table:table-row table:style-name="ro1">
          <table:table-cell office:value-type="string" calcext:value-type="string">
            <text:p>RECIFE II</text:p>
          </table:table-cell>
          <table:table-cell office:value-type="string" calcext:value-type="string">
            <text:p>JOAIRAM</text:p>
          </table:table-cell>
          <table:table-cell office:value-type="float" office:value="0.544917866441325" calcext:value-type="float">
            <text:p>0,544918</text:p>
          </table:table-cell>
        </table:table-row>
        <table:table-row table:style-name="ro1">
          <table:table-cell office:value-type="string" calcext:value-type="string">
            <text:p>CHAPADA II</text:p>
          </table:table-cell>
          <table:table-cell office:value-type="string" calcext:value-type="string">
            <text:p>PICOS</text:p>
          </table:table-cell>
          <table:table-cell office:value-type="float" office:value="0.544083511009021" calcext:value-type="float">
            <text:p>0,544084</text:p>
          </table:table-cell>
        </table:table-row>
        <table:table-row table:style-name="ro1">
          <table:table-cell office:value-type="string" calcext:value-type="string">
            <text:p>NSA.SRA.SOCORRO</text:p>
          </table:table-cell>
          <table:table-cell office:value-type="string" calcext:value-type="string">
            <text:p>PENEDO</text:p>
          </table:table-cell>
          <table:table-cell office:value-type="float" office:value="0.544027335877047" calcext:value-type="float">
            <text:p>0,544027</text:p>
          </table:table-cell>
        </table:table-row>
        <table:table-row table:style-name="ro1">
          <table:table-cell office:value-type="string" calcext:value-type="string">
            <text:p>CHAPADA III</text:p>
          </table:table-cell>
          <table:table-cell office:value-type="string" calcext:value-type="string">
            <text:p>CURRAL PIAUI II</text:p>
          </table:table-cell>
          <table:table-cell office:value-type="float" office:value="0.542696531078787" calcext:value-type="float">
            <text:p>0,542697</text:p>
          </table:table-cell>
        </table:table-row>
        <table:table-row table:style-name="ro1">
          <table:table-cell office:value-type="string" calcext:value-type="string">
            <text:p>GOIANINHA</text:p>
          </table:table-cell>
          <table:table-cell office:value-type="string" calcext:value-type="string">
            <text:p>RECIFE II</text:p>
          </table:table-cell>
          <table:table-cell office:value-type="float" office:value="0.541204296672101" calcext:value-type="float">
            <text:p>0,541204</text:p>
          </table:table-cell>
        </table:table-row>
        <table:table-row table:style-name="ro1">
          <table:table-cell office:value-type="string" calcext:value-type="string">
            <text:p>ACAILANDIA</text:p>
          </table:table-cell>
          <table:table-cell office:value-type="string" calcext:value-type="string">
            <text:p>DOM ELISEU II</text:p>
          </table:table-cell>
          <table:table-cell office:value-type="float" office:value="0.53794044888476" calcext:value-type="float">
            <text:p>0,537940</text:p>
          </table:table-cell>
        </table:table-row>
        <table:table-row table:style-name="ro1">
          <table:table-cell office:value-type="string" calcext:value-type="string">
            <text:p>CHAPADA I</text:p>
          </table:table-cell>
          <table:table-cell office:value-type="string" calcext:value-type="string">
            <text:p>CURRAL PIAUI II</text:p>
          </table:table-cell>
          <table:table-cell office:value-type="float" office:value="0.536102354097016" calcext:value-type="float">
            <text:p>0,536102</text:p>
          </table:table-cell>
        </table:table-row>
        <table:table-row table:style-name="ro1">
          <table:table-cell office:value-type="string" calcext:value-type="string">
            <text:p>CAMACARI II</text:p>
          </table:table-cell>
          <table:table-cell office:value-type="string" calcext:value-type="string">
            <text:p>G.MANGABEIRA</text:p>
          </table:table-cell>
          <table:table-cell office:value-type="float" office:value="0.534964795389863" calcext:value-type="float">
            <text:p>0,534965</text:p>
          </table:table-cell>
        </table:table-row>
        <table:table-row table:style-name="ro1">
          <table:table-cell office:value-type="string" calcext:value-type="string">
            <text:p>ELDORADO SUL</text:p>
          </table:table-cell>
          <table:table-cell office:value-type="string" calcext:value-type="string">
            <text:p>PORTO ALEGRE9</text:p>
          </table:table-cell>
          <table:table-cell office:value-type="float" office:value="0.532501263414657" calcext:value-type="float">
            <text:p>0,532501</text:p>
          </table:table-cell>
        </table:table-row>
        <table:table-row table:style-name="ro1">
          <table:table-cell office:value-type="string" calcext:value-type="string">
            <text:p>C.INDUSTRIAL</text:p>
          </table:table-cell>
          <table:table-cell office:value-type="string" calcext:value-type="string">
            <text:p>CACHOEIRINHA3</text:p>
          </table:table-cell>
          <table:table-cell office:value-type="float" office:value="0.532083363689718" calcext:value-type="float">
            <text:p>0,532083</text:p>
          </table:table-cell>
        </table:table-row>
        <table:table-row table:style-name="ro1">
          <table:table-cell office:value-type="string" calcext:value-type="string">
            <text:p>C.INDUSTRIAL</text:p>
          </table:table-cell>
          <table:table-cell office:value-type="string" calcext:value-type="string">
            <text:p>CANOAS 2</text:p>
          </table:table-cell>
          <table:table-cell office:value-type="float" office:value="0.531868916266611" calcext:value-type="float">
            <text:p>0,531869</text:p>
          </table:table-cell>
        </table:table-row>
        <table:table-row table:style-name="ro1">
          <table:table-cell office:value-type="string" calcext:value-type="string">
            <text:p>NOVA PRATA 2</text:p>
          </table:table-cell>
          <table:table-cell office:value-type="string" calcext:value-type="string">
            <text:p>VILA MARIA</text:p>
          </table:table-cell>
          <table:table-cell office:value-type="float" office:value="0.529809593742367" calcext:value-type="float">
            <text:p>0,529810</text:p>
          </table:table-cell>
        </table:table-row>
        <table:table-row table:style-name="ro1">
          <table:table-cell office:value-type="string" calcext:value-type="string">
            <text:p>CAXIAS II</text:p>
          </table:table-cell>
          <table:table-cell office:value-type="string" calcext:value-type="string">
            <text:p>PERITORO</text:p>
          </table:table-cell>
          <table:table-cell office:value-type="float" office:value="0.528077337742075" calcext:value-type="float">
            <text:p>0,528077</text:p>
          </table:table-cell>
        </table:table-row>
        <table:table-row table:style-name="ro1">
          <table:table-cell office:value-type="string" calcext:value-type="string">
            <text:p>SANTANA II</text:p>
          </table:table-cell>
          <table:table-cell office:value-type="string" calcext:value-type="string">
            <text:p>ANGELIM</text:p>
          </table:table-cell>
          <table:table-cell office:value-type="float" office:value="0.526517909292257" calcext:value-type="float">
            <text:p>0,526518</text:p>
          </table:table-cell>
        </table:table-row>
        <table:table-row table:style-name="ro1">
          <table:table-cell office:value-type="string" calcext:value-type="string">
            <text:p>CAMPO ASSOBIO</text:p>
          </table:table-cell>
          <table:table-cell office:value-type="string" calcext:value-type="string">
            <text:p>UMBARA</text:p>
          </table:table-cell>
          <table:table-cell office:value-type="float" office:value="0.525537633782488" calcext:value-type="float">
            <text:p>0,525538</text:p>
          </table:table-cell>
        </table:table-row>
        <table:table-row table:style-name="ro1">
          <table:table-cell office:value-type="string" calcext:value-type="string">
            <text:p>BARRO ALTO</text:p>
          </table:table-cell>
          <table:table-cell office:value-type="string" calcext:value-type="string">
            <text:p>ITAPACI</text:p>
          </table:table-cell>
          <table:table-cell office:value-type="float" office:value="0.524212375028808" calcext:value-type="float">
            <text:p>0,524212</text:p>
          </table:table-cell>
        </table:table-row>
        <table:table-row table:style-name="ro1">
          <table:table-cell office:value-type="string" calcext:value-type="string">
            <text:p>CURR NOVOS II</text:p>
          </table:table-cell>
          <table:table-cell office:value-type="string" calcext:value-type="string">
            <text:p>LAGOA NOVA II</text:p>
          </table:table-cell>
          <table:table-cell office:value-type="float" office:value="0.523705734874988" calcext:value-type="float">
            <text:p>0,523706</text:p>
          </table:table-cell>
        </table:table-row>
        <table:table-row table:style-name="ro1">
          <table:table-cell office:value-type="string" calcext:value-type="string">
            <text:p>ITAGIBA</text:p>
          </table:table-cell>
          <table:table-cell office:value-type="string" calcext:value-type="string">
            <text:p>POCOES II</text:p>
          </table:table-cell>
          <table:table-cell office:value-type="float" office:value="0.523419582274096" calcext:value-type="float">
            <text:p>0,523420</text:p>
          </table:table-cell>
        </table:table-row>
        <table:table-row table:style-name="ro1">
          <table:table-cell office:value-type="string" calcext:value-type="string">
            <text:p>JAGUARARI-SE</text:p>
          </table:table-cell>
          <table:table-cell office:value-type="string" calcext:value-type="string">
            <text:p>JUAZEIRO II</text:p>
          </table:table-cell>
          <table:table-cell office:value-type="float" office:value="0.520348356837104" calcext:value-type="float">
            <text:p>0,520348</text:p>
          </table:table-cell>
        </table:table-row>
        <table:table-row table:style-name="ro1">
          <table:table-cell office:value-type="string" calcext:value-type="string">
            <text:p>C.INDUSTRIAL</text:p>
          </table:table-cell>
          <table:table-cell office:value-type="string" calcext:value-type="string">
            <text:p>CANOAS 1</text:p>
          </table:table-cell>
          <table:table-cell office:value-type="float" office:value="0.517855998009005" calcext:value-type="float">
            <text:p>0,517856</text:p>
          </table:table-cell>
        </table:table-row>
        <table:table-row table:style-name="ro1">
          <table:table-cell office:value-type="string" calcext:value-type="string">
            <text:p>ARIQUEMES</text:p>
          </table:table-cell>
          <table:table-cell office:value-type="string" calcext:value-type="string">
            <text:p>JARU</text:p>
          </table:table-cell>
          <table:table-cell office:value-type="float" office:value="0.517379070790593" calcext:value-type="float">
            <text:p>0,517379</text:p>
          </table:table-cell>
        </table:table-row>
        <table:table-row table:style-name="ro1">
          <table:table-cell office:value-type="string" calcext:value-type="string">
            <text:p>PORTOALEGRE13</text:p>
          </table:table-cell>
          <table:table-cell office:value-type="string" calcext:value-type="string">
            <text:p>PORTOALEGRE6</text:p>
          </table:table-cell>
          <table:table-cell office:value-type="float" office:value="0.51433132917011" calcext:value-type="float">
            <text:p>0,514331</text:p>
          </table:table-cell>
        </table:table-row>
        <table:table-row table:style-name="ro1">
          <table:table-cell office:value-type="string" calcext:value-type="string">
            <text:p>COTEGIPE</text:p>
          </table:table-cell>
          <table:table-cell office:value-type="string" calcext:value-type="string">
            <text:p>MATATU</text:p>
          </table:table-cell>
          <table:table-cell office:value-type="float" office:value="0.514175123803155" calcext:value-type="float">
            <text:p>0,514175</text:p>
          </table:table-cell>
        </table:table-row>
        <table:table-row table:style-name="ro1">
          <table:table-cell office:value-type="string" calcext:value-type="string">
            <text:p>QUIXERE</text:p>
          </table:table-cell>
          <table:table-cell office:value-type="string" calcext:value-type="string">
            <text:p>MOSSORO II</text:p>
          </table:table-cell>
          <table:table-cell office:value-type="float" office:value="0.512671767386472" calcext:value-type="float">
            <text:p>0,512672</text:p>
          </table:table-cell>
        </table:table-row>
        <table:table-row table:style-name="ro1">
          <table:table-cell office:value-type="string" calcext:value-type="string">
            <text:p>RESTINGA</text:p>
          </table:table-cell>
          <table:table-cell office:value-type="string" calcext:value-type="string">
            <text:p>VIAMAO 3</text:p>
          </table:table-cell>
          <table:table-cell office:value-type="float" office:value="0.507287298900211" calcext:value-type="float">
            <text:p>0,507287</text:p>
          </table:table-cell>
        </table:table-row>
        <table:table-row table:style-name="ro1">
          <table:table-cell office:value-type="string" calcext:value-type="string">
            <text:p>CATU</text:p>
          </table:table-cell>
          <table:table-cell office:value-type="string" calcext:value-type="string">
            <text:p>ITABAIANINHA</text:p>
          </table:table-cell>
          <table:table-cell office:value-type="float" office:value="0.505640567629256" calcext:value-type="float">
            <text:p>0,505641</text:p>
          </table:table-cell>
        </table:table-row>
        <table:table-row table:style-name="ro1">
          <table:table-cell office:value-type="string" calcext:value-type="string">
            <text:p>ANGELIM</text:p>
          </table:table-cell>
          <table:table-cell office:value-type="string" calcext:value-type="string">
            <text:p>RIBEIRAO</text:p>
          </table:table-cell>
          <table:table-cell office:value-type="float" office:value="0.504483712811726" calcext:value-type="float">
            <text:p>0,504484</text:p>
          </table:table-cell>
        </table:table-row>
        <table:table-row table:style-name="ro1">
          <table:table-cell office:value-type="string" calcext:value-type="string">
            <text:p>RECIFE II</text:p>
          </table:table-cell>
          <table:table-cell office:value-type="string" calcext:value-type="string">
            <text:p>MIRUEIRA</text:p>
          </table:table-cell>
          <table:table-cell office:value-type="float" office:value="0.502146942915382" calcext:value-type="float">
            <text:p>0,502147</text:p>
          </table:table-cell>
        </table:table-row>
        <table:table-row table:style-name="ro1">
          <table:table-cell office:value-type="string" calcext:value-type="string">
            <text:p>CARAJAS</text:p>
          </table:table-cell>
          <table:table-cell office:value-type="string" calcext:value-type="string">
            <text:p>PALMEIRAS</text:p>
          </table:table-cell>
          <table:table-cell office:value-type="float" office:value="0.49882511460612" calcext:value-type="float">
            <text:p>0,498825</text:p>
          </table:table-cell>
        </table:table-row>
        <table:table-row table:style-name="ro1">
          <table:table-cell office:value-type="string" calcext:value-type="string">
            <text:p>MATA NORTE</text:p>
          </table:table-cell>
          <table:table-cell office:value-type="string" calcext:value-type="string">
            <text:p>PAU FERRO</text:p>
          </table:table-cell>
          <table:table-cell office:value-type="float" office:value="0.497534920435123" calcext:value-type="float">
            <text:p>0,497535</text:p>
          </table:table-cell>
        </table:table-row>
        <table:table-row table:style-name="ro1">
          <table:table-cell office:value-type="string" calcext:value-type="string">
            <text:p>PARANAIBA</text:p>
          </table:table-cell>
          <table:table-cell office:value-type="string" calcext:value-type="string">
            <text:p>ITUMBIARA</text:p>
          </table:table-cell>
          <table:table-cell office:value-type="float" office:value="0.491372874789777" calcext:value-type="float">
            <text:p>0,491373</text:p>
          </table:table-cell>
        </table:table-row>
        <table:table-row table:style-name="ro1">
          <table:table-cell office:value-type="string" calcext:value-type="string">
            <text:p>SANTA MARTA</text:p>
          </table:table-cell>
          <table:table-cell office:value-type="string" calcext:value-type="string">
            <text:p>TAPERA 2</text:p>
          </table:table-cell>
          <table:table-cell office:value-type="float" office:value="0.488057402971087" calcext:value-type="float">
            <text:p>0,488057</text:p>
          </table:table-cell>
        </table:table-row>
        <table:table-row table:style-name="ro1">
          <table:table-cell office:value-type="string" calcext:value-type="string">
            <text:p>CASTANHAL</text:p>
          </table:table-cell>
          <table:table-cell office:value-type="string" calcext:value-type="string">
            <text:p>SANTA MARIA</text:p>
          </table:table-cell>
          <table:table-cell office:value-type="float" office:value="0.486307433464683" calcext:value-type="float">
            <text:p>0,486307</text:p>
          </table:table-cell>
        </table:table-row>
        <table:table-row table:style-name="ro1">
          <table:table-cell office:value-type="string" calcext:value-type="string">
            <text:p>G.MANGABEIRA</text:p>
          </table:table-cell>
          <table:table-cell office:value-type="string" calcext:value-type="string">
            <text:p>TOMBA</text:p>
          </table:table-cell>
          <table:table-cell office:value-type="float" office:value="0.478781098728383" calcext:value-type="float">
            <text:p>0,478781</text:p>
          </table:table-cell>
        </table:table-row>
        <table:table-row table:style-name="ro1">
          <table:table-cell office:value-type="string" calcext:value-type="string">
            <text:p>CURIT.LESTE</text:p>
          </table:table-cell>
          <table:table-cell office:value-type="string" calcext:value-type="string">
            <text:p>POSTO FISCAL</text:p>
          </table:table-cell>
          <table:table-cell office:value-type="float" office:value="0.478516614717194" calcext:value-type="float">
            <text:p>0,478517</text:p>
          </table:table-cell>
        </table:table-row>
        <table:table-row table:style-name="ro1">
          <table:table-cell office:value-type="string" calcext:value-type="string">
            <text:p>PARIGOT SOUZA</text:p>
          </table:table-cell>
          <table:table-cell office:value-type="string" calcext:value-type="string">
            <text:p>SANTA MONICA</text:p>
          </table:table-cell>
          <table:table-cell office:value-type="float" office:value="0.476435583062377" calcext:value-type="float">
            <text:p>0,476436</text:p>
          </table:table-cell>
        </table:table-row>
        <table:table-row table:style-name="ro1">
          <table:table-cell office:value-type="string" calcext:value-type="string">
            <text:p>ALAGOINHAS II</text:p>
          </table:table-cell>
          <table:table-cell office:value-type="string" calcext:value-type="string">
            <text:p>OLINDINA</text:p>
          </table:table-cell>
          <table:table-cell office:value-type="float" office:value="0.472598630846391" calcext:value-type="float">
            <text:p>0,472599</text:p>
          </table:table-cell>
        </table:table-row>
        <table:table-row table:style-name="ro1">
          <table:table-cell office:value-type="string" calcext:value-type="string">
            <text:p>GOIANIA LESTE</text:p>
          </table:table-cell>
          <table:table-cell office:value-type="string" calcext:value-type="string">
            <text:p>XAVANTES</text:p>
          </table:table-cell>
          <table:table-cell office:value-type="float" office:value="0.468668396878097" calcext:value-type="float">
            <text:p>0,468668</text:p>
          </table:table-cell>
        </table:table-row>
        <table:table-row table:style-name="ro1">
          <table:table-cell office:value-type="string" calcext:value-type="string">
            <text:p>APERAM</text:p>
          </table:table-cell>
          <table:table-cell office:value-type="string" calcext:value-type="string">
            <text:p>TIMOTEO 2</text:p>
          </table:table-cell>
          <table:table-cell office:value-type="float" office:value="0.467436782517718" calcext:value-type="float">
            <text:p>0,467437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string" calcext:value-type="string">
            <text:p>POLO</text:p>
          </table:table-cell>
          <table:table-cell office:value-type="float" office:value="0.465689358842882" calcext:value-type="float">
            <text:p>0,465689</text:p>
          </table:table-cell>
        </table:table-row>
        <table:table-row table:style-name="ro1">
          <table:table-cell office:value-type="string" calcext:value-type="string">
            <text:p>JOAO PESSOA II</text:p>
          </table:table-cell>
          <table:table-cell office:value-type="string" calcext:value-type="string">
            <text:p>MUSSURE II</text:p>
          </table:table-cell>
          <table:table-cell office:value-type="float" office:value="0.465380364516462" calcext:value-type="float">
            <text:p>0,465380</text:p>
          </table:table-cell>
        </table:table-row>
        <table:table-row table:style-name="ro1">
          <table:table-cell office:value-type="string" calcext:value-type="string">
            <text:p>PEROXIDOS</text:p>
          </table:table-cell>
          <table:table-cell office:value-type="string" calcext:value-type="string">
            <text:p>UMBARA</text:p>
          </table:table-cell>
          <table:table-cell office:value-type="float" office:value="0.459093528909336" calcext:value-type="float">
            <text:p>0,459094</text:p>
          </table:table-cell>
        </table:table-row>
        <table:table-row table:style-name="ro1">
          <table:table-cell office:value-type="string" calcext:value-type="string">
            <text:p>DELM. GOUVEIA</text:p>
          </table:table-cell>
          <table:table-cell office:value-type="string" calcext:value-type="string">
            <text:p>FORTALEZA II</text:p>
          </table:table-cell>
          <table:table-cell office:value-type="float" office:value="0.456005226841273" calcext:value-type="float">
            <text:p>0,456005</text:p>
          </table:table-cell>
        </table:table-row>
        <table:table-row table:style-name="ro1">
          <table:table-cell office:value-type="string" calcext:value-type="string">
            <text:p>BONGI</text:p>
          </table:table-cell>
          <table:table-cell office:value-type="string" calcext:value-type="string">
            <text:p>JOAIRAM</text:p>
          </table:table-cell>
          <table:table-cell office:value-type="float" office:value="0.45206543613507" calcext:value-type="float">
            <text:p>0,452065</text:p>
          </table:table-cell>
        </table:table-row>
        <table:table-row table:style-name="ro1">
          <table:table-cell office:value-type="string" calcext:value-type="string">
            <text:p>GOIANINHA</text:p>
          </table:table-cell>
          <table:table-cell office:value-type="string" calcext:value-type="string">
            <text:p>NORFIL</text:p>
          </table:table-cell>
          <table:table-cell office:value-type="float" office:value="0.449175872025374" calcext:value-type="float">
            <text:p>0,449176</text:p>
          </table:table-cell>
        </table:table-row>
        <table:table-row table:style-name="ro1">
          <table:table-cell office:value-type="string" calcext:value-type="string">
            <text:p>P.AFONSO III</text:p>
          </table:table-cell>
          <table:table-cell office:value-type="string" calcext:value-type="string">
            <text:p>ZEBU</text:p>
          </table:table-cell>
          <table:table-cell office:value-type="float" office:value="0.445913657302346" calcext:value-type="float">
            <text:p>0,445914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POLO</text:p>
          </table:table-cell>
          <table:table-cell office:value-type="float" office:value="0.442634977332543" calcext:value-type="float">
            <text:p>0,442635</text:p>
          </table:table-cell>
        </table:table-row>
        <table:table-row table:style-name="ro1">
          <table:table-cell office:value-type="string" calcext:value-type="string">
            <text:p>B. ESPERANCA</text:p>
          </table:table-cell>
          <table:table-cell office:value-type="string" calcext:value-type="string">
            <text:p>UB.ESPERANCA</text:p>
          </table:table-cell>
          <table:table-cell office:value-type="float" office:value="0.441639592953297" calcext:value-type="float">
            <text:p>0,441640</text:p>
          </table:table-cell>
        </table:table-row>
        <table:table-row table:style-name="ro1">
          <table:table-cell office:value-type="string" calcext:value-type="string">
            <text:p>DARDANELOS</text:p>
          </table:table-cell>
          <table:table-cell office:value-type="string" calcext:value-type="string">
            <text:p>JUINA</text:p>
          </table:table-cell>
          <table:table-cell office:value-type="float" office:value="0.348329851787543" calcext:value-type="float">
            <text:p>0,348330</text:p>
          </table:table-cell>
        </table:table-row>
        <table:table-row table:style-name="ro1">
          <table:table-cell office:value-type="string" calcext:value-type="string">
            <text:p>ASOLO 2</text:p>
          </table:table-cell>
          <table:table-cell office:value-type="string" calcext:value-type="string">
            <text:p>C. DOURADA</text:p>
          </table:table-cell>
          <table:table-cell office:value-type="float" office:value="0.283830845358862" calcext:value-type="float">
            <text:p>0,283831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SIMPLICE</text:p>
          </table:table-cell>
          <table:table-cell office:value-type="float" office:value="0.281638366063644" calcext:value-type="float">
            <text:p>0,281638</text:p>
          </table:table-cell>
        </table:table-row>
        <table:table-row table:style-name="ro1">
          <table:table-cell office:value-type="string" calcext:value-type="string">
            <text:p>EDGARD SOUZA</text:p>
          </table:table-cell>
          <table:table-cell office:value-type="string" calcext:value-type="string">
            <text:p>SCALA III</text:p>
          </table:table-cell>
          <table:table-cell office:value-type="float" office:value="0.252982855969985" calcext:value-type="float">
            <text:p>0,252983</text:p>
          </table:table-cell>
        </table:table-row>
      </table:table>
      <table:table table:name="top10" table:style-name="ta1">
        <table:table-column table:style-name="co9" table:default-cell-style-name="ce16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row table:style-name="ro1">
          <table:table-cell table:style-name="ce15" office:value-type="string" calcext:value-type="string" table:number-columns-spanned="1" table:number-rows-spanned="2">
            <text:p>Posicion</text:p>
          </table:table-cell>
          <table:table-cell table:style-name="ce15" office:value-type="string" calcext:value-type="string" table:number-columns-spanned="2" table:number-rows-spanned="1">
            <text:p>Technical</text:p>
          </table:table-cell>
          <table:covered-table-cell table:style-name="ce16"/>
          <table:table-cell table:style-name="ce15" office:value-type="string" calcext:value-type="string" table:number-columns-spanned="1" table:number-rows-spanned="2">
            <text:p>weight</text:p>
          </table:table-cell>
          <table:table-cell table:style-name="ce16"/>
          <table:table-cell table:style-name="ce15" office:value-type="string" calcext:value-type="string" table:number-columns-spanned="2" table:number-rows-spanned="1">
            <text:p>Social</text:p>
          </table:table-cell>
          <table:covered-table-cell table:style-name="ce16"/>
          <table:table-cell table:style-name="ce15" office:value-type="string" calcext:value-type="string" table:number-columns-spanned="1" table:number-rows-spanned="2">
            <text:p>weight</text:p>
          </table:table-cell>
        </table:table-row>
        <table:table-row table:style-name="ro1">
          <table:covered-table-cell/>
          <table:table-cell table:style-name="ce16" office:value-type="string" calcext:value-type="string">
            <text:p>from</text:p>
          </table:table-cell>
          <table:table-cell table:style-name="ce16" office:value-type="string" calcext:value-type="string">
            <text:p>to</text:p>
          </table:table-cell>
          <table:covered-table-cell table:style-name="ce16"/>
          <table:table-cell table:style-name="ce16"/>
          <table:table-cell table:style-name="ce16" office:value-type="string" calcext:value-type="string">
            <text:p>from</text:p>
          </table:table-cell>
          <table:table-cell table:style-name="ce16" office:value-type="string" calcext:value-type="string">
            <text:p>to</text:p>
          </table:table-cell>
          <table:covered-table-cell table:style-name="ce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JUCO PRETO</text:p>
          </table:table-cell>
          <table:table-cell office:value-type="string" calcext:value-type="string">
            <text:p>ITABERA</text:p>
          </table:table-cell>
          <table:table-cell table:style-name="ce17" office:value-type="float" office:value="2.42830220156315" calcext:value-type="float">
            <text:p>2,428302</text:p>
          </table:table-cell>
          <table:table-cell/>
          <table:table-cell office:value-type="string" calcext:value-type="string">
            <text:p>RIO DAS EGUAS</text:p>
          </table:table-cell>
          <table:table-cell office:value-type="string" calcext:value-type="string">
            <text:p>LUZIANIA</text:p>
          </table:table-cell>
          <table:table-cell table:style-name="ce17" office:value-type="float" office:value="2.57979222850736" calcext:value-type="float">
            <text:p>2,5797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BERA</text:p>
          </table:table-cell>
          <table:table-cell office:value-type="string" calcext:value-type="string">
            <text:p>IVAIPORA FUR</text:p>
          </table:table-cell>
          <table:table-cell table:style-name="ce17" office:value-type="float" office:value="2.39316669549539" calcext:value-type="float">
            <text:p>2,393167</text:p>
          </table:table-cell>
          <table:table-cell/>
          <table:table-cell office:value-type="string" calcext:value-type="string">
            <text:p>TIJUCO PRETO</text:p>
          </table:table-cell>
          <table:table-cell office:value-type="string" calcext:value-type="string">
            <text:p>ITABERA</text:p>
          </table:table-cell>
          <table:table-cell table:style-name="ce17" office:value-type="float" office:value="2.48981791096995" calcext:value-type="float">
            <text:p>2,4898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O DAS EGUAS</text:p>
          </table:table-cell>
          <table:table-cell office:value-type="string" calcext:value-type="string">
            <text:p>LUZIANIA</text:p>
          </table:table-cell>
          <table:table-cell table:style-name="ce17" office:value-type="float" office:value="2.08888531428723" calcext:value-type="float">
            <text:p>2,088885</text:p>
          </table:table-cell>
          <table:table-cell/>
          <table:table-cell office:value-type="string" calcext:value-type="string">
            <text:p>BARREIRAS II</text:p>
          </table:table-cell>
          <table:table-cell office:value-type="string" calcext:value-type="string">
            <text:p>RIO DAS EGUAS</text:p>
          </table:table-cell>
          <table:table-cell table:style-name="ce17" office:value-type="float" office:value="2.45054974275673" calcext:value-type="float">
            <text:p>2,4505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VA IGUACU</text:p>
          </table:table-cell>
          <table:table-cell office:value-type="string" calcext:value-type="string">
            <text:p>TERMINAL RIO</text:p>
          </table:table-cell>
          <table:table-cell table:style-name="ce17" office:value-type="float" office:value="2.03585952672134" calcext:value-type="float">
            <text:p>2,035860</text:p>
          </table:table-cell>
          <table:table-cell/>
          <table:table-cell office:value-type="string" calcext:value-type="string">
            <text:p>ITABERA</text:p>
          </table:table-cell>
          <table:table-cell office:value-type="string" calcext:value-type="string">
            <text:p>IVAIPORA FUR</text:p>
          </table:table-cell>
          <table:table-cell table:style-name="ce17" office:value-type="float" office:value="2.41287910037302" calcext:value-type="float">
            <text:p>2,4128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RREIRAS II</text:p>
          </table:table-cell>
          <table:table-cell office:value-type="string" calcext:value-type="string">
            <text:p>RIO DAS EGUAS</text:p>
          </table:table-cell>
          <table:table-cell table:style-name="ce17" office:value-type="float" office:value="2.02832875354292" calcext:value-type="float">
            <text:p>2,028329</text:p>
          </table:table-cell>
          <table:table-cell/>
          <table:table-cell office:value-type="string" calcext:value-type="string">
            <text:p>S.JOAO PIAUI</text:p>
          </table:table-cell>
          <table:table-cell office:value-type="string" calcext:value-type="string">
            <text:p>GILBUES II</text:p>
          </table:table-cell>
          <table:table-cell table:style-name="ce17" office:value-type="float" office:value="2.3882347748339" calcext:value-type="float">
            <text:p>2,388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TREITO</text:p>
          </table:table-cell>
          <table:table-cell office:value-type="string" calcext:value-type="string">
            <text:p>FERNAO DIAS</text:p>
          </table:table-cell>
          <table:table-cell table:style-name="ce17" office:value-type="float" office:value="1.98501476173632" calcext:value-type="float">
            <text:p>1,985015</text:p>
          </table:table-cell>
          <table:table-cell/>
          <table:table-cell office:value-type="string" calcext:value-type="string">
            <text:p>ACAILANDIA</text:p>
          </table:table-cell>
          <table:table-cell office:value-type="string" calcext:value-type="string">
            <text:p>STA LUZIA III</text:p>
          </table:table-cell>
          <table:table-cell table:style-name="ce17" office:value-type="float" office:value="2.33516621238834" calcext:value-type="float">
            <text:p>2,3351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CAVEL OEST</text:p>
          </table:table-cell>
          <table:table-cell office:value-type="string" calcext:value-type="string">
            <text:p>F.IGUACU 60HZ</text:p>
          </table:table-cell>
          <table:table-cell table:style-name="ce17" office:value-type="float" office:value="1.9841986254596" calcext:value-type="float">
            <text:p>1,984199</text:p>
          </table:table-cell>
          <table:table-cell/>
          <table:table-cell office:value-type="string" calcext:value-type="string">
            <text:p>P. JUSCELINO</text:p>
          </table:table-cell>
          <table:table-cell office:value-type="string" calcext:value-type="string">
            <text:p>PIRAPORA 2</text:p>
          </table:table-cell>
          <table:table-cell table:style-name="ce17" office:value-type="float" office:value="2.30861757974393" calcext:value-type="float">
            <text:p>2,3086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.JOAO PIAUI</text:p>
          </table:table-cell>
          <table:table-cell office:value-type="string" calcext:value-type="string">
            <text:p>GILBUES II</text:p>
          </table:table-cell>
          <table:table-cell table:style-name="ce17" office:value-type="float" office:value="1.97867120242677" calcext:value-type="float">
            <text:p>1,978671</text:p>
          </table:table-cell>
          <table:table-cell/>
          <table:table-cell office:value-type="string" calcext:value-type="string">
            <text:p>MIRANDA II</text:p>
          </table:table-cell>
          <table:table-cell office:value-type="string" calcext:value-type="string">
            <text:p>STA LUZIA III</text:p>
          </table:table-cell>
          <table:table-cell table:style-name="ce17" office:value-type="float" office:value="2.3025884434592" calcext:value-type="float">
            <text:p>2,3025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AILANDIA</text:p>
          </table:table-cell>
          <table:table-cell office:value-type="string" calcext:value-type="string">
            <text:p>STA LUZIA III</text:p>
          </table:table-cell>
          <table:table-cell table:style-name="ce17" office:value-type="float" office:value="1.9613296098083" calcext:value-type="float">
            <text:p>1,961330</text:p>
          </table:table-cell>
          <table:table-cell/>
          <table:table-cell office:value-type="string" calcext:value-type="string">
            <text:p>ITABIRA 5</text:p>
          </table:table-cell>
          <table:table-cell office:value-type="string" calcext:value-type="string">
            <text:p>P. JUSCELINO</text:p>
          </table:table-cell>
          <table:table-cell table:style-name="ce17" office:value-type="float" office:value="2.2982720177624" calcext:value-type="float">
            <text:p>2,2982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RRA PELADA</text:p>
          </table:table-cell>
          <table:table-cell office:value-type="string" calcext:value-type="string">
            <text:p>XINGU</text:p>
          </table:table-cell>
          <table:table-cell table:style-name="ce17" office:value-type="float" office:value="1.95913999554038" calcext:value-type="float">
            <text:p>1,959140</text:p>
          </table:table-cell>
          <table:table-cell/>
          <table:table-cell office:value-type="string" calcext:value-type="string">
            <text:p>PIRAPORA 2</text:p>
          </table:table-cell>
          <table:table-cell office:value-type="string" calcext:value-type="string">
            <text:p>LUZIANIA</text:p>
          </table:table-cell>
          <table:table-cell table:style-name="ce17" office:value-type="float" office:value="2.26115339413807" calcext:value-type="float">
            <text:p>2,261153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mparative" table:style-name="ta1">
        <table:table-column table:style-name="co12" table:number-columns-repeated="2" table:default-cell-style-name="Default"/>
        <table:table-column table:style-name="co4" table:default-cell-style-name="ce14"/>
        <table:table-column table:style-name="co2" table:default-cell-style-name="Default"/>
        <table:table-column table:style-name="co12" table:number-columns-repeated="2" table:default-cell-style-name="Default"/>
        <table:table-column table:style-name="co4" table:default-cell-style-name="ce14"/>
        <table:table-row table:style-name="ro1">
          <table:table-cell table:style-name="ce18" office:value-type="string" calcext:value-type="string">
            <text:p>from</text:p>
          </table:table-cell>
          <table:table-cell table:style-name="ce18" office:value-type="string" calcext:value-type="string">
            <text:p>to</text:p>
          </table:table-cell>
          <table:table-cell table:style-name="ce18" office:value-type="string" calcext:value-type="string">
            <text:p>weight</text:p>
          </table:table-cell>
          <table:table-cell table:style-name="ce18"/>
          <table:table-cell table:style-name="ce18" office:value-type="string" calcext:value-type="string">
            <text:p>from</text:p>
          </table:table-cell>
          <table:table-cell table:style-name="ce18" office:value-type="string" calcext:value-type="string">
            <text:p>to</text:p>
          </table:table-cell>
          <table:table-cell table:style-name="ce18"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ABAIARA</text:p>
          </table:table-cell>
          <table:table-cell office:value-type="string" calcext:value-type="string">
            <text:p>MILAGRES</text:p>
          </table:table-cell>
          <table:table-cell office:value-type="float" office:value="0.403910909293972" calcext:value-type="float">
            <text:p>0,403911</text:p>
          </table:table-cell>
          <table:table-cell/>
          <table:table-cell office:value-type="string" calcext:value-type="string">
            <text:p>ABAIARA</text:p>
          </table:table-cell>
          <table:table-cell office:value-type="string" calcext:value-type="string">
            <text:p>BOM NOME</text:p>
          </table:table-cell>
          <table:table-cell office:value-type="float" office:value="0.628855029531884" calcext:value-type="float">
            <text:p>0,628855</text:p>
          </table:table-cell>
        </table:table-row>
        <table:table-row table:style-name="ro1">
          <table:table-cell office:value-type="string" calcext:value-type="string">
            <text:p>ABDON BATISTA</text:p>
          </table:table-cell>
          <table:table-cell office:value-type="string" calcext:value-type="string">
            <text:p>C.NOVOS</text:p>
          </table:table-cell>
          <table:table-cell office:value-type="float" office:value="1.45844517419606" calcext:value-type="float">
            <text:p>1,458445</text:p>
          </table:table-cell>
          <table:table-cell/>
          <table:table-cell office:value-type="string" calcext:value-type="string">
            <text:p>ABDON BATISTA</text:p>
          </table:table-cell>
          <table:table-cell office:value-type="string" calcext:value-type="string">
            <text:p>C.NOVOS</text:p>
          </table:table-cell>
          <table:table-cell office:value-type="float" office:value="1.93713102922268" calcext:value-type="float">
            <text:p>1,937131</text:p>
          </table:table-cell>
        </table:table-row>
        <table:table-row table:style-name="ro1">
          <table:table-cell office:value-type="string" calcext:value-type="string">
            <text:p>ABDON BATISTA</text:p>
          </table:table-cell>
          <table:table-cell office:value-type="string" calcext:value-type="string">
            <text:p>LAGES</text:p>
          </table:table-cell>
          <table:table-cell office:value-type="float" office:value="0.422536577714626" calcext:value-type="float">
            <text:p>0,422537</text:p>
          </table:table-cell>
          <table:table-cell/>
          <table:table-cell office:value-type="string" calcext:value-type="string">
            <text:p>ABDON BATISTA</text:p>
          </table:table-cell>
          <table:table-cell office:value-type="string" calcext:value-type="string">
            <text:p>LAGES</text:p>
          </table:table-cell>
          <table:table-cell office:value-type="float" office:value="0.665908431801182" calcext:value-type="float">
            <text:p>0,665908</text:p>
          </table:table-cell>
        </table:table-row>
        <table:table-row table:style-name="ro1">
          <table:table-cell office:value-type="string" calcext:value-type="string">
            <text:p>ABDON BATISTA</text:p>
          </table:table-cell>
          <table:table-cell office:value-type="string" calcext:value-type="string">
            <text:p>SIDEROPOLIS 2</text:p>
          </table:table-cell>
          <table:table-cell office:value-type="float" office:value="1.60349858550115" calcext:value-type="float">
            <text:p>1,603499</text:p>
          </table:table-cell>
          <table:table-cell/>
          <table:table-cell office:value-type="string" calcext:value-type="string">
            <text:p>ABDON BATISTA</text:p>
          </table:table-cell>
          <table:table-cell office:value-type="string" calcext:value-type="string">
            <text:p>SIDEROPOLIS 2</text:p>
          </table:table-cell>
          <table:table-cell office:value-type="float" office:value="2.12979337190456" calcext:value-type="float">
            <text:p>2,129793</text:p>
          </table:table-cell>
        </table:table-row>
        <table:table-row table:style-name="ro1">
          <table:table-cell office:value-type="string" calcext:value-type="string">
            <text:p>ABDON BATISTA</text:p>
          </table:table-cell>
          <table:table-cell office:value-type="string" calcext:value-type="string">
            <text:p>VIDEIRA</text:p>
          </table:table-cell>
          <table:table-cell office:value-type="float" office:value="0.493297235280295" calcext:value-type="float">
            <text:p>0,493297</text:p>
          </table:table-cell>
          <table:table-cell/>
          <table:table-cell office:value-type="string" calcext:value-type="string">
            <text:p>ABDON BATISTA</text:p>
          </table:table-cell>
          <table:table-cell office:value-type="string" calcext:value-type="string">
            <text:p>VIDEIRA</text:p>
          </table:table-cell>
          <table:table-cell office:value-type="float" office:value="0.77742568497636" calcext:value-type="float">
            <text:p>0,777426</text:p>
          </table:table-cell>
        </table:table-row>
        <table:table-row table:style-name="ro1">
          <table:table-cell office:value-type="string" calcext:value-type="string">
            <text:p>ABUNA</text:p>
          </table:table-cell>
          <table:table-cell office:value-type="string" calcext:value-type="string">
            <text:p>PORTO VELHO</text:p>
          </table:table-cell>
          <table:table-cell office:value-type="float" office:value="0.526741063844838" calcext:value-type="float">
            <text:p>0,526741</text:p>
          </table:table-cell>
          <table:table-cell/>
          <table:table-cell office:value-type="string" calcext:value-type="string">
            <text:p>ABUNA</text:p>
          </table:table-cell>
          <table:table-cell office:value-type="string" calcext:value-type="string">
            <text:p>PORTO VELHO</text:p>
          </table:table-cell>
          <table:table-cell office:value-type="float" office:value="0.903704497464796" calcext:value-type="float">
            <text:p>0,903704</text:p>
          </table:table-cell>
        </table:table-row>
        <table:table-row table:style-name="ro1">
          <table:table-cell office:value-type="string" calcext:value-type="string">
            <text:p>ABUNA</text:p>
          </table:table-cell>
          <table:table-cell office:value-type="string" calcext:value-type="string">
            <text:p>TUCUMA</text:p>
          </table:table-cell>
          <table:table-cell office:value-type="float" office:value="0.558896853066807" calcext:value-type="float">
            <text:p>0,558897</text:p>
          </table:table-cell>
          <table:table-cell/>
          <table:table-cell office:value-type="string" calcext:value-type="string">
            <text:p>ABUNA</text:p>
          </table:table-cell>
          <table:table-cell office:value-type="string" calcext:value-type="string">
            <text:p>TUCUMA</text:p>
          </table:table-cell>
          <table:table-cell office:value-type="float" office:value="0.963498021096087" calcext:value-type="float">
            <text:p>0,963498</text:p>
          </table:table-cell>
        </table:table-row>
        <table:table-row table:style-name="ro1">
          <table:table-cell office:value-type="string" calcext:value-type="string">
            <text:p>ACAILANDIA</text:p>
          </table:table-cell>
          <table:table-cell office:value-type="string" calcext:value-type="string">
            <text:p>DOM ELISEU II</text:p>
          </table:table-cell>
          <table:table-cell office:value-type="float" office:value="0.37821641282245" calcext:value-type="float">
            <text:p>0,378216</text:p>
          </table:table-cell>
          <table:table-cell/>
          <table:table-cell office:value-type="string" calcext:value-type="string">
            <text:p>ACAILANDIA</text:p>
          </table:table-cell>
          <table:table-cell office:value-type="string" calcext:value-type="string">
            <text:p>DOM ELISEU II</text:p>
          </table:table-cell>
          <table:table-cell office:value-type="float" office:value="0.53794044888476" calcext:value-type="float">
            <text:p>0,537940</text:p>
          </table:table-cell>
        </table:table-row>
        <table:table-row table:style-name="ro1">
          <table:table-cell office:value-type="string" calcext:value-type="string">
            <text:p>ACAILANDIA</text:p>
          </table:table-cell>
          <table:table-cell office:value-type="string" calcext:value-type="string">
            <text:p>MARABA</text:p>
          </table:table-cell>
          <table:table-cell office:value-type="float" office:value="1.39167511728203" calcext:value-type="float">
            <text:p>1,391675</text:p>
          </table:table-cell>
          <table:table-cell/>
          <table:table-cell office:value-type="string" calcext:value-type="string">
            <text:p>ACAILANDIA</text:p>
          </table:table-cell>
          <table:table-cell office:value-type="string" calcext:value-type="string">
            <text:p>MARABA</text:p>
          </table:table-cell>
          <table:table-cell office:value-type="float" office:value="1.66829620268826" calcext:value-type="float">
            <text:p>1,668296</text:p>
          </table:table-cell>
        </table:table-row>
        <table:table-row table:style-name="ro1">
          <table:table-cell office:value-type="string" calcext:value-type="string">
            <text:p>ACAILANDIA</text:p>
          </table:table-cell>
          <table:table-cell office:value-type="string" calcext:value-type="string">
            <text:p>STA LUZIA III</text:p>
          </table:table-cell>
          <table:table-cell office:value-type="float" office:value="1.9613296098083" calcext:value-type="float">
            <text:p>1,961330</text:p>
          </table:table-cell>
          <table:table-cell/>
          <table:table-cell office:value-type="string" calcext:value-type="string">
            <text:p>ACAILANDIA</text:p>
          </table:table-cell>
          <table:table-cell office:value-type="string" calcext:value-type="string">
            <text:p>STA LUZIA III</text:p>
          </table:table-cell>
          <table:table-cell office:value-type="float" office:value="2.33516621238834" calcext:value-type="float">
            <text:p>2,335166</text:p>
          </table:table-cell>
        </table:table-row>
        <table:table-row table:style-name="ro1">
          <table:table-cell office:value-type="string" calcext:value-type="string">
            <text:p>ACARAU II</text:p>
          </table:table-cell>
          <table:table-cell office:value-type="string" calcext:value-type="string">
            <text:p>ACARAU III</text:p>
          </table:table-cell>
          <table:table-cell office:value-type="float" office:value="0.571106543753625" calcext:value-type="float">
            <text:p>0,571107</text:p>
          </table:table-cell>
          <table:table-cell/>
          <table:table-cell office:value-type="string" calcext:value-type="string">
            <text:p>ACARAU II</text:p>
          </table:table-cell>
          <table:table-cell office:value-type="string" calcext:value-type="string">
            <text:p>ACARAU III</text:p>
          </table:table-cell>
          <table:table-cell office:value-type="float" office:value="0.853047931749332" calcext:value-type="float">
            <text:p>0,853048</text:p>
          </table:table-cell>
        </table:table-row>
        <table:table-row table:style-name="ro1">
          <table:table-cell office:value-type="string" calcext:value-type="string">
            <text:p>ACARAU III</text:p>
          </table:table-cell>
          <table:table-cell office:value-type="string" calcext:value-type="string">
            <text:p>PARNAIBA III</text:p>
          </table:table-cell>
          <table:table-cell office:value-type="float" office:value="1.43340702517706" calcext:value-type="float">
            <text:p>1,433407</text:p>
          </table:table-cell>
          <table:table-cell/>
          <table:table-cell office:value-type="string" calcext:value-type="string">
            <text:p>ACARAU III</text:p>
          </table:table-cell>
          <table:table-cell office:value-type="string" calcext:value-type="string">
            <text:p>PARNAIBA III</text:p>
          </table:table-cell>
          <table:table-cell office:value-type="float" office:value="1.76691406669893" calcext:value-type="float">
            <text:p>1,766914</text:p>
          </table:table-cell>
        </table:table-row>
        <table:table-row table:style-name="ro1">
          <table:table-cell office:value-type="string" calcext:value-type="string">
            <text:p>ACARAU III</text:p>
          </table:table-cell>
          <table:table-cell office:value-type="string" calcext:value-type="string">
            <text:p>PECEM II</text:p>
          </table:table-cell>
          <table:table-cell office:value-type="float" office:value="1.43378681262438" calcext:value-type="float">
            <text:p>1,433787</text:p>
          </table:table-cell>
          <table:table-cell/>
          <table:table-cell office:value-type="string" calcext:value-type="string">
            <text:p>ACARAU III</text:p>
          </table:table-cell>
          <table:table-cell office:value-type="string" calcext:value-type="string">
            <text:p>PECEM II</text:p>
          </table:table-cell>
          <table:table-cell office:value-type="float" office:value="1.80498250232334" calcext:value-type="float">
            <text:p>1,804983</text:p>
          </table:table-cell>
        </table:table-row>
        <table:table-row table:style-name="ro1">
          <table:table-cell office:value-type="string" calcext:value-type="string">
            <text:p>ACARAU III</text:p>
          </table:table-cell>
          <table:table-cell office:value-type="string" calcext:value-type="string">
            <text:p>TIANGUA II</text:p>
          </table:table-cell>
          <table:table-cell office:value-type="float" office:value="1.42787051096191" calcext:value-type="float">
            <text:p>1,427871</text:p>
          </table:table-cell>
          <table:table-cell/>
          <table:table-cell office:value-type="string" calcext:value-type="string">
            <text:p>ACARAU III</text:p>
          </table:table-cell>
          <table:table-cell office:value-type="string" calcext:value-type="string">
            <text:p>TIANGUA II</text:p>
          </table:table-cell>
          <table:table-cell office:value-type="float" office:value="1.79753451850511" calcext:value-type="float">
            <text:p>1,797535</text:p>
          </table:table-cell>
        </table:table-row>
        <table:table-row table:style-name="ro1">
          <table:table-cell office:value-type="string" calcext:value-type="string">
            <text:p>ACU II</text:p>
          </table:table-cell>
          <table:table-cell office:value-type="string" calcext:value-type="string">
            <text:p>ACU III</text:p>
          </table:table-cell>
          <table:table-cell office:value-type="float" office:value="0.358967499101974" calcext:value-type="float">
            <text:p>0,358967</text:p>
          </table:table-cell>
          <table:table-cell/>
          <table:table-cell office:value-type="string" calcext:value-type="string">
            <text:p>ACU II</text:p>
          </table:table-cell>
          <table:table-cell office:value-type="string" calcext:value-type="string">
            <text:p>PARAISO</text:p>
          </table:table-cell>
          <table:table-cell office:value-type="float" office:value="0.628707632691801" calcext:value-type="float">
            <text:p>0,628708</text:p>
          </table:table-cell>
        </table:table-row>
        <table:table-row table:style-name="ro1">
          <table:table-cell office:value-type="string" calcext:value-type="string">
            <text:p>ACU II</text:p>
          </table:table-cell>
          <table:table-cell office:value-type="string" calcext:value-type="string">
            <text:p>PARAISO</text:p>
          </table:table-cell>
          <table:table-cell office:value-type="float" office:value="0.356769812818643" calcext:value-type="float">
            <text:p>0,356770</text:p>
          </table:table-cell>
          <table:table-cell/>
          <table:table-cell office:value-type="string" calcext:value-type="string">
            <text:p>ACU III</text:p>
          </table:table-cell>
          <table:table-cell office:value-type="string" calcext:value-type="string">
            <text:p>CARAUBAS II</text:p>
          </table:table-cell>
          <table:table-cell office:value-type="float" office:value="0.64172112951899" calcext:value-type="float">
            <text:p>0,641721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CARAUBAS II</text:p>
          </table:table-cell>
          <table:table-cell office:value-type="float" office:value="0.432068167019325" calcext:value-type="float">
            <text:p>0,432068</text:p>
          </table:table-cell>
          <table:table-cell/>
          <table:table-cell office:value-type="string" calcext:value-type="string">
            <text:p>ACU III</text:p>
          </table:table-cell>
          <table:table-cell office:value-type="string" calcext:value-type="string">
            <text:p>J. CAMARA III</text:p>
          </table:table-cell>
          <table:table-cell office:value-type="float" office:value="1.84481486115125" calcext:value-type="float">
            <text:p>1,844815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J. CAMARA III</text:p>
          </table:table-cell>
          <table:table-cell office:value-type="float" office:value="1.47375497196522" calcext:value-type="float">
            <text:p>1,473755</text:p>
          </table:table-cell>
          <table:table-cell/>
          <table:table-cell office:value-type="string" calcext:value-type="string">
            <text:p>ACU III</text:p>
          </table:table-cell>
          <table:table-cell office:value-type="string" calcext:value-type="string">
            <text:p>MILAGRES II</text:p>
          </table:table-cell>
          <table:table-cell office:value-type="float" office:value="2.08742270715234" calcext:value-type="float">
            <text:p>2,087423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MILAGRES II</text:p>
          </table:table-cell>
          <table:table-cell office:value-type="float" office:value="1.66284758320196" calcext:value-type="float">
            <text:p>1,662848</text:p>
          </table:table-cell>
          <table:table-cell/>
          <table:table-cell office:value-type="string" calcext:value-type="string">
            <text:p>ACU III</text:p>
          </table:table-cell>
          <table:table-cell office:value-type="string" calcext:value-type="string">
            <text:p>MONTE VERDE</text:p>
          </table:table-cell>
          <table:table-cell office:value-type="float" office:value="1.73458162322458" calcext:value-type="float">
            <text:p>1,734582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MONTE VERDE</text:p>
          </table:table-cell>
          <table:table-cell office:value-type="float" office:value="1.3856936787204" calcext:value-type="float">
            <text:p>1,385694</text:p>
          </table:table-cell>
          <table:table-cell/>
          <table:table-cell office:value-type="string" calcext:value-type="string">
            <text:p>ACU III</text:p>
          </table:table-cell>
          <table:table-cell office:value-type="string" calcext:value-type="string">
            <text:p>QUIXADA</text:p>
          </table:table-cell>
          <table:table-cell office:value-type="float" office:value="1.80168805690206" calcext:value-type="float">
            <text:p>1,801688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MOSSORO II</text:p>
          </table:table-cell>
          <table:table-cell office:value-type="float" office:value="0.391590364269995" calcext:value-type="float">
            <text:p>0,391590</text:p>
          </table:table-cell>
          <table:table-cell/>
          <table:table-cell office:value-type="string" calcext:value-type="string">
            <text:p>ACU III</text:p>
          </table:table-cell>
          <table:table-cell office:value-type="string" calcext:value-type="string">
            <text:p>SIMPLICE</text:p>
          </table:table-cell>
          <table:table-cell office:value-type="float" office:value="0.281638366063644" calcext:value-type="float">
            <text:p>0,281638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QUIXADA</text:p>
          </table:table-cell>
          <table:table-cell office:value-type="float" office:value="1.43523044989314" calcext:value-type="float">
            <text:p>1,435230</text:p>
          </table:table-cell>
          <table:table-cell/>
          <table:table-cell office:value-type="string" calcext:value-type="string">
            <text:p>ADRIANOPOLIS</text:p>
          </table:table-cell>
          <table:table-cell office:value-type="string" calcext:value-type="string">
            <text:p>B. FLUMINENSE</text:p>
          </table:table-cell>
          <table:table-cell office:value-type="float" office:value="1.69555741391465" calcext:value-type="float">
            <text:p>1,695557</text:p>
          </table:table-cell>
        </table:table-row>
        <table:table-row table:style-name="ro1">
          <table:table-cell office:value-type="string" calcext:value-type="string">
            <text:p>ACU III</text:p>
          </table:table-cell>
          <table:table-cell office:value-type="string" calcext:value-type="string">
            <text:p>SIMPLICE</text:p>
          </table:table-cell>
          <table:table-cell office:value-type="float" office:value="0.189625940287564" calcext:value-type="float">
            <text:p>0,189626</text:p>
          </table:table-cell>
          <table:table-cell/>
          <table:table-cell office:value-type="string" calcext:value-type="string">
            <text:p>ADRIANOPOLIS</text:p>
          </table:table-cell>
          <table:table-cell office:value-type="string" calcext:value-type="string">
            <text:p>GRAJAU</text:p>
          </table:table-cell>
          <table:table-cell office:value-type="float" office:value="1.78225113110297" calcext:value-type="float">
            <text:p>1,782251</text:p>
          </table:table-cell>
        </table:table-row>
        <table:table-row table:style-name="ro1">
          <table:table-cell office:value-type="string" calcext:value-type="string">
            <text:p>ADRIANOPOLIS</text:p>
          </table:table-cell>
          <table:table-cell office:value-type="string" calcext:value-type="string">
            <text:p>GRAJAU</text:p>
          </table:table-cell>
          <table:table-cell office:value-type="float" office:value="1.37920280470151" calcext:value-type="float">
            <text:p>1,379203</text:p>
          </table:table-cell>
          <table:table-cell/>
          <table:table-cell office:value-type="string" calcext:value-type="string">
            <text:p>ADRIANOPOLIS</text:p>
          </table:table-cell>
          <table:table-cell office:value-type="string" calcext:value-type="string">
            <text:p>SAO JOSE</text:p>
          </table:table-cell>
          <table:table-cell office:value-type="float" office:value="1.77198861289171" calcext:value-type="float">
            <text:p>1,771989</text:p>
          </table:table-cell>
        </table:table-row>
        <table:table-row table:style-name="ro1">
          <table:table-cell office:value-type="string" calcext:value-type="string">
            <text:p>ADRIANOPOLIS</text:p>
          </table:table-cell>
          <table:table-cell office:value-type="string" calcext:value-type="string">
            <text:p>SAO JOSE</text:p>
          </table:table-cell>
          <table:table-cell office:value-type="float" office:value="1.37126111026055" calcext:value-type="float">
            <text:p>1,371261</text:p>
          </table:table-cell>
          <table:table-cell/>
          <table:table-cell office:value-type="string" calcext:value-type="string">
            <text:p>ADRIANOPOLIS</text:p>
          </table:table-cell>
          <table:table-cell office:value-type="string" calcext:value-type="string">
            <text:p>VENDA PEDRAS</text:p>
          </table:table-cell>
          <table:table-cell office:value-type="float" office:value="1.00439399250713" calcext:value-type="float">
            <text:p>1,004394</text:p>
          </table:table-cell>
        </table:table-row>
        <table:table-row table:style-name="ro1">
          <table:table-cell office:value-type="string" calcext:value-type="string">
            <text:p>ADRIANOPOLIS</text:p>
          </table:table-cell>
          <table:table-cell office:value-type="string" calcext:value-type="string">
            <text:p>TERMINAL RIO</text:p>
          </table:table-cell>
          <table:table-cell office:value-type="float" office:value="1.34836404027063" calcext:value-type="float">
            <text:p>1,348364</text:p>
          </table:table-cell>
          <table:table-cell/>
          <table:table-cell office:value-type="string" calcext:value-type="string">
            <text:p>AGUA AZUL</text:p>
          </table:table-cell>
          <table:table-cell office:value-type="string" calcext:value-type="string">
            <text:p>BOM JARDIM</text:p>
          </table:table-cell>
          <table:table-cell office:value-type="float" office:value="1.52809872933082" calcext:value-type="float">
            <text:p>1,528099</text:p>
          </table:table-cell>
        </table:table-row>
        <table:table-row table:style-name="ro1">
          <table:table-cell office:value-type="string" calcext:value-type="string">
            <text:p>ADRIANOPOLIS</text:p>
          </table:table-cell>
          <table:table-cell office:value-type="string" calcext:value-type="string">
            <text:p>VENDA PEDRAS</text:p>
          </table:table-cell>
          <table:table-cell office:value-type="float" office:value="0.70802661586413" calcext:value-type="float">
            <text:p>0,708027</text:p>
          </table:table-cell>
          <table:table-cell/>
          <table:table-cell office:value-type="string" calcext:value-type="string">
            <text:p>AGUA VERMELHA</text:p>
          </table:table-cell>
          <table:table-cell office:value-type="string" calcext:value-type="string">
            <text:p>ARARAQUARA CTP</text:p>
          </table:table-cell>
          <table:table-cell office:value-type="float" office:value="1.60436171366773" calcext:value-type="float">
            <text:p>1,604362</text:p>
          </table:table-cell>
        </table:table-row>
        <table:table-row table:style-name="ro1">
          <table:table-cell office:value-type="string" calcext:value-type="string">
            <text:p>AGUA AZUL</text:p>
          </table:table-cell>
          <table:table-cell office:value-type="string" calcext:value-type="string">
            <text:p>BOM JARDIM</text:p>
          </table:table-cell>
          <table:table-cell office:value-type="float" office:value="1.05986086072935" calcext:value-type="float">
            <text:p>1,059861</text:p>
          </table:table-cell>
          <table:table-cell/>
          <table:table-cell office:value-type="string" calcext:value-type="string">
            <text:p>AGUA VERMELHA</text:p>
          </table:table-cell>
          <table:table-cell office:value-type="string" calcext:value-type="string">
            <text:p>SAO SIMAO-SE</text:p>
          </table:table-cell>
          <table:table-cell office:value-type="float" office:value="1.6786010644254" calcext:value-type="float">
            <text:p>1,678601</text:p>
          </table:table-cell>
        </table:table-row>
        <table:table-row table:style-name="ro1">
          <table:table-cell office:value-type="string" calcext:value-type="string">
            <text:p>AGUA VERMELHA</text:p>
          </table:table-cell>
          <table:table-cell office:value-type="string" calcext:value-type="string">
            <text:p>SAO SIMAO-SE</text:p>
          </table:table-cell>
          <table:table-cell office:value-type="float" office:value="1.26619302632699" calcext:value-type="float">
            <text:p>1,266193</text:p>
          </table:table-cell>
          <table:table-cell/>
          <table:table-cell office:value-type="string" calcext:value-type="string">
            <text:p>AIMORES-SE</text:p>
          </table:table-cell>
          <table:table-cell office:value-type="string" calcext:value-type="string">
            <text:p>CONSE. PENA</text:p>
          </table:table-cell>
          <table:table-cell office:value-type="float" office:value="0.633665666182364" calcext:value-type="float">
            <text:p>0,633666</text:p>
          </table:table-cell>
        </table:table-row>
        <table:table-row table:style-name="ro1">
          <table:table-cell office:value-type="string" calcext:value-type="string">
            <text:p>AIMORES-SE</text:p>
          </table:table-cell>
          <table:table-cell office:value-type="string" calcext:value-type="string">
            <text:p>CONSE. PENA</text:p>
          </table:table-cell>
          <table:table-cell office:value-type="float" office:value="0.344481089871363" calcext:value-type="float">
            <text:p>0,344481</text:p>
          </table:table-cell>
          <table:table-cell/>
          <table:table-cell office:value-type="string" calcext:value-type="string">
            <text:p>ALAGOINHAS II</text:p>
          </table:table-cell>
          <table:table-cell office:value-type="string" calcext:value-type="string">
            <text:p>OLINDINA</text:p>
          </table:table-cell>
          <table:table-cell office:value-type="float" office:value="0.472598630846391" calcext:value-type="float">
            <text:p>0,472599</text:p>
          </table:table-cell>
        </table:table-row>
        <table:table-row table:style-name="ro1">
          <table:table-cell office:value-type="string" calcext:value-type="string">
            <text:p>ALAGOINHAS II</text:p>
          </table:table-cell>
          <table:table-cell office:value-type="string" calcext:value-type="string">
            <text:p>OLINDINA</text:p>
          </table:table-cell>
          <table:table-cell office:value-type="float" office:value="0.32969210634486" calcext:value-type="float">
            <text:p>0,329692</text:p>
          </table:table-cell>
          <table:table-cell/>
          <table:table-cell office:value-type="string" calcext:value-type="string">
            <text:p>ALEGRETE2</text:p>
          </table:table-cell>
          <table:table-cell office:value-type="string" calcext:value-type="string">
            <text:p>LIVRAMENTO 2</text:p>
          </table:table-cell>
          <table:table-cell office:value-type="float" office:value="0.635288737519455" calcext:value-type="float">
            <text:p>0,635289</text:p>
          </table:table-cell>
        </table:table-row>
        <table:table-row table:style-name="ro1">
          <table:table-cell office:value-type="string" calcext:value-type="string">
            <text:p>ALEGRETE2</text:p>
          </table:table-cell>
          <table:table-cell office:value-type="string" calcext:value-type="string">
            <text:p>LIVRAMENTO 3</text:p>
          </table:table-cell>
          <table:table-cell office:value-type="float" office:value="0.472360254600418" calcext:value-type="float">
            <text:p>0,472360</text:p>
          </table:table-cell>
          <table:table-cell/>
          <table:table-cell office:value-type="string" calcext:value-type="string">
            <text:p>ALEGRETE2</text:p>
          </table:table-cell>
          <table:table-cell office:value-type="string" calcext:value-type="string">
            <text:p>LIVRAMENTO 3</text:p>
          </table:table-cell>
          <table:table-cell office:value-type="float" office:value="0.866503563982837" calcext:value-type="float">
            <text:p>0,866504</text:p>
          </table:table-cell>
        </table:table-row>
        <table:table-row table:style-name="ro1">
          <table:table-cell office:value-type="string" calcext:value-type="string">
            <text:p>ALEGRETE2</text:p>
          </table:table-cell>
          <table:table-cell office:value-type="string" calcext:value-type="string">
            <text:p>S.VICENTE SUL</text:p>
          </table:table-cell>
          <table:table-cell office:value-type="float" office:value="0.339065480767745" calcext:value-type="float">
            <text:p>0,339065</text:p>
          </table:table-cell>
          <table:table-cell/>
          <table:table-cell office:value-type="string" calcext:value-type="string">
            <text:p>ALEGRETE2</text:p>
          </table:table-cell>
          <table:table-cell office:value-type="string" calcext:value-type="string">
            <text:p>S.VICENTE SUL</text:p>
          </table:table-cell>
          <table:table-cell office:value-type="float" office:value="0.621985962297653" calcext:value-type="float">
            <text:p>0,621986</text:p>
          </table:table-cell>
        </table:table-row>
        <table:table-row table:style-name="ro1">
          <table:table-cell office:value-type="string" calcext:value-type="string">
            <text:p>ALEGRETE2</text:p>
          </table:table-cell>
          <table:table-cell office:value-type="string" calcext:value-type="string">
            <text:p>U.URUGUAIANA</text:p>
          </table:table-cell>
          <table:table-cell office:value-type="float" office:value="0.44130795085742" calcext:value-type="float">
            <text:p>0,441308</text:p>
          </table:table-cell>
          <table:table-cell/>
          <table:table-cell office:value-type="string" calcext:value-type="string">
            <text:p>ALEGRETE2</text:p>
          </table:table-cell>
          <table:table-cell office:value-type="string" calcext:value-type="string">
            <text:p>U.URUGUAIANA</text:p>
          </table:table-cell>
          <table:table-cell office:value-type="float" office:value="0.809540829288009" calcext:value-type="float">
            <text:p>0,809541</text:p>
          </table:table-cell>
        </table:table-row>
        <table:table-row table:style-name="ro1">
          <table:table-cell office:value-type="string" calcext:value-type="string">
            <text:p>ALEGRETE2</text:p>
          </table:table-cell>
          <table:table-cell office:value-type="string" calcext:value-type="string">
            <text:p>URUGUAIANA5</text:p>
          </table:table-cell>
          <table:table-cell office:value-type="float" office:value="0.345805174347467" calcext:value-type="float">
            <text:p>0,345805</text:p>
          </table:table-cell>
          <table:table-cell/>
          <table:table-cell office:value-type="string" calcext:value-type="string">
            <text:p>ALEGRETE2</text:p>
          </table:table-cell>
          <table:table-cell office:value-type="string" calcext:value-type="string">
            <text:p>URUGUAIANA5</text:p>
          </table:table-cell>
          <table:table-cell office:value-type="float" office:value="0.634349340566895" calcext:value-type="float">
            <text:p>0,634349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BANABUIU</text:p>
          </table:table-cell>
          <table:table-cell office:value-type="float" office:value="0.323448618782534" calcext:value-type="float">
            <text:p>0,323449</text:p>
          </table:table-cell>
          <table:table-cell/>
          <table:table-cell office:value-type="string" calcext:value-type="string">
            <text:p>ALEX</text:p>
          </table:table-cell>
          <table:table-cell office:value-type="string" calcext:value-type="string">
            <text:p>BANABUIU</text:p>
          </table:table-cell>
          <table:table-cell office:value-type="float" office:value="0.573230753956314" calcext:value-type="float">
            <text:p>0,573231</text:p>
          </table:table-cell>
        </table:table-row>
        <table:table-row table:style-name="ro1">
          <table:table-cell office:value-type="string" calcext:value-type="string">
            <text:p>ALTA PAULISTA</text:p>
          </table:table-cell>
          <table:table-cell office:value-type="string" calcext:value-type="string">
            <text:p>MARECH.RONDON</text:p>
          </table:table-cell>
          <table:table-cell office:value-type="float" office:value="1.38370834951402" calcext:value-type="float">
            <text:p>1,383708</text:p>
          </table:table-cell>
          <table:table-cell/>
          <table:table-cell office:value-type="string" calcext:value-type="string">
            <text:p>ALTA PAULISTA</text:p>
          </table:table-cell>
          <table:table-cell office:value-type="string" calcext:value-type="string">
            <text:p>MARECH.RONDON</text:p>
          </table:table-cell>
          <table:table-cell office:value-type="float" office:value="1.93729081582201" calcext:value-type="float">
            <text:p>1,937291</text:p>
          </table:table-cell>
        </table:table-row>
        <table:table-row table:style-name="ro1">
          <table:table-cell office:value-type="string" calcext:value-type="string">
            <text:p>ALTA PAULISTA</text:p>
          </table:table-cell>
          <table:table-cell office:value-type="string" calcext:value-type="string">
            <text:p>TAQUARUCU</text:p>
          </table:table-cell>
          <table:table-cell office:value-type="float" office:value="1.30489258756251" calcext:value-type="float">
            <text:p>1,304893</text:p>
          </table:table-cell>
          <table:table-cell/>
          <table:table-cell office:value-type="string" calcext:value-type="string">
            <text:p>ALTA PAULISTA</text:p>
          </table:table-cell>
          <table:table-cell office:value-type="string" calcext:value-type="string">
            <text:p>TAQUARUCU</text:p>
          </table:table-cell>
          <table:table-cell office:value-type="float" office:value="1.88138347102968" calcext:value-type="float">
            <text:p>1,881383</text:p>
          </table:table-cell>
        </table:table-row>
        <table:table-row table:style-name="ro1">
          <table:table-cell office:value-type="string" calcext:value-type="string">
            <text:p>ALTAMIRA</text:p>
          </table:table-cell>
          <table:table-cell office:value-type="string" calcext:value-type="string">
            <text:p>TRANSAMAZONIC</text:p>
          </table:table-cell>
          <table:table-cell office:value-type="float" office:value="0.53106233324385" calcext:value-type="float">
            <text:p>0,531062</text:p>
          </table:table-cell>
          <table:table-cell/>
          <table:table-cell office:value-type="string" calcext:value-type="string">
            <text:p>ALTAMIRA</text:p>
          </table:table-cell>
          <table:table-cell office:value-type="string" calcext:value-type="string">
            <text:p>TRANSAMAZONIC</text:p>
          </table:table-cell>
          <table:table-cell office:value-type="float" office:value="0.902331140016008" calcext:value-type="float">
            <text:p>0,902331</text:p>
          </table:table-cell>
        </table:table-row>
        <table:table-row table:style-name="ro1">
          <table:table-cell office:value-type="string" calcext:value-type="string">
            <text:p>ALTAMIRA</text:p>
          </table:table-cell>
          <table:table-cell office:value-type="string" calcext:value-type="string">
            <text:p>XINGU</text:p>
          </table:table-cell>
          <table:table-cell office:value-type="float" office:value="0.714057026964796" calcext:value-type="float">
            <text:p>0,714057</text:p>
          </table:table-cell>
          <table:table-cell/>
          <table:table-cell office:value-type="string" calcext:value-type="string">
            <text:p>ALTAMIRA</text:p>
          </table:table-cell>
          <table:table-cell office:value-type="string" calcext:value-type="string">
            <text:p>XINGU</text:p>
          </table:table-cell>
          <table:table-cell office:value-type="float" office:value="0.878551571329753" calcext:value-type="float">
            <text:p>0,878552</text:p>
          </table:table-cell>
        </table:table-row>
        <table:table-row table:style-name="ro1">
          <table:table-cell office:value-type="string" calcext:value-type="string">
            <text:p>ANASTACIO</text:p>
          </table:table-cell>
          <table:table-cell office:value-type="string" calcext:value-type="string">
            <text:p>CORUMBA 2</text:p>
          </table:table-cell>
          <table:table-cell office:value-type="float" office:value="0.574681036446689" calcext:value-type="float">
            <text:p>0,574681</text:p>
          </table:table-cell>
          <table:table-cell/>
          <table:table-cell office:value-type="string" calcext:value-type="string">
            <text:p>ANASTACIO</text:p>
          </table:table-cell>
          <table:table-cell office:value-type="string" calcext:value-type="string">
            <text:p>CORUMBA 2</text:p>
          </table:table-cell>
          <table:table-cell office:value-type="float" office:value="1.02617205379515" calcext:value-type="float">
            <text:p>1,026172</text:p>
          </table:table-cell>
        </table:table-row>
        <table:table-row table:style-name="ro1">
          <table:table-cell office:value-type="string" calcext:value-type="string">
            <text:p>ANASTACIO</text:p>
          </table:table-cell>
          <table:table-cell office:value-type="string" calcext:value-type="string">
            <text:p>SIDROLANDIA 2</text:p>
          </table:table-cell>
          <table:table-cell office:value-type="float" office:value="0.467426009828034" calcext:value-type="float">
            <text:p>0,467426</text:p>
          </table:table-cell>
          <table:table-cell/>
          <table:table-cell office:value-type="string" calcext:value-type="string">
            <text:p>ANASTACIO</text:p>
          </table:table-cell>
          <table:table-cell office:value-type="string" calcext:value-type="string">
            <text:p>SIDROLANDIA 2</text:p>
          </table:table-cell>
          <table:table-cell office:value-type="float" office:value="0.834653447881784" calcext:value-type="float">
            <text:p>0,834653</text:p>
          </table:table-cell>
        </table:table-row>
        <table:table-row table:style-name="ro1">
          <table:table-cell office:value-type="string" calcext:value-type="string">
            <text:p>ANDIRA LESTE</text:p>
          </table:table-cell>
          <table:table-cell office:value-type="string" calcext:value-type="string">
            <text:p>ASSIS</text:p>
          </table:table-cell>
          <table:table-cell office:value-type="float" office:value="0.413324528759071" calcext:value-type="float">
            <text:p>0,413325</text:p>
          </table:table-cell>
          <table:table-cell/>
          <table:table-cell office:value-type="string" calcext:value-type="string">
            <text:p>ANDIRA LESTE</text:p>
          </table:table-cell>
          <table:table-cell office:value-type="string" calcext:value-type="string">
            <text:p>ASSIS</text:p>
          </table:table-cell>
          <table:table-cell office:value-type="float" office:value="0.648659757127348" calcext:value-type="float">
            <text:p>0,648660</text:p>
          </table:table-cell>
        </table:table-row>
        <table:table-row table:style-name="ro1">
          <table:table-cell office:value-type="string" calcext:value-type="string">
            <text:p>ANGELIM</text:p>
          </table:table-cell>
          <table:table-cell office:value-type="string" calcext:value-type="string">
            <text:p>GARANHUNS II</text:p>
          </table:table-cell>
          <table:table-cell office:value-type="float" office:value="0.490394117975783" calcext:value-type="float">
            <text:p>0,490394</text:p>
          </table:table-cell>
          <table:table-cell/>
          <table:table-cell office:value-type="string" calcext:value-type="string">
            <text:p>ANGELIM</text:p>
          </table:table-cell>
          <table:table-cell office:value-type="string" calcext:value-type="string">
            <text:p>GARANHUNS II</text:p>
          </table:table-cell>
          <table:table-cell office:value-type="float" office:value="0.72214927590628" calcext:value-type="float">
            <text:p>0,722149</text:p>
          </table:table-cell>
        </table:table-row>
        <table:table-row table:style-name="ro1">
          <table:table-cell office:value-type="string" calcext:value-type="string">
            <text:p>ANGRA FUR</text:p>
          </table:table-cell>
          <table:table-cell office:value-type="string" calcext:value-type="string">
            <text:p>C. PAULISTA</text:p>
          </table:table-cell>
          <table:table-cell office:value-type="float" office:value="1.15154231090794" calcext:value-type="float">
            <text:p>1,151542</text:p>
          </table:table-cell>
          <table:table-cell/>
          <table:table-cell office:value-type="string" calcext:value-type="string">
            <text:p>ANGELIM</text:p>
          </table:table-cell>
          <table:table-cell office:value-type="string" calcext:value-type="string">
            <text:p>RIBEIRAO</text:p>
          </table:table-cell>
          <table:table-cell office:value-type="float" office:value="0.504483712811726" calcext:value-type="float">
            <text:p>0,504484</text:p>
          </table:table-cell>
        </table:table-row>
        <table:table-row table:style-name="ro1">
          <table:table-cell office:value-type="string" calcext:value-type="string">
            <text:p>ANGRA FUR</text:p>
          </table:table-cell>
          <table:table-cell office:value-type="string" calcext:value-type="string">
            <text:p>ZONA OESTE</text:p>
          </table:table-cell>
          <table:table-cell office:value-type="float" office:value="1.14433179647059" calcext:value-type="float">
            <text:p>1,144332</text:p>
          </table:table-cell>
          <table:table-cell/>
          <table:table-cell office:value-type="string" calcext:value-type="string">
            <text:p>ANGRA FUR</text:p>
          </table:table-cell>
          <table:table-cell office:value-type="string" calcext:value-type="string">
            <text:p>C. PAULISTA</text:p>
          </table:table-cell>
          <table:table-cell office:value-type="float" office:value="1.51819474976226" calcext:value-type="float">
            <text:p>1,518195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office:value-type="string" calcext:value-type="string">
            <text:p>C. DOURADA</text:p>
          </table:table-cell>
          <table:table-cell office:value-type="float" office:value="0.384288540404269" calcext:value-type="float">
            <text:p>0,384289</text:p>
          </table:table-cell>
          <table:table-cell/>
          <table:table-cell office:value-type="string" calcext:value-type="string">
            <text:p>ANGRA FUR</text:p>
          </table:table-cell>
          <table:table-cell office:value-type="string" calcext:value-type="string">
            <text:p>ZONA OESTE</text:p>
          </table:table-cell>
          <table:table-cell office:value-type="float" office:value="1.4787431055567" calcext:value-type="float">
            <text:p>1,478743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office:value-type="string" calcext:value-type="string">
            <text:p>CENTRO-CTT</text:p>
          </table:table-cell>
          <table:table-cell office:value-type="float" office:value="0.346276138340875" calcext:value-type="float">
            <text:p>0,346276</text:p>
          </table:table-cell>
          <table:table-cell/>
          <table:table-cell office:value-type="string" calcext:value-type="string">
            <text:p>ANHANGUERA</text:p>
          </table:table-cell>
          <table:table-cell office:value-type="string" calcext:value-type="string">
            <text:p>C. DOURADA</text:p>
          </table:table-cell>
          <table:table-cell office:value-type="float" office:value="0.652272703798613" calcext:value-type="float">
            <text:p>0,652273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office:value-type="string" calcext:value-type="string">
            <text:p>GUARULHOS</text:p>
          </table:table-cell>
          <table:table-cell office:value-type="float" office:value="1.2721857607914" calcext:value-type="float">
            <text:p>1,272186</text:p>
          </table:table-cell>
          <table:table-cell/>
          <table:table-cell office:value-type="string" calcext:value-type="string">
            <text:p>ANHANGUERA</text:p>
          </table:table-cell>
          <table:table-cell office:value-type="string" calcext:value-type="string">
            <text:p>CENTRO-CTT</text:p>
          </table:table-cell>
          <table:table-cell office:value-type="float" office:value="0.606708627968782" calcext:value-type="float">
            <text:p>0,606709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office:value-type="string" calcext:value-type="string">
            <text:p>M. FORNASARO</text:p>
          </table:table-cell>
          <table:table-cell office:value-type="float" office:value="1.1431923962286" calcext:value-type="float">
            <text:p>1,143192</text:p>
          </table:table-cell>
          <table:table-cell/>
          <table:table-cell office:value-type="string" calcext:value-type="string">
            <text:p>ANHANGUERA</text:p>
          </table:table-cell>
          <table:table-cell office:value-type="string" calcext:value-type="string">
            <text:p>GUARULHOS</text:p>
          </table:table-cell>
          <table:table-cell office:value-type="float" office:value="2.06225271102911" calcext:value-type="float">
            <text:p>2,062253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office:value-type="string" calcext:value-type="string">
            <text:p>PLANALTO</text:p>
          </table:table-cell>
          <table:table-cell office:value-type="float" office:value="0.331704258906996" calcext:value-type="float">
            <text:p>0,331704</text:p>
          </table:table-cell>
          <table:table-cell/>
          <table:table-cell office:value-type="string" calcext:value-type="string">
            <text:p>ANHANGUERA</text:p>
          </table:table-cell>
          <table:table-cell office:value-type="string" calcext:value-type="string">
            <text:p>M. FORNASARO</text:p>
          </table:table-cell>
          <table:table-cell office:value-type="float" office:value="1.85315045255948" calcext:value-type="float">
            <text:p>1,853150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office:value-type="string" calcext:value-type="string">
            <text:p>SCALA III</text:p>
          </table:table-cell>
          <table:table-cell office:value-type="float" office:value="0.142762040200576" calcext:value-type="float">
            <text:p>0,142762</text:p>
          </table:table-cell>
          <table:table-cell/>
          <table:table-cell office:value-type="string" calcext:value-type="string">
            <text:p>ANHANGUERA</text:p>
          </table:table-cell>
          <table:table-cell office:value-type="string" calcext:value-type="string">
            <text:p>PLANALTO</text:p>
          </table:table-cell>
          <table:table-cell office:value-type="float" office:value="0.563018698374847" calcext:value-type="float">
            <text:p>0,563019</text:p>
          </table:table-cell>
        </table:table-row>
        <table:table-row table:style-name="ro1">
          <table:table-cell office:value-type="string" calcext:value-type="string">
            <text:p>APARECIDA</text:p>
          </table:table-cell>
          <table:table-cell office:value-type="string" calcext:value-type="string">
            <text:p>LORENA</text:p>
          </table:table-cell>
          <table:table-cell office:value-type="float" office:value="0.572990324464935" calcext:value-type="float">
            <text:p>0,572990</text:p>
          </table:table-cell>
          <table:table-cell/>
          <table:table-cell office:value-type="string" calcext:value-type="string">
            <text:p>APARECIDA</text:p>
          </table:table-cell>
          <table:table-cell office:value-type="string" calcext:value-type="string">
            <text:p>LORENA</text:p>
          </table:table-cell>
          <table:table-cell office:value-type="float" office:value="0.914505705316144" calcext:value-type="float">
            <text:p>0,914506</text:p>
          </table:table-cell>
        </table:table-row>
        <table:table-row table:style-name="ro1">
          <table:table-cell office:value-type="string" calcext:value-type="string">
            <text:p>APERAM</text:p>
          </table:table-cell>
          <table:table-cell office:value-type="string" calcext:value-type="string">
            <text:p>TIMOTEO 2</text:p>
          </table:table-cell>
          <table:table-cell office:value-type="float" office:value="0.254113708349989" calcext:value-type="float">
            <text:p>0,254114</text:p>
          </table:table-cell>
          <table:table-cell/>
          <table:table-cell office:value-type="string" calcext:value-type="string">
            <text:p>APERAM</text:p>
          </table:table-cell>
          <table:table-cell office:value-type="string" calcext:value-type="string">
            <text:p>TIMOTEO 2</text:p>
          </table:table-cell>
          <table:table-cell office:value-type="float" office:value="0.467436782517718" calcext:value-type="float">
            <text:p>0,467437</text:p>
          </table:table-cell>
        </table:table-row>
        <table:table-row table:style-name="ro1">
          <table:table-cell office:value-type="string" calcext:value-type="string">
            <text:p>APUCARANA</text:p>
          </table:table-cell>
          <table:table-cell office:value-type="string" calcext:value-type="string">
            <text:p>LONDRINA ESU</text:p>
          </table:table-cell>
          <table:table-cell office:value-type="float" office:value="0.373142924379957" calcext:value-type="float">
            <text:p>0,373143</text:p>
          </table:table-cell>
          <table:table-cell/>
          <table:table-cell office:value-type="string" calcext:value-type="string">
            <text:p>APUCARANA</text:p>
          </table:table-cell>
          <table:table-cell office:value-type="string" calcext:value-type="string">
            <text:p>LONDRINA SUL</text:p>
          </table:table-cell>
          <table:table-cell office:value-type="float" office:value="0.650177657616877" calcext:value-type="float">
            <text:p>0,650178</text:p>
          </table:table-cell>
        </table:table-row>
        <table:table-row table:style-name="ro1">
          <table:table-cell office:value-type="string" calcext:value-type="string">
            <text:p>AQUIRAZ II</text:p>
          </table:table-cell>
          <table:table-cell office:value-type="string" calcext:value-type="string">
            <text:p>BANABUIU</text:p>
          </table:table-cell>
          <table:table-cell office:value-type="float" office:value="0.367143277789237" calcext:value-type="float">
            <text:p>0,367143</text:p>
          </table:table-cell>
          <table:table-cell/>
          <table:table-cell office:value-type="string" calcext:value-type="string">
            <text:p>AQUIRAZ II</text:p>
          </table:table-cell>
          <table:table-cell office:value-type="string" calcext:value-type="string">
            <text:p>BANABUIU</text:p>
          </table:table-cell>
          <table:table-cell office:value-type="float" office:value="0.650668470093592" calcext:value-type="float">
            <text:p>0,650668</text:p>
          </table:table-cell>
        </table:table-row>
        <table:table-row table:style-name="ro1">
          <table:table-cell office:value-type="string" calcext:value-type="string">
            <text:p>ARACUAI 2</text:p>
          </table:table-cell>
          <table:table-cell office:value-type="string" calcext:value-type="string">
            <text:p>IRAPE-SE</text:p>
          </table:table-cell>
          <table:table-cell office:value-type="float" office:value="0.516951689143522" calcext:value-type="float">
            <text:p>0,516952</text:p>
          </table:table-cell>
          <table:table-cell/>
          <table:table-cell office:value-type="string" calcext:value-type="string">
            <text:p>ARACUAI 2</text:p>
          </table:table-cell>
          <table:table-cell office:value-type="string" calcext:value-type="string">
            <text:p>IRAPE-SE</text:p>
          </table:table-cell>
          <table:table-cell office:value-type="float" office:value="0.879797519732235" calcext:value-type="float">
            <text:p>0,879798</text:p>
          </table:table-cell>
        </table:table-row>
        <table:table-row table:style-name="ro1">
          <table:table-cell office:value-type="string" calcext:value-type="string">
            <text:p>ARAPIRACA III</text:p>
          </table:table-cell>
          <table:table-cell office:value-type="string" calcext:value-type="string">
            <text:p>RIO LARGO II</text:p>
          </table:table-cell>
          <table:table-cell office:value-type="float" office:value="0.326608140826521" calcext:value-type="float">
            <text:p>0,326608</text:p>
          </table:table-cell>
          <table:table-cell/>
          <table:table-cell office:value-type="string" calcext:value-type="string">
            <text:p>ARAPIRACA III</text:p>
          </table:table-cell>
          <table:table-cell office:value-type="string" calcext:value-type="string">
            <text:p>RIO LARGO II</text:p>
          </table:table-cell>
          <table:table-cell office:value-type="float" office:value="0.551706471330735" calcext:value-type="float">
            <text:p>0,551706</text:p>
          </table:table-cell>
        </table:table-row>
        <table:table-row table:style-name="ro1">
          <table:table-cell office:value-type="string" calcext:value-type="string">
            <text:p>ARARAQUARA 2</text:p>
          </table:table-cell>
          <table:table-cell office:value-type="string" calcext:value-type="string">
            <text:p>ARARAQUARA CTP</text:p>
          </table:table-cell>
          <table:table-cell office:value-type="float" office:value="1.20832372650526" calcext:value-type="float">
            <text:p>1,208324</text:p>
          </table:table-cell>
          <table:table-cell/>
          <table:table-cell office:value-type="string" calcext:value-type="string">
            <text:p>ARARAQUARA 2</text:p>
          </table:table-cell>
          <table:table-cell office:value-type="string" calcext:value-type="string">
            <text:p>ARARAQUARA FUR</text:p>
          </table:table-cell>
          <table:table-cell office:value-type="float" office:value="1.61079058414708" calcext:value-type="float">
            <text:p>1,610791</text:p>
          </table:table-cell>
        </table:table-row>
        <table:table-row table:style-name="ro1">
          <table:table-cell office:value-type="string" calcext:value-type="string">
            <text:p>ARARAQUARA 2</text:p>
          </table:table-cell>
          <table:table-cell office:value-type="string" calcext:value-type="string">
            <text:p>ARARAQUARA FUR</text:p>
          </table:table-cell>
          <table:table-cell office:value-type="float" office:value="1.26441122672939" calcext:value-type="float">
            <text:p>1,264411</text:p>
          </table:table-cell>
          <table:table-cell/>
          <table:table-cell office:value-type="string" calcext:value-type="string">
            <text:p>ARARAQUARA 2</text:p>
          </table:table-cell>
          <table:table-cell office:value-type="string" calcext:value-type="string">
            <text:p>FERNAO DIAS</text:p>
          </table:table-cell>
          <table:table-cell office:value-type="float" office:value="2.1886805251514" calcext:value-type="float">
            <text:p>2,188681</text:p>
          </table:table-cell>
        </table:table-row>
        <table:table-row table:style-name="ro1">
          <table:table-cell office:value-type="string" calcext:value-type="string">
            <text:p>ARARAQUARA 2</text:p>
          </table:table-cell>
          <table:table-cell office:value-type="string" calcext:value-type="string">
            <text:p>FERNAO DIAS</text:p>
          </table:table-cell>
          <table:table-cell office:value-type="float" office:value="1.71803352649392" calcext:value-type="float">
            <text:p>1,718034</text:p>
          </table:table-cell>
          <table:table-cell/>
          <table:table-cell office:value-type="string" calcext:value-type="string">
            <text:p>ARARAQUARA 2</text:p>
          </table:table-cell>
          <table:table-cell office:value-type="string" calcext:value-type="string">
            <text:p>ITATIBA</text:p>
          </table:table-cell>
          <table:table-cell office:value-type="float" office:value="2.1715504438572" calcext:value-type="float">
            <text:p>2,171550</text:p>
          </table:table-cell>
        </table:table-row>
        <table:table-row table:style-name="ro1">
          <table:table-cell office:value-type="string" calcext:value-type="string">
            <text:p>ARARAQUARA 2</text:p>
          </table:table-cell>
          <table:table-cell office:value-type="string" calcext:value-type="string">
            <text:p>ITATIBA</text:p>
          </table:table-cell>
          <table:table-cell office:value-type="float" office:value="1.70458704417875" calcext:value-type="float">
            <text:p>1,704587</text:p>
          </table:table-cell>
          <table:table-cell/>
          <table:table-cell office:value-type="string" calcext:value-type="string">
            <text:p>ARARAQUARA 2</text:p>
          </table:table-cell>
          <table:table-cell office:value-type="string" calcext:value-type="string">
            <text:p>NOVA PONTE 3</text:p>
          </table:table-cell>
          <table:table-cell office:value-type="float" office:value="2.04869743991797" calcext:value-type="float">
            <text:p>2,048697</text:p>
          </table:table-cell>
        </table:table-row>
        <table:table-row table:style-name="ro1">
          <table:table-cell office:value-type="string" calcext:value-type="string">
            <text:p>ARARAQUARA 2</text:p>
          </table:table-cell>
          <table:table-cell office:value-type="string" calcext:value-type="string">
            <text:p>NOVA PONTE 3</text:p>
          </table:table-cell>
          <table:table-cell office:value-type="float" office:value="1.63167595000855" calcext:value-type="float">
            <text:p>1,631676</text:p>
          </table:table-cell>
          <table:table-cell/>
          <table:table-cell office:value-type="string" calcext:value-type="string">
            <text:p>ARARAQUARA 2</text:p>
          </table:table-cell>
          <table:table-cell office:value-type="string" calcext:value-type="string">
            <text:p>TAUBATE</text:p>
          </table:table-cell>
          <table:table-cell office:value-type="float" office:value="1.98078862009593" calcext:value-type="float">
            <text:p>1,980789</text:p>
          </table:table-cell>
        </table:table-row>
        <table:table-row table:style-name="ro1">
          <table:table-cell office:value-type="string" calcext:value-type="string">
            <text:p>ARARAQUARA 2</text:p>
          </table:table-cell>
          <table:table-cell office:value-type="string" calcext:value-type="string">
            <text:p>TAUBATE</text:p>
          </table:table-cell>
          <table:table-cell office:value-type="float" office:value="1.55484604496447" calcext:value-type="float">
            <text:p>1,554846</text:p>
          </table:table-cell>
          <table:table-cell/>
          <table:table-cell office:value-type="string" calcext:value-type="string">
            <text:p>ARARAQUARA CTP</text:p>
          </table:table-cell>
          <table:table-cell office:value-type="string" calcext:value-type="string">
            <text:p>ARARAS</text:p>
          </table:table-cell>
          <table:table-cell office:value-type="float" office:value="1.4963555774329" calcext:value-type="float">
            <text:p>1,496356</text:p>
          </table:table-cell>
        </table:table-row>
        <table:table-row table:style-name="ro1">
          <table:table-cell office:value-type="string" calcext:value-type="string">
            <text:p>ARARAQUARA CTP</text:p>
          </table:table-cell>
          <table:table-cell office:value-type="string" calcext:value-type="string">
            <text:p>ARARAS</text:p>
          </table:table-cell>
          <table:table-cell office:value-type="float" office:value="1.0378444008979" calcext:value-type="float">
            <text:p>1,037844</text:p>
          </table:table-cell>
          <table:table-cell/>
          <table:table-cell office:value-type="string" calcext:value-type="string">
            <text:p>ARARAQUARA CTP</text:p>
          </table:table-cell>
          <table:table-cell office:value-type="string" calcext:value-type="string">
            <text:p>MIRASSOL II</text:p>
          </table:table-cell>
          <table:table-cell office:value-type="float" office:value="1.66638066789797" calcext:value-type="float">
            <text:p>1,666381</text:p>
          </table:table-cell>
        </table:table-row>
        <table:table-row table:style-name="ro1">
          <table:table-cell office:value-type="string" calcext:value-type="string">
            <text:p>ARARAQUARA CTP</text:p>
          </table:table-cell>
          <table:table-cell office:value-type="string" calcext:value-type="string">
            <text:p>MIRASSOL II</text:p>
          </table:table-cell>
          <table:table-cell office:value-type="float" office:value="1.15577064170095" calcext:value-type="float">
            <text:p>1,155771</text:p>
          </table:table-cell>
          <table:table-cell/>
          <table:table-cell office:value-type="string" calcext:value-type="string">
            <text:p>ARARAQUARA CTP</text:p>
          </table:table-cell>
          <table:table-cell office:value-type="string" calcext:value-type="string">
            <text:p>MOGI MIRIM 3</text:p>
          </table:table-cell>
          <table:table-cell office:value-type="float" office:value="1.52451676255473" calcext:value-type="float">
            <text:p>1,524517</text:p>
          </table:table-cell>
        </table:table-row>
        <table:table-row table:style-name="ro1">
          <table:table-cell office:value-type="string" calcext:value-type="string">
            <text:p>ARARAQUARA CTP</text:p>
          </table:table-cell>
          <table:table-cell office:value-type="string" calcext:value-type="string">
            <text:p>PIRACICABA</text:p>
          </table:table-cell>
          <table:table-cell office:value-type="float" office:value="1.06533005947673" calcext:value-type="float">
            <text:p>1,065330</text:p>
          </table:table-cell>
          <table:table-cell/>
          <table:table-cell office:value-type="string" calcext:value-type="string">
            <text:p>ARARAQUARA CTP</text:p>
          </table:table-cell>
          <table:table-cell office:value-type="string" calcext:value-type="string">
            <text:p>PIRACICABA</text:p>
          </table:table-cell>
          <table:table-cell office:value-type="float" office:value="1.53598417539831" calcext:value-type="float">
            <text:p>1,535984</text:p>
          </table:table-cell>
        </table:table-row>
        <table:table-row table:style-name="ro1">
          <table:table-cell office:value-type="string" calcext:value-type="string">
            <text:p>ARCOVERDE II</text:p>
          </table:table-cell>
          <table:table-cell office:value-type="string" calcext:value-type="string">
            <text:p>CAETES II</text:p>
          </table:table-cell>
          <table:table-cell office:value-type="float" office:value="0.35743098104898" calcext:value-type="float">
            <text:p>0,357431</text:p>
          </table:table-cell>
          <table:table-cell/>
          <table:table-cell office:value-type="string" calcext:value-type="string">
            <text:p>ARCOVERDE II</text:p>
          </table:table-cell>
          <table:table-cell office:value-type="string" calcext:value-type="string">
            <text:p>CAETES II</text:p>
          </table:table-cell>
          <table:table-cell office:value-type="float" office:value="0.624508753920696" calcext:value-type="float">
            <text:p>0,624509</text:p>
          </table:table-cell>
        </table:table-row>
        <table:table-row table:style-name="ro1">
          <table:table-cell office:value-type="string" calcext:value-type="string">
            <text:p>ARCOVERDE II</text:p>
          </table:table-cell>
          <table:table-cell office:value-type="string" calcext:value-type="string">
            <text:p>GARANHUNS II</text:p>
          </table:table-cell>
          <table:table-cell office:value-type="float" office:value="0.457734459562872" calcext:value-type="float">
            <text:p>0,457734</text:p>
          </table:table-cell>
          <table:table-cell/>
          <table:table-cell office:value-type="string" calcext:value-type="string">
            <text:p>ARCOVERDE II</text:p>
          </table:table-cell>
          <table:table-cell office:value-type="string" calcext:value-type="string">
            <text:p>GARANHUNS II</text:p>
          </table:table-cell>
          <table:table-cell office:value-type="float" office:value="0.674055002729466" calcext:value-type="float">
            <text:p>0,674055</text:p>
          </table:table-cell>
        </table:table-row>
        <table:table-row table:style-name="ro1">
          <table:table-cell office:value-type="string" calcext:value-type="string">
            <text:p>AREIA</text:p>
          </table:table-cell>
          <table:table-cell office:value-type="string" calcext:value-type="string">
            <text:p>CURITIBA</text:p>
          </table:table-cell>
          <table:table-cell office:value-type="float" office:value="1.34902396990287" calcext:value-type="float">
            <text:p>1,349024</text:p>
          </table:table-cell>
          <table:table-cell/>
          <table:table-cell office:value-type="string" calcext:value-type="string">
            <text:p>AREIA</text:p>
          </table:table-cell>
          <table:table-cell office:value-type="string" calcext:value-type="string">
            <text:p>CURITIBA</text:p>
          </table:table-cell>
          <table:table-cell office:value-type="float" office:value="1.75454746437849" calcext:value-type="float">
            <text:p>1,754547</text:p>
          </table:table-cell>
        </table:table-row>
        <table:table-row table:style-name="ro1">
          <table:table-cell office:value-type="string" calcext:value-type="string">
            <text:p>AREIA</text:p>
          </table:table-cell>
          <table:table-cell office:value-type="string" calcext:value-type="string">
            <text:p>GUARAPUAVA OEST</text:p>
          </table:table-cell>
          <table:table-cell office:value-type="float" office:value="0.419213687575842" calcext:value-type="float">
            <text:p>0,419214</text:p>
          </table:table-cell>
          <table:table-cell/>
          <table:table-cell office:value-type="string" calcext:value-type="string">
            <text:p>AREIA</text:p>
          </table:table-cell>
          <table:table-cell office:value-type="string" calcext:value-type="string">
            <text:p>GUARAPUAVA OEST</text:p>
          </table:table-cell>
          <table:table-cell office:value-type="float" office:value="0.646929202558157" calcext:value-type="float">
            <text:p>0,646929</text:p>
          </table:table-cell>
        </table:table-row>
        <table:table-row table:style-name="ro1">
          <table:table-cell office:value-type="string" calcext:value-type="string">
            <text:p>AREIA</text:p>
          </table:table-cell>
          <table:table-cell office:value-type="string" calcext:value-type="string">
            <text:p>JOINVILLE SUL</text:p>
          </table:table-cell>
          <table:table-cell office:value-type="float" office:value="1.54337097824043" calcext:value-type="float">
            <text:p>1,543371</text:p>
          </table:table-cell>
          <table:table-cell/>
          <table:table-cell office:value-type="string" calcext:value-type="string">
            <text:p>AREIA</text:p>
          </table:table-cell>
          <table:table-cell office:value-type="string" calcext:value-type="string">
            <text:p>JOINVILLE SUL</text:p>
          </table:table-cell>
          <table:table-cell office:value-type="float" office:value="2.02851162966124" calcext:value-type="float">
            <text:p>2,028512</text:p>
          </table:table-cell>
        </table:table-row>
        <table:table-row table:style-name="ro1">
          <table:table-cell office:value-type="string" calcext:value-type="string">
            <text:p>AREIA</text:p>
          </table:table-cell>
          <table:table-cell office:value-type="string" calcext:value-type="string">
            <text:p>S. OSORIO</text:p>
          </table:table-cell>
          <table:table-cell office:value-type="float" office:value="0.440227721557454" calcext:value-type="float">
            <text:p>0,440228</text:p>
          </table:table-cell>
          <table:table-cell/>
          <table:table-cell office:value-type="string" calcext:value-type="string">
            <text:p>ARINOS 2</text:p>
          </table:table-cell>
          <table:table-cell office:value-type="string" calcext:value-type="string">
            <text:p>PARACATU 4</text:p>
          </table:table-cell>
          <table:table-cell office:value-type="float" office:value="1.93495393726603" calcext:value-type="float">
            <text:p>1,934954</text:p>
          </table:table-cell>
        </table:table-row>
        <table:table-row table:style-name="ro1">
          <table:table-cell office:value-type="string" calcext:value-type="string">
            <text:p>AREIA</text:p>
          </table:table-cell>
          <table:table-cell office:value-type="string" calcext:value-type="string">
            <text:p>U.VITORIA NORTE</text:p>
          </table:table-cell>
          <table:table-cell office:value-type="float" office:value="0.461350539004943" calcext:value-type="float">
            <text:p>0,461351</text:p>
          </table:table-cell>
          <table:table-cell/>
          <table:table-cell office:value-type="string" calcext:value-type="string">
            <text:p>ARIQUEMES</text:p>
          </table:table-cell>
          <table:table-cell office:value-type="string" calcext:value-type="string">
            <text:p>JARU</text:p>
          </table:table-cell>
          <table:table-cell office:value-type="float" office:value="0.517379070790593" calcext:value-type="float">
            <text:p>0,517379</text:p>
          </table:table-cell>
        </table:table-row>
        <table:table-row table:style-name="ro1">
          <table:table-cell office:value-type="string" calcext:value-type="string">
            <text:p>ARINOS 2</text:p>
          </table:table-cell>
          <table:table-cell office:value-type="string" calcext:value-type="string">
            <text:p>PARACATU 4</text:p>
          </table:table-cell>
          <table:table-cell office:value-type="float" office:value="1.4809141422646" calcext:value-type="float">
            <text:p>1,480914</text:p>
          </table:table-cell>
          <table:table-cell/>
          <table:table-cell office:value-type="string" calcext:value-type="string">
            <text:p>ARIQUEMES</text:p>
          </table:table-cell>
          <table:table-cell office:value-type="string" calcext:value-type="string">
            <text:p>JI-PARANA</text:p>
          </table:table-cell>
          <table:table-cell office:value-type="float" office:value="0.830518414827306" calcext:value-type="float">
            <text:p>0,830518</text:p>
          </table:table-cell>
        </table:table-row>
        <table:table-row table:style-name="ro1">
          <table:table-cell office:value-type="string" calcext:value-type="string">
            <text:p>ARIQUEMES</text:p>
          </table:table-cell>
          <table:table-cell office:value-type="string" calcext:value-type="string">
            <text:p>JARU</text:p>
          </table:table-cell>
          <table:table-cell office:value-type="float" office:value="0.30156406538179" calcext:value-type="float">
            <text:p>0,301564</text:p>
          </table:table-cell>
          <table:table-cell/>
          <table:table-cell office:value-type="string" calcext:value-type="string">
            <text:p>ARIQUEMES</text:p>
          </table:table-cell>
          <table:table-cell office:value-type="string" calcext:value-type="string">
            <text:p>SAMUEL</text:p>
          </table:table-cell>
          <table:table-cell office:value-type="float" office:value="0.82404012807389" calcext:value-type="float">
            <text:p>0,824040</text:p>
          </table:table-cell>
        </table:table-row>
        <table:table-row table:style-name="ro1">
          <table:table-cell office:value-type="string" calcext:value-type="string">
            <text:p>ARIQUEMES</text:p>
          </table:table-cell>
          <table:table-cell office:value-type="string" calcext:value-type="string">
            <text:p>JI-PARANA</text:p>
          </table:table-cell>
          <table:table-cell office:value-type="float" office:value="0.484083187143711" calcext:value-type="float">
            <text:p>0,484083</text:p>
          </table:table-cell>
          <table:table-cell/>
          <table:table-cell office:value-type="string" calcext:value-type="string">
            <text:p>ASOLO 2</text:p>
          </table:table-cell>
          <table:table-cell office:value-type="string" calcext:value-type="string">
            <text:p>C. DOURADA</text:p>
          </table:table-cell>
          <table:table-cell office:value-type="float" office:value="0.283830845358862" calcext:value-type="float">
            <text:p>0,283831</text:p>
          </table:table-cell>
        </table:table-row>
        <table:table-row table:style-name="ro1">
          <table:table-cell office:value-type="string" calcext:value-type="string">
            <text:p>ARIQUEMES</text:p>
          </table:table-cell>
          <table:table-cell office:value-type="string" calcext:value-type="string">
            <text:p>SAMUEL</text:p>
          </table:table-cell>
          <table:table-cell office:value-type="float" office:value="0.480307196578256" calcext:value-type="float">
            <text:p>0,480307</text:p>
          </table:table-cell>
          <table:table-cell/>
          <table:table-cell office:value-type="string" calcext:value-type="string">
            <text:p>ASSIS</text:p>
          </table:table-cell>
          <table:table-cell office:value-type="string" calcext:value-type="string">
            <text:p>CAPIVARA</text:p>
          </table:table-cell>
          <table:table-cell office:value-type="float" office:value="1.67054266225721" calcext:value-type="float">
            <text:p>1,670543</text:p>
          </table:table-cell>
        </table:table-row>
        <table:table-row table:style-name="ro1">
          <table:table-cell office:value-type="string" calcext:value-type="string">
            <text:p>ASOLO 2</text:p>
          </table:table-cell>
          <table:table-cell office:value-type="string" calcext:value-type="string">
            <text:p>C. DOURADA</text:p>
          </table:table-cell>
          <table:table-cell office:value-type="float" office:value="0.159700914136278" calcext:value-type="float">
            <text:p>0,159701</text:p>
          </table:table-cell>
          <table:table-cell/>
          <table:table-cell office:value-type="string" calcext:value-type="string">
            <text:p>ASSIS</text:p>
          </table:table-cell>
          <table:table-cell office:value-type="string" calcext:value-type="string">
            <text:p>MARIMBONDO II</text:p>
          </table:table-cell>
          <table:table-cell office:value-type="float" office:value="2.1946399686964" calcext:value-type="float">
            <text:p>2,194640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CAPIVARA</text:p>
          </table:table-cell>
          <table:table-cell office:value-type="float" office:value="1.19957964913367" calcext:value-type="float">
            <text:p>1,199580</text:p>
          </table:table-cell>
          <table:table-cell/>
          <table:table-cell office:value-type="string" calcext:value-type="string">
            <text:p>ASSIS</text:p>
          </table:table-cell>
          <table:table-cell office:value-type="string" calcext:value-type="string">
            <text:p>PAR.PAULISTA2</text:p>
          </table:table-cell>
          <table:table-cell office:value-type="float" office:value="0.653619528866489" calcext:value-type="float">
            <text:p>0,653620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MARIMBONDO II</text:p>
          </table:table-cell>
          <table:table-cell office:value-type="float" office:value="1.65544862478274" calcext:value-type="float">
            <text:p>1,655449</text:p>
          </table:table-cell>
          <table:table-cell/>
          <table:table-cell office:value-type="string" calcext:value-type="string">
            <text:p>ASSIS</text:p>
          </table:table-cell>
          <table:table-cell office:value-type="string" calcext:value-type="string">
            <text:p>SUMARE</text:p>
          </table:table-cell>
          <table:table-cell office:value-type="float" office:value="1.66256389435348" calcext:value-type="float">
            <text:p>1,662564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PAR.PAULISTA2</text:p>
          </table:table-cell>
          <table:table-cell office:value-type="float" office:value="0.40953015792543" calcext:value-type="float">
            <text:p>0,409530</text:p>
          </table:table-cell>
          <table:table-cell/>
          <table:table-cell office:value-type="string" calcext:value-type="string">
            <text:p>ASSIS</text:p>
          </table:table-cell>
          <table:table-cell office:value-type="string" calcext:value-type="string">
            <text:p>TAQUARUCU</text:p>
          </table:table-cell>
          <table:table-cell office:value-type="float" office:value="1.58823441775944" calcext:value-type="float">
            <text:p>1,588234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SUMARE</text:p>
          </table:table-cell>
          <table:table-cell office:value-type="float" office:value="1.19385027279464" calcext:value-type="float">
            <text:p>1,193850</text:p>
          </table:table-cell>
          <table:table-cell/>
          <table:table-cell office:value-type="string" calcext:value-type="string">
            <text:p>ATIBAIA II</text:p>
          </table:table-cell>
          <table:table-cell office:value-type="string" calcext:value-type="string">
            <text:p>POCOS CALDAS</text:p>
          </table:table-cell>
          <table:table-cell office:value-type="float" office:value="1.05678600318324" calcext:value-type="float">
            <text:p>1,056786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TAQUARUCU</text:p>
          </table:table-cell>
          <table:table-cell office:value-type="float" office:value="1.14047592356821" calcext:value-type="float">
            <text:p>1,140476</text:p>
          </table:table-cell>
          <table:table-cell/>
          <table:table-cell office:value-type="string" calcext:value-type="string">
            <text:p>ATLANTIDA 2</text:p>
          </table:table-cell>
          <table:table-cell office:value-type="string" calcext:value-type="string">
            <text:p>GRAVATAI3</text:p>
          </table:table-cell>
          <table:table-cell office:value-type="float" office:value="0.594423120244704" calcext:value-type="float">
            <text:p>0,594423</text:p>
          </table:table-cell>
        </table:table-row>
        <table:table-row table:style-name="ro1">
          <table:table-cell office:value-type="string" calcext:value-type="string">
            <text:p>ATIBAIA II</text:p>
          </table:table-cell>
          <table:table-cell office:value-type="string" calcext:value-type="string">
            <text:p>POCOS CALDAS</text:p>
          </table:table-cell>
          <table:table-cell office:value-type="float" office:value="0.726141070210951" calcext:value-type="float">
            <text:p>0,726141</text:p>
          </table:table-cell>
          <table:table-cell/>
          <table:table-cell office:value-type="string" calcext:value-type="string">
            <text:p>ATLANTIDA 2</text:p>
          </table:table-cell>
          <table:table-cell office:value-type="string" calcext:value-type="string">
            <text:p>TORRES 2</text:p>
          </table:table-cell>
          <table:table-cell office:value-type="float" office:value="0.631957396153018" calcext:value-type="float">
            <text:p>0,631957</text:p>
          </table:table-cell>
        </table:table-row>
        <table:table-row table:style-name="ro1">
          <table:table-cell office:value-type="string" calcext:value-type="string">
            <text:p>ATLANTIDA 2</text:p>
          </table:table-cell>
          <table:table-cell office:value-type="string" calcext:value-type="string">
            <text:p>GRAVATAI3</text:p>
          </table:table-cell>
          <table:table-cell office:value-type="float" office:value="0.324040047946906" calcext:value-type="float">
            <text:p>0,324040</text:p>
          </table:table-cell>
          <table:table-cell/>
          <table:table-cell office:value-type="string" calcext:value-type="string">
            <text:p>AVARE NOVA</text:p>
          </table:table-cell>
          <table:table-cell office:value-type="string" calcext:value-type="string">
            <text:p>BOTUCATU</text:p>
          </table:table-cell>
          <table:table-cell office:value-type="float" office:value="0.612409490717571" calcext:value-type="float">
            <text:p>0,612409</text:p>
          </table:table-cell>
        </table:table-row>
        <table:table-row table:style-name="ro1">
          <table:table-cell office:value-type="string" calcext:value-type="string">
            <text:p>ATLANTIDA 2</text:p>
          </table:table-cell>
          <table:table-cell office:value-type="string" calcext:value-type="string">
            <text:p>TORRES 2</text:p>
          </table:table-cell>
          <table:table-cell office:value-type="float" office:value="0.344501244947412" calcext:value-type="float">
            <text:p>0,344501</text:p>
          </table:table-cell>
          <table:table-cell/>
          <table:table-cell office:value-type="string" calcext:value-type="string">
            <text:p>B. ESPERANCA</text:p>
          </table:table-cell>
          <table:table-cell office:value-type="string" calcext:value-type="string">
            <text:p>TERESINA</text:p>
          </table:table-cell>
          <table:table-cell office:value-type="float" office:value="0.594632237308461" calcext:value-type="float">
            <text:p>0,594632</text:p>
          </table:table-cell>
        </table:table-row>
        <table:table-row table:style-name="ro1">
          <table:table-cell office:value-type="string" calcext:value-type="string">
            <text:p>AVARE NOVA</text:p>
          </table:table-cell>
          <table:table-cell office:value-type="string" calcext:value-type="string">
            <text:p>BOTUCATU</text:p>
          </table:table-cell>
          <table:table-cell office:value-type="float" office:value="0.323383646964245" calcext:value-type="float">
            <text:p>0,323384</text:p>
          </table:table-cell>
          <table:table-cell/>
          <table:table-cell office:value-type="string" calcext:value-type="string">
            <text:p>B. ESPERANCA</text:p>
          </table:table-cell>
          <table:table-cell office:value-type="string" calcext:value-type="string">
            <text:p>UB.ESPERANCA</text:p>
          </table:table-cell>
          <table:table-cell office:value-type="float" office:value="0.441639592953297" calcext:value-type="float">
            <text:p>0,441640</text:p>
          </table:table-cell>
        </table:table-row>
        <table:table-row table:style-name="ro1">
          <table:table-cell office:value-type="string" calcext:value-type="string">
            <text:p>B. ESPERANCA</text:p>
          </table:table-cell>
          <table:table-cell office:value-type="string" calcext:value-type="string">
            <text:p>TERESINA</text:p>
          </table:table-cell>
          <table:table-cell office:value-type="float" office:value="0.415227907572883" calcext:value-type="float">
            <text:p>0,415228</text:p>
          </table:table-cell>
          <table:table-cell/>
          <table:table-cell office:value-type="string" calcext:value-type="string">
            <text:p>B. FLUMINENSE</text:p>
          </table:table-cell>
          <table:table-cell office:value-type="string" calcext:value-type="string">
            <text:p>C. PAULISTA</text:p>
          </table:table-cell>
          <table:table-cell office:value-type="float" office:value="1.80602468633774" calcext:value-type="float">
            <text:p>1,806025</text:p>
          </table:table-cell>
        </table:table-row>
        <table:table-row table:style-name="ro1">
          <table:table-cell office:value-type="string" calcext:value-type="string">
            <text:p>B. ESPERANCA</text:p>
          </table:table-cell>
          <table:table-cell office:value-type="string" calcext:value-type="string">
            <text:p>UB.ESPERANCA</text:p>
          </table:table-cell>
          <table:table-cell office:value-type="float" office:value="0.30839411753623" calcext:value-type="float">
            <text:p>0,308394</text:p>
          </table:table-cell>
          <table:table-cell/>
          <table:table-cell office:value-type="string" calcext:value-type="string">
            <text:p>B. SANTISTA</text:p>
          </table:table-cell>
          <table:table-cell office:value-type="string" calcext:value-type="string">
            <text:p>CARBOCLORO</text:p>
          </table:table-cell>
          <table:table-cell office:value-type="float" office:value="0.858662851423412" calcext:value-type="float">
            <text:p>0,858663</text:p>
          </table:table-cell>
        </table:table-row>
        <table:table-row table:style-name="ro1">
          <table:table-cell office:value-type="string" calcext:value-type="string">
            <text:p>B. FLUMINENSE</text:p>
          </table:table-cell>
          <table:table-cell office:value-type="string" calcext:value-type="string">
            <text:p>C. PAULISTA</text:p>
          </table:table-cell>
          <table:table-cell office:value-type="float" office:value="1.36985972398325" calcext:value-type="float">
            <text:p>1,369860</text:p>
          </table:table-cell>
          <table:table-cell/>
          <table:table-cell office:value-type="string" calcext:value-type="string">
            <text:p>B. SANTISTA</text:p>
          </table:table-cell>
          <table:table-cell office:value-type="string" calcext:value-type="string">
            <text:p>PBR CUBATAO</text:p>
          </table:table-cell>
          <table:table-cell office:value-type="float" office:value="0.859098674857592" calcext:value-type="float">
            <text:p>0,859099</text:p>
          </table:table-cell>
        </table:table-row>
        <table:table-row table:style-name="ro1">
          <table:table-cell office:value-type="string" calcext:value-type="string">
            <text:p>B. SANTISTA</text:p>
          </table:table-cell>
          <table:table-cell office:value-type="string" calcext:value-type="string">
            <text:p>CARBOCLORO</text:p>
          </table:table-cell>
          <table:table-cell office:value-type="float" office:value="0.490077843994271" calcext:value-type="float">
            <text:p>0,490078</text:p>
          </table:table-cell>
          <table:table-cell/>
          <table:table-cell office:value-type="string" calcext:value-type="string">
            <text:p>B. SANTISTA</text:p>
          </table:table-cell>
          <table:table-cell office:value-type="string" calcext:value-type="string">
            <text:p>TIJUCO PRETO</text:p>
          </table:table-cell>
          <table:table-cell office:value-type="float" office:value="1.26511657590492" calcext:value-type="float">
            <text:p>1,265117</text:p>
          </table:table-cell>
        </table:table-row>
        <table:table-row table:style-name="ro1">
          <table:table-cell office:value-type="string" calcext:value-type="string">
            <text:p>B. SANTISTA</text:p>
          </table:table-cell>
          <table:table-cell office:value-type="string" calcext:value-type="string">
            <text:p>PBR CUBATAO</text:p>
          </table:table-cell>
          <table:table-cell office:value-type="float" office:value="0.490326588200022" calcext:value-type="float">
            <text:p>0,490327</text:p>
          </table:table-cell>
          <table:table-cell/>
          <table:table-cell office:value-type="string" calcext:value-type="string">
            <text:p>B.JESUS LAPA</text:p>
          </table:table-cell>
          <table:table-cell office:value-type="string" calcext:value-type="string">
            <text:p>BOM.JES.LAPA II</text:p>
          </table:table-cell>
          <table:table-cell office:value-type="float" office:value="0.903998613546403" calcext:value-type="float">
            <text:p>0,903999</text:p>
          </table:table-cell>
        </table:table-row>
        <table:table-row table:style-name="ro1">
          <table:table-cell office:value-type="string" calcext:value-type="string">
            <text:p>B. SANTISTA</text:p>
          </table:table-cell>
          <table:table-cell office:value-type="string" calcext:value-type="string">
            <text:p>TIJUCO PRETO</text:p>
          </table:table-cell>
          <table:table-cell office:value-type="float" office:value="0.981301455461796" calcext:value-type="float">
            <text:p>0,981301</text:p>
          </table:table-cell>
          <table:table-cell/>
          <table:table-cell office:value-type="string" calcext:value-type="string">
            <text:p>B.JESUS LAPA</text:p>
          </table:table-cell>
          <table:table-cell office:value-type="string" calcext:value-type="string">
            <text:p>BROTAS.MACAUBAS</text:p>
          </table:table-cell>
          <table:table-cell office:value-type="float" office:value="0.633794861362619" calcext:value-type="float">
            <text:p>0,633795</text:p>
          </table:table-cell>
        </table:table-row>
        <table:table-row table:style-name="ro1">
          <table:table-cell office:value-type="string" calcext:value-type="string">
            <text:p>B.JESUS LAPA</text:p>
          </table:table-cell>
          <table:table-cell office:value-type="string" calcext:value-type="string">
            <text:p>BOM.JES.LAPA II</text:p>
          </table:table-cell>
          <table:table-cell office:value-type="float" office:value="0.630643399239596" calcext:value-type="float">
            <text:p>0,630643</text:p>
          </table:table-cell>
          <table:table-cell/>
          <table:table-cell office:value-type="string" calcext:value-type="string">
            <text:p>B.JESUS LAPA</text:p>
          </table:table-cell>
          <table:table-cell office:value-type="string" calcext:value-type="string">
            <text:p>TABOCAS BRJ VLH</text:p>
          </table:table-cell>
          <table:table-cell office:value-type="float" office:value="0.554953945523621" calcext:value-type="float">
            <text:p>0,554954</text:p>
          </table:table-cell>
        </table:table-row>
        <table:table-row table:style-name="ro1">
          <table:table-cell office:value-type="string" calcext:value-type="string">
            <text:p>BACABEIRA</text:p>
          </table:table-cell>
          <table:table-cell office:value-type="string" calcext:value-type="string">
            <text:p>PARNAIBA III</text:p>
          </table:table-cell>
          <table:table-cell office:value-type="float" office:value="1.4625475168008" calcext:value-type="float">
            <text:p>1,462548</text:p>
          </table:table-cell>
          <table:table-cell/>
          <table:table-cell office:value-type="string" calcext:value-type="string">
            <text:p>BACABEIRA</text:p>
          </table:table-cell>
          <table:table-cell office:value-type="string" calcext:value-type="string">
            <text:p>PARNAIBA III</text:p>
          </table:table-cell>
          <table:table-cell office:value-type="float" office:value="1.75325579816015" calcext:value-type="float">
            <text:p>1,753256</text:p>
          </table:table-cell>
        </table:table-row>
        <table:table-row table:style-name="ro1">
          <table:table-cell office:value-type="string" calcext:value-type="string">
            <text:p>BAGE2</text:p>
          </table:table-cell>
          <table:table-cell office:value-type="string" calcext:value-type="string">
            <text:p>CANDIOTA 2</text:p>
          </table:table-cell>
          <table:table-cell office:value-type="float" office:value="0.382945450485741" calcext:value-type="float">
            <text:p>0,382945</text:p>
          </table:table-cell>
          <table:table-cell/>
          <table:table-cell office:value-type="string" calcext:value-type="string">
            <text:p>BAGE2</text:p>
          </table:table-cell>
          <table:table-cell office:value-type="string" calcext:value-type="string">
            <text:p>LIVRAMENTO 2</text:p>
          </table:table-cell>
          <table:table-cell office:value-type="float" office:value="0.658811130309614" calcext:value-type="float">
            <text:p>0,658811</text:p>
          </table:table-cell>
        </table:table-row>
        <table:table-row table:style-name="ro1">
          <table:table-cell office:value-type="string" calcext:value-type="string">
            <text:p>BAGE2</text:p>
          </table:table-cell>
          <table:table-cell office:value-type="string" calcext:value-type="string">
            <text:p>LIVRAMENTO 2</text:p>
          </table:table-cell>
          <table:table-cell office:value-type="float" office:value="0.359140119189172" calcext:value-type="float">
            <text:p>0,359140</text:p>
          </table:table-cell>
          <table:table-cell/>
          <table:table-cell office:value-type="string" calcext:value-type="string">
            <text:p>BAGUACU</text:p>
          </table:table-cell>
          <table:table-cell office:value-type="string" calcext:value-type="string">
            <text:p>ILHA SOLTEIRA</text:p>
          </table:table-cell>
          <table:table-cell office:value-type="float" office:value="1.5570600196576" calcext:value-type="float">
            <text:p>1,557060</text:p>
          </table:table-cell>
        </table:table-row>
        <table:table-row table:style-name="ro1">
          <table:table-cell office:value-type="string" calcext:value-type="string">
            <text:p>BAGUACU</text:p>
          </table:table-cell>
          <table:table-cell office:value-type="string" calcext:value-type="string">
            <text:p>ILHA SOLTEIRA</text:p>
          </table:table-cell>
          <table:table-cell office:value-type="float" office:value="1.07994787310911" calcext:value-type="float">
            <text:p>1,079948</text:p>
          </table:table-cell>
          <table:table-cell/>
          <table:table-cell office:value-type="string" calcext:value-type="string">
            <text:p>BAGUARI-SE</text:p>
          </table:table-cell>
          <table:table-cell office:value-type="string" calcext:value-type="string">
            <text:p>MESQUITA</text:p>
          </table:table-cell>
          <table:table-cell office:value-type="float" office:value="0.573074608225482" calcext:value-type="float">
            <text:p>0,573075</text:p>
          </table:table-cell>
        </table:table-row>
        <table:table-row table:style-name="ro1">
          <table:table-cell office:value-type="string" calcext:value-type="string">
            <text:p>BAGUARI-SE</text:p>
          </table:table-cell>
          <table:table-cell office:value-type="string" calcext:value-type="string">
            <text:p>MESQUITA</text:p>
          </table:table-cell>
          <table:table-cell office:value-type="float" office:value="0.36965228578206" calcext:value-type="float">
            <text:p>0,369652</text:p>
          </table:table-cell>
          <table:table-cell/>
          <table:table-cell office:value-type="string" calcext:value-type="string">
            <text:p>BAIXO IGUACU</text:p>
          </table:table-cell>
          <table:table-cell office:value-type="string" calcext:value-type="string">
            <text:p>CASCAVEL OEST</text:p>
          </table:table-cell>
          <table:table-cell office:value-type="float" office:value="0.705764426821786" calcext:value-type="float">
            <text:p>0,705764</text:p>
          </table:table-cell>
        </table:table-row>
        <table:table-row table:style-name="ro1">
          <table:table-cell office:value-type="string" calcext:value-type="string">
            <text:p>BAIXO IGUACU</text:p>
          </table:table-cell>
          <table:table-cell office:value-type="string" calcext:value-type="string">
            <text:p>CASCAVEL OEST</text:p>
          </table:table-cell>
          <table:table-cell office:value-type="float" office:value="0.457339237056954" calcext:value-type="float">
            <text:p>0,457339</text:p>
          </table:table-cell>
          <table:table-cell/>
          <table:table-cell office:value-type="string" calcext:value-type="string">
            <text:p>BAIXO IGUACU</text:p>
          </table:table-cell>
          <table:table-cell office:value-type="string" calcext:value-type="string">
            <text:p>REALEZA SUL</text:p>
          </table:table-cell>
          <table:table-cell office:value-type="float" office:value="0.633520608194573" calcext:value-type="float">
            <text:p>0,633521</text:p>
          </table:table-cell>
        </table:table-row>
        <table:table-row table:style-name="ro1">
          <table:table-cell office:value-type="string" calcext:value-type="string">
            <text:p>BAIXO IGUACU</text:p>
          </table:table-cell>
          <table:table-cell office:value-type="string" calcext:value-type="string">
            <text:p>REALEZA SUL</text:p>
          </table:table-cell>
          <table:table-cell office:value-type="float" office:value="0.345990041349693" calcext:value-type="float">
            <text:p>0,345990</text:p>
          </table:table-cell>
          <table:table-cell/>
          <table:table-cell office:value-type="string" calcext:value-type="string">
            <text:p>BALSAS</text:p>
          </table:table-cell>
          <table:table-cell office:value-type="string" calcext:value-type="string">
            <text:p>RIB.GONCALVES</text:p>
          </table:table-cell>
          <table:table-cell office:value-type="float" office:value="0.561248596497777" calcext:value-type="float">
            <text:p>0,561249</text:p>
          </table:table-cell>
        </table:table-row>
        <table:table-row table:style-name="ro1">
          <table:table-cell office:value-type="string" calcext:value-type="string">
            <text:p>BALSAS</text:p>
          </table:table-cell>
          <table:table-cell office:value-type="string" calcext:value-type="string">
            <text:p>RIB.GONCALVES</text:p>
          </table:table-cell>
          <table:table-cell office:value-type="float" office:value="0.394606513124301" calcext:value-type="float">
            <text:p>0,394607</text:p>
          </table:table-cell>
          <table:table-cell/>
          <table:table-cell office:value-type="string" calcext:value-type="string">
            <text:p>BANABUIU</text:p>
          </table:table-cell>
          <table:table-cell office:value-type="string" calcext:value-type="string">
            <text:p>MOSSORO II</text:p>
          </table:table-cell>
          <table:table-cell office:value-type="float" office:value="0.63199904711181" calcext:value-type="float">
            <text:p>0,631999</text:p>
          </table:table-cell>
        </table:table-row>
        <table:table-row table:style-name="ro1">
          <table:table-cell office:value-type="string" calcext:value-type="string">
            <text:p>BANABUIU</text:p>
          </table:table-cell>
          <table:table-cell office:value-type="string" calcext:value-type="string">
            <text:p>MILAGRES</text:p>
          </table:table-cell>
          <table:table-cell office:value-type="float" office:value="0.477039923768551" calcext:value-type="float">
            <text:p>0,477040</text:p>
          </table:table-cell>
          <table:table-cell/>
          <table:table-cell office:value-type="string" calcext:value-type="string">
            <text:p>BANABUIU</text:p>
          </table:table-cell>
          <table:table-cell office:value-type="string" calcext:value-type="string">
            <text:p>RUSSAS II</text:p>
          </table:table-cell>
          <table:table-cell office:value-type="float" office:value="0.778329974146591" calcext:value-type="float">
            <text:p>0,778330</text:p>
          </table:table-cell>
        </table:table-row>
        <table:table-row table:style-name="ro1">
          <table:table-cell office:value-type="string" calcext:value-type="string">
            <text:p>BAR.COQUEIROS</text:p>
          </table:table-cell>
          <table:table-cell office:value-type="string" calcext:value-type="string">
            <text:p>ITAGUACU</text:p>
          </table:table-cell>
          <table:table-cell office:value-type="float" office:value="0.694766736745832" calcext:value-type="float">
            <text:p>0,694767</text:p>
          </table:table-cell>
          <table:table-cell/>
          <table:table-cell office:value-type="string" calcext:value-type="string">
            <text:p>BAR.COQUEIROS</text:p>
          </table:table-cell>
          <table:table-cell office:value-type="string" calcext:value-type="string">
            <text:p>ITAGUACU</text:p>
          </table:table-cell>
          <table:table-cell office:value-type="float" office:value="1.04069305848886" calcext:value-type="float">
            <text:p>1,040693</text:p>
          </table:table-cell>
        </table:table-row>
        <table:table-row table:style-name="ro1">
          <table:table-cell office:value-type="string" calcext:value-type="string">
            <text:p>BAR.COQUEIROS</text:p>
          </table:table-cell>
          <table:table-cell office:value-type="string" calcext:value-type="string">
            <text:p>QUIRINOPOLIS2</text:p>
          </table:table-cell>
          <table:table-cell office:value-type="float" office:value="0.325930748929232" calcext:value-type="float">
            <text:p>0,325931</text:p>
          </table:table-cell>
          <table:table-cell/>
          <table:table-cell office:value-type="string" calcext:value-type="string">
            <text:p>BAR.COQUEIROS</text:p>
          </table:table-cell>
          <table:table-cell office:value-type="string" calcext:value-type="string">
            <text:p>QUIRINOPOLIS2</text:p>
          </table:table-cell>
          <table:table-cell office:value-type="float" office:value="0.579265312896641" calcext:value-type="float">
            <text:p>0,579265</text:p>
          </table:table-cell>
        </table:table-row>
        <table:table-row table:style-name="ro1">
          <table:table-cell office:value-type="string" calcext:value-type="string">
            <text:p>BARAO COCAIS3</text:p>
          </table:table-cell>
          <table:table-cell office:value-type="string" calcext:value-type="string">
            <text:p>J.MONLEVADE 2</text:p>
          </table:table-cell>
          <table:table-cell office:value-type="float" office:value="0.308073012938785" calcext:value-type="float">
            <text:p>0,308073</text:p>
          </table:table-cell>
          <table:table-cell/>
          <table:table-cell office:value-type="string" calcext:value-type="string">
            <text:p>BARAO COCAIS3</text:p>
          </table:table-cell>
          <table:table-cell office:value-type="string" calcext:value-type="string">
            <text:p>J.MONLEVADE 2</text:p>
          </table:table-cell>
          <table:table-cell office:value-type="float" office:value="0.566693780054984" calcext:value-type="float">
            <text:p>0,566694</text:p>
          </table:table-cell>
        </table:table-row>
        <table:table-row table:style-name="ro1">
          <table:table-cell office:value-type="string" calcext:value-type="string">
            <text:p>BARAO COCAIS3</text:p>
          </table:table-cell>
          <table:table-cell office:value-type="string" calcext:value-type="string">
            <text:p>TAQUARIL</text:p>
          </table:table-cell>
          <table:table-cell office:value-type="float" office:value="0.344460117783389" calcext:value-type="float">
            <text:p>0,344460</text:p>
          </table:table-cell>
          <table:table-cell/>
          <table:table-cell office:value-type="string" calcext:value-type="string">
            <text:p>BARAO COCAIS3</text:p>
          </table:table-cell>
          <table:table-cell office:value-type="string" calcext:value-type="string">
            <text:p>TAQUARIL</text:p>
          </table:table-cell>
          <table:table-cell office:value-type="float" office:value="0.586234968638164" calcext:value-type="float">
            <text:p>0,586235</text:p>
          </table:table-cell>
        </table:table-row>
        <table:table-row table:style-name="ro1">
          <table:table-cell office:value-type="string" calcext:value-type="string">
            <text:p>BARBACENA 2</text:p>
          </table:table-cell>
          <table:table-cell office:value-type="string" calcext:value-type="string">
            <text:p>LAFAIETE 1</text:p>
          </table:table-cell>
          <table:table-cell office:value-type="float" office:value="0.545419783196678" calcext:value-type="float">
            <text:p>0,545420</text:p>
          </table:table-cell>
          <table:table-cell/>
          <table:table-cell office:value-type="string" calcext:value-type="string">
            <text:p>BARBACENA 2</text:p>
          </table:table-cell>
          <table:table-cell office:value-type="string" calcext:value-type="string">
            <text:p>LAFAIETE 1</text:p>
          </table:table-cell>
          <table:table-cell office:value-type="float" office:value="0.858819003338099" calcext:value-type="float">
            <text:p>0,858819</text:p>
          </table:table-cell>
        </table:table-row>
        <table:table-row table:style-name="ro1">
          <table:table-cell office:value-type="string" calcext:value-type="string">
            <text:p>BARBACENA 2</text:p>
          </table:table-cell>
          <table:table-cell office:value-type="string" calcext:value-type="string">
            <text:p>SANT.DUMONT 2</text:p>
          </table:table-cell>
          <table:table-cell office:value-type="float" office:value="0.722970420432675" calcext:value-type="float">
            <text:p>0,722970</text:p>
          </table:table-cell>
          <table:table-cell/>
          <table:table-cell office:value-type="string" calcext:value-type="string">
            <text:p>BARBACENA 2</text:p>
          </table:table-cell>
          <table:table-cell office:value-type="string" calcext:value-type="string">
            <text:p>SANT.DUMONT 2</text:p>
          </table:table-cell>
          <table:table-cell office:value-type="float" office:value="1.13839056639979" calcext:value-type="float">
            <text:p>1,138391</text:p>
          </table:table-cell>
        </table:table-row>
        <table:table-row table:style-name="ro1">
          <table:table-cell office:value-type="string" calcext:value-type="string">
            <text:p>BARRA GRANDE</text:p>
          </table:table-cell>
          <table:table-cell office:value-type="string" calcext:value-type="string">
            <text:p>C.NOVOS</text:p>
          </table:table-cell>
          <table:table-cell office:value-type="float" office:value="0.610967958249522" calcext:value-type="float">
            <text:p>0,610968</text:p>
          </table:table-cell>
          <table:table-cell/>
          <table:table-cell office:value-type="string" calcext:value-type="string">
            <text:p>BARRA GRANDE</text:p>
          </table:table-cell>
          <table:table-cell office:value-type="string" calcext:value-type="string">
            <text:p>C.NOVOS</text:p>
          </table:table-cell>
          <table:table-cell office:value-type="float" office:value="0.962872178212909" calcext:value-type="float">
            <text:p>0,962872</text:p>
          </table:table-cell>
        </table:table-row>
        <table:table-row table:style-name="ro1">
          <table:table-cell office:value-type="string" calcext:value-type="string">
            <text:p>BARRA PEIXE</text:p>
          </table:table-cell>
          <table:table-cell office:value-type="string" calcext:value-type="string">
            <text:p>RIBEIRAOZINHO</text:p>
          </table:table-cell>
          <table:table-cell office:value-type="float" office:value="0.49270619702508" calcext:value-type="float">
            <text:p>0,492706</text:p>
          </table:table-cell>
          <table:table-cell/>
          <table:table-cell office:value-type="string" calcext:value-type="string">
            <text:p>BARRA PEIXE</text:p>
          </table:table-cell>
          <table:table-cell office:value-type="string" calcext:value-type="string">
            <text:p>RONDONOPOLIS</text:p>
          </table:table-cell>
          <table:table-cell office:value-type="float" office:value="0.862289452305359" calcext:value-type="float">
            <text:p>0,862289</text:p>
          </table:table-cell>
        </table:table-row>
        <table:table-row table:style-name="ro1">
          <table:table-cell office:value-type="string" calcext:value-type="string">
            <text:p>BARREIRAS</text:p>
          </table:table-cell>
          <table:table-cell office:value-type="string" calcext:value-type="string">
            <text:p>BARREIRAS II</text:p>
          </table:table-cell>
          <table:table-cell office:value-type="float" office:value="0.578411515384327" calcext:value-type="float">
            <text:p>0,578412</text:p>
          </table:table-cell>
          <table:table-cell/>
          <table:table-cell office:value-type="string" calcext:value-type="string">
            <text:p>BARREIRAS</text:p>
          </table:table-cell>
          <table:table-cell office:value-type="string" calcext:value-type="string">
            <text:p>BARREIRAS II</text:p>
          </table:table-cell>
          <table:table-cell office:value-type="float" office:value="0.829126585003787" calcext:value-type="float">
            <text:p>0,829127</text:p>
          </table:table-cell>
        </table:table-row>
        <table:table-row table:style-name="ro1">
          <table:table-cell office:value-type="string" calcext:value-type="string">
            <text:p>BARREIRAS II</text:p>
          </table:table-cell>
          <table:table-cell office:value-type="string" calcext:value-type="string">
            <text:p>GILBUES II</text:p>
          </table:table-cell>
          <table:table-cell office:value-type="float" office:value="1.57872599436912" calcext:value-type="float">
            <text:p>1,578726</text:p>
          </table:table-cell>
          <table:table-cell/>
          <table:table-cell office:value-type="string" calcext:value-type="string">
            <text:p>BARREIRAS II</text:p>
          </table:table-cell>
          <table:table-cell office:value-type="string" calcext:value-type="string">
            <text:p>GILBUES II</text:p>
          </table:table-cell>
          <table:table-cell office:value-type="float" office:value="1.90643077384416" calcext:value-type="float">
            <text:p>1,906431</text:p>
          </table:table-cell>
        </table:table-row>
        <table:table-row table:style-name="ro1">
          <table:table-cell office:value-type="string" calcext:value-type="string">
            <text:p>BARREIRAS II</text:p>
          </table:table-cell>
          <table:table-cell office:value-type="string" calcext:value-type="string">
            <text:p>RIO DAS EGUAS</text:p>
          </table:table-cell>
          <table:table-cell office:value-type="float" office:value="2.02832875354292" calcext:value-type="float">
            <text:p>2,028329</text:p>
          </table:table-cell>
          <table:table-cell/>
          <table:table-cell office:value-type="string" calcext:value-type="string">
            <text:p>BARREIRAS II</text:p>
          </table:table-cell>
          <table:table-cell office:value-type="string" calcext:value-type="string">
            <text:p>RIO DAS EGUAS</text:p>
          </table:table-cell>
          <table:table-cell office:value-type="float" office:value="2.45054974275673" calcext:value-type="float">
            <text:p>2,450550</text:p>
          </table:table-cell>
        </table:table-row>
        <table:table-row table:style-name="ro1">
          <table:table-cell office:value-type="string" calcext:value-type="string">
            <text:p>BARREIRAS II</text:p>
          </table:table-cell>
          <table:table-cell office:value-type="string" calcext:value-type="string">
            <text:p>TABOCAS BRJ VLH</text:p>
          </table:table-cell>
          <table:table-cell office:value-type="float" office:value="0.381975560788437" calcext:value-type="float">
            <text:p>0,381976</text:p>
          </table:table-cell>
          <table:table-cell/>
          <table:table-cell office:value-type="string" calcext:value-type="string">
            <text:p>BARREIRO 1</text:p>
          </table:table-cell>
          <table:table-cell office:value-type="string" calcext:value-type="string">
            <text:p>SARZEDO</text:p>
          </table:table-cell>
          <table:table-cell office:value-type="float" office:value="0.906107998530694" calcext:value-type="float">
            <text:p>0,906108</text:p>
          </table:table-cell>
        </table:table-row>
        <table:table-row table:style-name="ro1">
          <table:table-cell office:value-type="string" calcext:value-type="string">
            <text:p>BARREIRO 1</text:p>
          </table:table-cell>
          <table:table-cell office:value-type="string" calcext:value-type="string">
            <text:p>SARZEDO</text:p>
          </table:table-cell>
          <table:table-cell office:value-type="float" office:value="0.575452133907693" calcext:value-type="float">
            <text:p>0,575452</text:p>
          </table:table-cell>
          <table:table-cell/>
          <table:table-cell office:value-type="string" calcext:value-type="string">
            <text:p>BARRO ALTO</text:p>
          </table:table-cell>
          <table:table-cell office:value-type="string" calcext:value-type="string">
            <text:p>AGUAS LINDAS</text:p>
          </table:table-cell>
          <table:table-cell office:value-type="float" office:value="0.590400678471503" calcext:value-type="float">
            <text:p>0,590401</text:p>
          </table:table-cell>
        </table:table-row>
        <table:table-row table:style-name="ro1">
          <table:table-cell office:value-type="string" calcext:value-type="string">
            <text:p>BARRO ALTO</text:p>
          </table:table-cell>
          <table:table-cell office:value-type="string" calcext:value-type="string">
            <text:p>AGUAS LINDAS</text:p>
          </table:table-cell>
          <table:table-cell office:value-type="float" office:value="0.332196199251584" calcext:value-type="float">
            <text:p>0,332196</text:p>
          </table:table-cell>
          <table:table-cell/>
          <table:table-cell office:value-type="string" calcext:value-type="string">
            <text:p>BARRO ALTO</text:p>
          </table:table-cell>
          <table:table-cell office:value-type="string" calcext:value-type="string">
            <text:p>ITAPACI</text:p>
          </table:table-cell>
          <table:table-cell office:value-type="float" office:value="0.524212375028808" calcext:value-type="float">
            <text:p>0,524212</text:p>
          </table:table-cell>
        </table:table-row>
        <table:table-row table:style-name="ro1">
          <table:table-cell office:value-type="string" calcext:value-type="string">
            <text:p>BARRO ALTO</text:p>
          </table:table-cell>
          <table:table-cell office:value-type="string" calcext:value-type="string">
            <text:p>ITAPACI</text:p>
          </table:table-cell>
          <table:table-cell office:value-type="float" office:value="0.294954536698794" calcext:value-type="float">
            <text:p>0,294955</text:p>
          </table:table-cell>
          <table:table-cell/>
          <table:table-cell office:value-type="string" calcext:value-type="string">
            <text:p>BARRO ALTO</text:p>
          </table:table-cell>
          <table:table-cell office:value-type="string" calcext:value-type="string">
            <text:p>NIQUELANDIA</text:p>
          </table:table-cell>
          <table:table-cell office:value-type="float" office:value="0.60516730077548" calcext:value-type="float">
            <text:p>0,605167</text:p>
          </table:table-cell>
        </table:table-row>
        <table:table-row table:style-name="ro1">
          <table:table-cell office:value-type="string" calcext:value-type="string">
            <text:p>BARRO ALTO</text:p>
          </table:table-cell>
          <table:table-cell office:value-type="string" calcext:value-type="string">
            <text:p>NIQUELANDIA</text:p>
          </table:table-cell>
          <table:table-cell office:value-type="float" office:value="0.340504820809852" calcext:value-type="float">
            <text:p>0,340505</text:p>
          </table:table-cell>
          <table:table-cell/>
          <table:table-cell office:value-type="string" calcext:value-type="string">
            <text:p>BARRO BRANCO</text:p>
          </table:table-cell>
          <table:table-cell office:value-type="string" calcext:value-type="string">
            <text:p>GERDAU O.BRANCO</text:p>
          </table:table-cell>
          <table:table-cell office:value-type="float" office:value="1.11461926425965" calcext:value-type="float">
            <text:p>1,114619</text:p>
          </table:table-cell>
        </table:table-row>
        <table:table-row table:style-name="ro1">
          <table:table-cell office:value-type="string" calcext:value-type="string">
            <text:p>BARRO BRANCO</text:p>
          </table:table-cell>
          <table:table-cell office:value-type="string" calcext:value-type="string">
            <text:p>GERDAU O.BRANCO</text:p>
          </table:table-cell>
          <table:table-cell office:value-type="float" office:value="0.70787371389826" calcext:value-type="float">
            <text:p>0,707874</text:p>
          </table:table-cell>
          <table:table-cell/>
          <table:table-cell office:value-type="string" calcext:value-type="string">
            <text:p>BARRO BRANCO</text:p>
          </table:table-cell>
          <table:table-cell office:value-type="string" calcext:value-type="string">
            <text:p>PADRE FIALHO</text:p>
          </table:table-cell>
          <table:table-cell office:value-type="float" office:value="1.00103532721733" calcext:value-type="float">
            <text:p>1,001035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string" calcext:value-type="string">
            <text:p>C.COMPRIDO</text:p>
          </table:table-cell>
          <table:table-cell office:value-type="float" office:value="0.376681892262239" calcext:value-type="float">
            <text:p>0,376682</text:p>
          </table:table-cell>
          <table:table-cell/>
          <table:table-cell office:value-type="string" calcext:value-type="string">
            <text:p>BATEIAS</text:p>
          </table:table-cell>
          <table:table-cell office:value-type="string" calcext:value-type="string">
            <text:p>CURIT.LESTE</text:p>
          </table:table-cell>
          <table:table-cell office:value-type="float" office:value="2.1420119227537" calcext:value-type="float">
            <text:p>2,142012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string" calcext:value-type="string">
            <text:p>CURIT.LESTE</text:p>
          </table:table-cell>
          <table:table-cell office:value-type="float" office:value="1.64693488564932" calcext:value-type="float">
            <text:p>1,646935</text:p>
          </table:table-cell>
          <table:table-cell/>
          <table:table-cell office:value-type="string" calcext:value-type="string">
            <text:p>BATEIAS</text:p>
          </table:table-cell>
          <table:table-cell office:value-type="string" calcext:value-type="string">
            <text:p>CURITIBA NORT</text:p>
          </table:table-cell>
          <table:table-cell office:value-type="float" office:value="0.589026416981985" calcext:value-type="float">
            <text:p>0,589026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string" calcext:value-type="string">
            <text:p>CURITIBA NORT</text:p>
          </table:table-cell>
          <table:table-cell office:value-type="float" office:value="0.381692363501561" calcext:value-type="float">
            <text:p>0,381692</text:p>
          </table:table-cell>
          <table:table-cell/>
          <table:table-cell office:value-type="string" calcext:value-type="string">
            <text:p>BATEIAS</text:p>
          </table:table-cell>
          <table:table-cell office:value-type="string" calcext:value-type="string">
            <text:p>ITATIBA</text:p>
          </table:table-cell>
          <table:table-cell office:value-type="float" office:value="2.19750238390479" calcext:value-type="float">
            <text:p>2,197502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string" calcext:value-type="string">
            <text:p>ITATIBA</text:p>
          </table:table-cell>
          <table:table-cell office:value-type="float" office:value="1.66141996763698" calcext:value-type="float">
            <text:p>1,661420</text:p>
          </table:table-cell>
          <table:table-cell/>
          <table:table-cell office:value-type="string" calcext:value-type="string">
            <text:p>BATEIAS</text:p>
          </table:table-cell>
          <table:table-cell office:value-type="string" calcext:value-type="string">
            <text:p>JAGUARIAIVA</text:p>
          </table:table-cell>
          <table:table-cell office:value-type="float" office:value="0.716103355566249" calcext:value-type="float">
            <text:p>0,716103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string" calcext:value-type="string">
            <text:p>JAGUARIAIVA</text:p>
          </table:table-cell>
          <table:table-cell office:value-type="float" office:value="0.464038919846681" calcext:value-type="float">
            <text:p>0,464039</text:p>
          </table:table-cell>
          <table:table-cell/>
          <table:table-cell office:value-type="string" calcext:value-type="string">
            <text:p>BATEIAS</text:p>
          </table:table-cell>
          <table:table-cell office:value-type="string" calcext:value-type="string">
            <text:p>PONTA GROSSA</text:p>
          </table:table-cell>
          <table:table-cell office:value-type="float" office:value="2.04353265641709" calcext:value-type="float">
            <text:p>2,043533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string" calcext:value-type="string">
            <text:p>PILARZINHO</text:p>
          </table:table-cell>
          <table:table-cell office:value-type="float" office:value="0.397269325610948" calcext:value-type="float">
            <text:p>0,397269</text:p>
          </table:table-cell>
          <table:table-cell/>
          <table:table-cell office:value-type="string" calcext:value-type="string">
            <text:p>BAURU</text:p>
          </table:table-cell>
          <table:table-cell office:value-type="string" calcext:value-type="string">
            <text:p>GETULINA</text:p>
          </table:table-cell>
          <table:table-cell office:value-type="float" office:value="1.65161632779429" calcext:value-type="float">
            <text:p>1,651616</text:p>
          </table:table-cell>
        </table:table-row>
        <table:table-row table:style-name="ro1">
          <table:table-cell office:value-type="string" calcext:value-type="string">
            <text:p>BATEIAS</text:p>
          </table:table-cell>
          <table:table-cell office:value-type="string" calcext:value-type="string">
            <text:p>PONTA GROSSA</text:p>
          </table:table-cell>
          <table:table-cell office:value-type="float" office:value="1.5712168480791" calcext:value-type="float">
            <text:p>1,571217</text:p>
          </table:table-cell>
          <table:table-cell/>
          <table:table-cell office:value-type="string" calcext:value-type="string">
            <text:p>BAURU</text:p>
          </table:table-cell>
          <table:table-cell office:value-type="string" calcext:value-type="string">
            <text:p>OESTE</text:p>
          </table:table-cell>
          <table:table-cell office:value-type="float" office:value="1.55401852918584" calcext:value-type="float">
            <text:p>1,554019</text:p>
          </table:table-cell>
        </table:table-row>
        <table:table-row table:style-name="ro1">
          <table:table-cell office:value-type="string" calcext:value-type="string">
            <text:p>BAURU</text:p>
          </table:table-cell>
          <table:table-cell office:value-type="string" calcext:value-type="string">
            <text:p>GETULINA</text:p>
          </table:table-cell>
          <table:table-cell office:value-type="float" office:value="1.14553036997634" calcext:value-type="float">
            <text:p>1,145530</text:p>
          </table:table-cell>
          <table:table-cell/>
          <table:table-cell office:value-type="string" calcext:value-type="string">
            <text:p>BAURU</text:p>
          </table:table-cell>
          <table:table-cell office:value-type="string" calcext:value-type="string">
            <text:p>SALTO</text:p>
          </table:table-cell>
          <table:table-cell office:value-type="float" office:value="1.55040045657021" calcext:value-type="float">
            <text:p>1,550400</text:p>
          </table:table-cell>
        </table:table-row>
        <table:table-row table:style-name="ro1">
          <table:table-cell office:value-type="string" calcext:value-type="string">
            <text:p>BAURU</text:p>
          </table:table-cell>
          <table:table-cell office:value-type="string" calcext:value-type="string">
            <text:p>OESTE</text:p>
          </table:table-cell>
          <table:table-cell office:value-type="float" office:value="1.07783835188027" calcext:value-type="float">
            <text:p>1,077838</text:p>
          </table:table-cell>
          <table:table-cell/>
          <table:table-cell office:value-type="string" calcext:value-type="string">
            <text:p>BETIM 6</text:p>
          </table:table-cell>
          <table:table-cell office:value-type="string" calcext:value-type="string">
            <text:p>SARZEDO</text:p>
          </table:table-cell>
          <table:table-cell office:value-type="float" office:value="1.43629123197825" calcext:value-type="float">
            <text:p>1,436291</text:p>
          </table:table-cell>
        </table:table-row>
        <table:table-row table:style-name="ro1">
          <table:table-cell office:value-type="string" calcext:value-type="string">
            <text:p>BAURU</text:p>
          </table:table-cell>
          <table:table-cell office:value-type="string" calcext:value-type="string">
            <text:p>SALTO</text:p>
          </table:table-cell>
          <table:table-cell office:value-type="float" office:value="1.07532892399908" calcext:value-type="float">
            <text:p>1,075329</text:p>
          </table:table-cell>
          <table:table-cell/>
          <table:table-cell office:value-type="string" calcext:value-type="string">
            <text:p>BETIM 6</text:p>
          </table:table-cell>
          <table:table-cell office:value-type="string" calcext:value-type="string">
            <text:p>SETE LAGOAS 4</text:p>
          </table:table-cell>
          <table:table-cell office:value-type="float" office:value="1.11140774555211" calcext:value-type="float">
            <text:p>1,111408</text:p>
          </table:table-cell>
        </table:table-row>
        <table:table-row table:style-name="ro1">
          <table:table-cell office:value-type="string" calcext:value-type="string">
            <text:p>BETIM 6</text:p>
          </table:table-cell>
          <table:table-cell office:value-type="string" calcext:value-type="string">
            <text:p>SARZEDO</text:p>
          </table:table-cell>
          <table:table-cell office:value-type="float" office:value="0.912161525662546" calcext:value-type="float">
            <text:p>0,912162</text:p>
          </table:table-cell>
          <table:table-cell/>
          <table:table-cell office:value-type="string" calcext:value-type="string">
            <text:p>BIGUACU</text:p>
          </table:table-cell>
          <table:table-cell office:value-type="string" calcext:value-type="string">
            <text:p>DESTERRO</text:p>
          </table:table-cell>
          <table:table-cell office:value-type="float" office:value="0.605768437938967" calcext:value-type="float">
            <text:p>0,605768</text:p>
          </table:table-cell>
        </table:table-row>
        <table:table-row table:style-name="ro1">
          <table:table-cell office:value-type="string" calcext:value-type="string">
            <text:p>BETIM 6</text:p>
          </table:table-cell>
          <table:table-cell office:value-type="string" calcext:value-type="string">
            <text:p>SETE LAGOAS 4</text:p>
          </table:table-cell>
          <table:table-cell office:value-type="float" office:value="0.705834138818534" calcext:value-type="float">
            <text:p>0,705834</text:p>
          </table:table-cell>
          <table:table-cell/>
          <table:table-cell office:value-type="string" calcext:value-type="string">
            <text:p>BIGUACU</text:p>
          </table:table-cell>
          <table:table-cell office:value-type="string" calcext:value-type="string">
            <text:p>GASPAR 2</text:p>
          </table:table-cell>
          <table:table-cell office:value-type="float" office:value="1.92355366450764" calcext:value-type="float">
            <text:p>1,923554</text:p>
          </table:table-cell>
        </table:table-row>
        <table:table-row table:style-name="ro1">
          <table:table-cell office:value-type="string" calcext:value-type="string">
            <text:p>BIGUACU</text:p>
          </table:table-cell>
          <table:table-cell office:value-type="string" calcext:value-type="string">
            <text:p>DESTERRO</text:p>
          </table:table-cell>
          <table:table-cell office:value-type="float" office:value="0.384376155084768" calcext:value-type="float">
            <text:p>0,384376</text:p>
          </table:table-cell>
          <table:table-cell/>
          <table:table-cell office:value-type="string" calcext:value-type="string">
            <text:p>BIGUACU</text:p>
          </table:table-cell>
          <table:table-cell office:value-type="string" calcext:value-type="string">
            <text:p>ITAJAI 2</text:p>
          </table:table-cell>
          <table:table-cell office:value-type="float" office:value="1.98875736163" calcext:value-type="float">
            <text:p>1,988757</text:p>
          </table:table-cell>
        </table:table-row>
        <table:table-row table:style-name="ro1">
          <table:table-cell office:value-type="string" calcext:value-type="string">
            <text:p>BIGUACU</text:p>
          </table:table-cell>
          <table:table-cell office:value-type="string" calcext:value-type="string">
            <text:p>GASPAR 2</text:p>
          </table:table-cell>
          <table:table-cell office:value-type="float" office:value="1.44822292193319" calcext:value-type="float">
            <text:p>1,448223</text:p>
          </table:table-cell>
          <table:table-cell/>
          <table:table-cell office:value-type="string" calcext:value-type="string">
            <text:p>BIGUACU</text:p>
          </table:table-cell>
          <table:table-cell office:value-type="string" calcext:value-type="string">
            <text:p>J.LACERDA-B</text:p>
          </table:table-cell>
          <table:table-cell office:value-type="float" office:value="0.645184449204055" calcext:value-type="float">
            <text:p>0,645184</text:p>
          </table:table-cell>
        </table:table-row>
        <table:table-row table:style-name="ro1">
          <table:table-cell office:value-type="string" calcext:value-type="string">
            <text:p>BIGUACU</text:p>
          </table:table-cell>
          <table:table-cell office:value-type="string" calcext:value-type="string">
            <text:p>ITAJAI 2</text:p>
          </table:table-cell>
          <table:table-cell office:value-type="float" office:value="1.49731408612046" calcext:value-type="float">
            <text:p>1,497314</text:p>
          </table:table-cell>
          <table:table-cell/>
          <table:table-cell office:value-type="string" calcext:value-type="string">
            <text:p>BIGUACU</text:p>
          </table:table-cell>
          <table:table-cell office:value-type="string" calcext:value-type="string">
            <text:p>RATONES</text:p>
          </table:table-cell>
          <table:table-cell office:value-type="float" office:value="0.671551293591181" calcext:value-type="float">
            <text:p>0,671551</text:p>
          </table:table-cell>
        </table:table-row>
        <table:table-row table:style-name="ro1">
          <table:table-cell office:value-type="string" calcext:value-type="string">
            <text:p>BIGUACU</text:p>
          </table:table-cell>
          <table:table-cell office:value-type="string" calcext:value-type="string">
            <text:p>J.LACERDA-B</text:p>
          </table:table-cell>
          <table:table-cell office:value-type="float" office:value="0.409386660601364" calcext:value-type="float">
            <text:p>0,409387</text:p>
          </table:table-cell>
          <table:table-cell/>
          <table:table-cell office:value-type="string" calcext:value-type="string">
            <text:p>BIGUACU</text:p>
          </table:table-cell>
          <table:table-cell office:value-type="string" calcext:value-type="string">
            <text:p>SIDEROPOLIS 2</text:p>
          </table:table-cell>
          <table:table-cell office:value-type="float" office:value="2.08568275958098" calcext:value-type="float">
            <text:p>2,085683</text:p>
          </table:table-cell>
        </table:table-row>
        <table:table-row table:style-name="ro1">
          <table:table-cell office:value-type="string" calcext:value-type="string">
            <text:p>BIGUACU</text:p>
          </table:table-cell>
          <table:table-cell office:value-type="string" calcext:value-type="string">
            <text:p>RATONES</text:p>
          </table:table-cell>
          <table:table-cell office:value-type="float" office:value="0.426117123320293" calcext:value-type="float">
            <text:p>0,426117</text:p>
          </table:table-cell>
          <table:table-cell/>
          <table:table-cell office:value-type="string" calcext:value-type="string">
            <text:p>BLUMENAU</text:p>
          </table:table-cell>
          <table:table-cell office:value-type="string" calcext:value-type="string">
            <text:p>GASPAR 2</text:p>
          </table:table-cell>
          <table:table-cell office:value-type="float" office:value="1.89630984684789" calcext:value-type="float">
            <text:p>1,896310</text:p>
          </table:table-cell>
        </table:table-row>
        <table:table-row table:style-name="ro1">
          <table:table-cell office:value-type="string" calcext:value-type="string">
            <text:p>BIGUACU</text:p>
          </table:table-cell>
          <table:table-cell office:value-type="string" calcext:value-type="string">
            <text:p>SIDEROPOLIS 2</text:p>
          </table:table-cell>
          <table:table-cell office:value-type="float" office:value="1.57028817861402" calcext:value-type="float">
            <text:p>1,570288</text:p>
          </table:table-cell>
          <table:table-cell/>
          <table:table-cell office:value-type="string" calcext:value-type="string">
            <text:p>BLUMENAU</text:p>
          </table:table-cell>
          <table:table-cell office:value-type="string" calcext:value-type="string">
            <text:p>JARAGUA DO SUL</text:p>
          </table:table-cell>
          <table:table-cell office:value-type="float" office:value="1.01693983356055" calcext:value-type="float">
            <text:p>1,016940</text:p>
          </table:table-cell>
        </table:table-row>
        <table:table-row table:style-name="ro1">
          <table:table-cell office:value-type="string" calcext:value-type="string">
            <text:p>BLUMENAU</text:p>
          </table:table-cell>
          <table:table-cell office:value-type="string" calcext:value-type="string">
            <text:p>GASPAR 2</text:p>
          </table:table-cell>
          <table:table-cell office:value-type="float" office:value="1.42771134383488" calcext:value-type="float">
            <text:p>1,427711</text:p>
          </table:table-cell>
          <table:table-cell/>
          <table:table-cell office:value-type="string" calcext:value-type="string">
            <text:p>BOA VISTA</text:p>
          </table:table-cell>
          <table:table-cell office:value-type="string" calcext:value-type="string">
            <text:p>EQUADOR</text:p>
          </table:table-cell>
          <table:table-cell office:value-type="float" office:value="1.58340246733817" calcext:value-type="float">
            <text:p>1,583402</text:p>
          </table:table-cell>
        </table:table-row>
        <table:table-row table:style-name="ro1">
          <table:table-cell office:value-type="string" calcext:value-type="string">
            <text:p>BLUMENAU</text:p>
          </table:table-cell>
          <table:table-cell office:value-type="string" calcext:value-type="string">
            <text:p>JARAGUA DO SUL</text:p>
          </table:table-cell>
          <table:table-cell office:value-type="float" office:value="0.64527532089074" calcext:value-type="float">
            <text:p>0,645275</text:p>
          </table:table-cell>
          <table:table-cell/>
          <table:table-cell office:value-type="string" calcext:value-type="string">
            <text:p>BOM JARDIM</text:p>
          </table:table-cell>
          <table:table-cell office:value-type="string" calcext:value-type="string">
            <text:p>FERNAO DIAS</text:p>
          </table:table-cell>
          <table:table-cell office:value-type="float" office:value="1.48139580627292" calcext:value-type="float">
            <text:p>1,481396</text:p>
          </table:table-cell>
        </table:table-row>
        <table:table-row table:style-name="ro1">
          <table:table-cell office:value-type="string" calcext:value-type="string">
            <text:p>BOA VISTA</text:p>
          </table:table-cell>
          <table:table-cell office:value-type="string" calcext:value-type="string">
            <text:p>EQUADOR</text:p>
          </table:table-cell>
          <table:table-cell office:value-type="float" office:value="1.30047612071923" calcext:value-type="float">
            <text:p>1,300476</text:p>
          </table:table-cell>
          <table:table-cell/>
          <table:table-cell office:value-type="string" calcext:value-type="string">
            <text:p>BOM JESUS II</text:p>
          </table:table-cell>
          <table:table-cell office:value-type="string" calcext:value-type="string">
            <text:p>ELISEU MARTINS</text:p>
          </table:table-cell>
          <table:table-cell office:value-type="float" office:value="0.617638344665204" calcext:value-type="float">
            <text:p>0,617638</text:p>
          </table:table-cell>
        </table:table-row>
        <table:table-row table:style-name="ro1">
          <table:table-cell office:value-type="string" calcext:value-type="string">
            <text:p>BOM JARDIM</text:p>
          </table:table-cell>
          <table:table-cell office:value-type="string" calcext:value-type="string">
            <text:p>FERNAO DIAS</text:p>
          </table:table-cell>
          <table:table-cell office:value-type="float" office:value="1.06375748531667" calcext:value-type="float">
            <text:p>1,063757</text:p>
          </table:table-cell>
          <table:table-cell/>
          <table:table-cell office:value-type="string" calcext:value-type="string">
            <text:p>BOM JESUS II</text:p>
          </table:table-cell>
          <table:table-cell office:value-type="string" calcext:value-type="string">
            <text:p>GILBUES II</text:p>
          </table:table-cell>
          <table:table-cell office:value-type="float" office:value="0.641084115931224" calcext:value-type="float">
            <text:p>0,641084</text:p>
          </table:table-cell>
        </table:table-row>
        <table:table-row table:style-name="ro1">
          <table:table-cell office:value-type="string" calcext:value-type="string">
            <text:p>BOM JESUS II</text:p>
          </table:table-cell>
          <table:table-cell office:value-type="string" calcext:value-type="string">
            <text:p>GILBUES II</text:p>
          </table:table-cell>
          <table:table-cell office:value-type="float" office:value="0.447664958834458" calcext:value-type="float">
            <text:p>0,447665</text:p>
          </table:table-cell>
          <table:table-cell/>
          <table:table-cell office:value-type="string" calcext:value-type="string">
            <text:p>BOM NOME</text:p>
          </table:table-cell>
          <table:table-cell office:value-type="string" calcext:value-type="string">
            <text:p>FLORESTA II</text:p>
          </table:table-cell>
          <table:table-cell office:value-type="float" office:value="0.627249695763156" calcext:value-type="float">
            <text:p>0,627250</text:p>
          </table:table-cell>
        </table:table-row>
        <table:table-row table:style-name="ro1">
          <table:table-cell office:value-type="string" calcext:value-type="string">
            <text:p>BOM NOME</text:p>
          </table:table-cell>
          <table:table-cell office:value-type="string" calcext:value-type="string">
            <text:p>FLORESTA II</text:p>
          </table:table-cell>
          <table:table-cell office:value-type="float" office:value="0.358999730126712" calcext:value-type="float">
            <text:p>0,359000</text:p>
          </table:table-cell>
          <table:table-cell/>
          <table:table-cell office:value-type="string" calcext:value-type="string">
            <text:p>BOM NOME</text:p>
          </table:table-cell>
          <table:table-cell office:value-type="string" calcext:value-type="string">
            <text:p>TACARATU</text:p>
          </table:table-cell>
          <table:table-cell office:value-type="float" office:value="0.576836590785957" calcext:value-type="float">
            <text:p>0,576837</text:p>
          </table:table-cell>
        </table:table-row>
        <table:table-row table:style-name="ro1">
          <table:table-cell office:value-type="string" calcext:value-type="string">
            <text:p>BOM NOME</text:p>
          </table:table-cell>
          <table:table-cell office:value-type="string" calcext:value-type="string">
            <text:p>TACARATU</text:p>
          </table:table-cell>
          <table:table-cell office:value-type="float" office:value="0.33014632261785" calcext:value-type="float">
            <text:p>0,330146</text:p>
          </table:table-cell>
          <table:table-cell/>
          <table:table-cell office:value-type="string" calcext:value-type="string">
            <text:p>BOM.JES.LAPA II</text:p>
          </table:table-cell>
          <table:table-cell office:value-type="string" calcext:value-type="string">
            <text:p>GENTIO OURO II</text:p>
          </table:table-cell>
          <table:table-cell office:value-type="float" office:value="2.02451493792193" calcext:value-type="float">
            <text:p>2,024515</text:p>
          </table:table-cell>
        </table:table-row>
        <table:table-row table:style-name="ro1">
          <table:table-cell office:value-type="string" calcext:value-type="string">
            <text:p>BOM.JES.LAPA II</text:p>
          </table:table-cell>
          <table:table-cell office:value-type="string" calcext:value-type="string">
            <text:p>GENTIO OURO II</text:p>
          </table:table-cell>
          <table:table-cell office:value-type="float" office:value="1.6756982275923" calcext:value-type="float">
            <text:p>1,675698</text:p>
          </table:table-cell>
          <table:table-cell/>
          <table:table-cell office:value-type="string" calcext:value-type="string">
            <text:p>BOM.JES.LAPA II</text:p>
          </table:table-cell>
          <table:table-cell office:value-type="string" calcext:value-type="string">
            <text:p>IGAPORA II</text:p>
          </table:table-cell>
          <table:table-cell office:value-type="float" office:value="0.886753377487974" calcext:value-type="float">
            <text:p>0,886753</text:p>
          </table:table-cell>
        </table:table-row>
        <table:table-row table:style-name="ro1">
          <table:table-cell office:value-type="string" calcext:value-type="string">
            <text:p>BOM.JES.LAPA II</text:p>
          </table:table-cell>
          <table:table-cell office:value-type="string" calcext:value-type="string">
            <text:p>IGAPORA II</text:p>
          </table:table-cell>
          <table:table-cell office:value-type="float" office:value="0.618612856132995" calcext:value-type="float">
            <text:p>0,618613</text:p>
          </table:table-cell>
          <table:table-cell/>
          <table:table-cell office:value-type="string" calcext:value-type="string">
            <text:p>BOM.JES.LAPA II</text:p>
          </table:table-cell>
          <table:table-cell office:value-type="string" calcext:value-type="string">
            <text:p>JANAUBA 3</text:p>
          </table:table-cell>
          <table:table-cell office:value-type="float" office:value="1.90117210078596" calcext:value-type="float">
            <text:p>1,901172</text:p>
          </table:table-cell>
        </table:table-row>
        <table:table-row table:style-name="ro1">
          <table:table-cell office:value-type="string" calcext:value-type="string">
            <text:p>BOM.JES.LAPA II</text:p>
          </table:table-cell>
          <table:table-cell office:value-type="string" calcext:value-type="string">
            <text:p>SOL DO SERTAO</text:p>
          </table:table-cell>
          <table:table-cell office:value-type="float" office:value="1.42465502646666" calcext:value-type="float">
            <text:p>1,424655</text:p>
          </table:table-cell>
          <table:table-cell/>
          <table:table-cell office:value-type="string" calcext:value-type="string">
            <text:p>BOM.JES.LAPA II</text:p>
          </table:table-cell>
          <table:table-cell office:value-type="string" calcext:value-type="string">
            <text:p>SOL DO SERTAO</text:p>
          </table:table-cell>
          <table:table-cell office:value-type="float" office:value="1.72121407958489" calcext:value-type="float">
            <text:p>1,721214</text:p>
          </table:table-cell>
        </table:table-row>
        <table:table-row table:style-name="ro1">
          <table:table-cell office:value-type="string" calcext:value-type="string">
            <text:p>BONGI</text:p>
          </table:table-cell>
          <table:table-cell office:value-type="string" calcext:value-type="string">
            <text:p>JOAIRAM</text:p>
          </table:table-cell>
          <table:table-cell office:value-type="float" office:value="0.258734871723851" calcext:value-type="float">
            <text:p>0,258735</text:p>
          </table:table-cell>
          <table:table-cell/>
          <table:table-cell office:value-type="string" calcext:value-type="string">
            <text:p>BONGI</text:p>
          </table:table-cell>
          <table:table-cell office:value-type="string" calcext:value-type="string">
            <text:p>JOAIRAM</text:p>
          </table:table-cell>
          <table:table-cell office:value-type="float" office:value="0.45206543613507" calcext:value-type="float">
            <text:p>0,452065</text:p>
          </table:table-cell>
        </table:table-row>
        <table:table-row table:style-name="ro1">
          <table:table-cell office:value-type="string" calcext:value-type="string">
            <text:p>BOTUCATU</text:p>
          </table:table-cell>
          <table:table-cell office:value-type="string" calcext:value-type="string">
            <text:p>CAPAO BONITO</text:p>
          </table:table-cell>
          <table:table-cell office:value-type="float" office:value="0.307146603943288" calcext:value-type="float">
            <text:p>0,307147</text:p>
          </table:table-cell>
          <table:table-cell/>
          <table:table-cell office:value-type="string" calcext:value-type="string">
            <text:p>BOTUCATU</text:p>
          </table:table-cell>
          <table:table-cell office:value-type="string" calcext:value-type="string">
            <text:p>CAPAO BONITO</text:p>
          </table:table-cell>
          <table:table-cell office:value-type="float" office:value="0.581660504673998" calcext:value-type="float">
            <text:p>0,581661</text:p>
          </table:table-cell>
        </table:table-row>
        <table:table-row table:style-name="ro1">
          <table:table-cell office:value-type="string" calcext:value-type="string">
            <text:p>BOTUCATU</text:p>
          </table:table-cell>
          <table:table-cell office:value-type="string" calcext:value-type="string">
            <text:p>CERQUILHO III</text:p>
          </table:table-cell>
          <table:table-cell office:value-type="float" office:value="0.332538512518987" calcext:value-type="float">
            <text:p>0,332539</text:p>
          </table:table-cell>
          <table:table-cell/>
          <table:table-cell office:value-type="string" calcext:value-type="string">
            <text:p>BOTUCATU</text:p>
          </table:table-cell>
          <table:table-cell office:value-type="string" calcext:value-type="string">
            <text:p>CERQUILHO III</text:p>
          </table:table-cell>
          <table:table-cell office:value-type="float" office:value="0.629746565750889" calcext:value-type="float">
            <text:p>0,629747</text:p>
          </table:table-cell>
        </table:table-row>
        <table:table-row table:style-name="ro1">
          <table:table-cell office:value-type="string" calcext:value-type="string">
            <text:p>BOTUCATU</text:p>
          </table:table-cell>
          <table:table-cell office:value-type="string" calcext:value-type="string">
            <text:p>CHAVANTES</text:p>
          </table:table-cell>
          <table:table-cell office:value-type="float" office:value="0.495533539316684" calcext:value-type="float">
            <text:p>0,495534</text:p>
          </table:table-cell>
          <table:table-cell/>
          <table:table-cell office:value-type="string" calcext:value-type="string">
            <text:p>BOTUCATU</text:p>
          </table:table-cell>
          <table:table-cell office:value-type="string" calcext:value-type="string">
            <text:p>CHAVANTES</text:p>
          </table:table-cell>
          <table:table-cell office:value-type="float" office:value="0.938419259276766" calcext:value-type="float">
            <text:p>0,938419</text:p>
          </table:table-cell>
        </table:table-row>
        <table:table-row table:style-name="ro1">
          <table:table-cell office:value-type="string" calcext:value-type="string">
            <text:p>BRACELL</text:p>
          </table:table-cell>
          <table:table-cell office:value-type="string" calcext:value-type="string">
            <text:p>OESTE</text:p>
          </table:table-cell>
          <table:table-cell office:value-type="float" office:value="1.09784061520332" calcext:value-type="float">
            <text:p>1,097841</text:p>
          </table:table-cell>
          <table:table-cell/>
          <table:table-cell office:value-type="string" calcext:value-type="string">
            <text:p>BRACELL</text:p>
          </table:table-cell>
          <table:table-cell office:value-type="string" calcext:value-type="string">
            <text:p>OESTE</text:p>
          </table:table-cell>
          <table:table-cell office:value-type="float" office:value="1.5828576290151" calcext:value-type="float">
            <text:p>1,582858</text:p>
          </table:table-cell>
        </table:table-row>
        <table:table-row table:style-name="ro1">
          <table:table-cell office:value-type="string" calcext:value-type="string">
            <text:p>BRAS. GERAL</text:p>
          </table:table-cell>
          <table:table-cell office:value-type="string" calcext:value-type="string">
            <text:p>BRAS. SUL</text:p>
          </table:table-cell>
          <table:table-cell office:value-type="float" office:value="0.315979213968718" calcext:value-type="float">
            <text:p>0,315979</text:p>
          </table:table-cell>
          <table:table-cell/>
          <table:table-cell office:value-type="string" calcext:value-type="string">
            <text:p>BRAS. GERAL</text:p>
          </table:table-cell>
          <table:table-cell office:value-type="string" calcext:value-type="string">
            <text:p>BRAS. SUL</text:p>
          </table:table-cell>
          <table:table-cell office:value-type="float" office:value="0.557610452612286" calcext:value-type="float">
            <text:p>0,557610</text:p>
          </table:table-cell>
        </table:table-row>
        <table:table-row table:style-name="ro1">
          <table:table-cell office:value-type="string" calcext:value-type="string">
            <text:p>BRAS. SUL</text:p>
          </table:table-cell>
          <table:table-cell office:value-type="string" calcext:value-type="string">
            <text:p>SAMAMBAIA</text:p>
          </table:table-cell>
          <table:table-cell office:value-type="float" office:value="0.684554840478123" calcext:value-type="float">
            <text:p>0,684555</text:p>
          </table:table-cell>
          <table:table-cell/>
          <table:table-cell office:value-type="string" calcext:value-type="string">
            <text:p>BRAS. SUL</text:p>
          </table:table-cell>
          <table:table-cell office:value-type="string" calcext:value-type="string">
            <text:p>CORUMBA</text:p>
          </table:table-cell>
          <table:table-cell office:value-type="float" office:value="1.07774363872572" calcext:value-type="float">
            <text:p>1,077744</text:p>
          </table:table-cell>
        </table:table-row>
        <table:table-row table:style-name="ro1">
          <table:table-cell office:value-type="string" calcext:value-type="string">
            <text:p>BRAS.LESTE</text:p>
          </table:table-cell>
          <table:table-cell office:value-type="string" calcext:value-type="string">
            <text:p>LUZIANIA</text:p>
          </table:table-cell>
          <table:table-cell office:value-type="float" office:value="1.29981039441048" calcext:value-type="float">
            <text:p>1,299810</text:p>
          </table:table-cell>
          <table:table-cell/>
          <table:table-cell office:value-type="string" calcext:value-type="string">
            <text:p>BRAS. SUL</text:p>
          </table:table-cell>
          <table:table-cell office:value-type="string" calcext:value-type="string">
            <text:p>SAMAMBAIA</text:p>
          </table:table-cell>
          <table:table-cell office:value-type="float" office:value="1.01810819041772" calcext:value-type="float">
            <text:p>1,018108</text:p>
          </table:table-cell>
        </table:table-row>
        <table:table-row table:style-name="ro1">
          <table:table-cell office:value-type="string" calcext:value-type="string">
            <text:p>BRASNORTE</text:p>
          </table:table-cell>
          <table:table-cell office:value-type="string" calcext:value-type="string">
            <text:p>JUBA</text:p>
          </table:table-cell>
          <table:table-cell office:value-type="float" office:value="0.516855970303427" calcext:value-type="float">
            <text:p>0,516856</text:p>
          </table:table-cell>
          <table:table-cell/>
          <table:table-cell office:value-type="string" calcext:value-type="string">
            <text:p>BRAS.LESTE</text:p>
          </table:table-cell>
          <table:table-cell office:value-type="string" calcext:value-type="string">
            <text:p>LUZIANIA</text:p>
          </table:table-cell>
          <table:table-cell office:value-type="float" office:value="1.69988956503026" calcext:value-type="float">
            <text:p>1,699890</text:p>
          </table:table-cell>
        </table:table-row>
        <table:table-row table:style-name="ro1">
          <table:table-cell office:value-type="string" calcext:value-type="string">
            <text:p>BRASNORTE</text:p>
          </table:table-cell>
          <table:table-cell office:value-type="string" calcext:value-type="string">
            <text:p>JUINA</text:p>
          </table:table-cell>
          <table:table-cell office:value-type="float" office:value="0.506490520463987" calcext:value-type="float">
            <text:p>0,506491</text:p>
          </table:table-cell>
          <table:table-cell/>
          <table:table-cell office:value-type="string" calcext:value-type="string">
            <text:p>BRASNORTE</text:p>
          </table:table-cell>
          <table:table-cell office:value-type="string" calcext:value-type="string">
            <text:p>JUBA</text:p>
          </table:table-cell>
          <table:table-cell office:value-type="float" office:value="0.91772522343576" calcext:value-type="float">
            <text:p>0,917725</text:p>
          </table:table-cell>
        </table:table-row>
        <table:table-row table:style-name="ro1">
          <table:table-cell office:value-type="string" calcext:value-type="string">
            <text:p>BRASNORTE</text:p>
          </table:table-cell>
          <table:table-cell office:value-type="string" calcext:value-type="string">
            <text:p>NOVA MUTUM</text:p>
          </table:table-cell>
          <table:table-cell office:value-type="float" office:value="0.499622372172536" calcext:value-type="float">
            <text:p>0,499622</text:p>
          </table:table-cell>
          <table:table-cell/>
          <table:table-cell office:value-type="string" calcext:value-type="string">
            <text:p>BRASNORTE</text:p>
          </table:table-cell>
          <table:table-cell office:value-type="string" calcext:value-type="string">
            <text:p>JUINA</text:p>
          </table:table-cell>
          <table:table-cell office:value-type="float" office:value="0.899320415681817" calcext:value-type="float">
            <text:p>0,899320</text:p>
          </table:table-cell>
        </table:table-row>
        <table:table-row table:style-name="ro1">
          <table:table-cell office:value-type="string" calcext:value-type="string">
            <text:p>BRASNORTE</text:p>
          </table:table-cell>
          <table:table-cell office:value-type="string" calcext:value-type="string">
            <text:p>PARECIS</text:p>
          </table:table-cell>
          <table:table-cell office:value-type="float" office:value="0.333710977400355" calcext:value-type="float">
            <text:p>0,333711</text:p>
          </table:table-cell>
          <table:table-cell/>
          <table:table-cell office:value-type="string" calcext:value-type="string">
            <text:p>BRASNORTE</text:p>
          </table:table-cell>
          <table:table-cell office:value-type="string" calcext:value-type="string">
            <text:p>NOVA MUTUM</text:p>
          </table:table-cell>
          <table:table-cell office:value-type="float" office:value="0.887125387883916" calcext:value-type="float">
            <text:p>0,887125</text:p>
          </table:table-cell>
        </table:table-row>
        <table:table-row table:style-name="ro1">
          <table:table-cell office:value-type="string" calcext:value-type="string">
            <text:p>BRAUNAS</text:p>
          </table:table-cell>
          <table:table-cell office:value-type="string" calcext:value-type="string">
            <text:p>ITABIRA 2</text:p>
          </table:table-cell>
          <table:table-cell office:value-type="float" office:value="0.328807665118531" calcext:value-type="float">
            <text:p>0,328808</text:p>
          </table:table-cell>
          <table:table-cell/>
          <table:table-cell office:value-type="string" calcext:value-type="string">
            <text:p>BRASNORTE</text:p>
          </table:table-cell>
          <table:table-cell office:value-type="string" calcext:value-type="string">
            <text:p>PARECIS</text:p>
          </table:table-cell>
          <table:table-cell office:value-type="float" office:value="0.592534475548218" calcext:value-type="float">
            <text:p>0,592534</text:p>
          </table:table-cell>
        </table:table-row>
        <table:table-row table:style-name="ro1">
          <table:table-cell office:value-type="string" calcext:value-type="string">
            <text:p>BROTAS.MACAUBAS</text:p>
          </table:table-cell>
          <table:table-cell office:value-type="string" calcext:value-type="string">
            <text:p>GENTIO OURO II</text:p>
          </table:table-cell>
          <table:table-cell office:value-type="float" office:value="0.427143745892976" calcext:value-type="float">
            <text:p>0,427144</text:p>
          </table:table-cell>
          <table:table-cell/>
          <table:table-cell office:value-type="string" calcext:value-type="string">
            <text:p>BRAUNAS</text:p>
          </table:table-cell>
          <table:table-cell office:value-type="string" calcext:value-type="string">
            <text:p>ITABIRA 2</text:p>
          </table:table-cell>
          <table:table-cell office:value-type="float" office:value="0.60483473342762" calcext:value-type="float">
            <text:p>0,604835</text:p>
          </table:table-cell>
        </table:table-row>
        <table:table-row table:style-name="ro1">
          <table:table-cell office:value-type="string" calcext:value-type="string">
            <text:p>BRUMADO II</text:p>
          </table:table-cell>
          <table:table-cell office:value-type="string" calcext:value-type="string">
            <text:p>IBICOARA</text:p>
          </table:table-cell>
          <table:table-cell office:value-type="float" office:value="0.410061358245477" calcext:value-type="float">
            <text:p>0,410061</text:p>
          </table:table-cell>
          <table:table-cell/>
          <table:table-cell office:value-type="string" calcext:value-type="string">
            <text:p>BROTAS.MACAUBAS</text:p>
          </table:table-cell>
          <table:table-cell office:value-type="string" calcext:value-type="string">
            <text:p>IRECE</text:p>
          </table:table-cell>
          <table:table-cell office:value-type="float" office:value="0.568290087146621" calcext:value-type="float">
            <text:p>0,568290</text:p>
          </table:table-cell>
        </table:table-row>
        <table:table-row table:style-name="ro1">
          <table:table-cell office:value-type="string" calcext:value-type="string">
            <text:p>BURITIRAMA</text:p>
          </table:table-cell>
          <table:table-cell office:value-type="string" calcext:value-type="string">
            <text:p>GENTIO OURO II</text:p>
          </table:table-cell>
          <table:table-cell office:value-type="float" office:value="1.5528674124639" calcext:value-type="float">
            <text:p>1,552867</text:p>
          </table:table-cell>
          <table:table-cell/>
          <table:table-cell office:value-type="string" calcext:value-type="string">
            <text:p>BRUMADO II</text:p>
          </table:table-cell>
          <table:table-cell office:value-type="string" calcext:value-type="string">
            <text:p>IBICOARA</text:p>
          </table:table-cell>
          <table:table-cell office:value-type="float" office:value="0.587804296009179" calcext:value-type="float">
            <text:p>0,587804</text:p>
          </table:table-cell>
        </table:table-row>
        <table:table-row table:style-name="ro1">
          <table:table-cell office:value-type="string" calcext:value-type="string">
            <text:p>BURITIRAMA</text:p>
          </table:table-cell>
          <table:table-cell office:value-type="string" calcext:value-type="string">
            <text:p>GILBUES II</text:p>
          </table:table-cell>
          <table:table-cell office:value-type="float" office:value="1.55870076812754" calcext:value-type="float">
            <text:p>1,558701</text:p>
          </table:table-cell>
          <table:table-cell/>
          <table:table-cell office:value-type="string" calcext:value-type="string">
            <text:p>BURITIRAMA</text:p>
          </table:table-cell>
          <table:table-cell office:value-type="string" calcext:value-type="string">
            <text:p>GILBUES II</text:p>
          </table:table-cell>
          <table:table-cell office:value-type="float" office:value="1.88224880199071" calcext:value-type="float">
            <text:p>1,882249</text:p>
          </table:table-cell>
        </table:table-row>
        <table:table-row table:style-name="ro1">
          <table:table-cell office:value-type="string" calcext:value-type="string">
            <text:p>BURITIRAMA</text:p>
          </table:table-cell>
          <table:table-cell office:value-type="string" calcext:value-type="string">
            <text:p>QUEIMADA NOVA 2</text:p>
          </table:table-cell>
          <table:table-cell office:value-type="float" office:value="1.51290291290078" calcext:value-type="float">
            <text:p>1,512903</text:p>
          </table:table-cell>
          <table:table-cell/>
          <table:table-cell office:value-type="string" calcext:value-type="string">
            <text:p>BURITIRAMA</text:p>
          </table:table-cell>
          <table:table-cell office:value-type="string" calcext:value-type="string">
            <text:p>QUEIMADA NOVA 2</text:p>
          </table:table-cell>
          <table:table-cell office:value-type="float" office:value="1.82694443575377" calcext:value-type="float">
            <text:p>1,826944</text:p>
          </table:table-cell>
        </table:table-row>
        <table:table-row table:style-name="ro1">
          <table:table-cell office:value-type="string" calcext:value-type="string">
            <text:p>C. PAULISTA</text:p>
          </table:table-cell>
          <table:table-cell office:value-type="string" calcext:value-type="string">
            <text:p>TIJUCO PRETO</text:p>
          </table:table-cell>
          <table:table-cell office:value-type="float" office:value="1.39744091516246" calcext:value-type="float">
            <text:p>1,397441</text:p>
          </table:table-cell>
          <table:table-cell/>
          <table:table-cell office:value-type="string" calcext:value-type="string">
            <text:p>C.COMPRIDO</text:p>
          </table:table-cell>
          <table:table-cell office:value-type="string" calcext:value-type="string">
            <text:p>C.I.CURITIBA</text:p>
          </table:table-cell>
          <table:table-cell office:value-type="float" office:value="0.610332029872348" calcext:value-type="float">
            <text:p>0,610332</text:p>
          </table:table-cell>
        </table:table-row>
        <table:table-row table:style-name="ro1">
          <table:table-cell office:value-type="string" calcext:value-type="string">
            <text:p>C.COMPRIDO</text:p>
          </table:table-cell>
          <table:table-cell office:value-type="string" calcext:value-type="string">
            <text:p>C.I.CURITIBA</text:p>
          </table:table-cell>
          <table:table-cell office:value-type="float" office:value="0.333325864259367" calcext:value-type="float">
            <text:p>0,333326</text:p>
          </table:table-cell>
          <table:table-cell/>
          <table:table-cell office:value-type="string" calcext:value-type="string">
            <text:p>C.COMPRIDO</text:p>
          </table:table-cell>
          <table:table-cell office:value-type="string" calcext:value-type="string">
            <text:p>GRALHA AZUL</text:p>
          </table:table-cell>
          <table:table-cell office:value-type="float" office:value="0.621962340692532" calcext:value-type="float">
            <text:p>0,621962</text:p>
          </table:table-cell>
        </table:table-row>
        <table:table-row table:style-name="ro1">
          <table:table-cell office:value-type="string" calcext:value-type="string">
            <text:p>C.COMPRIDO</text:p>
          </table:table-cell>
          <table:table-cell office:value-type="string" calcext:value-type="string">
            <text:p>SANTAQUITERIA</text:p>
          </table:table-cell>
          <table:table-cell office:value-type="float" office:value="0.332930135856264" calcext:value-type="float">
            <text:p>0,332930</text:p>
          </table:table-cell>
          <table:table-cell/>
          <table:table-cell office:value-type="string" calcext:value-type="string">
            <text:p>C.COMPRIDO</text:p>
          </table:table-cell>
          <table:table-cell office:value-type="string" calcext:value-type="string">
            <text:p>PILARZINHO</text:p>
          </table:table-cell>
          <table:table-cell office:value-type="float" office:value="0.628290908548808" calcext:value-type="float">
            <text:p>0,628291</text:p>
          </table:table-cell>
        </table:table-row>
        <table:table-row table:style-name="ro1">
          <table:table-cell office:value-type="string" calcext:value-type="string">
            <text:p>C.GRANDE II</text:p>
          </table:table-cell>
          <table:table-cell office:value-type="string" calcext:value-type="string">
            <text:p>PAU FERRO</text:p>
          </table:table-cell>
          <table:table-cell office:value-type="float" office:value="0.522567665519091" calcext:value-type="float">
            <text:p>0,522568</text:p>
          </table:table-cell>
          <table:table-cell/>
          <table:table-cell office:value-type="string" calcext:value-type="string">
            <text:p>C.COMPRIDO</text:p>
          </table:table-cell>
          <table:table-cell office:value-type="string" calcext:value-type="string">
            <text:p>SANTAQUITERIA</text:p>
          </table:table-cell>
          <table:table-cell office:value-type="float" office:value="0.609607436477593" calcext:value-type="float">
            <text:p>0,609607</text:p>
          </table:table-cell>
        </table:table-row>
        <table:table-row table:style-name="ro1">
          <table:table-cell office:value-type="string" calcext:value-type="string">
            <text:p>C.GRANDE II</text:p>
          </table:table-cell>
          <table:table-cell office:value-type="string" calcext:value-type="string">
            <text:p>TACAIMBO</text:p>
          </table:table-cell>
          <table:table-cell office:value-type="float" office:value="0.322658285367184" calcext:value-type="float">
            <text:p>0,322658</text:p>
          </table:table-cell>
          <table:table-cell/>
          <table:table-cell office:value-type="string" calcext:value-type="string">
            <text:p>C.GRANDE II</text:p>
          </table:table-cell>
          <table:table-cell office:value-type="string" calcext:value-type="string">
            <text:p>PARAISO</text:p>
          </table:table-cell>
          <table:table-cell office:value-type="float" office:value="0.564322667388878" calcext:value-type="float">
            <text:p>0,564323</text:p>
          </table:table-cell>
        </table:table-row>
        <table:table-row table:style-name="ro1">
          <table:table-cell office:value-type="string" calcext:value-type="string">
            <text:p>C.GRANDE III</text:p>
          </table:table-cell>
          <table:table-cell office:value-type="string" calcext:value-type="string">
            <text:p>CEARA MIRIM 2</text:p>
          </table:table-cell>
          <table:table-cell office:value-type="float" office:value="1.47517994216912" calcext:value-type="float">
            <text:p>1,475180</text:p>
          </table:table-cell>
          <table:table-cell/>
          <table:table-cell office:value-type="string" calcext:value-type="string">
            <text:p>C.GRANDE II</text:p>
          </table:table-cell>
          <table:table-cell office:value-type="string" calcext:value-type="string">
            <text:p>PAU FERRO</text:p>
          </table:table-cell>
          <table:table-cell office:value-type="float" office:value="0.761808845626031" calcext:value-type="float">
            <text:p>0,761809</text:p>
          </table:table-cell>
        </table:table-row>
        <table:table-row table:style-name="ro1">
          <table:table-cell office:value-type="string" calcext:value-type="string">
            <text:p>C.GRANDE III</text:p>
          </table:table-cell>
          <table:table-cell office:value-type="string" calcext:value-type="string">
            <text:p>EXTREMOZ II</text:p>
          </table:table-cell>
          <table:table-cell office:value-type="float" office:value="0.577938255176993" calcext:value-type="float">
            <text:p>0,577938</text:p>
          </table:table-cell>
          <table:table-cell/>
          <table:table-cell office:value-type="string" calcext:value-type="string">
            <text:p>C.GRANDE II</text:p>
          </table:table-cell>
          <table:table-cell office:value-type="string" calcext:value-type="string">
            <text:p>TACAIMBO</text:p>
          </table:table-cell>
          <table:table-cell office:value-type="float" office:value="0.55809856836923" calcext:value-type="float">
            <text:p>0,558099</text:p>
          </table:table-cell>
        </table:table-row>
        <table:table-row table:style-name="ro1">
          <table:table-cell office:value-type="string" calcext:value-type="string">
            <text:p>C.GRANDE III</text:p>
          </table:table-cell>
          <table:table-cell office:value-type="string" calcext:value-type="string">
            <text:p>GARANHUNS II</text:p>
          </table:table-cell>
          <table:table-cell office:value-type="float" office:value="1.4715530672349" calcext:value-type="float">
            <text:p>1,471553</text:p>
          </table:table-cell>
          <table:table-cell/>
          <table:table-cell office:value-type="string" calcext:value-type="string">
            <text:p>C.GRANDE III</text:p>
          </table:table-cell>
          <table:table-cell office:value-type="string" calcext:value-type="string">
            <text:p>CEARA MIRIM 2</text:p>
          </table:table-cell>
          <table:table-cell office:value-type="float" office:value="1.82030220779836" calcext:value-type="float">
            <text:p>1,820302</text:p>
          </table:table-cell>
        </table:table-row>
        <table:table-row table:style-name="ro1">
          <table:table-cell office:value-type="string" calcext:value-type="string">
            <text:p>C.GRANDE III</text:p>
          </table:table-cell>
          <table:table-cell office:value-type="string" calcext:value-type="string">
            <text:p>JOAO PESSOA II</text:p>
          </table:table-cell>
          <table:table-cell office:value-type="float" office:value="1.44221710832828" calcext:value-type="float">
            <text:p>1,442217</text:p>
          </table:table-cell>
          <table:table-cell/>
          <table:table-cell office:value-type="string" calcext:value-type="string">
            <text:p>C.GRANDE III</text:p>
          </table:table-cell>
          <table:table-cell office:value-type="string" calcext:value-type="string">
            <text:p>EXTREMOZ II</text:p>
          </table:table-cell>
          <table:table-cell office:value-type="float" office:value="0.846148332927756" calcext:value-type="float">
            <text:p>0,846148</text:p>
          </table:table-cell>
        </table:table-row>
        <table:table-row table:style-name="ro1">
          <table:table-cell office:value-type="string" calcext:value-type="string">
            <text:p>C.GRANDE III</text:p>
          </table:table-cell>
          <table:table-cell office:value-type="string" calcext:value-type="string">
            <text:p>RIACHAO II</text:p>
          </table:table-cell>
          <table:table-cell office:value-type="float" office:value="0.530258438364688" calcext:value-type="float">
            <text:p>0,530258</text:p>
          </table:table-cell>
          <table:table-cell/>
          <table:table-cell office:value-type="string" calcext:value-type="string">
            <text:p>C.GRANDE III</text:p>
          </table:table-cell>
          <table:table-cell office:value-type="string" calcext:value-type="string">
            <text:p>GARANHUNS II</text:p>
          </table:table-cell>
          <table:table-cell office:value-type="float" office:value="1.8080866179723" calcext:value-type="float">
            <text:p>1,808087</text:p>
          </table:table-cell>
        </table:table-row>
        <table:table-row table:style-name="ro1">
          <table:table-cell office:value-type="string" calcext:value-type="string">
            <text:p>C.GRANDE III</text:p>
          </table:table-cell>
          <table:table-cell office:value-type="string" calcext:value-type="string">
            <text:p>SANTA LUZIA II</text:p>
          </table:table-cell>
          <table:table-cell office:value-type="float" office:value="1.45537809464972" calcext:value-type="float">
            <text:p>1,455378</text:p>
          </table:table-cell>
          <table:table-cell/>
          <table:table-cell office:value-type="string" calcext:value-type="string">
            <text:p>C.GRANDE III</text:p>
          </table:table-cell>
          <table:table-cell office:value-type="string" calcext:value-type="string">
            <text:p>JOAO PESSOA II</text:p>
          </table:table-cell>
          <table:table-cell office:value-type="float" office:value="1.75428492798246" calcext:value-type="float">
            <text:p>1,754285</text:p>
          </table:table-cell>
        </table:table-row>
        <table:table-row table:style-name="ro1">
          <table:table-cell office:value-type="string" calcext:value-type="string">
            <text:p>C.INDUSTRIAL</text:p>
          </table:table-cell>
          <table:table-cell office:value-type="string" calcext:value-type="string">
            <text:p>CACHOEIRINHA3</text:p>
          </table:table-cell>
          <table:table-cell office:value-type="float" office:value="0.290056548626153" calcext:value-type="float">
            <text:p>0,290057</text:p>
          </table:table-cell>
          <table:table-cell/>
          <table:table-cell office:value-type="string" calcext:value-type="string">
            <text:p>C.GRANDE III</text:p>
          </table:table-cell>
          <table:table-cell office:value-type="string" calcext:value-type="string">
            <text:p>RIACHAO II</text:p>
          </table:table-cell>
          <table:table-cell office:value-type="float" office:value="0.765274515796541" calcext:value-type="float">
            <text:p>0,765275</text:p>
          </table:table-cell>
        </table:table-row>
        <table:table-row table:style-name="ro1">
          <table:table-cell office:value-type="string" calcext:value-type="string">
            <text:p>C.INDUSTRIAL</text:p>
          </table:table-cell>
          <table:table-cell office:value-type="string" calcext:value-type="string">
            <text:p>CANOAS 1</text:p>
          </table:table-cell>
          <table:table-cell office:value-type="float" office:value="0.282300732776597" calcext:value-type="float">
            <text:p>0,282301</text:p>
          </table:table-cell>
          <table:table-cell/>
          <table:table-cell office:value-type="string" calcext:value-type="string">
            <text:p>C.INDUSTRIAL</text:p>
          </table:table-cell>
          <table:table-cell office:value-type="string" calcext:value-type="string">
            <text:p>CACHOEIRINHA3</text:p>
          </table:table-cell>
          <table:table-cell office:value-type="float" office:value="0.532083363689718" calcext:value-type="float">
            <text:p>0,532083</text:p>
          </table:table-cell>
        </table:table-row>
        <table:table-row table:style-name="ro1">
          <table:table-cell office:value-type="string" calcext:value-type="string">
            <text:p>C.INDUSTRIAL</text:p>
          </table:table-cell>
          <table:table-cell office:value-type="string" calcext:value-type="string">
            <text:p>CANOAS 2</text:p>
          </table:table-cell>
          <table:table-cell office:value-type="float" office:value="0.289939646118664" calcext:value-type="float">
            <text:p>0,289940</text:p>
          </table:table-cell>
          <table:table-cell/>
          <table:table-cell office:value-type="string" calcext:value-type="string">
            <text:p>C.INDUSTRIAL</text:p>
          </table:table-cell>
          <table:table-cell office:value-type="string" calcext:value-type="string">
            <text:p>CANOAS 1</text:p>
          </table:table-cell>
          <table:table-cell office:value-type="float" office:value="0.517855998009005" calcext:value-type="float">
            <text:p>0,517856</text:p>
          </table:table-cell>
        </table:table-row>
        <table:table-row table:style-name="ro1">
          <table:table-cell office:value-type="string" calcext:value-type="string">
            <text:p>C.INDUSTRIAL</text:p>
          </table:table-cell>
          <table:table-cell office:value-type="string" calcext:value-type="string">
            <text:p>NOVA STA RITA</text:p>
          </table:table-cell>
          <table:table-cell office:value-type="float" office:value="0.364728186683723" calcext:value-type="float">
            <text:p>0,364728</text:p>
          </table:table-cell>
          <table:table-cell/>
          <table:table-cell office:value-type="string" calcext:value-type="string">
            <text:p>C.INDUSTRIAL</text:p>
          </table:table-cell>
          <table:table-cell office:value-type="string" calcext:value-type="string">
            <text:p>CANOAS 2</text:p>
          </table:table-cell>
          <table:table-cell office:value-type="float" office:value="0.531868916266611" calcext:value-type="float">
            <text:p>0,531869</text:p>
          </table:table-cell>
        </table:table-row>
        <table:table-row table:style-name="ro1">
          <table:table-cell office:value-type="string" calcext:value-type="string">
            <text:p>C.MOURAO</text:p>
          </table:table-cell>
          <table:table-cell office:value-type="string" calcext:value-type="string">
            <text:p>S. OSORIO</text:p>
          </table:table-cell>
          <table:table-cell office:value-type="float" office:value="0.409360699272579" calcext:value-type="float">
            <text:p>0,409361</text:p>
          </table:table-cell>
          <table:table-cell/>
          <table:table-cell office:value-type="string" calcext:value-type="string">
            <text:p>C.INDUSTRIAL</text:p>
          </table:table-cell>
          <table:table-cell office:value-type="string" calcext:value-type="string">
            <text:p>NOVA STA RITA</text:p>
          </table:table-cell>
          <table:table-cell office:value-type="float" office:value="0.563884319514447" calcext:value-type="float">
            <text:p>0,563884</text:p>
          </table:table-cell>
        </table:table-row>
        <table:table-row table:style-name="ro1">
          <table:table-cell office:value-type="string" calcext:value-type="string">
            <text:p>C.PORTO VELHO</text:p>
          </table:table-cell>
          <table:table-cell office:value-type="string" calcext:value-type="string">
            <text:p>PORTO VELHO</text:p>
          </table:table-cell>
          <table:table-cell office:value-type="float" office:value="0.53752492687219" calcext:value-type="float">
            <text:p>0,537525</text:p>
          </table:table-cell>
          <table:table-cell/>
          <table:table-cell office:value-type="string" calcext:value-type="string">
            <text:p>C.MOURAO</text:p>
          </table:table-cell>
          <table:table-cell office:value-type="string" calcext:value-type="string">
            <text:p>S. OSORIO</text:p>
          </table:table-cell>
          <table:table-cell office:value-type="float" office:value="0.749554635048025" calcext:value-type="float">
            <text:p>0,749555</text:p>
          </table:table-cell>
        </table:table-row>
        <table:table-row table:style-name="ro1">
          <table:table-cell office:value-type="string" calcext:value-type="string">
            <text:p>CABREUVA</text:p>
          </table:table-cell>
          <table:table-cell office:value-type="string" calcext:value-type="string">
            <text:p>BAURU</text:p>
          </table:table-cell>
          <table:table-cell office:value-type="float" office:value="1.08047721237866" calcext:value-type="float">
            <text:p>1,080477</text:p>
          </table:table-cell>
          <table:table-cell/>
          <table:table-cell office:value-type="string" calcext:value-type="string">
            <text:p>C.PORTO VELHO</text:p>
          </table:table-cell>
          <table:table-cell office:value-type="string" calcext:value-type="string">
            <text:p>PORTO VELHO</text:p>
          </table:table-cell>
          <table:table-cell office:value-type="float" office:value="0.736151388153815" calcext:value-type="float">
            <text:p>0,736151</text:p>
          </table:table-cell>
        </table:table-row>
        <table:table-row table:style-name="ro1">
          <table:table-cell office:value-type="string" calcext:value-type="string">
            <text:p>CABREUVA</text:p>
          </table:table-cell>
          <table:table-cell office:value-type="string" calcext:value-type="string">
            <text:p>EDGARD SOUZA</text:p>
          </table:table-cell>
          <table:table-cell office:value-type="float" office:value="0.424146425656393" calcext:value-type="float">
            <text:p>0,424146</text:p>
          </table:table-cell>
          <table:table-cell/>
          <table:table-cell office:value-type="string" calcext:value-type="string">
            <text:p>CABREUVA</text:p>
          </table:table-cell>
          <table:table-cell office:value-type="string" calcext:value-type="string">
            <text:p>BAURU</text:p>
          </table:table-cell>
          <table:table-cell office:value-type="float" office:value="1.55782321669143" calcext:value-type="float">
            <text:p>1,557823</text:p>
          </table:table-cell>
        </table:table-row>
        <table:table-row table:style-name="ro1">
          <table:table-cell office:value-type="string" calcext:value-type="string">
            <text:p>CABREUVA</text:p>
          </table:table-cell>
          <table:table-cell office:value-type="string" calcext:value-type="string">
            <text:p>GERDAU SP</text:p>
          </table:table-cell>
          <table:table-cell office:value-type="float" office:value="1.03051791428887" calcext:value-type="float">
            <text:p>1,030518</text:p>
          </table:table-cell>
          <table:table-cell/>
          <table:table-cell office:value-type="string" calcext:value-type="string">
            <text:p>CABREUVA</text:p>
          </table:table-cell>
          <table:table-cell office:value-type="string" calcext:value-type="string">
            <text:p>EDGARD SOUZA</text:p>
          </table:table-cell>
          <table:table-cell office:value-type="float" office:value="0.700856362860004" calcext:value-type="float">
            <text:p>0,700856</text:p>
          </table:table-cell>
        </table:table-row>
        <table:table-row table:style-name="ro1">
          <table:table-cell office:value-type="string" calcext:value-type="string">
            <text:p>CAMACARI II</text:p>
          </table:table-cell>
          <table:table-cell office:value-type="string" calcext:value-type="string">
            <text:p>COTEGIPE</text:p>
          </table:table-cell>
          <table:table-cell office:value-type="float" office:value="0.494586433940975" calcext:value-type="float">
            <text:p>0,494586</text:p>
          </table:table-cell>
          <table:table-cell/>
          <table:table-cell office:value-type="string" calcext:value-type="string">
            <text:p>CABREUVA</text:p>
          </table:table-cell>
          <table:table-cell office:value-type="string" calcext:value-type="string">
            <text:p>GERDAU SP</text:p>
          </table:table-cell>
          <table:table-cell office:value-type="float" office:value="1.48579230890158" calcext:value-type="float">
            <text:p>1,485792</text:p>
          </table:table-cell>
        </table:table-row>
        <table:table-row table:style-name="ro1">
          <table:table-cell office:value-type="string" calcext:value-type="string">
            <text:p>CAMACARI II</text:p>
          </table:table-cell>
          <table:table-cell office:value-type="string" calcext:value-type="string">
            <text:p>F. SANTANA III</text:p>
          </table:table-cell>
          <table:table-cell office:value-type="float" office:value="0.380317138930818" calcext:value-type="float">
            <text:p>0,380317</text:p>
          </table:table-cell>
          <table:table-cell/>
          <table:table-cell office:value-type="string" calcext:value-type="string">
            <text:p>CAMACARI II</text:p>
          </table:table-cell>
          <table:table-cell office:value-type="string" calcext:value-type="string">
            <text:p>COTEGIPE</text:p>
          </table:table-cell>
          <table:table-cell office:value-type="float" office:value="0.70896714545907" calcext:value-type="float">
            <text:p>0,708967</text:p>
          </table:table-cell>
        </table:table-row>
        <table:table-row table:style-name="ro1">
          <table:table-cell office:value-type="string" calcext:value-type="string">
            <text:p>CAMACARI II</text:p>
          </table:table-cell>
          <table:table-cell office:value-type="string" calcext:value-type="string">
            <text:p>G.MANGABEIRA</text:p>
          </table:table-cell>
          <table:table-cell office:value-type="float" office:value="0.373199706263554" calcext:value-type="float">
            <text:p>0,373200</text:p>
          </table:table-cell>
          <table:table-cell/>
          <table:table-cell office:value-type="string" calcext:value-type="string">
            <text:p>CAMACARI II</text:p>
          </table:table-cell>
          <table:table-cell office:value-type="string" calcext:value-type="string">
            <text:p>F. SANTANA III</text:p>
          </table:table-cell>
          <table:table-cell office:value-type="float" office:value="0.545167311218895" calcext:value-type="float">
            <text:p>0,545167</text:p>
          </table:table-cell>
        </table:table-row>
        <table:table-row table:style-name="ro1">
          <table:table-cell office:value-type="string" calcext:value-type="string">
            <text:p>CAMACARI II</text:p>
          </table:table-cell>
          <table:table-cell office:value-type="string" calcext:value-type="string">
            <text:p>MATATU</text:p>
          </table:table-cell>
          <table:table-cell office:value-type="float" office:value="0.350039329666613" calcext:value-type="float">
            <text:p>0,350039</text:p>
          </table:table-cell>
          <table:table-cell/>
          <table:table-cell office:value-type="string" calcext:value-type="string">
            <text:p>CAMACARI II</text:p>
          </table:table-cell>
          <table:table-cell office:value-type="string" calcext:value-type="string">
            <text:p>G.MANGABEIRA</text:p>
          </table:table-cell>
          <table:table-cell office:value-type="float" office:value="0.534964795389863" calcext:value-type="float">
            <text:p>0,534965</text:p>
          </table:table-cell>
        </table:table-row>
        <table:table-row table:style-name="ro1">
          <table:table-cell office:value-type="string" calcext:value-type="string">
            <text:p>CAMACARI II</text:p>
          </table:table-cell>
          <table:table-cell office:value-type="string" calcext:value-type="string">
            <text:p>OLINDINA</text:p>
          </table:table-cell>
          <table:table-cell office:value-type="float" office:value="1.22492064255575" calcext:value-type="float">
            <text:p>1,224921</text:p>
          </table:table-cell>
          <table:table-cell/>
          <table:table-cell office:value-type="string" calcext:value-type="string">
            <text:p>CAMACARI II</text:p>
          </table:table-cell>
          <table:table-cell office:value-type="string" calcext:value-type="string">
            <text:p>OLINDINA</text:p>
          </table:table-cell>
          <table:table-cell office:value-type="float" office:value="1.4799025849578" calcext:value-type="float">
            <text:p>1,479903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string" calcext:value-type="string">
            <text:p>CATU</text:p>
          </table:table-cell>
          <table:table-cell office:value-type="float" office:value="0.327117791762098" calcext:value-type="float">
            <text:p>0,327118</text:p>
          </table:table-cell>
          <table:table-cell/>
          <table:table-cell office:value-type="string" calcext:value-type="string">
            <text:p>CAMACARI IV</text:p>
          </table:table-cell>
          <table:table-cell office:value-type="string" calcext:value-type="string">
            <text:p>JARDIM</text:p>
          </table:table-cell>
          <table:table-cell office:value-type="float" office:value="1.58468945880137" calcext:value-type="float">
            <text:p>1,584689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string" calcext:value-type="string">
            <text:p>JACARACANGA</text:p>
          </table:table-cell>
          <table:table-cell office:value-type="float" office:value="0.375709837446742" calcext:value-type="float">
            <text:p>0,375710</text:p>
          </table:table-cell>
          <table:table-cell/>
          <table:table-cell office:value-type="string" calcext:value-type="string">
            <text:p>CAMACARI IV</text:p>
          </table:table-cell>
          <table:table-cell office:value-type="string" calcext:value-type="string">
            <text:p>PIRAJA</text:p>
          </table:table-cell>
          <table:table-cell office:value-type="float" office:value="0.687311115662632" calcext:value-type="float">
            <text:p>0,687311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string" calcext:value-type="string">
            <text:p>JARDIM</text:p>
          </table:table-cell>
          <table:table-cell office:value-type="float" office:value="1.30469445971026" calcext:value-type="float">
            <text:p>1,304694</text:p>
          </table:table-cell>
          <table:table-cell/>
          <table:table-cell office:value-type="string" calcext:value-type="string">
            <text:p>CAMACARI IV</text:p>
          </table:table-cell>
          <table:table-cell office:value-type="string" calcext:value-type="string">
            <text:p>PITUACU</text:p>
          </table:table-cell>
          <table:table-cell office:value-type="float" office:value="0.687009916873704" calcext:value-type="float">
            <text:p>0,687010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string" calcext:value-type="string">
            <text:p>PIRAJA</text:p>
          </table:table-cell>
          <table:table-cell office:value-type="float" office:value="0.479478852977679" calcext:value-type="float">
            <text:p>0,479479</text:p>
          </table:table-cell>
          <table:table-cell/>
          <table:table-cell office:value-type="string" calcext:value-type="string">
            <text:p>CAMACARI IV</text:p>
          </table:table-cell>
          <table:table-cell office:value-type="string" calcext:value-type="string">
            <text:p>POLO</text:p>
          </table:table-cell>
          <table:table-cell office:value-type="float" office:value="0.465689358842882" calcext:value-type="float">
            <text:p>0,465689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string" calcext:value-type="string">
            <text:p>PITUACU</text:p>
          </table:table-cell>
          <table:table-cell office:value-type="float" office:value="0.479268732049117" calcext:value-type="float">
            <text:p>0,479269</text:p>
          </table:table-cell>
          <table:table-cell/>
          <table:table-cell office:value-type="string" calcext:value-type="string">
            <text:p>CAMACARI IV</text:p>
          </table:table-cell>
          <table:table-cell office:value-type="string" calcext:value-type="string">
            <text:p>SAPEACU</text:p>
          </table:table-cell>
          <table:table-cell office:value-type="float" office:value="1.64186734191078" calcext:value-type="float">
            <text:p>1,641867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string" calcext:value-type="string">
            <text:p>POLO</text:p>
          </table:table-cell>
          <table:table-cell office:value-type="float" office:value="0.324872091449627" calcext:value-type="float">
            <text:p>0,324872</text:p>
          </table:table-cell>
          <table:table-cell/>
          <table:table-cell office:value-type="string" calcext:value-type="string">
            <text:p>CAMAQUA</text:p>
          </table:table-cell>
          <table:table-cell office:value-type="string" calcext:value-type="string">
            <text:p>PRE.MEDICI</text:p>
          </table:table-cell>
          <table:table-cell office:value-type="float" office:value="0.704683165845649" calcext:value-type="float">
            <text:p>0,704683</text:p>
          </table:table-cell>
        </table:table-row>
        <table:table-row table:style-name="ro1">
          <table:table-cell office:value-type="string" calcext:value-type="string">
            <text:p>CAMACARI IV</text:p>
          </table:table-cell>
          <table:table-cell office:value-type="string" calcext:value-type="string">
            <text:p>SAPEACU</text:p>
          </table:table-cell>
          <table:table-cell office:value-type="float" office:value="1.35897944897637" calcext:value-type="float">
            <text:p>1,358979</text:p>
          </table:table-cell>
          <table:table-cell/>
          <table:table-cell office:value-type="string" calcext:value-type="string">
            <text:p>CAMAQUA 3</text:p>
          </table:table-cell>
          <table:table-cell office:value-type="string" calcext:value-type="string">
            <text:p>POVO NOVO</text:p>
          </table:table-cell>
          <table:table-cell office:value-type="float" office:value="0.922994177176824" calcext:value-type="float">
            <text:p>0,922994</text:p>
          </table:table-cell>
        </table:table-row>
        <table:table-row table:style-name="ro1">
          <table:table-cell office:value-type="string" calcext:value-type="string">
            <text:p>CAMAQUA</text:p>
          </table:table-cell>
          <table:table-cell office:value-type="string" calcext:value-type="string">
            <text:p>PRE.MEDICI</text:p>
          </table:table-cell>
          <table:table-cell office:value-type="float" office:value="0.384146509567123" calcext:value-type="float">
            <text:p>0,384147</text:p>
          </table:table-cell>
          <table:table-cell/>
          <table:table-cell office:value-type="string" calcext:value-type="string">
            <text:p>CAMPINAS</text:p>
          </table:table-cell>
          <table:table-cell office:value-type="string" calcext:value-type="string">
            <text:p>ITATIBA</text:p>
          </table:table-cell>
          <table:table-cell office:value-type="float" office:value="1.89559068896527" calcext:value-type="float">
            <text:p>1,895591</text:p>
          </table:table-cell>
        </table:table-row>
        <table:table-row table:style-name="ro1">
          <table:table-cell office:value-type="string" calcext:value-type="string">
            <text:p>CAMAQUA 3</text:p>
          </table:table-cell>
          <table:table-cell office:value-type="string" calcext:value-type="string">
            <text:p>POVO NOVO</text:p>
          </table:table-cell>
          <table:table-cell office:value-type="float" office:value="0.597005415669681" calcext:value-type="float">
            <text:p>0,597005</text:p>
          </table:table-cell>
          <table:table-cell/>
          <table:table-cell office:value-type="string" calcext:value-type="string">
            <text:p>CAMPO ASSOBIO</text:p>
          </table:table-cell>
          <table:table-cell office:value-type="string" calcext:value-type="string">
            <text:p>UMBARA</text:p>
          </table:table-cell>
          <table:table-cell office:value-type="float" office:value="0.525537633782488" calcext:value-type="float">
            <text:p>0,525538</text:p>
          </table:table-cell>
        </table:table-row>
        <table:table-row table:style-name="ro1">
          <table:table-cell office:value-type="string" calcext:value-type="string">
            <text:p>CAMPINAS</text:p>
          </table:table-cell>
          <table:table-cell office:value-type="string" calcext:value-type="string">
            <text:p>ITATIBA</text:p>
          </table:table-cell>
          <table:table-cell office:value-type="float" office:value="1.40925687873135" calcext:value-type="float">
            <text:p>1,409257</text:p>
          </table:table-cell>
          <table:table-cell/>
          <table:table-cell office:value-type="string" calcext:value-type="string">
            <text:p>CAMPO BOM</text:p>
          </table:table-cell>
          <table:table-cell office:value-type="string" calcext:value-type="string">
            <text:p>CAXIAS</text:p>
          </table:table-cell>
          <table:table-cell office:value-type="float" office:value="0.636116492868589" calcext:value-type="float">
            <text:p>0,636116</text:p>
          </table:table-cell>
        </table:table-row>
        <table:table-row table:style-name="ro1">
          <table:table-cell office:value-type="string" calcext:value-type="string">
            <text:p>CAMPO ASSOBIO</text:p>
          </table:table-cell>
          <table:table-cell office:value-type="string" calcext:value-type="string">
            <text:p>UMBARA</text:p>
          </table:table-cell>
          <table:table-cell office:value-type="float" office:value="0.287016373723674" calcext:value-type="float">
            <text:p>0,287016</text:p>
          </table:table-cell>
          <table:table-cell/>
          <table:table-cell office:value-type="string" calcext:value-type="string">
            <text:p>CAMPO FORMOSO</text:p>
          </table:table-cell>
          <table:table-cell office:value-type="string" calcext:value-type="string">
            <text:p>OUROLANDIA II</text:p>
          </table:table-cell>
          <table:table-cell office:value-type="float" office:value="0.557345450717418" calcext:value-type="float">
            <text:p>0,557345</text:p>
          </table:table-cell>
        </table:table-row>
        <table:table-row table:style-name="ro1">
          <table:table-cell office:value-type="string" calcext:value-type="string">
            <text:p>CAMPO BOM</text:p>
          </table:table-cell>
          <table:table-cell office:value-type="string" calcext:value-type="string">
            <text:p>CAXIAS</text:p>
          </table:table-cell>
          <table:table-cell office:value-type="float" office:value="0.411448956699753" calcext:value-type="float">
            <text:p>0,411449</text:p>
          </table:table-cell>
          <table:table-cell/>
          <table:table-cell office:value-type="string" calcext:value-type="string">
            <text:p>CAMPO GRANDE2</text:p>
          </table:table-cell>
          <table:table-cell office:value-type="string" calcext:value-type="string">
            <text:p>PARAISO 2</text:p>
          </table:table-cell>
          <table:table-cell office:value-type="float" office:value="1.03277407629021" calcext:value-type="float">
            <text:p>1,032774</text:p>
          </table:table-cell>
        </table:table-row>
        <table:table-row table:style-name="ro1">
          <table:table-cell office:value-type="string" calcext:value-type="string">
            <text:p>CAMPO FORMOSO</text:p>
          </table:table-cell>
          <table:table-cell office:value-type="string" calcext:value-type="string">
            <text:p>OUROLANDIA II</text:p>
          </table:table-cell>
          <table:table-cell office:value-type="float" office:value="0.388812797192542" calcext:value-type="float">
            <text:p>0,388813</text:p>
          </table:table-cell>
          <table:table-cell/>
          <table:table-cell office:value-type="string" calcext:value-type="string">
            <text:p>CAMPO GRANDE2</text:p>
          </table:table-cell>
          <table:table-cell office:value-type="string" calcext:value-type="string">
            <text:p>RIO BRILHANTE</text:p>
          </table:table-cell>
          <table:table-cell office:value-type="float" office:value="0.968450228752896" calcext:value-type="float">
            <text:p>0,968450</text:p>
          </table:table-cell>
        </table:table-row>
        <table:table-row table:style-name="ro1">
          <table:table-cell office:value-type="string" calcext:value-type="string">
            <text:p>CAMPO GRANDE2</text:p>
          </table:table-cell>
          <table:table-cell office:value-type="string" calcext:value-type="string">
            <text:p>PARAISO 2</text:p>
          </table:table-cell>
          <table:table-cell office:value-type="float" office:value="0.578378327866851" calcext:value-type="float">
            <text:p>0,578378</text:p>
          </table:table-cell>
          <table:table-cell/>
          <table:table-cell office:value-type="string" calcext:value-type="string">
            <text:p>CAMPOS</text:p>
          </table:table-cell>
          <table:table-cell office:value-type="string" calcext:value-type="string">
            <text:p>MACAE MERCHAN</text:p>
          </table:table-cell>
          <table:table-cell office:value-type="float" office:value="1.10018146177414" calcext:value-type="float">
            <text:p>1,100181</text:p>
          </table:table-cell>
        </table:table-row>
        <table:table-row table:style-name="ro1">
          <table:table-cell office:value-type="string" calcext:value-type="string">
            <text:p>CAMPO GRANDE2</text:p>
          </table:table-cell>
          <table:table-cell office:value-type="string" calcext:value-type="string">
            <text:p>RIO BRILHANTE</text:p>
          </table:table-cell>
          <table:table-cell office:value-type="float" office:value="0.542355425825939" calcext:value-type="float">
            <text:p>0,542355</text:p>
          </table:table-cell>
          <table:table-cell/>
          <table:table-cell office:value-type="string" calcext:value-type="string">
            <text:p>CANARANA</text:p>
          </table:table-cell>
          <table:table-cell office:value-type="string" calcext:value-type="string">
            <text:p>PARANATINGA</text:p>
          </table:table-cell>
          <table:table-cell office:value-type="float" office:value="0.737596328847877" calcext:value-type="float">
            <text:p>0,737596</text:p>
          </table:table-cell>
        </table:table-row>
        <table:table-row table:style-name="ro1">
          <table:table-cell office:value-type="string" calcext:value-type="string">
            <text:p>CAMPOS</text:p>
          </table:table-cell>
          <table:table-cell office:value-type="string" calcext:value-type="string">
            <text:p>MACAE MERCHAN</text:p>
          </table:table-cell>
          <table:table-cell office:value-type="float" office:value="0.706473774729885" calcext:value-type="float">
            <text:p>0,706474</text:p>
          </table:table-cell>
          <table:table-cell/>
          <table:table-cell office:value-type="string" calcext:value-type="string">
            <text:p>CANDELARIA 2</text:p>
          </table:table-cell>
          <table:table-cell office:value-type="string" calcext:value-type="string">
            <text:p>NOVA STA RITA</text:p>
          </table:table-cell>
          <table:table-cell office:value-type="float" office:value="0.764707691879379" calcext:value-type="float">
            <text:p>0,764708</text:p>
          </table:table-cell>
        </table:table-row>
        <table:table-row table:style-name="ro1">
          <table:table-cell office:value-type="string" calcext:value-type="string">
            <text:p>CANARANA</text:p>
          </table:table-cell>
          <table:table-cell office:value-type="string" calcext:value-type="string">
            <text:p>PARANATINGA</text:p>
          </table:table-cell>
          <table:table-cell office:value-type="float" office:value="0.49288311647467" calcext:value-type="float">
            <text:p>0,492883</text:p>
          </table:table-cell>
          <table:table-cell/>
          <table:table-cell office:value-type="string" calcext:value-type="string">
            <text:p>CANDIOTA 2</text:p>
          </table:table-cell>
          <table:table-cell office:value-type="string" calcext:value-type="string">
            <text:p>GUAIBA 3</text:p>
          </table:table-cell>
          <table:table-cell office:value-type="float" office:value="2.20448846745972" calcext:value-type="float">
            <text:p>2,204488</text:p>
          </table:table-cell>
        </table:table-row>
        <table:table-row table:style-name="ro1">
          <table:table-cell office:value-type="string" calcext:value-type="string">
            <text:p>CANDELARIA 2</text:p>
          </table:table-cell>
          <table:table-cell office:value-type="string" calcext:value-type="string">
            <text:p>NOVA STA RITA</text:p>
          </table:table-cell>
          <table:table-cell office:value-type="float" office:value="0.494623524985456" calcext:value-type="float">
            <text:p>0,494624</text:p>
          </table:table-cell>
          <table:table-cell/>
          <table:table-cell office:value-type="string" calcext:value-type="string">
            <text:p>CAPELINHA 3</text:p>
          </table:table-cell>
          <table:table-cell office:value-type="string" calcext:value-type="string">
            <text:p>JANAUBA 6</text:p>
          </table:table-cell>
          <table:table-cell office:value-type="float" office:value="1.95856411069638" calcext:value-type="float">
            <text:p>1,958564</text:p>
          </table:table-cell>
        </table:table-row>
        <table:table-row table:style-name="ro1">
          <table:table-cell office:value-type="string" calcext:value-type="string">
            <text:p>CANDIOTA 2</text:p>
          </table:table-cell>
          <table:table-cell office:value-type="string" calcext:value-type="string">
            <text:p>GUAIBA 3</text:p>
          </table:table-cell>
          <table:table-cell office:value-type="float" office:value="1.69185623281381" calcext:value-type="float">
            <text:p>1,691856</text:p>
          </table:table-cell>
          <table:table-cell/>
          <table:table-cell office:value-type="string" calcext:value-type="string">
            <text:p>CAPIVARI SUL</text:p>
          </table:table-cell>
          <table:table-cell office:value-type="string" calcext:value-type="string">
            <text:p>GRAVATAI</text:p>
          </table:table-cell>
          <table:table-cell office:value-type="float" office:value="1.67687012171077" calcext:value-type="float">
            <text:p>1,676870</text:p>
          </table:table-cell>
        </table:table-row>
        <table:table-row table:style-name="ro1">
          <table:table-cell office:value-type="string" calcext:value-type="string">
            <text:p>CAPELINHA 3</text:p>
          </table:table-cell>
          <table:table-cell office:value-type="string" calcext:value-type="string">
            <text:p>JANAUBA 6</text:p>
          </table:table-cell>
          <table:table-cell office:value-type="float" office:value="1.49898415367982" calcext:value-type="float">
            <text:p>1,498984</text:p>
          </table:table-cell>
          <table:table-cell/>
          <table:table-cell office:value-type="string" calcext:value-type="string">
            <text:p>CAPIVARI SUL</text:p>
          </table:table-cell>
          <table:table-cell office:value-type="string" calcext:value-type="string">
            <text:p>VIAMAO 3</text:p>
          </table:table-cell>
          <table:table-cell office:value-type="float" office:value="0.878792975987043" calcext:value-type="float">
            <text:p>0,878793</text:p>
          </table:table-cell>
        </table:table-row>
        <table:table-row table:style-name="ro1">
          <table:table-cell office:value-type="string" calcext:value-type="string">
            <text:p>CAPIVARI SUL</text:p>
          </table:table-cell>
          <table:table-cell office:value-type="string" calcext:value-type="string">
            <text:p>GRAVATAI</text:p>
          </table:table-cell>
          <table:table-cell office:value-type="float" office:value="1.28693037360489" calcext:value-type="float">
            <text:p>1,286930</text:p>
          </table:table-cell>
          <table:table-cell/>
          <table:table-cell office:value-type="string" calcext:value-type="string">
            <text:p>CARAJAS</text:p>
          </table:table-cell>
          <table:table-cell office:value-type="string" calcext:value-type="string">
            <text:p>ITACAIUNAS</text:p>
          </table:table-cell>
          <table:table-cell office:value-type="float" office:value="0.957230279286472" calcext:value-type="float">
            <text:p>0,957230</text:p>
          </table:table-cell>
        </table:table-row>
        <table:table-row table:style-name="ro1">
          <table:table-cell office:value-type="string" calcext:value-type="string">
            <text:p>CAPIVARI SUL</text:p>
          </table:table-cell>
          <table:table-cell office:value-type="string" calcext:value-type="string">
            <text:p>VIAMAO 3</text:p>
          </table:table-cell>
          <table:table-cell office:value-type="float" office:value="0.568415466630003" calcext:value-type="float">
            <text:p>0,568415</text:p>
          </table:table-cell>
          <table:table-cell/>
          <table:table-cell office:value-type="string" calcext:value-type="string">
            <text:p>CARAJAS</text:p>
          </table:table-cell>
          <table:table-cell office:value-type="string" calcext:value-type="string">
            <text:p>PALMEIRAS</text:p>
          </table:table-cell>
          <table:table-cell office:value-type="float" office:value="0.49882511460612" calcext:value-type="float">
            <text:p>0,498825</text:p>
          </table:table-cell>
        </table:table-row>
        <table:table-row table:style-name="ro1">
          <table:table-cell office:value-type="string" calcext:value-type="string">
            <text:p>CARAJAS</text:p>
          </table:table-cell>
          <table:table-cell office:value-type="string" calcext:value-type="string">
            <text:p>ITACAIUNAS</text:p>
          </table:table-cell>
          <table:table-cell office:value-type="float" office:value="0.668427813017047" calcext:value-type="float">
            <text:p>0,668428</text:p>
          </table:table-cell>
          <table:table-cell/>
          <table:table-cell office:value-type="string" calcext:value-type="string">
            <text:p>CARBOCLORO</text:p>
          </table:table-cell>
          <table:table-cell office:value-type="string" calcext:value-type="string">
            <text:p>H.BORDEN SUB</text:p>
          </table:table-cell>
          <table:table-cell office:value-type="float" office:value="0.849602803105472" calcext:value-type="float">
            <text:p>0,849603</text:p>
          </table:table-cell>
        </table:table-row>
        <table:table-row table:style-name="ro1">
          <table:table-cell office:value-type="string" calcext:value-type="string">
            <text:p>CARAJAS</text:p>
          </table:table-cell>
          <table:table-cell office:value-type="string" calcext:value-type="string">
            <text:p>PALMEIRAS</text:p>
          </table:table-cell>
          <table:table-cell office:value-type="float" office:value="0.287052936249133" calcext:value-type="float">
            <text:p>0,287053</text:p>
          </table:table-cell>
          <table:table-cell/>
          <table:table-cell office:value-type="string" calcext:value-type="string">
            <text:p>CASCAVEL</text:p>
          </table:table-cell>
          <table:table-cell office:value-type="string" calcext:value-type="string">
            <text:p>CASCAVEL OEST</text:p>
          </table:table-cell>
          <table:table-cell office:value-type="float" office:value="0.604869195017433" calcext:value-type="float">
            <text:p>0,604869</text:p>
          </table:table-cell>
        </table:table-row>
        <table:table-row table:style-name="ro1">
          <table:table-cell office:value-type="string" calcext:value-type="string">
            <text:p>CARBOCLORO</text:p>
          </table:table-cell>
          <table:table-cell office:value-type="string" calcext:value-type="string">
            <text:p>H.BORDEN SUB</text:p>
          </table:table-cell>
          <table:table-cell office:value-type="float" office:value="0.448633891381021" calcext:value-type="float">
            <text:p>0,448634</text:p>
          </table:table-cell>
          <table:table-cell/>
          <table:table-cell office:value-type="string" calcext:value-type="string">
            <text:p>CASCAVEL</text:p>
          </table:table-cell>
          <table:table-cell office:value-type="string" calcext:value-type="string">
            <text:p>FOZ DO CHOPIM</text:p>
          </table:table-cell>
          <table:table-cell office:value-type="float" office:value="0.61691402084925" calcext:value-type="float">
            <text:p>0,616914</text:p>
          </table:table-cell>
        </table:table-row>
        <table:table-row table:style-name="ro1">
          <table:table-cell office:value-type="string" calcext:value-type="string">
            <text:p>CASCAVEL</text:p>
          </table:table-cell>
          <table:table-cell office:value-type="string" calcext:value-type="string">
            <text:p>CASCAVEL OEST</text:p>
          </table:table-cell>
          <table:table-cell office:value-type="float" office:value="0.391958570955829" calcext:value-type="float">
            <text:p>0,391959</text:p>
          </table:table-cell>
          <table:table-cell/>
          <table:table-cell office:value-type="string" calcext:value-type="string">
            <text:p>CASCAVEL NORT</text:p>
          </table:table-cell>
          <table:table-cell office:value-type="string" calcext:value-type="string">
            <text:p>UMUARAMA SUL</text:p>
          </table:table-cell>
          <table:table-cell office:value-type="float" office:value="0.663915602651357" calcext:value-type="float">
            <text:p>0,663916</text:p>
          </table:table-cell>
        </table:table-row>
        <table:table-row table:style-name="ro1">
          <table:table-cell office:value-type="string" calcext:value-type="string">
            <text:p>CASCAVEL</text:p>
          </table:table-cell>
          <table:table-cell office:value-type="string" calcext:value-type="string">
            <text:p>FOZ DO CHOPIM</text:p>
          </table:table-cell>
          <table:table-cell office:value-type="float" office:value="0.336920543423398" calcext:value-type="float">
            <text:p>0,336921</text:p>
          </table:table-cell>
          <table:table-cell/>
          <table:table-cell office:value-type="string" calcext:value-type="string">
            <text:p>CASCAVEL OEST</text:p>
          </table:table-cell>
          <table:table-cell office:value-type="string" calcext:value-type="string">
            <text:p>F.IGUACU 60HZ</text:p>
          </table:table-cell>
          <table:table-cell office:value-type="float" office:value="2.2531393721763" calcext:value-type="float">
            <text:p>2,253139</text:p>
          </table:table-cell>
        </table:table-row>
        <table:table-row table:style-name="ro1">
          <table:table-cell office:value-type="string" calcext:value-type="string">
            <text:p>CASCAVEL NORT</text:p>
          </table:table-cell>
          <table:table-cell office:value-type="string" calcext:value-type="string">
            <text:p>CASCAVEL OEST</text:p>
          </table:table-cell>
          <table:table-cell office:value-type="float" office:value="0.383558383196004" calcext:value-type="float">
            <text:p>0,383558</text:p>
          </table:table-cell>
          <table:table-cell/>
          <table:table-cell office:value-type="string" calcext:value-type="string">
            <text:p>CASCAVEL OEST</text:p>
          </table:table-cell>
          <table:table-cell office:value-type="string" calcext:value-type="string">
            <text:p>MEDIANEIRA NT</text:p>
          </table:table-cell>
          <table:table-cell office:value-type="float" office:value="0.604480562070582" calcext:value-type="float">
            <text:p>0,604481</text:p>
          </table:table-cell>
        </table:table-row>
        <table:table-row table:style-name="ro1">
          <table:table-cell office:value-type="string" calcext:value-type="string">
            <text:p>CASCAVEL OEST</text:p>
          </table:table-cell>
          <table:table-cell office:value-type="string" calcext:value-type="string">
            <text:p>F.IGUACU 60HZ</text:p>
          </table:table-cell>
          <table:table-cell office:value-type="float" office:value="1.9841986254596" calcext:value-type="float">
            <text:p>1,984199</text:p>
          </table:table-cell>
          <table:table-cell/>
          <table:table-cell office:value-type="string" calcext:value-type="string">
            <text:p>CASTANHAL</text:p>
          </table:table-cell>
          <table:table-cell office:value-type="string" calcext:value-type="string">
            <text:p>MARITUBA</text:p>
          </table:table-cell>
          <table:table-cell office:value-type="float" office:value="0.887136356102615" calcext:value-type="float">
            <text:p>0,887136</text:p>
          </table:table-cell>
        </table:table-row>
        <table:table-row table:style-name="ro1">
          <table:table-cell office:value-type="string" calcext:value-type="string">
            <text:p>CASCAVEL OEST</text:p>
          </table:table-cell>
          <table:table-cell office:value-type="string" calcext:value-type="string">
            <text:p>MEDIANEIRA NT</text:p>
          </table:table-cell>
          <table:table-cell office:value-type="float" office:value="0.391706734665059" calcext:value-type="float">
            <text:p>0,391707</text:p>
          </table:table-cell>
          <table:table-cell/>
          <table:table-cell office:value-type="string" calcext:value-type="string">
            <text:p>CASTANHAL</text:p>
          </table:table-cell>
          <table:table-cell office:value-type="string" calcext:value-type="string">
            <text:p>SANTA MARIA</text:p>
          </table:table-cell>
          <table:table-cell office:value-type="float" office:value="0.486307433464683" calcext:value-type="float">
            <text:p>0,486307</text:p>
          </table:table-cell>
        </table:table-row>
        <table:table-row table:style-name="ro1">
          <table:table-cell office:value-type="string" calcext:value-type="string">
            <text:p>CASTANHAL</text:p>
          </table:table-cell>
          <table:table-cell office:value-type="string" calcext:value-type="string">
            <text:p>MARITUBA</text:p>
          </table:table-cell>
          <table:table-cell office:value-type="float" office:value="0.619481672476555" calcext:value-type="float">
            <text:p>0,619482</text:p>
          </table:table-cell>
          <table:table-cell/>
          <table:table-cell office:value-type="string" calcext:value-type="string">
            <text:p>CASTERTECH</text:p>
          </table:table-cell>
          <table:table-cell office:value-type="string" calcext:value-type="string">
            <text:p>CAXIAS 6</text:p>
          </table:table-cell>
          <table:table-cell office:value-type="float" office:value="0.592229441088298" calcext:value-type="float">
            <text:p>0,592229</text:p>
          </table:table-cell>
        </table:table-row>
        <table:table-row table:style-name="ro1">
          <table:table-cell office:value-type="string" calcext:value-type="string">
            <text:p>CASTANHAL</text:p>
          </table:table-cell>
          <table:table-cell office:value-type="string" calcext:value-type="string">
            <text:p>SANTA MARIA</text:p>
          </table:table-cell>
          <table:table-cell office:value-type="float" office:value="0.286213728903339" calcext:value-type="float">
            <text:p>0,286214</text:p>
          </table:table-cell>
          <table:table-cell/>
          <table:table-cell office:value-type="string" calcext:value-type="string">
            <text:p>CASTERTECH</text:p>
          </table:table-cell>
          <table:table-cell office:value-type="string" calcext:value-type="string">
            <text:p>CAXIAS SUL 2</text:p>
          </table:table-cell>
          <table:table-cell office:value-type="float" office:value="0.589934396668918" calcext:value-type="float">
            <text:p>0,589934</text:p>
          </table:table-cell>
        </table:table-row>
        <table:table-row table:style-name="ro1">
          <table:table-cell office:value-type="string" calcext:value-type="string">
            <text:p>CASTERTECH</text:p>
          </table:table-cell>
          <table:table-cell office:value-type="string" calcext:value-type="string">
            <text:p>CAXIAS 6</text:p>
          </table:table-cell>
          <table:table-cell office:value-type="float" office:value="0.322844199611247" calcext:value-type="float">
            <text:p>0,322844</text:p>
          </table:table-cell>
          <table:table-cell/>
          <table:table-cell office:value-type="string" calcext:value-type="string">
            <text:p>CASTRO NORTE</text:p>
          </table:table-cell>
          <table:table-cell office:value-type="string" calcext:value-type="string">
            <text:p>KLABIN CELULOSE</text:p>
          </table:table-cell>
          <table:table-cell office:value-type="float" office:value="0.667690890908963" calcext:value-type="float">
            <text:p>0,667691</text:p>
          </table:table-cell>
        </table:table-row>
        <table:table-row table:style-name="ro1">
          <table:table-cell office:value-type="string" calcext:value-type="string">
            <text:p>CASTRO NORTE</text:p>
          </table:table-cell>
          <table:table-cell office:value-type="string" calcext:value-type="string">
            <text:p>KLABIN CELULOSE</text:p>
          </table:table-cell>
          <table:table-cell office:value-type="float" office:value="0.364651750813217" calcext:value-type="float">
            <text:p>0,364652</text:p>
          </table:table-cell>
          <table:table-cell/>
          <table:table-cell office:value-type="string" calcext:value-type="string">
            <text:p>CASTRO NORTE</text:p>
          </table:table-cell>
          <table:table-cell office:value-type="string" calcext:value-type="string">
            <text:p>PONTA GROSSA</text:p>
          </table:table-cell>
          <table:table-cell office:value-type="float" office:value="0.633971670372513" calcext:value-type="float">
            <text:p>0,633972</text:p>
          </table:table-cell>
        </table:table-row>
        <table:table-row table:style-name="ro1">
          <table:table-cell office:value-type="string" calcext:value-type="string">
            <text:p>CASTRO NORTE</text:p>
          </table:table-cell>
          <table:table-cell office:value-type="string" calcext:value-type="string">
            <text:p>PONTA GROSSA</text:p>
          </table:table-cell>
          <table:table-cell office:value-type="float" office:value="0.410817135328785" calcext:value-type="float">
            <text:p>0,410817</text:p>
          </table:table-cell>
          <table:table-cell/>
          <table:table-cell office:value-type="string" calcext:value-type="string">
            <text:p>CATU</text:p>
          </table:table-cell>
          <table:table-cell office:value-type="string" calcext:value-type="string">
            <text:p>CICERO DANTAS</text:p>
          </table:table-cell>
          <table:table-cell office:value-type="float" office:value="0.554686495401565" calcext:value-type="float">
            <text:p>0,554686</text:p>
          </table:table-cell>
        </table:table-row>
        <table:table-row table:style-name="ro1">
          <table:table-cell office:value-type="string" calcext:value-type="string">
            <text:p>CATU</text:p>
          </table:table-cell>
          <table:table-cell office:value-type="string" calcext:value-type="string">
            <text:p>ITABAIANINHA</text:p>
          </table:table-cell>
          <table:table-cell office:value-type="float" office:value="0.295724168688016" calcext:value-type="float">
            <text:p>0,295724</text:p>
          </table:table-cell>
          <table:table-cell/>
          <table:table-cell office:value-type="string" calcext:value-type="string">
            <text:p>CATU</text:p>
          </table:table-cell>
          <table:table-cell office:value-type="string" calcext:value-type="string">
            <text:p>ITABAIANINHA</text:p>
          </table:table-cell>
          <table:table-cell office:value-type="float" office:value="0.505640567629256" calcext:value-type="float">
            <text:p>0,505641</text:p>
          </table:table-cell>
        </table:table-row>
        <table:table-row table:style-name="ro1">
          <table:table-cell office:value-type="string" calcext:value-type="string">
            <text:p>CAUIPE</text:p>
          </table:table-cell>
          <table:table-cell office:value-type="string" calcext:value-type="string">
            <text:p>FORTALEZA II</text:p>
          </table:table-cell>
          <table:table-cell office:value-type="float" office:value="0.49772537833419" calcext:value-type="float">
            <text:p>0,497725</text:p>
          </table:table-cell>
          <table:table-cell/>
          <table:table-cell office:value-type="string" calcext:value-type="string">
            <text:p>CAUIPE</text:p>
          </table:table-cell>
          <table:table-cell office:value-type="string" calcext:value-type="string">
            <text:p>FORTALEZA II</text:p>
          </table:table-cell>
          <table:table-cell office:value-type="float" office:value="0.743440272591764" calcext:value-type="float">
            <text:p>0,743440</text:p>
          </table:table-cell>
        </table:table-row>
        <table:table-row table:style-name="ro1">
          <table:table-cell office:value-type="string" calcext:value-type="string">
            <text:p>CAXIAS</text:p>
          </table:table-cell>
          <table:table-cell office:value-type="string" calcext:value-type="string">
            <text:p>CAXIAS SUL 5</text:p>
          </table:table-cell>
          <table:table-cell office:value-type="float" office:value="0.353442570983913" calcext:value-type="float">
            <text:p>0,353443</text:p>
          </table:table-cell>
          <table:table-cell/>
          <table:table-cell office:value-type="string" calcext:value-type="string">
            <text:p>CAXIAS</text:p>
          </table:table-cell>
          <table:table-cell office:value-type="string" calcext:value-type="string">
            <text:p>CAXIAS SUL 5</text:p>
          </table:table-cell>
          <table:table-cell office:value-type="float" office:value="0.546436307648266" calcext:value-type="float">
            <text:p>0,546436</text:p>
          </table:table-cell>
        </table:table-row>
        <table:table-row table:style-name="ro1">
          <table:table-cell office:value-type="string" calcext:value-type="string">
            <text:p>CAXIAS</text:p>
          </table:table-cell>
          <table:table-cell office:value-type="string" calcext:value-type="string">
            <text:p>GRAVATAI</text:p>
          </table:table-cell>
          <table:table-cell office:value-type="float" office:value="1.19608237388162" calcext:value-type="float">
            <text:p>1,196082</text:p>
          </table:table-cell>
          <table:table-cell/>
          <table:table-cell office:value-type="string" calcext:value-type="string">
            <text:p>CAXIAS</text:p>
          </table:table-cell>
          <table:table-cell office:value-type="string" calcext:value-type="string">
            <text:p>GRAVATAI</text:p>
          </table:table-cell>
          <table:table-cell office:value-type="float" office:value="1.55849518902003" calcext:value-type="float">
            <text:p>1,558495</text:p>
          </table:table-cell>
        </table:table-row>
        <table:table-row table:style-name="ro1">
          <table:table-cell office:value-type="string" calcext:value-type="string">
            <text:p>CAXIAS</text:p>
          </table:table-cell>
          <table:table-cell office:value-type="string" calcext:value-type="string">
            <text:p>N.PETROPOLIS2</text:p>
          </table:table-cell>
          <table:table-cell office:value-type="float" office:value="0.408388561630767" calcext:value-type="float">
            <text:p>0,408389</text:p>
          </table:table-cell>
          <table:table-cell/>
          <table:table-cell office:value-type="string" calcext:value-type="string">
            <text:p>CAXIAS</text:p>
          </table:table-cell>
          <table:table-cell office:value-type="string" calcext:value-type="string">
            <text:p>N.PETROPOLIS2</text:p>
          </table:table-cell>
          <table:table-cell office:value-type="float" office:value="0.63138500006401" calcext:value-type="float">
            <text:p>0,631385</text:p>
          </table:table-cell>
        </table:table-row>
        <table:table-row table:style-name="ro1">
          <table:table-cell office:value-type="string" calcext:value-type="string">
            <text:p>CAXIAS II</text:p>
          </table:table-cell>
          <table:table-cell office:value-type="string" calcext:value-type="string">
            <text:p>PERITORO</text:p>
          </table:table-cell>
          <table:table-cell office:value-type="float" office:value="0.315078578409083" calcext:value-type="float">
            <text:p>0,315079</text:p>
          </table:table-cell>
          <table:table-cell/>
          <table:table-cell office:value-type="string" calcext:value-type="string">
            <text:p>CAXIAS II</text:p>
          </table:table-cell>
          <table:table-cell office:value-type="string" calcext:value-type="string">
            <text:p>PERITORO</text:p>
          </table:table-cell>
          <table:table-cell office:value-type="float" office:value="0.528077337742075" calcext:value-type="float">
            <text:p>0,528077</text:p>
          </table:table-cell>
        </table:table-row>
        <table:table-row table:style-name="ro1">
          <table:table-cell office:value-type="string" calcext:value-type="string">
            <text:p>CAXIAS NORTE</text:p>
          </table:table-cell>
          <table:table-cell office:value-type="string" calcext:value-type="string">
            <text:p>CAXIAS 6</text:p>
          </table:table-cell>
          <table:table-cell office:value-type="float" office:value="0.46807220875739" calcext:value-type="float">
            <text:p>0,468072</text:p>
          </table:table-cell>
          <table:table-cell/>
          <table:table-cell office:value-type="string" calcext:value-type="string">
            <text:p>CAXIAS NORTE</text:p>
          </table:table-cell>
          <table:table-cell office:value-type="string" calcext:value-type="string">
            <text:p>CAXIAS 6</text:p>
          </table:table-cell>
          <table:table-cell office:value-type="float" office:value="0.723658298303284" calcext:value-type="float">
            <text:p>0,723658</text:p>
          </table:table-cell>
        </table:table-row>
        <table:table-row table:style-name="ro1">
          <table:table-cell office:value-type="string" calcext:value-type="string">
            <text:p>CAXIAS NORTE</text:p>
          </table:table-cell>
          <table:table-cell office:value-type="string" calcext:value-type="string">
            <text:p>CAXIAS SUL 2</text:p>
          </table:table-cell>
          <table:table-cell office:value-type="float" office:value="0.363329747986153" calcext:value-type="float">
            <text:p>0,363330</text:p>
          </table:table-cell>
          <table:table-cell/>
          <table:table-cell office:value-type="string" calcext:value-type="string">
            <text:p>CAXIAS NORTE</text:p>
          </table:table-cell>
          <table:table-cell office:value-type="string" calcext:value-type="string">
            <text:p>ITA</text:p>
          </table:table-cell>
          <table:table-cell office:value-type="float" office:value="0.691146933961914" calcext:value-type="float">
            <text:p>0,691147</text:p>
          </table:table-cell>
        </table:table-row>
        <table:table-row table:style-name="ro1">
          <table:table-cell office:value-type="string" calcext:value-type="string">
            <text:p>CAXIAS NORTE</text:p>
          </table:table-cell>
          <table:table-cell office:value-type="string" calcext:value-type="string">
            <text:p>FARROUPILHA</text:p>
          </table:table-cell>
          <table:table-cell office:value-type="float" office:value="0.361975555349102" calcext:value-type="float">
            <text:p>0,361976</text:p>
          </table:table-cell>
          <table:table-cell/>
          <table:table-cell office:value-type="string" calcext:value-type="string">
            <text:p>CAXIAS NORTE</text:p>
          </table:table-cell>
          <table:table-cell office:value-type="string" calcext:value-type="string">
            <text:p>MONTE CLARO</text:p>
          </table:table-cell>
          <table:table-cell office:value-type="float" office:value="0.729203141180868" calcext:value-type="float">
            <text:p>0,729203</text:p>
          </table:table-cell>
        </table:table-row>
        <table:table-row table:style-name="ro1">
          <table:table-cell office:value-type="string" calcext:value-type="string">
            <text:p>CAXIAS NORTE</text:p>
          </table:table-cell>
          <table:table-cell office:value-type="string" calcext:value-type="string">
            <text:p>ITA</text:p>
          </table:table-cell>
          <table:table-cell office:value-type="float" office:value="0.525368165104311" calcext:value-type="float">
            <text:p>0,525368</text:p>
          </table:table-cell>
          <table:table-cell/>
          <table:table-cell office:value-type="string" calcext:value-type="string">
            <text:p>CAXIAS NORTE</text:p>
          </table:table-cell>
          <table:table-cell office:value-type="string" calcext:value-type="string">
            <text:p>VINHEDOS</text:p>
          </table:table-cell>
          <table:table-cell office:value-type="float" office:value="0.724594083580625" calcext:value-type="float">
            <text:p>0,724594</text:p>
          </table:table-cell>
        </table:table-row>
        <table:table-row table:style-name="ro1">
          <table:table-cell office:value-type="string" calcext:value-type="string">
            <text:p>CAXIAS NORTE</text:p>
          </table:table-cell>
          <table:table-cell office:value-type="string" calcext:value-type="string">
            <text:p>MONTE CLARO</text:p>
          </table:table-cell>
          <table:table-cell office:value-type="float" office:value="0.471658689917088" calcext:value-type="float">
            <text:p>0,471659</text:p>
          </table:table-cell>
          <table:table-cell/>
          <table:table-cell office:value-type="string" calcext:value-type="string">
            <text:p>CEARA MIRIM 2</text:p>
          </table:table-cell>
          <table:table-cell office:value-type="string" calcext:value-type="string">
            <text:p>J. CAMARA III</text:p>
          </table:table-cell>
          <table:table-cell office:value-type="float" office:value="1.79096120867287" calcext:value-type="float">
            <text:p>1,790961</text:p>
          </table:table-cell>
        </table:table-row>
        <table:table-row table:style-name="ro1">
          <table:table-cell office:value-type="string" calcext:value-type="string">
            <text:p>CAXIAS NORTE</text:p>
          </table:table-cell>
          <table:table-cell office:value-type="string" calcext:value-type="string">
            <text:p>VINHEDOS</text:p>
          </table:table-cell>
          <table:table-cell office:value-type="float" office:value="0.46867748763378" calcext:value-type="float">
            <text:p>0,468677</text:p>
          </table:table-cell>
          <table:table-cell/>
          <table:table-cell office:value-type="string" calcext:value-type="string">
            <text:p>CEARA MIRIM 2</text:p>
          </table:table-cell>
          <table:table-cell office:value-type="string" calcext:value-type="string">
            <text:p>TOUROS</text:p>
          </table:table-cell>
          <table:table-cell office:value-type="float" office:value="0.880904975530932" calcext:value-type="float">
            <text:p>0,880905</text:p>
          </table:table-cell>
        </table:table-row>
        <table:table-row table:style-name="ro1">
          <table:table-cell office:value-type="string" calcext:value-type="string">
            <text:p>CEARA MIRIM 2</text:p>
          </table:table-cell>
          <table:table-cell office:value-type="string" calcext:value-type="string">
            <text:p>TOUROS</text:p>
          </table:table-cell>
          <table:table-cell office:value-type="float" office:value="0.59310965556198" calcext:value-type="float">
            <text:p>0,593110</text:p>
          </table:table-cell>
          <table:table-cell/>
          <table:table-cell office:value-type="string" calcext:value-type="string">
            <text:p>CENTRO-CTT</text:p>
          </table:table-cell>
          <table:table-cell office:value-type="string" calcext:value-type="string">
            <text:p>CENTRO-CTR</text:p>
          </table:table-cell>
          <table:table-cell office:value-type="float" office:value="0.699101236728546" calcext:value-type="float">
            <text:p>0,699101</text:p>
          </table:table-cell>
        </table:table-row>
        <table:table-row table:style-name="ro1">
          <table:table-cell office:value-type="string" calcext:value-type="string">
            <text:p>CENTRO-CTT</text:p>
          </table:table-cell>
          <table:table-cell office:value-type="string" calcext:value-type="string">
            <text:p>CENTRO-CTR</text:p>
          </table:table-cell>
          <table:table-cell office:value-type="float" office:value="0.369161338870813" calcext:value-type="float">
            <text:p>0,369161</text:p>
          </table:table-cell>
          <table:table-cell/>
          <table:table-cell office:value-type="string" calcext:value-type="string">
            <text:p>CERQUILHO III</text:p>
          </table:table-cell>
          <table:table-cell office:value-type="string" calcext:value-type="string">
            <text:p>TOYOTA</text:p>
          </table:table-cell>
          <table:table-cell office:value-type="float" office:value="0.657264570496274" calcext:value-type="float">
            <text:p>0,657265</text:p>
          </table:table-cell>
        </table:table-row>
        <table:table-row table:style-name="ro1">
          <table:table-cell office:value-type="string" calcext:value-type="string">
            <text:p>CERQUILHO III</text:p>
          </table:table-cell>
          <table:table-cell office:value-type="string" calcext:value-type="string">
            <text:p>TOYOTA</text:p>
          </table:table-cell>
          <table:table-cell office:value-type="float" office:value="0.347069431563554" calcext:value-type="float">
            <text:p>0,347069</text:p>
          </table:table-cell>
          <table:table-cell/>
          <table:table-cell office:value-type="string" calcext:value-type="string">
            <text:p>CERRO CHATO</text:p>
          </table:table-cell>
          <table:table-cell office:value-type="string" calcext:value-type="string">
            <text:p>LIVRAMENTO 3</text:p>
          </table:table-cell>
          <table:table-cell office:value-type="float" office:value="0.782840806458331" calcext:value-type="float">
            <text:p>0,782841</text:p>
          </table:table-cell>
        </table:table-row>
        <table:table-row table:style-name="ro1">
          <table:table-cell office:value-type="string" calcext:value-type="string">
            <text:p>CERRO CHATO</text:p>
          </table:table-cell>
          <table:table-cell office:value-type="string" calcext:value-type="string">
            <text:p>LIVRAMENTO 3</text:p>
          </table:table-cell>
          <table:table-cell office:value-type="float" office:value="0.426752869833064" calcext:value-type="float">
            <text:p>0,426753</text:p>
          </table:table-cell>
          <table:table-cell/>
          <table:table-cell office:value-type="string" calcext:value-type="string">
            <text:p>CHAPADA I</text:p>
          </table:table-cell>
          <table:table-cell office:value-type="string" calcext:value-type="string">
            <text:p>CURRAL PIAUI II</text:p>
          </table:table-cell>
          <table:table-cell office:value-type="float" office:value="0.536102354097016" calcext:value-type="float">
            <text:p>0,536102</text:p>
          </table:table-cell>
        </table:table-row>
        <table:table-row table:style-name="ro1">
          <table:table-cell office:value-type="string" calcext:value-type="string">
            <text:p>CHAPADA I</text:p>
          </table:table-cell>
          <table:table-cell office:value-type="string" calcext:value-type="string">
            <text:p>CURRAL PIAUI II</text:p>
          </table:table-cell>
          <table:table-cell office:value-type="float" office:value="0.374356862561298" calcext:value-type="float">
            <text:p>0,374357</text:p>
          </table:table-cell>
          <table:table-cell/>
          <table:table-cell office:value-type="string" calcext:value-type="string">
            <text:p>CHAPADA II</text:p>
          </table:table-cell>
          <table:table-cell office:value-type="string" calcext:value-type="string">
            <text:p>PICOS</text:p>
          </table:table-cell>
          <table:table-cell office:value-type="float" office:value="0.544083511009021" calcext:value-type="float">
            <text:p>0,544084</text:p>
          </table:table-cell>
        </table:table-row>
        <table:table-row table:style-name="ro1">
          <table:table-cell office:value-type="string" calcext:value-type="string">
            <text:p>CHAPADA II</text:p>
          </table:table-cell>
          <table:table-cell office:value-type="string" calcext:value-type="string">
            <text:p>PICOS</text:p>
          </table:table-cell>
          <table:table-cell office:value-type="float" office:value="0.320217541013636" calcext:value-type="float">
            <text:p>0,320218</text:p>
          </table:table-cell>
          <table:table-cell/>
          <table:table-cell office:value-type="string" calcext:value-type="string">
            <text:p>CHAPADA III</text:p>
          </table:table-cell>
          <table:table-cell office:value-type="string" calcext:value-type="string">
            <text:p>CURRAL PIAUI II</text:p>
          </table:table-cell>
          <table:table-cell office:value-type="float" office:value="0.542696531078787" calcext:value-type="float">
            <text:p>0,542697</text:p>
          </table:table-cell>
        </table:table-row>
        <table:table-row table:style-name="ro1">
          <table:table-cell office:value-type="string" calcext:value-type="string">
            <text:p>CHAPADA III</text:p>
          </table:table-cell>
          <table:table-cell office:value-type="string" calcext:value-type="string">
            <text:p>CURRAL PIAUI II</text:p>
          </table:table-cell>
          <table:table-cell office:value-type="float" office:value="0.378961534387871" calcext:value-type="float">
            <text:p>0,378962</text:p>
          </table:table-cell>
          <table:table-cell/>
          <table:table-cell office:value-type="string" calcext:value-type="string">
            <text:p>CHAPADAO</text:p>
          </table:table-cell>
          <table:table-cell office:value-type="string" calcext:value-type="string">
            <text:p>INOCENCIA</text:p>
          </table:table-cell>
          <table:table-cell office:value-type="float" office:value="0.98915429173592" calcext:value-type="float">
            <text:p>0,989154</text:p>
          </table:table-cell>
        </table:table-row>
        <table:table-row table:style-name="ro1">
          <table:table-cell office:value-type="string" calcext:value-type="string">
            <text:p>CHAPADAO</text:p>
          </table:table-cell>
          <table:table-cell office:value-type="string" calcext:value-type="string">
            <text:p>INOCENCIA</text:p>
          </table:table-cell>
          <table:table-cell office:value-type="float" office:value="0.553950199168029" calcext:value-type="float">
            <text:p>0,553950</text:p>
          </table:table-cell>
          <table:table-cell/>
          <table:table-cell office:value-type="string" calcext:value-type="string">
            <text:p>CHAPADINHA II</text:p>
          </table:table-cell>
          <table:table-cell office:value-type="string" calcext:value-type="string">
            <text:p>COELHO NETO</text:p>
          </table:table-cell>
          <table:table-cell office:value-type="float" office:value="0.562872693364421" calcext:value-type="float">
            <text:p>0,562873</text:p>
          </table:table-cell>
        </table:table-row>
        <table:table-row table:style-name="ro1">
          <table:table-cell office:value-type="string" calcext:value-type="string">
            <text:p>CHAPADINHA II</text:p>
          </table:table-cell>
          <table:table-cell office:value-type="string" calcext:value-type="string">
            <text:p>COELHO NETO</text:p>
          </table:table-cell>
          <table:table-cell office:value-type="float" office:value="0.335839308705905" calcext:value-type="float">
            <text:p>0,335839</text:p>
          </table:table-cell>
          <table:table-cell/>
          <table:table-cell office:value-type="string" calcext:value-type="string">
            <text:p>CHAPADINHA II</text:p>
          </table:table-cell>
          <table:table-cell office:value-type="string" calcext:value-type="string">
            <text:p>MIRANDA II</text:p>
          </table:table-cell>
          <table:table-cell office:value-type="float" office:value="0.625117157464976" calcext:value-type="float">
            <text:p>0,625117</text:p>
          </table:table-cell>
        </table:table-row>
        <table:table-row table:style-name="ro1">
          <table:table-cell office:value-type="string" calcext:value-type="string">
            <text:p>CHAPADINHA II</text:p>
          </table:table-cell>
          <table:table-cell office:value-type="string" calcext:value-type="string">
            <text:p>MIRANDA II</text:p>
          </table:table-cell>
          <table:table-cell office:value-type="float" office:value="0.442525687940972" calcext:value-type="float">
            <text:p>0,442526</text:p>
          </table:table-cell>
          <table:table-cell/>
          <table:table-cell office:value-type="string" calcext:value-type="string">
            <text:p>CHARQUEADAS3</text:p>
          </table:table-cell>
          <table:table-cell office:value-type="string" calcext:value-type="string">
            <text:p>CHARQUEADAS</text:p>
          </table:table-cell>
          <table:table-cell office:value-type="float" office:value="0.552348488317951" calcext:value-type="float">
            <text:p>0,552348</text:p>
          </table:table-cell>
        </table:table-row>
        <table:table-row table:style-name="ro1">
          <table:table-cell office:value-type="string" calcext:value-type="string">
            <text:p>CHARQUEADAS3</text:p>
          </table:table-cell>
          <table:table-cell office:value-type="string" calcext:value-type="string">
            <text:p>CHARQUEADAS</text:p>
          </table:table-cell>
          <table:table-cell office:value-type="float" office:value="0.30110375007666" calcext:value-type="float">
            <text:p>0,301104</text:p>
          </table:table-cell>
          <table:table-cell/>
          <table:table-cell office:value-type="string" calcext:value-type="string">
            <text:p>CHARQUEADAS3</text:p>
          </table:table-cell>
          <table:table-cell office:value-type="string" calcext:value-type="string">
            <text:p>GUAIBA 3</text:p>
          </table:table-cell>
          <table:table-cell office:value-type="float" office:value="0.928185832408135" calcext:value-type="float">
            <text:p>0,928186</text:p>
          </table:table-cell>
        </table:table-row>
        <table:table-row table:style-name="ro1">
          <table:table-cell office:value-type="string" calcext:value-type="string">
            <text:p>CHARQUEADAS3</text:p>
          </table:table-cell>
          <table:table-cell office:value-type="string" calcext:value-type="string">
            <text:p>GUAIBA 3</text:p>
          </table:table-cell>
          <table:table-cell office:value-type="float" office:value="0.600363450168732" calcext:value-type="float">
            <text:p>0,600363</text:p>
          </table:table-cell>
          <table:table-cell/>
          <table:table-cell office:value-type="string" calcext:value-type="string">
            <text:p>CHAVANTES</text:p>
          </table:table-cell>
          <table:table-cell office:value-type="string" calcext:value-type="string">
            <text:p>PIRAJU</text:p>
          </table:table-cell>
          <table:table-cell office:value-type="float" office:value="0.626918387808545" calcext:value-type="float">
            <text:p>0,626918</text:p>
          </table:table-cell>
        </table:table-row>
        <table:table-row table:style-name="ro1">
          <table:table-cell office:value-type="string" calcext:value-type="string">
            <text:p>CHAVANTES</text:p>
          </table:table-cell>
          <table:table-cell office:value-type="string" calcext:value-type="string">
            <text:p>PIRAJU</text:p>
          </table:table-cell>
          <table:table-cell office:value-type="float" office:value="0.331045089390963" calcext:value-type="float">
            <text:p>0,331045</text:p>
          </table:table-cell>
          <table:table-cell/>
          <table:table-cell office:value-type="string" calcext:value-type="string">
            <text:p>CHAVANTES</text:p>
          </table:table-cell>
          <table:table-cell office:value-type="string" calcext:value-type="string">
            <text:p>SALTO GRANDE SP</text:p>
          </table:table-cell>
          <table:table-cell office:value-type="float" office:value="0.62410823659096" calcext:value-type="float">
            <text:p>0,624108</text:p>
          </table:table-cell>
        </table:table-row>
        <table:table-row table:style-name="ro1">
          <table:table-cell office:value-type="string" calcext:value-type="string">
            <text:p>CHAVANTES</text:p>
          </table:table-cell>
          <table:table-cell office:value-type="string" calcext:value-type="string">
            <text:p>SALTO GRANDE SP</text:p>
          </table:table-cell>
          <table:table-cell office:value-type="float" office:value="0.329561185298949" calcext:value-type="float">
            <text:p>0,329561</text:p>
          </table:table-cell>
          <table:table-cell/>
          <table:table-cell office:value-type="string" calcext:value-type="string">
            <text:p>CICERO DANTAS</text:p>
          </table:table-cell>
          <table:table-cell office:value-type="string" calcext:value-type="string">
            <text:p>P.AFONSO III</text:p>
          </table:table-cell>
          <table:table-cell office:value-type="float" office:value="0.55552336752791" calcext:value-type="float">
            <text:p>0,555523</text:p>
          </table:table-cell>
        </table:table-row>
        <table:table-row table:style-name="ro1">
          <table:table-cell office:value-type="string" calcext:value-type="string">
            <text:p>CICERO DANTAS</text:p>
          </table:table-cell>
          <table:table-cell office:value-type="string" calcext:value-type="string">
            <text:p>P.AFONSO III</text:p>
          </table:table-cell>
          <table:table-cell office:value-type="float" office:value="0.326632719803857" calcext:value-type="float">
            <text:p>0,326633</text:p>
          </table:table-cell>
          <table:table-cell/>
          <table:table-cell office:value-type="string" calcext:value-type="string">
            <text:p>CLAUDIA</text:p>
          </table:table-cell>
          <table:table-cell office:value-type="string" calcext:value-type="string">
            <text:p>PARANAITA</text:p>
          </table:table-cell>
          <table:table-cell office:value-type="float" office:value="1.87751502608183" calcext:value-type="float">
            <text:p>1,877515</text:p>
          </table:table-cell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PARANAITA</text:p>
          </table:table-cell>
          <table:table-cell office:value-type="float" office:value="1.48859632731712" calcext:value-type="float">
            <text:p>1,488596</text:p>
          </table:table-cell>
          <table:table-cell/>
          <table:table-cell office:value-type="string" calcext:value-type="string">
            <text:p>CLAUDIA</text:p>
          </table:table-cell>
          <table:table-cell office:value-type="string" calcext:value-type="string">
            <text:p>PARANATINGA</text:p>
          </table:table-cell>
          <table:table-cell office:value-type="float" office:value="1.90163837467064" calcext:value-type="float">
            <text:p>1,901638</text:p>
          </table:table-cell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PARANATINGA</text:p>
          </table:table-cell>
          <table:table-cell office:value-type="float" office:value="1.5077226339581" calcext:value-type="float">
            <text:p>1,507723</text:p>
          </table:table-cell>
          <table:table-cell/>
          <table:table-cell office:value-type="string" calcext:value-type="string">
            <text:p>COLINAS</text:p>
          </table:table-cell>
          <table:table-cell office:value-type="string" calcext:value-type="string">
            <text:p>MIRACEMA</text:p>
          </table:table-cell>
          <table:table-cell office:value-type="float" office:value="1.76241770629519" calcext:value-type="float">
            <text:p>1,762418</text:p>
          </table:table-cell>
        </table:table-row>
        <table:table-row table:style-name="ro1">
          <table:table-cell office:value-type="string" calcext:value-type="string">
            <text:p>COLINAS</text:p>
          </table:table-cell>
          <table:table-cell office:value-type="string" calcext:value-type="string">
            <text:p>MIRACEMA</text:p>
          </table:table-cell>
          <table:table-cell office:value-type="float" office:value="1.40394348319854" calcext:value-type="float">
            <text:p>1,403943</text:p>
          </table:table-cell>
          <table:table-cell/>
          <table:table-cell office:value-type="string" calcext:value-type="string">
            <text:p>COMPERJ</text:p>
          </table:table-cell>
          <table:table-cell office:value-type="string" calcext:value-type="string">
            <text:p>LAGOS</text:p>
          </table:table-cell>
          <table:table-cell office:value-type="float" office:value="1.00640050613993" calcext:value-type="float">
            <text:p>1,006401</text:p>
          </table:table-cell>
        </table:table-row>
        <table:table-row table:style-name="ro1">
          <table:table-cell office:value-type="string" calcext:value-type="string">
            <text:p>COMPERJ</text:p>
          </table:table-cell>
          <table:table-cell office:value-type="string" calcext:value-type="string">
            <text:p>LAGOS</text:p>
          </table:table-cell>
          <table:table-cell office:value-type="float" office:value="0.709441065838659" calcext:value-type="float">
            <text:p>0,709441</text:p>
          </table:table-cell>
          <table:table-cell/>
          <table:table-cell office:value-type="string" calcext:value-type="string">
            <text:p>COTEGIPE</text:p>
          </table:table-cell>
          <table:table-cell office:value-type="string" calcext:value-type="string">
            <text:p>JACARACANGA</text:p>
          </table:table-cell>
          <table:table-cell office:value-type="float" office:value="0.606752456277909" calcext:value-type="float">
            <text:p>0,606752</text:p>
          </table:table-cell>
        </table:table-row>
        <table:table-row table:style-name="ro1">
          <table:table-cell office:value-type="string" calcext:value-type="string">
            <text:p>COXIPO</text:p>
          </table:table-cell>
          <table:table-cell office:value-type="string" calcext:value-type="string">
            <text:p>SE CUIABA</text:p>
          </table:table-cell>
          <table:table-cell office:value-type="float" office:value="0.499206948779971" calcext:value-type="float">
            <text:p>0,499207</text:p>
          </table:table-cell>
          <table:table-cell/>
          <table:table-cell office:value-type="string" calcext:value-type="string">
            <text:p>COTEGIPE</text:p>
          </table:table-cell>
          <table:table-cell office:value-type="string" calcext:value-type="string">
            <text:p>MATATU</text:p>
          </table:table-cell>
          <table:table-cell office:value-type="float" office:value="0.514175123803155" calcext:value-type="float">
            <text:p>0,514175</text:p>
          </table:table-cell>
        </table:table-row>
        <table:table-row table:style-name="ro1">
          <table:table-cell office:value-type="string" calcext:value-type="string">
            <text:p>CRATO II</text:p>
          </table:table-cell>
          <table:table-cell office:value-type="string" calcext:value-type="string">
            <text:p>MILAGRES</text:p>
          </table:table-cell>
          <table:table-cell office:value-type="float" office:value="0.378435150146109" calcext:value-type="float">
            <text:p>0,378435</text:p>
          </table:table-cell>
          <table:table-cell/>
          <table:table-cell office:value-type="string" calcext:value-type="string">
            <text:p>COXIPO</text:p>
          </table:table-cell>
          <table:table-cell office:value-type="string" calcext:value-type="string">
            <text:p>VARZ.GRANDE 2</text:p>
          </table:table-cell>
          <table:table-cell office:value-type="float" office:value="0.755461616030523" calcext:value-type="float">
            <text:p>0,755462</text:p>
          </table:table-cell>
        </table:table-row>
        <table:table-row table:style-name="ro1">
          <table:table-cell office:value-type="string" calcext:value-type="string">
            <text:p>CRATO II</text:p>
          </table:table-cell>
          <table:table-cell office:value-type="string" calcext:value-type="string">
            <text:p>TAUA II</text:p>
          </table:table-cell>
          <table:table-cell office:value-type="float" office:value="0.379487766916123" calcext:value-type="float">
            <text:p>0,379488</text:p>
          </table:table-cell>
          <table:table-cell/>
          <table:table-cell office:value-type="string" calcext:value-type="string">
            <text:p>CRATO II</text:p>
          </table:table-cell>
          <table:table-cell office:value-type="string" calcext:value-type="string">
            <text:p>TAUA II</text:p>
          </table:table-cell>
          <table:table-cell office:value-type="float" office:value="0.672545950467585" calcext:value-type="float">
            <text:p>0,672546</text:p>
          </table:table-cell>
        </table:table-row>
        <table:table-row table:style-name="ro1">
          <table:table-cell office:value-type="string" calcext:value-type="string">
            <text:p>CRISTIANO ROCHA</text:p>
          </table:table-cell>
          <table:table-cell office:value-type="string" calcext:value-type="string">
            <text:p>LECHUGA</text:p>
          </table:table-cell>
          <table:table-cell office:value-type="float" office:value="0.558131492300613" calcext:value-type="float">
            <text:p>0,558131</text:p>
          </table:table-cell>
          <table:table-cell/>
          <table:table-cell office:value-type="string" calcext:value-type="string">
            <text:p>CRISTIANO ROCHA</text:p>
          </table:table-cell>
          <table:table-cell office:value-type="string" calcext:value-type="string">
            <text:p>LECHUGA</text:p>
          </table:table-cell>
          <table:table-cell office:value-type="float" office:value="0.807058854379863" calcext:value-type="float">
            <text:p>0,807059</text:p>
          </table:table-cell>
        </table:table-row>
        <table:table-row table:style-name="ro1">
          <table:table-cell office:value-type="string" calcext:value-type="string">
            <text:p>CRISTIANO ROCHA</text:p>
          </table:table-cell>
          <table:table-cell office:value-type="string" calcext:value-type="string">
            <text:p>PR.FIGUEIREDO</text:p>
          </table:table-cell>
          <table:table-cell office:value-type="float" office:value="0.428730729995359" calcext:value-type="float">
            <text:p>0,428731</text:p>
          </table:table-cell>
          <table:table-cell/>
          <table:table-cell office:value-type="string" calcext:value-type="string">
            <text:p>CRISTIANO ROCHA</text:p>
          </table:table-cell>
          <table:table-cell office:value-type="string" calcext:value-type="string">
            <text:p>PR.FIGUEIREDO</text:p>
          </table:table-cell>
          <table:table-cell office:value-type="float" office:value="0.73555284653543" calcext:value-type="float">
            <text:p>0,735553</text:p>
          </table:table-cell>
        </table:table-row>
        <table:table-row table:style-name="ro1">
          <table:table-cell office:value-type="string" calcext:value-type="string">
            <text:p>CRUZ ALTA 2</text:p>
          </table:table-cell>
          <table:table-cell office:value-type="string" calcext:value-type="string">
            <text:p>IJUI 2</text:p>
          </table:table-cell>
          <table:table-cell office:value-type="float" office:value="0.326467438198649" calcext:value-type="float">
            <text:p>0,326467</text:p>
          </table:table-cell>
          <table:table-cell/>
          <table:table-cell office:value-type="string" calcext:value-type="string">
            <text:p>CRUZ ALTA 2</text:p>
          </table:table-cell>
          <table:table-cell office:value-type="string" calcext:value-type="string">
            <text:p>IJUI 2</text:p>
          </table:table-cell>
          <table:table-cell office:value-type="float" office:value="0.598875955308254" calcext:value-type="float">
            <text:p>0,598876</text:p>
          </table:table-cell>
        </table:table-row>
        <table:table-row table:style-name="ro1">
          <table:table-cell office:value-type="string" calcext:value-type="string">
            <text:p>CRUZ ALTA 2</text:p>
          </table:table-cell>
          <table:table-cell office:value-type="string" calcext:value-type="string">
            <text:p>PASSO REAL</text:p>
          </table:table-cell>
          <table:table-cell office:value-type="float" office:value="0.334677723281687" calcext:value-type="float">
            <text:p>0,334678</text:p>
          </table:table-cell>
          <table:table-cell/>
          <table:table-cell office:value-type="string" calcext:value-type="string">
            <text:p>CRUZ ALTA 2</text:p>
          </table:table-cell>
          <table:table-cell office:value-type="string" calcext:value-type="string">
            <text:p>PASSO REAL</text:p>
          </table:table-cell>
          <table:table-cell office:value-type="float" office:value="0.613937005039853" calcext:value-type="float">
            <text:p>0,613937</text:p>
          </table:table-cell>
        </table:table-row>
        <table:table-row table:style-name="ro1">
          <table:table-cell office:value-type="string" calcext:value-type="string">
            <text:p>CRUZEIRO SUL</text:p>
          </table:table-cell>
          <table:table-cell office:value-type="string" calcext:value-type="string">
            <text:p>FEIJO</text:p>
          </table:table-cell>
          <table:table-cell office:value-type="float" office:value="0.432426226227589" calcext:value-type="float">
            <text:p>0,432426</text:p>
          </table:table-cell>
          <table:table-cell/>
          <table:table-cell office:value-type="string" calcext:value-type="string">
            <text:p>CRUZEIRO SUL</text:p>
          </table:table-cell>
          <table:table-cell office:value-type="string" calcext:value-type="string">
            <text:p>FEIJO</text:p>
          </table:table-cell>
          <table:table-cell office:value-type="float" office:value="0.749067723105134" calcext:value-type="float">
            <text:p>0,749068</text:p>
          </table:table-cell>
        </table:table-row>
        <table:table-row table:style-name="ro1">
          <table:table-cell office:value-type="string" calcext:value-type="string">
            <text:p>CURIT. CENTRO</text:p>
          </table:table-cell>
          <table:table-cell office:value-type="string" calcext:value-type="string">
            <text:p>UBERABA</text:p>
          </table:table-cell>
          <table:table-cell office:value-type="float" office:value="0.333417251796366" calcext:value-type="float">
            <text:p>0,333417</text:p>
          </table:table-cell>
          <table:table-cell/>
          <table:table-cell office:value-type="string" calcext:value-type="string">
            <text:p>CURIT. CENTRO</text:p>
          </table:table-cell>
          <table:table-cell office:value-type="string" calcext:value-type="string">
            <text:p>UBERABA</text:p>
          </table:table-cell>
          <table:table-cell office:value-type="float" office:value="0.610499363844723" calcext:value-type="float">
            <text:p>0,610499</text:p>
          </table:table-cell>
        </table:table-row>
        <table:table-row table:style-name="ro1">
          <table:table-cell office:value-type="string" calcext:value-type="string">
            <text:p>CURIT.LESTE</text:p>
          </table:table-cell>
          <table:table-cell office:value-type="string" calcext:value-type="string">
            <text:p>D.S.J.PINHAIS</text:p>
          </table:table-cell>
          <table:table-cell office:value-type="float" office:value="0.381586041470854" calcext:value-type="float">
            <text:p>0,381586</text:p>
          </table:table-cell>
          <table:table-cell/>
          <table:table-cell office:value-type="string" calcext:value-type="string">
            <text:p>CURIT.LESTE</text:p>
          </table:table-cell>
          <table:table-cell office:value-type="string" calcext:value-type="string">
            <text:p>D.S.J.PINHAIS</text:p>
          </table:table-cell>
          <table:table-cell office:value-type="float" office:value="0.588862341169151" calcext:value-type="float">
            <text:p>0,588862</text:p>
          </table:table-cell>
        </table:table-row>
        <table:table-row table:style-name="ro1">
          <table:table-cell office:value-type="string" calcext:value-type="string">
            <text:p>CURIT.LESTE</text:p>
          </table:table-cell>
          <table:table-cell office:value-type="string" calcext:value-type="string">
            <text:p>POSTO FISCAL</text:p>
          </table:table-cell>
          <table:table-cell office:value-type="float" office:value="0.31008140276968" calcext:value-type="float">
            <text:p>0,310081</text:p>
          </table:table-cell>
          <table:table-cell/>
          <table:table-cell office:value-type="string" calcext:value-type="string">
            <text:p>CURIT.LESTE</text:p>
          </table:table-cell>
          <table:table-cell office:value-type="string" calcext:value-type="string">
            <text:p>POSTO FISCAL</text:p>
          </table:table-cell>
          <table:table-cell office:value-type="float" office:value="0.478516614717194" calcext:value-type="float">
            <text:p>0,478517</text:p>
          </table:table-cell>
        </table:table-row>
        <table:table-row table:style-name="ro1">
          <table:table-cell office:value-type="string" calcext:value-type="string">
            <text:p>CURIT.LESTE</text:p>
          </table:table-cell>
          <table:table-cell office:value-type="string" calcext:value-type="string">
            <text:p>SANTA MONICA</text:p>
          </table:table-cell>
          <table:table-cell office:value-type="float" office:value="0.392333345952418" calcext:value-type="float">
            <text:p>0,392333</text:p>
          </table:table-cell>
          <table:table-cell/>
          <table:table-cell office:value-type="string" calcext:value-type="string">
            <text:p>CURIT.LESTE</text:p>
          </table:table-cell>
          <table:table-cell office:value-type="string" calcext:value-type="string">
            <text:p>SANTA MONICA</text:p>
          </table:table-cell>
          <table:table-cell office:value-type="float" office:value="0.605447546576239" calcext:value-type="float">
            <text:p>0,605448</text:p>
          </table:table-cell>
        </table:table-row>
        <table:table-row table:style-name="ro1">
          <table:table-cell office:value-type="string" calcext:value-type="string">
            <text:p>CURIT.LESTE</text:p>
          </table:table-cell>
          <table:table-cell office:value-type="string" calcext:value-type="string">
            <text:p>UBERABA</text:p>
          </table:table-cell>
          <table:table-cell office:value-type="float" office:value="0.36966386907896" calcext:value-type="float">
            <text:p>0,369664</text:p>
          </table:table-cell>
          <table:table-cell/>
          <table:table-cell office:value-type="string" calcext:value-type="string">
            <text:p>CURIT.LESTE</text:p>
          </table:table-cell>
          <table:table-cell office:value-type="string" calcext:value-type="string">
            <text:p>UBERABA</text:p>
          </table:table-cell>
          <table:table-cell office:value-type="float" office:value="0.570464083414618" calcext:value-type="float">
            <text:p>0,570464</text:p>
          </table:table-cell>
        </table:table-row>
        <table:table-row table:style-name="ro1">
          <table:table-cell office:value-type="string" calcext:value-type="string">
            <text:p>CURITIBA</text:p>
          </table:table-cell>
          <table:table-cell office:value-type="string" calcext:value-type="string">
            <text:p>UMBARA</text:p>
          </table:table-cell>
          <table:table-cell office:value-type="float" office:value="0.784930745250458" calcext:value-type="float">
            <text:p>0,784931</text:p>
          </table:table-cell>
          <table:table-cell/>
          <table:table-cell office:value-type="string" calcext:value-type="string">
            <text:p>CURITIBA</text:p>
          </table:table-cell>
          <table:table-cell office:value-type="string" calcext:value-type="string">
            <text:p>UMBARA</text:p>
          </table:table-cell>
          <table:table-cell office:value-type="float" office:value="1.21130257941874" calcext:value-type="float">
            <text:p>1,211303</text:p>
          </table:table-cell>
        </table:table-row>
        <table:table-row table:style-name="ro1">
          <table:table-cell office:value-type="string" calcext:value-type="string">
            <text:p>CURR NOVOS II</text:p>
          </table:table-cell>
          <table:table-cell office:value-type="string" calcext:value-type="string">
            <text:p>LAGOA NOVA II</text:p>
          </table:table-cell>
          <table:table-cell office:value-type="float" office:value="0.297184871453582" calcext:value-type="float">
            <text:p>0,297185</text:p>
          </table:table-cell>
          <table:table-cell/>
          <table:table-cell office:value-type="string" calcext:value-type="string">
            <text:p>CURR NOVOS II</text:p>
          </table:table-cell>
          <table:table-cell office:value-type="string" calcext:value-type="string">
            <text:p>LAGOA NOVA II</text:p>
          </table:table-cell>
          <table:table-cell office:value-type="float" office:value="0.523705734874988" calcext:value-type="float">
            <text:p>0,523706</text:p>
          </table:table-cell>
        </table:table-row>
        <table:table-row table:style-name="ro1">
          <table:table-cell office:value-type="string" calcext:value-type="string">
            <text:p>CURRAL PIAUI II</text:p>
          </table:table-cell>
          <table:table-cell office:value-type="string" calcext:value-type="string">
            <text:p>QUEIMADA NOVA 2</text:p>
          </table:table-cell>
          <table:table-cell office:value-type="float" office:value="1.41171032493276" calcext:value-type="float">
            <text:p>1,411710</text:p>
          </table:table-cell>
          <table:table-cell/>
          <table:table-cell office:value-type="string" calcext:value-type="string">
            <text:p>CURRAL PIAUI II</text:p>
          </table:table-cell>
          <table:table-cell office:value-type="string" calcext:value-type="string">
            <text:p>QUEIMADA NOVA 2</text:p>
          </table:table-cell>
          <table:table-cell office:value-type="float" office:value="1.70391911797244" calcext:value-type="float">
            <text:p>1,703919</text:p>
          </table:table-cell>
        </table:table-row>
        <table:table-row table:style-name="ro1">
          <table:table-cell office:value-type="string" calcext:value-type="string">
            <text:p>D.S.J.PINHAIS</text:p>
          </table:table-cell>
          <table:table-cell office:value-type="string" calcext:value-type="string">
            <text:p>REPAR</text:p>
          </table:table-cell>
          <table:table-cell office:value-type="float" office:value="0.310307913085953" calcext:value-type="float">
            <text:p>0,310308</text:p>
          </table:table-cell>
          <table:table-cell/>
          <table:table-cell office:value-type="string" calcext:value-type="string">
            <text:p>D.S.J.PINHAIS</text:p>
          </table:table-cell>
          <table:table-cell office:value-type="string" calcext:value-type="string">
            <text:p>REPAR</text:p>
          </table:table-cell>
          <table:table-cell office:value-type="float" office:value="0.568185306891857" calcext:value-type="float">
            <text:p>0,568185</text:p>
          </table:table-cell>
        </table:table-row>
        <table:table-row table:style-name="ro1">
          <table:table-cell office:value-type="string" calcext:value-type="string">
            <text:p>DARDANELOS</text:p>
          </table:table-cell>
          <table:table-cell office:value-type="string" calcext:value-type="string">
            <text:p>JUINA</text:p>
          </table:table-cell>
          <table:table-cell office:value-type="float" office:value="0.196176762862944" calcext:value-type="float">
            <text:p>0,196177</text:p>
          </table:table-cell>
          <table:table-cell/>
          <table:table-cell office:value-type="string" calcext:value-type="string">
            <text:p>DARDANELOS</text:p>
          </table:table-cell>
          <table:table-cell office:value-type="string" calcext:value-type="string">
            <text:p>JUINA</text:p>
          </table:table-cell>
          <table:table-cell office:value-type="float" office:value="0.348329851787543" calcext:value-type="float">
            <text:p>0,348330</text:p>
          </table:table-cell>
        </table:table-row>
        <table:table-row table:style-name="ro1">
          <table:table-cell office:value-type="string" calcext:value-type="string">
            <text:p>DELM. GOUVEIA</text:p>
          </table:table-cell>
          <table:table-cell office:value-type="string" calcext:value-type="string">
            <text:p>FORTALEZA II</text:p>
          </table:table-cell>
          <table:table-cell office:value-type="float" office:value="0.305290663445901" calcext:value-type="float">
            <text:p>0,305291</text:p>
          </table:table-cell>
          <table:table-cell/>
          <table:table-cell office:value-type="string" calcext:value-type="string">
            <text:p>DELM. GOUVEIA</text:p>
          </table:table-cell>
          <table:table-cell office:value-type="string" calcext:value-type="string">
            <text:p>FORTALEZA II</text:p>
          </table:table-cell>
          <table:table-cell office:value-type="float" office:value="0.456005226841273" calcext:value-type="float">
            <text:p>0,456005</text:p>
          </table:table-cell>
        </table:table-row>
        <table:table-row table:style-name="ro1">
          <table:table-cell office:value-type="string" calcext:value-type="string">
            <text:p>DIANOPOLIS II</text:p>
          </table:table-cell>
          <table:table-cell office:value-type="string" calcext:value-type="string">
            <text:p>GURUPI</text:p>
          </table:table-cell>
          <table:table-cell office:value-type="float" office:value="0.640941542297227" calcext:value-type="float">
            <text:p>0,640942</text:p>
          </table:table-cell>
          <table:table-cell/>
          <table:table-cell office:value-type="string" calcext:value-type="string">
            <text:p>DIANOPOLIS II</text:p>
          </table:table-cell>
          <table:table-cell office:value-type="string" calcext:value-type="string">
            <text:p>GURUPI</text:p>
          </table:table-cell>
          <table:table-cell office:value-type="float" office:value="0.954651512377739" calcext:value-type="float">
            <text:p>0,954652</text:p>
          </table:table-cell>
        </table:table-row>
        <table:table-row table:style-name="ro1">
          <table:table-cell office:value-type="string" calcext:value-type="string">
            <text:p>DIANOPOLIS II</text:p>
          </table:table-cell>
          <table:table-cell office:value-type="string" calcext:value-type="string">
            <text:p>PALMAS</text:p>
          </table:table-cell>
          <table:table-cell office:value-type="float" office:value="0.519517377523753" calcext:value-type="float">
            <text:p>0,519517</text:p>
          </table:table-cell>
          <table:table-cell/>
          <table:table-cell office:value-type="string" calcext:value-type="string">
            <text:p>DIANOPOLIS II</text:p>
          </table:table-cell>
          <table:table-cell office:value-type="string" calcext:value-type="string">
            <text:p>PALMAS</text:p>
          </table:table-cell>
          <table:table-cell office:value-type="float" office:value="0.918107942871236" calcext:value-type="float">
            <text:p>0,918108</text:p>
          </table:table-cell>
        </table:table-row>
        <table:table-row table:style-name="ro1">
          <table:table-cell office:value-type="string" calcext:value-type="string">
            <text:p>DOME.RANGONI</text:p>
          </table:table-cell>
          <table:table-cell office:value-type="string" calcext:value-type="string">
            <text:p>TIJUCO PRETO</text:p>
          </table:table-cell>
          <table:table-cell office:value-type="float" office:value="0.840125286745049" calcext:value-type="float">
            <text:p>0,840125</text:p>
          </table:table-cell>
          <table:table-cell/>
          <table:table-cell office:value-type="string" calcext:value-type="string">
            <text:p>DOME.RANGONI</text:p>
          </table:table-cell>
          <table:table-cell office:value-type="string" calcext:value-type="string">
            <text:p>TIJUCO PRETO</text:p>
          </table:table-cell>
          <table:table-cell office:value-type="float" office:value="1.08310898774512" calcext:value-type="float">
            <text:p>1,083109</text:p>
          </table:table-cell>
        </table:table-row>
        <table:table-row table:style-name="ro1">
          <table:table-cell office:value-type="string" calcext:value-type="string">
            <text:p>DOURADOS</text:p>
          </table:table-cell>
          <table:table-cell office:value-type="string" calcext:value-type="string">
            <text:p>DOURADOS 2</text:p>
          </table:table-cell>
          <table:table-cell office:value-type="float" office:value="0.504126068595943" calcext:value-type="float">
            <text:p>0,504126</text:p>
          </table:table-cell>
          <table:table-cell/>
          <table:table-cell office:value-type="string" calcext:value-type="string">
            <text:p>DOURADOS</text:p>
          </table:table-cell>
          <table:table-cell office:value-type="string" calcext:value-type="string">
            <text:p>DOURADOS 2</text:p>
          </table:table-cell>
          <table:table-cell office:value-type="float" office:value="0.90018645191673" calcext:value-type="float">
            <text:p>0,900186</text:p>
          </table:table-cell>
        </table:table-row>
        <table:table-row table:style-name="ro1">
          <table:table-cell office:value-type="string" calcext:value-type="string">
            <text:p>DOURADOS 2</text:p>
          </table:table-cell>
          <table:table-cell office:value-type="string" calcext:value-type="string">
            <text:p>RIO BRILHANTE</text:p>
          </table:table-cell>
          <table:table-cell office:value-type="float" office:value="0.532157907176362" calcext:value-type="float">
            <text:p>0,532158</text:p>
          </table:table-cell>
          <table:table-cell/>
          <table:table-cell office:value-type="string" calcext:value-type="string">
            <text:p>DOURADOS 2</text:p>
          </table:table-cell>
          <table:table-cell office:value-type="string" calcext:value-type="string">
            <text:p>RIO BRILHANTE</text:p>
          </table:table-cell>
          <table:table-cell office:value-type="float" office:value="0.950241156254256" calcext:value-type="float">
            <text:p>0,950241</text:p>
          </table:table-cell>
        </table:table-row>
        <table:table-row table:style-name="ro1">
          <table:table-cell office:value-type="string" calcext:value-type="string">
            <text:p>EDEIA</text:p>
          </table:table-cell>
          <table:table-cell office:value-type="string" calcext:value-type="string">
            <text:p>PALMEIRAS</text:p>
          </table:table-cell>
          <table:table-cell office:value-type="float" office:value="0.329894290956682" calcext:value-type="float">
            <text:p>0,329894</text:p>
          </table:table-cell>
          <table:table-cell/>
          <table:table-cell office:value-type="string" calcext:value-type="string">
            <text:p>EDEIA</text:p>
          </table:table-cell>
          <table:table-cell office:value-type="string" calcext:value-type="string">
            <text:p>PALMEIRAS</text:p>
          </table:table-cell>
          <table:table-cell office:value-type="float" office:value="0.586309577422932" calcext:value-type="float">
            <text:p>0,586310</text:p>
          </table:table-cell>
        </table:table-row>
        <table:table-row table:style-name="ro1">
          <table:table-cell office:value-type="string" calcext:value-type="string">
            <text:p>EDGARD SOUZA</text:p>
          </table:table-cell>
          <table:table-cell office:value-type="string" calcext:value-type="string">
            <text:p>PIRITUBA</text:p>
          </table:table-cell>
          <table:table-cell office:value-type="float" office:value="0.4356303803424" calcext:value-type="float">
            <text:p>0,435630</text:p>
          </table:table-cell>
          <table:table-cell/>
          <table:table-cell office:value-type="string" calcext:value-type="string">
            <text:p>EDGARD SOUZA</text:p>
          </table:table-cell>
          <table:table-cell office:value-type="string" calcext:value-type="string">
            <text:p>PIRITUBA</text:p>
          </table:table-cell>
          <table:table-cell office:value-type="float" office:value="0.824977335344627" calcext:value-type="float">
            <text:p>0,824977</text:p>
          </table:table-cell>
        </table:table-row>
        <table:table-row table:style-name="ro1">
          <table:table-cell office:value-type="string" calcext:value-type="string">
            <text:p>EDGARD SOUZA</text:p>
          </table:table-cell>
          <table:table-cell office:value-type="string" calcext:value-type="string">
            <text:p>TOYOTA</text:p>
          </table:table-cell>
          <table:table-cell office:value-type="float" office:value="0.343595736756232" calcext:value-type="float">
            <text:p>0,343596</text:p>
          </table:table-cell>
          <table:table-cell/>
          <table:table-cell office:value-type="string" calcext:value-type="string">
            <text:p>EDGARD SOUZA</text:p>
          </table:table-cell>
          <table:table-cell office:value-type="string" calcext:value-type="string">
            <text:p>SCALA III</text:p>
          </table:table-cell>
          <table:table-cell office:value-type="float" office:value="0.252982855969985" calcext:value-type="float">
            <text:p>0,252983</text:p>
          </table:table-cell>
        </table:table-row>
        <table:table-row table:style-name="ro1">
          <table:table-cell office:value-type="string" calcext:value-type="string">
            <text:p>ELDORADO SUL</text:p>
          </table:table-cell>
          <table:table-cell office:value-type="string" calcext:value-type="string">
            <text:p>PORTO ALEGRE9</text:p>
          </table:table-cell>
          <table:table-cell office:value-type="float" office:value="0.290284359830485" calcext:value-type="float">
            <text:p>0,290284</text:p>
          </table:table-cell>
          <table:table-cell/>
          <table:table-cell office:value-type="string" calcext:value-type="string">
            <text:p>EDGARD SOUZA</text:p>
          </table:table-cell>
          <table:table-cell office:value-type="string" calcext:value-type="string">
            <text:p>TOYOTA</text:p>
          </table:table-cell>
          <table:table-cell office:value-type="float" office:value="0.65068624259432" calcext:value-type="float">
            <text:p>0,650686</text:p>
          </table:table-cell>
        </table:table-row>
        <table:table-row table:style-name="ro1">
          <table:table-cell office:value-type="string" calcext:value-type="string">
            <text:p>EMBORCACAO</text:p>
          </table:table-cell>
          <table:table-cell office:value-type="string" calcext:value-type="string">
            <text:p>PARACATU 4</text:p>
          </table:table-cell>
          <table:table-cell office:value-type="float" office:value="1.37213260846559" calcext:value-type="float">
            <text:p>1,372133</text:p>
          </table:table-cell>
          <table:table-cell/>
          <table:table-cell office:value-type="string" calcext:value-type="string">
            <text:p>ELDORADO SUL</text:p>
          </table:table-cell>
          <table:table-cell office:value-type="string" calcext:value-type="string">
            <text:p>PORTO ALEGRE9</text:p>
          </table:table-cell>
          <table:table-cell office:value-type="float" office:value="0.532501263414657" calcext:value-type="float">
            <text:p>0,532501</text:p>
          </table:table-cell>
        </table:table-row>
        <table:table-row table:style-name="ro1">
          <table:table-cell office:value-type="string" calcext:value-type="string">
            <text:p>EMBU-GUACU</text:p>
          </table:table-cell>
          <table:table-cell office:value-type="string" calcext:value-type="string">
            <text:p>CBA2 CIA.B.ALUM</text:p>
          </table:table-cell>
          <table:table-cell office:value-type="float" office:value="1.02303243543851" calcext:value-type="float">
            <text:p>1,023032</text:p>
          </table:table-cell>
          <table:table-cell/>
          <table:table-cell office:value-type="string" calcext:value-type="string">
            <text:p>EMBORCACAO</text:p>
          </table:table-cell>
          <table:table-cell office:value-type="string" calcext:value-type="string">
            <text:p>PARACATU 4</text:p>
          </table:table-cell>
          <table:table-cell office:value-type="float" office:value="1.79282060818299" calcext:value-type="float">
            <text:p>1,792821</text:p>
          </table:table-cell>
        </table:table-row>
        <table:table-row table:style-name="ro1">
          <table:table-cell office:value-type="string" calcext:value-type="string">
            <text:p>EMBU-GUACU</text:p>
          </table:table-cell>
          <table:table-cell office:value-type="string" calcext:value-type="string">
            <text:p>OESTE</text:p>
          </table:table-cell>
          <table:table-cell office:value-type="float" office:value="1.02889722734105" calcext:value-type="float">
            <text:p>1,028897</text:p>
          </table:table-cell>
          <table:table-cell/>
          <table:table-cell office:value-type="string" calcext:value-type="string">
            <text:p>EMBU-GUACU</text:p>
          </table:table-cell>
          <table:table-cell office:value-type="string" calcext:value-type="string">
            <text:p>CBA2 CIA.B.ALUM</text:p>
          </table:table-cell>
          <table:table-cell office:value-type="float" office:value="1.47499980665577" calcext:value-type="float">
            <text:p>1,475000</text:p>
          </table:table-cell>
        </table:table-row>
        <table:table-row table:style-name="ro1">
          <table:table-cell office:value-type="string" calcext:value-type="string">
            <text:p>ENCRUZO NOVO</text:p>
          </table:table-cell>
          <table:table-cell office:value-type="string" calcext:value-type="string">
            <text:p>MIRANDA II</text:p>
          </table:table-cell>
          <table:table-cell office:value-type="float" office:value="0.459829799666449" calcext:value-type="float">
            <text:p>0,459830</text:p>
          </table:table-cell>
          <table:table-cell/>
          <table:table-cell office:value-type="string" calcext:value-type="string">
            <text:p>EMBU-GUACU</text:p>
          </table:table-cell>
          <table:table-cell office:value-type="string" calcext:value-type="string">
            <text:p>OESTE</text:p>
          </table:table-cell>
          <table:table-cell office:value-type="float" office:value="1.48345561570215" calcext:value-type="float">
            <text:p>1,483456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C. PAULISTA</text:p>
          </table:table-cell>
          <table:table-cell office:value-type="float" office:value="1.83780661830519" calcext:value-type="float">
            <text:p>1,837807</text:p>
          </table:table-cell>
          <table:table-cell/>
          <table:table-cell office:value-type="string" calcext:value-type="string">
            <text:p>EMBU-GUACU</text:p>
          </table:table-cell>
          <table:table-cell office:value-type="string" calcext:value-type="string">
            <text:p>SOLVAY</text:p>
          </table:table-cell>
          <table:table-cell office:value-type="float" office:value="1.46556995282943" calcext:value-type="float">
            <text:p>1,465570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FERNAO DIAS</text:p>
          </table:table-cell>
          <table:table-cell office:value-type="float" office:value="1.98501476173632" calcext:value-type="float">
            <text:p>1,985015</text:p>
          </table:table-cell>
          <table:table-cell/>
          <table:table-cell office:value-type="string" calcext:value-type="string">
            <text:p>ENCRUZO NOVO</text:p>
          </table:table-cell>
          <table:table-cell office:value-type="string" calcext:value-type="string">
            <text:p>MIRANDA II</text:p>
          </table:table-cell>
          <table:table-cell office:value-type="float" office:value="0.649561155698429" calcext:value-type="float">
            <text:p>0,649561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FURNAS</text:p>
          </table:table-cell>
          <table:table-cell office:value-type="float" office:value="0.858105841929441" calcext:value-type="float">
            <text:p>0,858106</text:p>
          </table:table-cell>
          <table:table-cell/>
          <table:table-cell office:value-type="string" calcext:value-type="string">
            <text:p>ESTREITO</text:p>
          </table:table-cell>
          <table:table-cell office:value-type="string" calcext:value-type="string">
            <text:p>C. PAULISTA</text:p>
          </table:table-cell>
          <table:table-cell office:value-type="float" office:value="2.09322893329873" calcext:value-type="float">
            <text:p>2,093229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JAGUARA-500</text:p>
          </table:table-cell>
          <table:table-cell office:value-type="float" office:value="1.40266962384814" calcext:value-type="float">
            <text:p>1,402670</text:p>
          </table:table-cell>
          <table:table-cell/>
          <table:table-cell office:value-type="string" calcext:value-type="string">
            <text:p>ESTREITO</text:p>
          </table:table-cell>
          <table:table-cell office:value-type="string" calcext:value-type="string">
            <text:p>FERNAO DIAS</text:p>
          </table:table-cell>
          <table:table-cell office:value-type="float" office:value="2.2608963809932" calcext:value-type="float">
            <text:p>2,260896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L.C.BARRETO</text:p>
          </table:table-cell>
          <table:table-cell office:value-type="float" office:value="0.822089734288089" calcext:value-type="float">
            <text:p>0,822090</text:p>
          </table:table-cell>
          <table:table-cell/>
          <table:table-cell office:value-type="string" calcext:value-type="string">
            <text:p>ESTREITO</text:p>
          </table:table-cell>
          <table:table-cell office:value-type="string" calcext:value-type="string">
            <text:p>M. MORAES</text:p>
          </table:table-cell>
          <table:table-cell office:value-type="float" office:value="1.00454514734831" calcext:value-type="float">
            <text:p>1,004545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M. MORAES</text:p>
          </table:table-cell>
          <table:table-cell office:value-type="float" office:value="0.815162822297762" calcext:value-type="float">
            <text:p>0,815163</text:p>
          </table:table-cell>
          <table:table-cell/>
          <table:table-cell office:value-type="string" calcext:value-type="string">
            <text:p>ESTREITO</text:p>
          </table:table-cell>
          <table:table-cell office:value-type="string" calcext:value-type="string">
            <text:p>NOVA PONTE</text:p>
          </table:table-cell>
          <table:table-cell office:value-type="float" office:value="1.79980685180629" calcext:value-type="float">
            <text:p>1,799807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NOVA PONTE</text:p>
          </table:table-cell>
          <table:table-cell office:value-type="float" office:value="1.6033037542632" calcext:value-type="float">
            <text:p>1,603304</text:p>
          </table:table-cell>
          <table:table-cell/>
          <table:table-cell office:value-type="string" calcext:value-type="string">
            <text:p>ESTREITO</text:p>
          </table:table-cell>
          <table:table-cell office:value-type="string" calcext:value-type="string">
            <text:p>RIBEIRAOPRETO</text:p>
          </table:table-cell>
          <table:table-cell office:value-type="float" office:value="1.63627833747096" calcext:value-type="float">
            <text:p>1,636278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RIBEIRAOPRETO</text:p>
          </table:table-cell>
          <table:table-cell office:value-type="float" office:value="1.43661455761293" calcext:value-type="float">
            <text:p>1,436615</text:p>
          </table:table-cell>
          <table:table-cell/>
          <table:table-cell office:value-type="string" calcext:value-type="string">
            <text:p>EUNAPOLIS</text:p>
          </table:table-cell>
          <table:table-cell office:value-type="string" calcext:value-type="string">
            <text:p>TEIX FREITAS II</text:p>
          </table:table-cell>
          <table:table-cell office:value-type="float" office:value="0.612904616984389" calcext:value-type="float">
            <text:p>0,612905</text:p>
          </table:table-cell>
        </table:table-row>
        <table:table-row table:style-name="ro1">
          <table:table-cell office:value-type="string" calcext:value-type="string">
            <text:p>EUNAPOLIS</text:p>
          </table:table-cell>
          <table:table-cell office:value-type="string" calcext:value-type="string">
            <text:p>TEIX FREITAS II</text:p>
          </table:table-cell>
          <table:table-cell office:value-type="float" office:value="0.360371343003666" calcext:value-type="float">
            <text:p>0,360371</text:p>
          </table:table-cell>
          <table:table-cell/>
          <table:table-cell office:value-type="string" calcext:value-type="string">
            <text:p>EXTREMOZ II</text:p>
          </table:table-cell>
          <table:table-cell office:value-type="string" calcext:value-type="string">
            <text:p>NATAL III</text:p>
          </table:table-cell>
          <table:table-cell office:value-type="float" office:value="0.713468804398137" calcext:value-type="float">
            <text:p>0,713469</text:p>
          </table:table-cell>
        </table:table-row>
        <table:table-row table:style-name="ro1">
          <table:table-cell office:value-type="string" calcext:value-type="string">
            <text:p>EXTREMOZ II</text:p>
          </table:table-cell>
          <table:table-cell office:value-type="string" calcext:value-type="string">
            <text:p>NATAL III</text:p>
          </table:table-cell>
          <table:table-cell office:value-type="float" office:value="0.404868842942526" calcext:value-type="float">
            <text:p>0,404869</text:p>
          </table:table-cell>
          <table:table-cell/>
          <table:table-cell office:value-type="string" calcext:value-type="string">
            <text:p>F.IGUACUNORTE</text:p>
          </table:table-cell>
          <table:table-cell office:value-type="string" calcext:value-type="string">
            <text:p>MEDIANEIRA NT</text:p>
          </table:table-cell>
          <table:table-cell office:value-type="float" office:value="0.577070237942314" calcext:value-type="float">
            <text:p>0,577070</text:p>
          </table:table-cell>
        </table:table-row>
        <table:table-row table:style-name="ro1">
          <table:table-cell office:value-type="string" calcext:value-type="string">
            <text:p>F.IGUACUNORTE</text:p>
          </table:table-cell>
          <table:table-cell office:value-type="string" calcext:value-type="string">
            <text:p>MEDIANEIRA NT</text:p>
          </table:table-cell>
          <table:table-cell office:value-type="float" office:value="0.315160316657002" calcext:value-type="float">
            <text:p>0,315160</text:p>
          </table:table-cell>
          <table:table-cell/>
          <table:table-cell office:value-type="string" calcext:value-type="string">
            <text:p>FARROUPILHA</text:p>
          </table:table-cell>
          <table:table-cell office:value-type="string" calcext:value-type="string">
            <text:p>GARIBALDI 1</text:p>
          </table:table-cell>
          <table:table-cell office:value-type="float" office:value="0.57541815467461" calcext:value-type="float">
            <text:p>0,575418</text:p>
          </table:table-cell>
        </table:table-row>
        <table:table-row table:style-name="ro1">
          <table:table-cell office:value-type="string" calcext:value-type="string">
            <text:p>FEIJO</text:p>
          </table:table-cell>
          <table:table-cell office:value-type="string" calcext:value-type="string">
            <text:p>RIO BRANCO I</text:p>
          </table:table-cell>
          <table:table-cell office:value-type="float" office:value="0.491764665101568" calcext:value-type="float">
            <text:p>0,491765</text:p>
          </table:table-cell>
          <table:table-cell/>
          <table:table-cell office:value-type="string" calcext:value-type="string">
            <text:p>FEIJO</text:p>
          </table:table-cell>
          <table:table-cell office:value-type="string" calcext:value-type="string">
            <text:p>RIO BRANCO I</text:p>
          </table:table-cell>
          <table:table-cell office:value-type="float" office:value="0.851856376068452" calcext:value-type="float">
            <text:p>0,851856</text:p>
          </table:table-cell>
        </table:table-row>
        <table:table-row table:style-name="ro1">
          <table:table-cell office:value-type="string" calcext:value-type="string">
            <text:p>FERNAO DIAS</text:p>
          </table:table-cell>
          <table:table-cell office:value-type="string" calcext:value-type="string">
            <text:p>TERMINAL RIO</text:p>
          </table:table-cell>
          <table:table-cell office:value-type="float" office:value="1.84134075852179" calcext:value-type="float">
            <text:p>1,841341</text:p>
          </table:table-cell>
          <table:table-cell/>
          <table:table-cell office:value-type="string" calcext:value-type="string">
            <text:p>FERNAO DIAS</text:p>
          </table:table-cell>
          <table:table-cell office:value-type="string" calcext:value-type="string">
            <text:p>TERMINAL RIO</text:p>
          </table:table-cell>
          <table:table-cell office:value-type="float" office:value="2.08569941995616" calcext:value-type="float">
            <text:p>2,085699</text:p>
          </table:table-cell>
        </table:table-row>
        <table:table-row table:style-name="ro1">
          <table:table-cell office:value-type="string" calcext:value-type="string">
            <text:p>FIBRAPLAC</text:p>
          </table:table-cell>
          <table:table-cell office:value-type="string" calcext:value-type="string">
            <text:p>OSORIO 2</text:p>
          </table:table-cell>
          <table:table-cell office:value-type="float" office:value="0.299825269397689" calcext:value-type="float">
            <text:p>0,299825</text:p>
          </table:table-cell>
          <table:table-cell/>
          <table:table-cell office:value-type="string" calcext:value-type="string">
            <text:p>FIBRAPLAC</text:p>
          </table:table-cell>
          <table:table-cell office:value-type="string" calcext:value-type="string">
            <text:p>OSORIO 2</text:p>
          </table:table-cell>
          <table:table-cell office:value-type="float" office:value="0.550003227356592" calcext:value-type="float">
            <text:p>0,550003</text:p>
          </table:table-cell>
        </table:table-row>
        <table:table-row table:style-name="ro1">
          <table:table-cell office:value-type="string" calcext:value-type="string">
            <text:p>FIGUEIRA</text:p>
          </table:table-cell>
          <table:table-cell office:value-type="string" calcext:value-type="string">
            <text:p>LONDRINA ESU</text:p>
          </table:table-cell>
          <table:table-cell office:value-type="float" office:value="0.411078836319566" calcext:value-type="float">
            <text:p>0,411079</text:p>
          </table:table-cell>
          <table:table-cell/>
          <table:table-cell office:value-type="string" calcext:value-type="string">
            <text:p>FIGUEIRA</text:p>
          </table:table-cell>
          <table:table-cell office:value-type="string" calcext:value-type="string">
            <text:p>LONDRINA ESU</text:p>
          </table:table-cell>
          <table:table-cell office:value-type="float" office:value="0.634375526492417" calcext:value-type="float">
            <text:p>0,634376</text:p>
          </table:table-cell>
        </table:table-row>
        <table:table-row table:style-name="ro1">
          <table:table-cell office:value-type="string" calcext:value-type="string">
            <text:p>FIRMINOPOLIS</text:p>
          </table:table-cell>
          <table:table-cell office:value-type="string" calcext:value-type="string">
            <text:p>TRINDADE</text:p>
          </table:table-cell>
          <table:table-cell office:value-type="float" office:value="0.435949870274917" calcext:value-type="float">
            <text:p>0,435950</text:p>
          </table:table-cell>
          <table:table-cell/>
          <table:table-cell office:value-type="string" calcext:value-type="string">
            <text:p>FIRMINOPOLIS</text:p>
          </table:table-cell>
          <table:table-cell office:value-type="string" calcext:value-type="string">
            <text:p>TRINDADE</text:p>
          </table:table-cell>
          <table:table-cell office:value-type="float" office:value="0.653010542745947" calcext:value-type="float">
            <text:p>0,653011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POLO</text:p>
          </table:table-cell>
          <table:table-cell office:value-type="float" office:value="0.260257398657822" calcext:value-type="float">
            <text:p>0,260257</text:p>
          </table:table-cell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POLO</text:p>
          </table:table-cell>
          <table:table-cell office:value-type="float" office:value="0.442634977332543" calcext:value-type="float">
            <text:p>0,442635</text:p>
          </table:table-cell>
        </table:table-row>
        <table:table-row table:style-name="ro1">
          <table:table-cell office:value-type="string" calcext:value-type="string">
            <text:p>FORQUILHINHA</text:p>
          </table:table-cell>
          <table:table-cell office:value-type="string" calcext:value-type="string">
            <text:p>SIDEROPOLIS 2</text:p>
          </table:table-cell>
          <table:table-cell office:value-type="float" office:value="0.40391502319606" calcext:value-type="float">
            <text:p>0,403915</text:p>
          </table:table-cell>
          <table:table-cell/>
          <table:table-cell office:value-type="string" calcext:value-type="string">
            <text:p>FORQUILHINHA</text:p>
          </table:table-cell>
          <table:table-cell office:value-type="string" calcext:value-type="string">
            <text:p>SIDEROPOLIS 2</text:p>
          </table:table-cell>
          <table:table-cell office:value-type="float" office:value="0.636561267978756" calcext:value-type="float">
            <text:p>0,636561</text:p>
          </table:table-cell>
        </table:table-row>
        <table:table-row table:style-name="ro1">
          <table:table-cell office:value-type="string" calcext:value-type="string">
            <text:p>FORQUILHINHA</text:p>
          </table:table-cell>
          <table:table-cell office:value-type="string" calcext:value-type="string">
            <text:p>TORRES 2</text:p>
          </table:table-cell>
          <table:table-cell office:value-type="float" office:value="0.347313618805379" calcext:value-type="float">
            <text:p>0,347314</text:p>
          </table:table-cell>
          <table:table-cell/>
          <table:table-cell office:value-type="string" calcext:value-type="string">
            <text:p>FORQUILHINHA</text:p>
          </table:table-cell>
          <table:table-cell office:value-type="string" calcext:value-type="string">
            <text:p>TORRES 2</text:p>
          </table:table-cell>
          <table:table-cell office:value-type="float" office:value="0.643259300799653" calcext:value-type="float">
            <text:p>0,643259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FORTALEZA II</text:p>
          </table:table-cell>
          <table:table-cell office:value-type="float" office:value="0.502181887109632" calcext:value-type="float">
            <text:p>0,502182</text:p>
          </table:table-cell>
          <table:table-cell/>
          <table:table-cell office:value-type="string" calcext:value-type="string">
            <text:p>FORTALEZA</text:p>
          </table:table-cell>
          <table:table-cell office:value-type="string" calcext:value-type="string">
            <text:p>FORTALEZA II</text:p>
          </table:table-cell>
          <table:table-cell office:value-type="float" office:value="0.750096851185185" calcext:value-type="float">
            <text:p>0,750097</text:p>
          </table:table-cell>
        </table:table-row>
        <table:table-row table:style-name="ro1">
          <table:table-cell office:value-type="string" calcext:value-type="string">
            <text:p>FORTALEZA II</text:p>
          </table:table-cell>
          <table:table-cell office:value-type="string" calcext:value-type="string">
            <text:p>MARACANAU II</text:p>
          </table:table-cell>
          <table:table-cell office:value-type="float" office:value="0.480481781861823" calcext:value-type="float">
            <text:p>0,480482</text:p>
          </table:table-cell>
          <table:table-cell/>
          <table:table-cell office:value-type="string" calcext:value-type="string">
            <text:p>FORTALEZA II</text:p>
          </table:table-cell>
          <table:table-cell office:value-type="string" calcext:value-type="string">
            <text:p>MARACANAU II</text:p>
          </table:table-cell>
          <table:table-cell office:value-type="float" office:value="0.717683932610097" calcext:value-type="float">
            <text:p>0,717684</text:p>
          </table:table-cell>
        </table:table-row>
        <table:table-row table:style-name="ro1">
          <table:table-cell office:value-type="string" calcext:value-type="string">
            <text:p>FORTALEZA II</text:p>
          </table:table-cell>
          <table:table-cell office:value-type="string" calcext:value-type="string">
            <text:p>PACATUBA</text:p>
          </table:table-cell>
          <table:table-cell office:value-type="float" office:value="1.36860080020487" calcext:value-type="float">
            <text:p>1,368601</text:p>
          </table:table-cell>
          <table:table-cell/>
          <table:table-cell office:value-type="string" calcext:value-type="string">
            <text:p>FORTALEZA II</text:p>
          </table:table-cell>
          <table:table-cell office:value-type="string" calcext:value-type="string">
            <text:p>PACATUBA</text:p>
          </table:table-cell>
          <table:table-cell office:value-type="float" office:value="1.7229203639514" calcext:value-type="float">
            <text:p>1,722920</text:p>
          </table:table-cell>
        </table:table-row>
        <table:table-row table:style-name="ro1">
          <table:table-cell office:value-type="string" calcext:value-type="string">
            <text:p>FORTALEZA II</text:p>
          </table:table-cell>
          <table:table-cell office:value-type="string" calcext:value-type="string">
            <text:p>PICI II</text:p>
          </table:table-cell>
          <table:table-cell office:value-type="float" office:value="0.409899630247014" calcext:value-type="float">
            <text:p>0,409900</text:p>
          </table:table-cell>
          <table:table-cell/>
          <table:table-cell office:value-type="string" calcext:value-type="string">
            <text:p>FORTALEZA II</text:p>
          </table:table-cell>
          <table:table-cell office:value-type="string" calcext:value-type="string">
            <text:p>PICI II</text:p>
          </table:table-cell>
          <table:table-cell office:value-type="float" office:value="0.612257092186071" calcext:value-type="float">
            <text:p>0,612257</text:p>
          </table:table-cell>
        </table:table-row>
        <table:table-row table:style-name="ro1">
          <table:table-cell office:value-type="string" calcext:value-type="string">
            <text:p>FOZ CHAPECO</text:p>
          </table:table-cell>
          <table:table-cell office:value-type="string" calcext:value-type="string">
            <text:p>GUARITA</text:p>
          </table:table-cell>
          <table:table-cell office:value-type="float" office:value="0.336470650256212" calcext:value-type="float">
            <text:p>0,336471</text:p>
          </table:table-cell>
          <table:table-cell/>
          <table:table-cell office:value-type="string" calcext:value-type="string">
            <text:p>FOZ CHAPECO</text:p>
          </table:table-cell>
          <table:table-cell office:value-type="string" calcext:value-type="string">
            <text:p>GUARITA</text:p>
          </table:table-cell>
          <table:table-cell office:value-type="float" office:value="0.617225972725547" calcext:value-type="float">
            <text:p>0,617226</text:p>
          </table:table-cell>
        </table:table-row>
        <table:table-row table:style-name="ro1">
          <table:table-cell office:value-type="string" calcext:value-type="string">
            <text:p>FOZ CHAPECO</text:p>
          </table:table-cell>
          <table:table-cell office:value-type="string" calcext:value-type="string">
            <text:p>XANXERE ESU</text:p>
          </table:table-cell>
          <table:table-cell office:value-type="float" office:value="0.438295300042756" calcext:value-type="float">
            <text:p>0,438295</text:p>
          </table:table-cell>
          <table:table-cell/>
          <table:table-cell office:value-type="string" calcext:value-type="string">
            <text:p>FOZ CHAPECO</text:p>
          </table:table-cell>
          <table:table-cell office:value-type="string" calcext:value-type="string">
            <text:p>XANXERE ESU</text:p>
          </table:table-cell>
          <table:table-cell office:value-type="float" office:value="0.81176640645141" calcext:value-type="float">
            <text:p>0,811766</text:p>
          </table:table-cell>
        </table:table-row>
        <table:table-row table:style-name="ro1">
          <table:table-cell office:value-type="string" calcext:value-type="string">
            <text:p>FUNIL</text:p>
          </table:table-cell>
          <table:table-cell office:value-type="string" calcext:value-type="string">
            <text:p>ITAPEBI SE</text:p>
          </table:table-cell>
          <table:table-cell office:value-type="float" office:value="0.365818604214846" calcext:value-type="float">
            <text:p>0,365819</text:p>
          </table:table-cell>
          <table:table-cell/>
          <table:table-cell office:value-type="string" calcext:value-type="string">
            <text:p>FUNIL</text:p>
          </table:table-cell>
          <table:table-cell office:value-type="string" calcext:value-type="string">
            <text:p>ITAPEBI SE</text:p>
          </table:table-cell>
          <table:table-cell office:value-type="float" office:value="0.62216909267334" calcext:value-type="float">
            <text:p>0,622169</text:p>
          </table:table-cell>
        </table:table-row>
        <table:table-row table:style-name="ro1">
          <table:table-cell office:value-type="string" calcext:value-type="string">
            <text:p>FUNIL</text:p>
          </table:table-cell>
          <table:table-cell office:value-type="string" calcext:value-type="string">
            <text:p>SAPEACU</text:p>
          </table:table-cell>
          <table:table-cell office:value-type="float" office:value="0.439800012743172" calcext:value-type="float">
            <text:p>0,439800</text:p>
          </table:table-cell>
          <table:table-cell/>
          <table:table-cell office:value-type="string" calcext:value-type="string">
            <text:p>FUNIL</text:p>
          </table:table-cell>
          <table:table-cell office:value-type="string" calcext:value-type="string">
            <text:p>SAPEACU</text:p>
          </table:table-cell>
          <table:table-cell office:value-type="float" office:value="0.630433303887589" calcext:value-type="float">
            <text:p>0,630433</text:p>
          </table:table-cell>
        </table:table-row>
        <table:table-row table:style-name="ro1">
          <table:table-cell office:value-type="string" calcext:value-type="string">
            <text:p>FURNAS</text:p>
          </table:table-cell>
          <table:table-cell office:value-type="string" calcext:value-type="string">
            <text:p>PIMENTA</text:p>
          </table:table-cell>
          <table:table-cell office:value-type="float" office:value="0.698748992715312" calcext:value-type="float">
            <text:p>0,698749</text:p>
          </table:table-cell>
          <table:table-cell/>
          <table:table-cell office:value-type="string" calcext:value-type="string">
            <text:p>FUNIL</text:p>
          </table:table-cell>
          <table:table-cell office:value-type="string" calcext:value-type="string">
            <text:p>STO.A.JESUS</text:p>
          </table:table-cell>
          <table:table-cell office:value-type="float" office:value="0.590541894514489" calcext:value-type="float">
            <text:p>0,590542</text:p>
          </table:table-cell>
        </table:table-row>
        <table:table-row table:style-name="ro1">
          <table:table-cell office:value-type="string" calcext:value-type="string">
            <text:p>FURNAS</text:p>
          </table:table-cell>
          <table:table-cell office:value-type="string" calcext:value-type="string">
            <text:p>VARGINHA 4</text:p>
          </table:table-cell>
          <table:table-cell office:value-type="float" office:value="0.65319076833621" calcext:value-type="float">
            <text:p>0,653191</text:p>
          </table:table-cell>
          <table:table-cell/>
          <table:table-cell office:value-type="string" calcext:value-type="string">
            <text:p>FURNAS</text:p>
          </table:table-cell>
          <table:table-cell office:value-type="string" calcext:value-type="string">
            <text:p>PIMENTA</text:p>
          </table:table-cell>
          <table:table-cell office:value-type="float" office:value="1.10025146134252" calcext:value-type="float">
            <text:p>1,100251</text:p>
          </table:table-cell>
        </table:table-row>
        <table:table-row table:style-name="ro1">
          <table:table-cell office:value-type="string" calcext:value-type="string">
            <text:p>FUTURA</text:p>
          </table:table-cell>
          <table:table-cell office:value-type="string" calcext:value-type="string">
            <text:p>JUAZEIRO III</text:p>
          </table:table-cell>
          <table:table-cell office:value-type="float" office:value="1.22657397113672" calcext:value-type="float">
            <text:p>1,226574</text:p>
          </table:table-cell>
          <table:table-cell/>
          <table:table-cell office:value-type="string" calcext:value-type="string">
            <text:p>FURNAS</text:p>
          </table:table-cell>
          <table:table-cell office:value-type="string" calcext:value-type="string">
            <text:p>VARGINHA 4</text:p>
          </table:table-cell>
          <table:table-cell office:value-type="float" office:value="1.02851539664425" calcext:value-type="float">
            <text:p>1,028515</text:p>
          </table:table-cell>
        </table:table-row>
        <table:table-row table:style-name="ro1">
          <table:table-cell office:value-type="string" calcext:value-type="string">
            <text:p>G.MANGABEIRA</text:p>
          </table:table-cell>
          <table:table-cell office:value-type="string" calcext:value-type="string">
            <text:p>TOMBA</text:p>
          </table:table-cell>
          <table:table-cell office:value-type="float" office:value="0.281510340715728" calcext:value-type="float">
            <text:p>0,281510</text:p>
          </table:table-cell>
          <table:table-cell/>
          <table:table-cell office:value-type="string" calcext:value-type="string">
            <text:p>FUTURA</text:p>
          </table:table-cell>
          <table:table-cell office:value-type="string" calcext:value-type="string">
            <text:p>JUAZEIRO III</text:p>
          </table:table-cell>
          <table:table-cell office:value-type="float" office:value="1.4819000737385" calcext:value-type="float">
            <text:p>1,481900</text:p>
          </table:table-cell>
        </table:table-row>
        <table:table-row table:style-name="ro1">
          <table:table-cell office:value-type="string" calcext:value-type="string">
            <text:p>G.VALADARES 6</text:p>
          </table:table-cell>
          <table:table-cell office:value-type="string" calcext:value-type="string">
            <text:p>CONSE. PENA</text:p>
          </table:table-cell>
          <table:table-cell office:value-type="float" office:value="0.420719412262371" calcext:value-type="float">
            <text:p>0,420719</text:p>
          </table:table-cell>
          <table:table-cell/>
          <table:table-cell office:value-type="string" calcext:value-type="string">
            <text:p>G.MANGABEIRA</text:p>
          </table:table-cell>
          <table:table-cell office:value-type="string" calcext:value-type="string">
            <text:p>TOMBA</text:p>
          </table:table-cell>
          <table:table-cell office:value-type="float" office:value="0.478781098728383" calcext:value-type="float">
            <text:p>0,478781</text:p>
          </table:table-cell>
        </table:table-row>
        <table:table-row table:style-name="ro1">
          <table:table-cell office:value-type="string" calcext:value-type="string">
            <text:p>G.VALADARES 6</text:p>
          </table:table-cell>
          <table:table-cell office:value-type="string" calcext:value-type="string">
            <text:p>G.VALADARES 2</text:p>
          </table:table-cell>
          <table:table-cell office:value-type="float" office:value="0.419973237064441" calcext:value-type="float">
            <text:p>0,419973</text:p>
          </table:table-cell>
          <table:table-cell/>
          <table:table-cell office:value-type="string" calcext:value-type="string">
            <text:p>G.VALADARES 6</text:p>
          </table:table-cell>
          <table:table-cell office:value-type="string" calcext:value-type="string">
            <text:p>CAPELINHA 3</text:p>
          </table:table-cell>
          <table:table-cell office:value-type="float" office:value="1.91271781688713" calcext:value-type="float">
            <text:p>1,912718</text:p>
          </table:table-cell>
        </table:table-row>
        <table:table-row table:style-name="ro1">
          <table:table-cell office:value-type="string" calcext:value-type="string">
            <text:p>G.VALADARES 6</text:p>
          </table:table-cell>
          <table:table-cell office:value-type="string" calcext:value-type="string">
            <text:p>PE. PARAISO 2</text:p>
          </table:table-cell>
          <table:table-cell office:value-type="float" office:value="1.48025946545418" calcext:value-type="float">
            <text:p>1,480259</text:p>
          </table:table-cell>
          <table:table-cell/>
          <table:table-cell office:value-type="string" calcext:value-type="string">
            <text:p>G.VALADARES 6</text:p>
          </table:table-cell>
          <table:table-cell office:value-type="string" calcext:value-type="string">
            <text:p>CONSE. PENA</text:p>
          </table:table-cell>
          <table:table-cell office:value-type="float" office:value="0.652244343207615" calcext:value-type="float">
            <text:p>0,652244</text:p>
          </table:table-cell>
        </table:table-row>
        <table:table-row table:style-name="ro1">
          <table:table-cell office:value-type="string" calcext:value-type="string">
            <text:p>GARANHUNS II</text:p>
          </table:table-cell>
          <table:table-cell office:value-type="string" calcext:value-type="string">
            <text:p>PAU FERRO</text:p>
          </table:table-cell>
          <table:table-cell office:value-type="float" office:value="1.48034284579164" calcext:value-type="float">
            <text:p>1,480343</text:p>
          </table:table-cell>
          <table:table-cell/>
          <table:table-cell office:value-type="string" calcext:value-type="string">
            <text:p>G.VALADARES 6</text:p>
          </table:table-cell>
          <table:table-cell office:value-type="string" calcext:value-type="string">
            <text:p>G.VALADARES 2</text:p>
          </table:table-cell>
          <table:table-cell office:value-type="float" office:value="0.651087542409491" calcext:value-type="float">
            <text:p>0,651088</text:p>
          </table:table-cell>
        </table:table-row>
        <table:table-row table:style-name="ro1">
          <table:table-cell office:value-type="string" calcext:value-type="string">
            <text:p>GARANHUNS II</text:p>
          </table:table-cell>
          <table:table-cell office:value-type="string" calcext:value-type="string">
            <text:p>US. L.GONZAGA</text:p>
          </table:table-cell>
          <table:table-cell office:value-type="float" office:value="1.48344579606523" calcext:value-type="float">
            <text:p>1,483446</text:p>
          </table:table-cell>
          <table:table-cell/>
          <table:table-cell office:value-type="string" calcext:value-type="string">
            <text:p>G.VALADARES 6</text:p>
          </table:table-cell>
          <table:table-cell office:value-type="string" calcext:value-type="string">
            <text:p>PE. PARAISO 2</text:p>
          </table:table-cell>
          <table:table-cell office:value-type="float" office:value="1.93409854029479" calcext:value-type="float">
            <text:p>1,934099</text:p>
          </table:table-cell>
        </table:table-row>
        <table:table-row table:style-name="ro1">
          <table:table-cell office:value-type="string" calcext:value-type="string">
            <text:p>GARIBALDI 1</text:p>
          </table:table-cell>
          <table:table-cell office:value-type="string" calcext:value-type="string">
            <text:p>LAJEADO III</text:p>
          </table:table-cell>
          <table:table-cell office:value-type="float" office:value="0.319489702658108" calcext:value-type="float">
            <text:p>0,319490</text:p>
          </table:table-cell>
          <table:table-cell/>
          <table:table-cell office:value-type="string" calcext:value-type="string">
            <text:p>GARANHUNS II</text:p>
          </table:table-cell>
          <table:table-cell office:value-type="string" calcext:value-type="string">
            <text:p>PAU FERRO</text:p>
          </table:table-cell>
          <table:table-cell office:value-type="float" office:value="1.83729726002716" calcext:value-type="float">
            <text:p>1,837297</text:p>
          </table:table-cell>
        </table:table-row>
        <table:table-row table:style-name="ro1">
          <table:table-cell office:value-type="string" calcext:value-type="string">
            <text:p>GARIBALDI 1</text:p>
          </table:table-cell>
          <table:table-cell office:value-type="string" calcext:value-type="string">
            <text:p>VINHEDOS</text:p>
          </table:table-cell>
          <table:table-cell office:value-type="float" office:value="0.320013703205516" calcext:value-type="float">
            <text:p>0,320014</text:p>
          </table:table-cell>
          <table:table-cell/>
          <table:table-cell office:value-type="string" calcext:value-type="string">
            <text:p>GARANHUNS II</text:p>
          </table:table-cell>
          <table:table-cell office:value-type="string" calcext:value-type="string">
            <text:p>US. L.GONZAGA</text:p>
          </table:table-cell>
          <table:table-cell office:value-type="float" office:value="1.84114842332483" calcext:value-type="float">
            <text:p>1,841148</text:p>
          </table:table-cell>
        </table:table-row>
        <table:table-row table:style-name="ro1">
          <table:table-cell office:value-type="string" calcext:value-type="string">
            <text:p>GASPAR 2</text:p>
          </table:table-cell>
          <table:table-cell office:value-type="string" calcext:value-type="string">
            <text:p>INDAIAL</text:p>
          </table:table-cell>
          <table:table-cell office:value-type="float" office:value="0.433471960708961" calcext:value-type="float">
            <text:p>0,433472</text:p>
          </table:table-cell>
          <table:table-cell/>
          <table:table-cell office:value-type="string" calcext:value-type="string">
            <text:p>GARIBALDI 1</text:p>
          </table:table-cell>
          <table:table-cell office:value-type="string" calcext:value-type="string">
            <text:p>LAJEADO III</text:p>
          </table:table-cell>
          <table:table-cell office:value-type="float" office:value="0.586075909886307" calcext:value-type="float">
            <text:p>0,586076</text:p>
          </table:table-cell>
        </table:table-row>
        <table:table-row table:style-name="ro1">
          <table:table-cell office:value-type="string" calcext:value-type="string">
            <text:p>GASPAR 2</text:p>
          </table:table-cell>
          <table:table-cell office:value-type="string" calcext:value-type="string">
            <text:p>PALHOCA <text:s/>ESU</text:p>
          </table:table-cell>
          <table:table-cell office:value-type="float" office:value="0.404326203522899" calcext:value-type="float">
            <text:p>0,404326</text:p>
          </table:table-cell>
          <table:table-cell/>
          <table:table-cell office:value-type="string" calcext:value-type="string">
            <text:p>GARIBALDI 1</text:p>
          </table:table-cell>
          <table:table-cell office:value-type="string" calcext:value-type="string">
            <text:p>VINHEDOS</text:p>
          </table:table-cell>
          <table:table-cell office:value-type="float" office:value="0.587037143049842" calcext:value-type="float">
            <text:p>0,587037</text:p>
          </table:table-cell>
        </table:table-row>
        <table:table-row table:style-name="ro1">
          <table:table-cell office:value-type="string" calcext:value-type="string">
            <text:p>GERDAU O.BRANCO</text:p>
          </table:table-cell>
          <table:table-cell office:value-type="string" calcext:value-type="string">
            <text:p>ITABIRITO 2</text:p>
          </table:table-cell>
          <table:table-cell office:value-type="float" office:value="0.783018815465561" calcext:value-type="float">
            <text:p>0,783019</text:p>
          </table:table-cell>
          <table:table-cell/>
          <table:table-cell office:value-type="string" calcext:value-type="string">
            <text:p>GASPAR 2</text:p>
          </table:table-cell>
          <table:table-cell office:value-type="string" calcext:value-type="string">
            <text:p>INDAIAL</text:p>
          </table:table-cell>
          <table:table-cell office:value-type="float" office:value="0.683142356921439" calcext:value-type="float">
            <text:p>0,683142</text:p>
          </table:table-cell>
        </table:table-row>
        <table:table-row table:style-name="ro1">
          <table:table-cell office:value-type="string" calcext:value-type="string">
            <text:p>GERDAU SP</text:p>
          </table:table-cell>
          <table:table-cell office:value-type="string" calcext:value-type="string">
            <text:p>JANDIRA</text:p>
          </table:table-cell>
          <table:table-cell office:value-type="float" office:value="1.12510588796018" calcext:value-type="float">
            <text:p>1,125106</text:p>
          </table:table-cell>
          <table:table-cell/>
          <table:table-cell office:value-type="string" calcext:value-type="string">
            <text:p>GASPAR 2</text:p>
          </table:table-cell>
          <table:table-cell office:value-type="string" calcext:value-type="string">
            <text:p>PALHOCA <text:s/>ESU</text:p>
          </table:table-cell>
          <table:table-cell office:value-type="float" office:value="0.637209279206835" calcext:value-type="float">
            <text:p>0,637209</text:p>
          </table:table-cell>
        </table:table-row>
        <table:table-row table:style-name="ro1">
          <table:table-cell office:value-type="string" calcext:value-type="string">
            <text:p>GETULINA</text:p>
          </table:table-cell>
          <table:table-cell office:value-type="string" calcext:value-type="string">
            <text:p>MARECH.RONDON</text:p>
          </table:table-cell>
          <table:table-cell office:value-type="float" office:value="1.18978300518831" calcext:value-type="float">
            <text:p>1,189783</text:p>
          </table:table-cell>
          <table:table-cell/>
          <table:table-cell office:value-type="string" calcext:value-type="string">
            <text:p>GERDAU O.BRANCO</text:p>
          </table:table-cell>
          <table:table-cell office:value-type="string" calcext:value-type="string">
            <text:p>ITABIRITO 2</text:p>
          </table:table-cell>
          <table:table-cell office:value-type="float" office:value="1.12312463364069" calcext:value-type="float">
            <text:p>1,123125</text:p>
          </table:table-cell>
        </table:table-row>
        <table:table-row table:style-name="ro1">
          <table:table-cell office:value-type="string" calcext:value-type="string">
            <text:p>GILBUES II</text:p>
          </table:table-cell>
          <table:table-cell office:value-type="string" calcext:value-type="string">
            <text:p>MIRACEMA</text:p>
          </table:table-cell>
          <table:table-cell office:value-type="float" office:value="1.62578957941014" calcext:value-type="float">
            <text:p>1,625790</text:p>
          </table:table-cell>
          <table:table-cell/>
          <table:table-cell office:value-type="string" calcext:value-type="string">
            <text:p>GERDAU SP</text:p>
          </table:table-cell>
          <table:table-cell office:value-type="string" calcext:value-type="string">
            <text:p>JANDIRA</text:p>
          </table:table-cell>
          <table:table-cell office:value-type="float" office:value="1.62216847650308" calcext:value-type="float">
            <text:p>1,622168</text:p>
          </table:table-cell>
        </table:table-row>
        <table:table-row table:style-name="ro1">
          <table:table-cell office:value-type="string" calcext:value-type="string">
            <text:p>GOIANIA LESTE</text:p>
          </table:table-cell>
          <table:table-cell office:value-type="string" calcext:value-type="string">
            <text:p>XAVANTES</text:p>
          </table:table-cell>
          <table:table-cell office:value-type="float" office:value="0.276117478350741" calcext:value-type="float">
            <text:p>0,276117</text:p>
          </table:table-cell>
          <table:table-cell/>
          <table:table-cell office:value-type="string" calcext:value-type="string">
            <text:p>GETULINA</text:p>
          </table:table-cell>
          <table:table-cell office:value-type="string" calcext:value-type="string">
            <text:p>JUPIA</text:p>
          </table:table-cell>
          <table:table-cell office:value-type="float" office:value="1.55088028717051" calcext:value-type="float">
            <text:p>1,550880</text:p>
          </table:table-cell>
        </table:table-row>
        <table:table-row table:style-name="ro1">
          <table:table-cell office:value-type="string" calcext:value-type="string">
            <text:p>GOIANINHA</text:p>
          </table:table-cell>
          <table:table-cell office:value-type="string" calcext:value-type="string">
            <text:p>NORFIL</text:p>
          </table:table-cell>
          <table:table-cell office:value-type="float" office:value="0.259685877925658" calcext:value-type="float">
            <text:p>0,259686</text:p>
          </table:table-cell>
          <table:table-cell/>
          <table:table-cell office:value-type="string" calcext:value-type="string">
            <text:p>GETULINA</text:p>
          </table:table-cell>
          <table:table-cell office:value-type="string" calcext:value-type="string">
            <text:p>MARECH.RONDON</text:p>
          </table:table-cell>
          <table:table-cell office:value-type="float" office:value="1.66578144128563" calcext:value-type="float">
            <text:p>1,665781</text:p>
          </table:table-cell>
        </table:table-row>
        <table:table-row table:style-name="ro1">
          <table:table-cell office:value-type="string" calcext:value-type="string">
            <text:p>GOIANINHA</text:p>
          </table:table-cell>
          <table:table-cell office:value-type="string" calcext:value-type="string">
            <text:p>RECIFE II</text:p>
          </table:table-cell>
          <table:table-cell office:value-type="float" office:value="0.367518756254576" calcext:value-type="float">
            <text:p>0,367519</text:p>
          </table:table-cell>
          <table:table-cell/>
          <table:table-cell office:value-type="string" calcext:value-type="string">
            <text:p>GILBUES II</text:p>
          </table:table-cell>
          <table:table-cell office:value-type="string" calcext:value-type="string">
            <text:p>MIRACEMA</text:p>
          </table:table-cell>
          <table:table-cell office:value-type="float" office:value="2.00122370676179" calcext:value-type="float">
            <text:p>2,001224</text:p>
          </table:table-cell>
        </table:table-row>
        <table:table-row table:style-name="ro1">
          <table:table-cell office:value-type="string" calcext:value-type="string">
            <text:p>GRALHA AZUL</text:p>
          </table:table-cell>
          <table:table-cell office:value-type="string" calcext:value-type="string">
            <text:p>UMBARA</text:p>
          </table:table-cell>
          <table:table-cell office:value-type="float" office:value="0.35300749513277" calcext:value-type="float">
            <text:p>0,353007</text:p>
          </table:table-cell>
          <table:table-cell/>
          <table:table-cell office:value-type="string" calcext:value-type="string">
            <text:p>GOIANIA LESTE</text:p>
          </table:table-cell>
          <table:table-cell office:value-type="string" calcext:value-type="string">
            <text:p>XAVANTES</text:p>
          </table:table-cell>
          <table:table-cell office:value-type="float" office:value="0.468668396878097" calcext:value-type="float">
            <text:p>0,468668</text:p>
          </table:table-cell>
        </table:table-row>
        <table:table-row table:style-name="ro1">
          <table:table-cell office:value-type="string" calcext:value-type="string">
            <text:p>GRAVATAI</text:p>
          </table:table-cell>
          <table:table-cell office:value-type="string" calcext:value-type="string">
            <text:p>GUAIBA 3</text:p>
          </table:table-cell>
          <table:table-cell office:value-type="float" office:value="1.28881779701348" calcext:value-type="float">
            <text:p>1,288818</text:p>
          </table:table-cell>
          <table:table-cell/>
          <table:table-cell office:value-type="string" calcext:value-type="string">
            <text:p>GOIANINHA</text:p>
          </table:table-cell>
          <table:table-cell office:value-type="string" calcext:value-type="string">
            <text:p>NORFIL</text:p>
          </table:table-cell>
          <table:table-cell office:value-type="float" office:value="0.449175872025374" calcext:value-type="float">
            <text:p>0,449176</text:p>
          </table:table-cell>
        </table:table-row>
        <table:table-row table:style-name="ro1">
          <table:table-cell office:value-type="string" calcext:value-type="string">
            <text:p>GRAVATAI2</text:p>
          </table:table-cell>
          <table:table-cell office:value-type="string" calcext:value-type="string">
            <text:p>JBO LT GRA2</text:p>
          </table:table-cell>
          <table:table-cell office:value-type="float" office:value="0.324275378822812" calcext:value-type="float">
            <text:p>0,324275</text:p>
          </table:table-cell>
          <table:table-cell/>
          <table:table-cell office:value-type="string" calcext:value-type="string">
            <text:p>GOIANINHA</text:p>
          </table:table-cell>
          <table:table-cell office:value-type="string" calcext:value-type="string">
            <text:p>RECIFE II</text:p>
          </table:table-cell>
          <table:table-cell office:value-type="float" office:value="0.541204296672101" calcext:value-type="float">
            <text:p>0,541204</text:p>
          </table:table-cell>
        </table:table-row>
        <table:table-row table:style-name="ro1">
          <table:table-cell office:value-type="string" calcext:value-type="string">
            <text:p>GRAVATAI2</text:p>
          </table:table-cell>
          <table:table-cell office:value-type="string" calcext:value-type="string">
            <text:p>PORTOALEGRE6</text:p>
          </table:table-cell>
          <table:table-cell office:value-type="float" office:value="0.320819480303966" calcext:value-type="float">
            <text:p>0,320819</text:p>
          </table:table-cell>
          <table:table-cell/>
          <table:table-cell office:value-type="string" calcext:value-type="string">
            <text:p>GRALHA AZUL</text:p>
          </table:table-cell>
          <table:table-cell office:value-type="string" calcext:value-type="string">
            <text:p>UMBARA</text:p>
          </table:table-cell>
          <table:table-cell office:value-type="float" office:value="0.646369826545742" calcext:value-type="float">
            <text:p>0,646370</text:p>
          </table:table-cell>
        </table:table-row>
        <table:table-row table:style-name="ro1">
          <table:table-cell office:value-type="string" calcext:value-type="string">
            <text:p>GRAVATAI3</text:p>
          </table:table-cell>
          <table:table-cell office:value-type="string" calcext:value-type="string">
            <text:p>OSORIO 3</text:p>
          </table:table-cell>
          <table:table-cell office:value-type="float" office:value="0.463826713549466" calcext:value-type="float">
            <text:p>0,463827</text:p>
          </table:table-cell>
          <table:table-cell/>
          <table:table-cell office:value-type="string" calcext:value-type="string">
            <text:p>GRAVATAI</text:p>
          </table:table-cell>
          <table:table-cell office:value-type="string" calcext:value-type="string">
            <text:p>GUAIBA 3</text:p>
          </table:table-cell>
          <table:table-cell office:value-type="float" office:value="1.67932943418469" calcext:value-type="float">
            <text:p>1,679329</text:p>
          </table:table-cell>
        </table:table-row>
        <table:table-row table:style-name="ro1">
          <table:table-cell office:value-type="string" calcext:value-type="string">
            <text:p>GUAIBA 2</text:p>
          </table:table-cell>
          <table:table-cell office:value-type="string" calcext:value-type="string">
            <text:p>GUAIBA 3</text:p>
          </table:table-cell>
          <table:table-cell office:value-type="float" office:value="0.611827031922118" calcext:value-type="float">
            <text:p>0,611827</text:p>
          </table:table-cell>
          <table:table-cell/>
          <table:table-cell office:value-type="string" calcext:value-type="string">
            <text:p>GRAVATAI2</text:p>
          </table:table-cell>
          <table:table-cell office:value-type="string" calcext:value-type="string">
            <text:p>JBO LT GRA2</text:p>
          </table:table-cell>
          <table:table-cell office:value-type="float" office:value="0.594854814149308" calcext:value-type="float">
            <text:p>0,594855</text:p>
          </table:table-cell>
        </table:table-row>
        <table:table-row table:style-name="ro1">
          <table:table-cell office:value-type="string" calcext:value-type="string">
            <text:p>GUAIRA</text:p>
          </table:table-cell>
          <table:table-cell office:value-type="string" calcext:value-type="string">
            <text:p>F.IGUACU 60HZ</text:p>
          </table:table-cell>
          <table:table-cell office:value-type="float" office:value="1.80735019866048" calcext:value-type="float">
            <text:p>1,807350</text:p>
          </table:table-cell>
          <table:table-cell/>
          <table:table-cell office:value-type="string" calcext:value-type="string">
            <text:p>GRAVATAI2</text:p>
          </table:table-cell>
          <table:table-cell office:value-type="string" calcext:value-type="string">
            <text:p>PORTOALEGRE6</text:p>
          </table:table-cell>
          <table:table-cell office:value-type="float" office:value="0.58851527064585" calcext:value-type="float">
            <text:p>0,588515</text:p>
          </table:table-cell>
        </table:table-row>
        <table:table-row table:style-name="ro1">
          <table:table-cell office:value-type="string" calcext:value-type="string">
            <text:p>GUAIRA</text:p>
          </table:table-cell>
          <table:table-cell office:value-type="string" calcext:value-type="string">
            <text:p>SARANDI</text:p>
          </table:table-cell>
          <table:table-cell office:value-type="float" office:value="1.56748178875872" calcext:value-type="float">
            <text:p>1,567482</text:p>
          </table:table-cell>
          <table:table-cell/>
          <table:table-cell office:value-type="string" calcext:value-type="string">
            <text:p>GRAVATAI3</text:p>
          </table:table-cell>
          <table:table-cell office:value-type="string" calcext:value-type="string">
            <text:p>OSORIO 3</text:p>
          </table:table-cell>
          <table:table-cell office:value-type="float" office:value="0.85084952945722" calcext:value-type="float">
            <text:p>0,850850</text:p>
          </table:table-cell>
        </table:table-row>
        <table:table-row table:style-name="ro1">
          <table:table-cell office:value-type="string" calcext:value-type="string">
            <text:p>GUAIRA</text:p>
          </table:table-cell>
          <table:table-cell office:value-type="string" calcext:value-type="string">
            <text:p>UMUARAMA SUL</text:p>
          </table:table-cell>
          <table:table-cell office:value-type="float" office:value="0.434267501130878" calcext:value-type="float">
            <text:p>0,434268</text:p>
          </table:table-cell>
          <table:table-cell/>
          <table:table-cell office:value-type="string" calcext:value-type="string">
            <text:p>GUAIBA 2</text:p>
          </table:table-cell>
          <table:table-cell office:value-type="string" calcext:value-type="string">
            <text:p>GUAIBA 3</text:p>
          </table:table-cell>
          <table:table-cell office:value-type="float" office:value="0.945908986889234" calcext:value-type="float">
            <text:p>0,945909</text:p>
          </table:table-cell>
        </table:table-row>
        <table:table-row table:style-name="ro1">
          <table:table-cell office:value-type="string" calcext:value-type="string">
            <text:p>GUAMA</text:p>
          </table:table-cell>
          <table:table-cell office:value-type="string" calcext:value-type="string">
            <text:p>VILA DO CONDE</text:p>
          </table:table-cell>
          <table:table-cell office:value-type="float" office:value="0.562927244982902" calcext:value-type="float">
            <text:p>0,562927</text:p>
          </table:table-cell>
          <table:table-cell/>
          <table:table-cell office:value-type="string" calcext:value-type="string">
            <text:p>GUAIRA</text:p>
          </table:table-cell>
          <table:table-cell office:value-type="string" calcext:value-type="string">
            <text:p>F.IGUACU 60HZ</text:p>
          </table:table-cell>
          <table:table-cell office:value-type="float" office:value="2.0523206899054" calcext:value-type="float">
            <text:p>2,052321</text:p>
          </table:table-cell>
        </table:table-row>
        <table:table-row table:style-name="ro1">
          <table:table-cell office:value-type="string" calcext:value-type="string">
            <text:p>GUARULHOS</text:p>
          </table:table-cell>
          <table:table-cell office:value-type="string" calcext:value-type="string">
            <text:p>IBIUNA</text:p>
          </table:table-cell>
          <table:table-cell office:value-type="float" office:value="1.19679884408434" calcext:value-type="float">
            <text:p>1,196799</text:p>
          </table:table-cell>
          <table:table-cell/>
          <table:table-cell office:value-type="string" calcext:value-type="string">
            <text:p>GUAIRA</text:p>
          </table:table-cell>
          <table:table-cell office:value-type="string" calcext:value-type="string">
            <text:p>SARANDI</text:p>
          </table:table-cell>
          <table:table-cell office:value-type="float" office:value="2.038674819191" calcext:value-type="float">
            <text:p>2,038675</text:p>
          </table:table-cell>
        </table:table-row>
        <table:table-row table:style-name="ro1">
          <table:table-cell office:value-type="string" calcext:value-type="string">
            <text:p>GUARULHOS</text:p>
          </table:table-cell>
          <table:table-cell office:value-type="string" calcext:value-type="string">
            <text:p>NORTE</text:p>
          </table:table-cell>
          <table:table-cell office:value-type="float" office:value="1.24893401695267" calcext:value-type="float">
            <text:p>1,248934</text:p>
          </table:table-cell>
          <table:table-cell/>
          <table:table-cell office:value-type="string" calcext:value-type="string">
            <text:p>GUAIRA</text:p>
          </table:table-cell>
          <table:table-cell office:value-type="string" calcext:value-type="string">
            <text:p>UMUARAMA SUL</text:p>
          </table:table-cell>
          <table:table-cell office:value-type="float" office:value="0.670160198795265" calcext:value-type="float">
            <text:p>0,670160</text:p>
          </table:table-cell>
        </table:table-row>
        <table:table-row table:style-name="ro1">
          <table:table-cell office:value-type="string" calcext:value-type="string">
            <text:p>GUIL AMORIM-SE</text:p>
          </table:table-cell>
          <table:table-cell office:value-type="string" calcext:value-type="string">
            <text:p>IPATINGA 1</text:p>
          </table:table-cell>
          <table:table-cell office:value-type="float" office:value="0.315793716654768" calcext:value-type="float">
            <text:p>0,315794</text:p>
          </table:table-cell>
          <table:table-cell/>
          <table:table-cell office:value-type="string" calcext:value-type="string">
            <text:p>GUAMA</text:p>
          </table:table-cell>
          <table:table-cell office:value-type="string" calcext:value-type="string">
            <text:p>VILA DO CONDE</text:p>
          </table:table-cell>
          <table:table-cell office:value-type="float" office:value="0.806146891914573" calcext:value-type="float">
            <text:p>0,806147</text:p>
          </table:table-cell>
        </table:table-row>
        <table:table-row table:style-name="ro1">
          <table:table-cell office:value-type="string" calcext:value-type="string">
            <text:p>GURUPI</text:p>
          </table:table-cell>
          <table:table-cell office:value-type="string" calcext:value-type="string">
            <text:p>MIRACEMA</text:p>
          </table:table-cell>
          <table:table-cell office:value-type="float" office:value="1.42905181957592" calcext:value-type="float">
            <text:p>1,429052</text:p>
          </table:table-cell>
          <table:table-cell/>
          <table:table-cell office:value-type="string" calcext:value-type="string">
            <text:p>GUARAPUAVA OEST</text:p>
          </table:table-cell>
          <table:table-cell office:value-type="string" calcext:value-type="string">
            <text:p>IRATI NORTE</text:p>
          </table:table-cell>
          <table:table-cell office:value-type="float" office:value="0.657978712573265" calcext:value-type="float">
            <text:p>0,657979</text:p>
          </table:table-cell>
        </table:table-row>
        <table:table-row table:style-name="ro1">
          <table:table-cell office:value-type="string" calcext:value-type="string">
            <text:p>GURUPI</text:p>
          </table:table-cell>
          <table:table-cell office:value-type="string" calcext:value-type="string">
            <text:p>PEIXE 2</text:p>
          </table:table-cell>
          <table:table-cell office:value-type="float" office:value="1.4034965614344" calcext:value-type="float">
            <text:p>1,403497</text:p>
          </table:table-cell>
          <table:table-cell/>
          <table:table-cell office:value-type="string" calcext:value-type="string">
            <text:p>GUARULHOS</text:p>
          </table:table-cell>
          <table:table-cell office:value-type="string" calcext:value-type="string">
            <text:p>IBIUNA</text:p>
          </table:table-cell>
          <table:table-cell office:value-type="float" office:value="1.67374917034909" calcext:value-type="float">
            <text:p>1,673749</text:p>
          </table:table-cell>
        </table:table-row>
        <table:table-row table:style-name="ro1">
          <table:table-cell office:value-type="string" calcext:value-type="string">
            <text:p>GV DO BRASIL</text:p>
          </table:table-cell>
          <table:table-cell office:value-type="string" calcext:value-type="string">
            <text:p>TAUBATE</text:p>
          </table:table-cell>
          <table:table-cell office:value-type="float" office:value="0.616514626477513" calcext:value-type="float">
            <text:p>0,616515</text:p>
          </table:table-cell>
          <table:table-cell/>
          <table:table-cell office:value-type="string" calcext:value-type="string">
            <text:p>GUARULHOS</text:p>
          </table:table-cell>
          <table:table-cell office:value-type="string" calcext:value-type="string">
            <text:p>NORTE</text:p>
          </table:table-cell>
          <table:table-cell office:value-type="float" office:value="2.02456091062903" calcext:value-type="float">
            <text:p>2,024561</text:p>
          </table:table-cell>
        </table:table-row>
        <table:table-row table:style-name="ro1">
          <table:table-cell office:value-type="string" calcext:value-type="string">
            <text:p>H.BORDEN SUB</text:p>
          </table:table-cell>
          <table:table-cell office:value-type="string" calcext:value-type="string">
            <text:p>MANOE.NOBREGA</text:p>
          </table:table-cell>
          <table:table-cell office:value-type="float" office:value="0.501072825418255" calcext:value-type="float">
            <text:p>0,501073</text:p>
          </table:table-cell>
          <table:table-cell/>
          <table:table-cell office:value-type="string" calcext:value-type="string">
            <text:p>GUIL AMORIM-SE</text:p>
          </table:table-cell>
          <table:table-cell office:value-type="string" calcext:value-type="string">
            <text:p>IPATINGA 1</text:p>
          </table:table-cell>
          <table:table-cell office:value-type="float" office:value="0.580895850959404" calcext:value-type="float">
            <text:p>0,580896</text:p>
          </table:table-cell>
        </table:table-row>
        <table:table-row table:style-name="ro1">
          <table:table-cell office:value-type="string" calcext:value-type="string">
            <text:p>IBIAPINA II</text:p>
          </table:table-cell>
          <table:table-cell office:value-type="string" calcext:value-type="string">
            <text:p>MARANGATU</text:p>
          </table:table-cell>
          <table:table-cell office:value-type="float" office:value="0.479672779687851" calcext:value-type="float">
            <text:p>0,479673</text:p>
          </table:table-cell>
          <table:table-cell/>
          <table:table-cell office:value-type="string" calcext:value-type="string">
            <text:p>GURUPI</text:p>
          </table:table-cell>
          <table:table-cell office:value-type="string" calcext:value-type="string">
            <text:p>MIRACEMA</text:p>
          </table:table-cell>
          <table:table-cell office:value-type="float" office:value="1.79393704958549" calcext:value-type="float">
            <text:p>1,793937</text:p>
          </table:table-cell>
        </table:table-row>
        <table:table-row table:style-name="ro1">
          <table:table-cell office:value-type="string" calcext:value-type="string">
            <text:p>IBIAPINA II</text:p>
          </table:table-cell>
          <table:table-cell office:value-type="string" calcext:value-type="string">
            <text:p>TIANGUA II</text:p>
          </table:table-cell>
          <table:table-cell office:value-type="float" office:value="0.58049857062601" calcext:value-type="float">
            <text:p>0,580499</text:p>
          </table:table-cell>
          <table:table-cell/>
          <table:table-cell office:value-type="string" calcext:value-type="string">
            <text:p>GURUPI</text:p>
          </table:table-cell>
          <table:table-cell office:value-type="string" calcext:value-type="string">
            <text:p>PEIXE 2</text:p>
          </table:table-cell>
          <table:table-cell office:value-type="float" office:value="1.76185667029918" calcext:value-type="float">
            <text:p>1,761857</text:p>
          </table:table-cell>
        </table:table-row>
        <table:table-row table:style-name="ro1">
          <table:table-cell office:value-type="string" calcext:value-type="string">
            <text:p>IBICOARA</text:p>
          </table:table-cell>
          <table:table-cell office:value-type="string" calcext:value-type="string">
            <text:p>POCOES III</text:p>
          </table:table-cell>
          <table:table-cell office:value-type="float" office:value="1.37530971650188" calcext:value-type="float">
            <text:p>1,375310</text:p>
          </table:table-cell>
          <table:table-cell/>
          <table:table-cell office:value-type="string" calcext:value-type="string">
            <text:p>GV DO BRASIL</text:p>
          </table:table-cell>
          <table:table-cell office:value-type="string" calcext:value-type="string">
            <text:p>TAUBATE</text:p>
          </table:table-cell>
          <table:table-cell office:value-type="float" office:value="0.983971490009062" calcext:value-type="float">
            <text:p>0,983971</text:p>
          </table:table-cell>
        </table:table-row>
        <table:table-row table:style-name="ro1">
          <table:table-cell office:value-type="string" calcext:value-type="string">
            <text:p>IBIPORA</text:p>
          </table:table-cell>
          <table:table-cell office:value-type="string" calcext:value-type="string">
            <text:p>LONDRINA ESU</text:p>
          </table:table-cell>
          <table:table-cell office:value-type="float" office:value="0.39038085816778" calcext:value-type="float">
            <text:p>0,390381</text:p>
          </table:table-cell>
          <table:table-cell/>
          <table:table-cell office:value-type="string" calcext:value-type="string">
            <text:p>H.BORDEN SUB</text:p>
          </table:table-cell>
          <table:table-cell office:value-type="string" calcext:value-type="string">
            <text:p>MANOE.NOBREGA</text:p>
          </table:table-cell>
          <table:table-cell office:value-type="float" office:value="0.948909311610107" calcext:value-type="float">
            <text:p>0,948909</text:p>
          </table:table-cell>
        </table:table-row>
        <table:table-row table:style-name="ro1">
          <table:table-cell office:value-type="string" calcext:value-type="string">
            <text:p>IBIUNA</text:p>
          </table:table-cell>
          <table:table-cell office:value-type="string" calcext:value-type="string">
            <text:p>INTERLAGOS</text:p>
          </table:table-cell>
          <table:table-cell office:value-type="float" office:value="1.34827442338241" calcext:value-type="float">
            <text:p>1,348274</text:p>
          </table:table-cell>
          <table:table-cell/>
          <table:table-cell office:value-type="string" calcext:value-type="string">
            <text:p>IBIAPINA II</text:p>
          </table:table-cell>
          <table:table-cell office:value-type="string" calcext:value-type="string">
            <text:p>MARANGATU</text:p>
          </table:table-cell>
          <table:table-cell office:value-type="float" office:value="0.832371856500976" calcext:value-type="float">
            <text:p>0,832372</text:p>
          </table:table-cell>
        </table:table-row>
        <table:table-row table:style-name="ro1">
          <table:table-cell office:value-type="string" calcext:value-type="string">
            <text:p>IBIUNA</text:p>
          </table:table-cell>
          <table:table-cell office:value-type="string" calcext:value-type="string">
            <text:p>TIJUCO PRETO</text:p>
          </table:table-cell>
          <table:table-cell office:value-type="float" office:value="1.29372132720077" calcext:value-type="float">
            <text:p>1,293721</text:p>
          </table:table-cell>
          <table:table-cell/>
          <table:table-cell office:value-type="string" calcext:value-type="string">
            <text:p>IBIAPINA II</text:p>
          </table:table-cell>
          <table:table-cell office:value-type="string" calcext:value-type="string">
            <text:p>TIANGUA II</text:p>
          </table:table-cell>
          <table:table-cell office:value-type="float" office:value="0.867076573490615" calcext:value-type="float">
            <text:p>0,867077</text:p>
          </table:table-cell>
        </table:table-row>
        <table:table-row table:style-name="ro1">
          <table:table-cell office:value-type="string" calcext:value-type="string">
            <text:p>ICO</text:p>
          </table:table-cell>
          <table:table-cell office:value-type="string" calcext:value-type="string">
            <text:p>MILAGRES</text:p>
          </table:table-cell>
          <table:table-cell office:value-type="float" office:value="0.408717989503125" calcext:value-type="float">
            <text:p>0,408718</text:p>
          </table:table-cell>
          <table:table-cell/>
          <table:table-cell office:value-type="string" calcext:value-type="string">
            <text:p>IBICOARA</text:p>
          </table:table-cell>
          <table:table-cell office:value-type="string" calcext:value-type="string">
            <text:p>POCOES III</text:p>
          </table:table-cell>
          <table:table-cell office:value-type="float" office:value="1.66159695073967" calcext:value-type="float">
            <text:p>1,661597</text:p>
          </table:table-cell>
        </table:table-row>
        <table:table-row table:style-name="ro1">
          <table:table-cell office:value-type="string" calcext:value-type="string">
            <text:p>IGAPORA III</text:p>
          </table:table-cell>
          <table:table-cell office:value-type="string" calcext:value-type="string">
            <text:p>PINDAI II</text:p>
          </table:table-cell>
          <table:table-cell office:value-type="float" office:value="0.5838623206063" calcext:value-type="float">
            <text:p>0,583862</text:p>
          </table:table-cell>
          <table:table-cell/>
          <table:table-cell office:value-type="string" calcext:value-type="string">
            <text:p>IBIPORA</text:p>
          </table:table-cell>
          <table:table-cell office:value-type="string" calcext:value-type="string">
            <text:p>LONDRINA ESU</text:p>
          </table:table-cell>
          <table:table-cell office:value-type="float" office:value="0.602434473761692" calcext:value-type="float">
            <text:p>0,602434</text:p>
          </table:table-cell>
        </table:table-row>
        <table:table-row table:style-name="ro1">
          <table:table-cell office:value-type="string" calcext:value-type="string">
            <text:p>IGAPORA III</text:p>
          </table:table-cell>
          <table:table-cell office:value-type="string" calcext:value-type="string">
            <text:p>S. DAS ALMAS II</text:p>
          </table:table-cell>
          <table:table-cell office:value-type="float" office:value="1.50941509397797" calcext:value-type="float">
            <text:p>1,509415</text:p>
          </table:table-cell>
          <table:table-cell/>
          <table:table-cell office:value-type="string" calcext:value-type="string">
            <text:p>IBIUNA</text:p>
          </table:table-cell>
          <table:table-cell office:value-type="string" calcext:value-type="string">
            <text:p>INTERLAGOS</text:p>
          </table:table-cell>
          <table:table-cell office:value-type="float" office:value="1.88559105708843" calcext:value-type="float">
            <text:p>1,885591</text:p>
          </table:table-cell>
        </table:table-row>
        <table:table-row table:style-name="ro1">
          <table:table-cell office:value-type="string" calcext:value-type="string">
            <text:p>IL.SOLTEIRA 2</text:p>
          </table:table-cell>
          <table:table-cell office:value-type="string" calcext:value-type="string">
            <text:p>ILHA SOLTEIRA</text:p>
          </table:table-cell>
          <table:table-cell office:value-type="float" office:value="1.34060702673747" calcext:value-type="float">
            <text:p>1,340607</text:p>
          </table:table-cell>
          <table:table-cell/>
          <table:table-cell office:value-type="string" calcext:value-type="string">
            <text:p>IBIUNA</text:p>
          </table:table-cell>
          <table:table-cell office:value-type="string" calcext:value-type="string">
            <text:p>ITATIBA</text:p>
          </table:table-cell>
          <table:table-cell office:value-type="float" office:value="1.56537445545732" calcext:value-type="float">
            <text:p>1,565374</text:p>
          </table:table-cell>
        </table:table-row>
        <table:table-row table:style-name="ro1">
          <table:table-cell office:value-type="string" calcext:value-type="string">
            <text:p>IL.SOLTEIRA 2</text:p>
          </table:table-cell>
          <table:table-cell office:value-type="string" calcext:value-type="string">
            <text:p>INOCENCIA</text:p>
          </table:table-cell>
          <table:table-cell office:value-type="float" office:value="0.626145717816116" calcext:value-type="float">
            <text:p>0,626146</text:p>
          </table:table-cell>
          <table:table-cell/>
          <table:table-cell office:value-type="string" calcext:value-type="string">
            <text:p>ICO</text:p>
          </table:table-cell>
          <table:table-cell office:value-type="string" calcext:value-type="string">
            <text:p>MILAGRES</text:p>
          </table:table-cell>
          <table:table-cell office:value-type="float" office:value="0.610492104192727" calcext:value-type="float">
            <text:p>0,610492</text:p>
          </table:table-cell>
        </table:table-row>
        <table:table-row table:style-name="ro1">
          <table:table-cell office:value-type="string" calcext:value-type="string">
            <text:p>ILHA SOLTEIRA</text:p>
          </table:table-cell>
          <table:table-cell office:value-type="string" calcext:value-type="string">
            <text:p>MIRASSOL II</text:p>
          </table:table-cell>
          <table:table-cell office:value-type="float" office:value="1.10154762899013" calcext:value-type="float">
            <text:p>1,101548</text:p>
          </table:table-cell>
          <table:table-cell/>
          <table:table-cell office:value-type="string" calcext:value-type="string">
            <text:p>IGAPORA III</text:p>
          </table:table-cell>
          <table:table-cell office:value-type="string" calcext:value-type="string">
            <text:p>PINDAI II</text:p>
          </table:table-cell>
          <table:table-cell office:value-type="float" office:value="0.836940066234727" calcext:value-type="float">
            <text:p>0,836940</text:p>
          </table:table-cell>
        </table:table-row>
        <table:table-row table:style-name="ro1">
          <table:table-cell office:value-type="string" calcext:value-type="string">
            <text:p>ILHA SOLTEIRA</text:p>
          </table:table-cell>
          <table:table-cell office:value-type="string" calcext:value-type="string">
            <text:p>TRES IRMAOS</text:p>
          </table:table-cell>
          <table:table-cell office:value-type="float" office:value="1.14002183202399" calcext:value-type="float">
            <text:p>1,140022</text:p>
          </table:table-cell>
          <table:table-cell/>
          <table:table-cell office:value-type="string" calcext:value-type="string">
            <text:p>IGAPORA III</text:p>
          </table:table-cell>
          <table:table-cell office:value-type="string" calcext:value-type="string">
            <text:p>S. DAS ALMAS II</text:p>
          </table:table-cell>
          <table:table-cell office:value-type="float" office:value="1.89645111076983" calcext:value-type="float">
            <text:p>1,896451</text:p>
          </table:table-cell>
        </table:table-row>
        <table:table-row table:style-name="ro1">
          <table:table-cell office:value-type="string" calcext:value-type="string">
            <text:p>IMBIRUSSU</text:p>
          </table:table-cell>
          <table:table-cell office:value-type="string" calcext:value-type="string">
            <text:p>RIO BRILHANTE</text:p>
          </table:table-cell>
          <table:table-cell office:value-type="float" office:value="0.514324499538289" calcext:value-type="float">
            <text:p>0,514324</text:p>
          </table:table-cell>
          <table:table-cell/>
          <table:table-cell office:value-type="string" calcext:value-type="string">
            <text:p>IJUI 2</text:p>
          </table:table-cell>
          <table:table-cell office:value-type="string" calcext:value-type="string">
            <text:p>SANTO ANGELO2</text:p>
          </table:table-cell>
          <table:table-cell office:value-type="float" office:value="0.597509067762628" calcext:value-type="float">
            <text:p>0,597509</text:p>
          </table:table-cell>
        </table:table-row>
        <table:table-row table:style-name="ro1">
          <table:table-cell office:value-type="string" calcext:value-type="string">
            <text:p>IMBIRUSSU</text:p>
          </table:table-cell>
          <table:table-cell office:value-type="string" calcext:value-type="string">
            <text:p>SIDROLANDIA 2</text:p>
          </table:table-cell>
          <table:table-cell office:value-type="float" office:value="0.443142560508782" calcext:value-type="float">
            <text:p>0,443143</text:p>
          </table:table-cell>
          <table:table-cell/>
          <table:table-cell office:value-type="string" calcext:value-type="string">
            <text:p>IL.SOLTEIRA 2</text:p>
          </table:table-cell>
          <table:table-cell office:value-type="string" calcext:value-type="string">
            <text:p>ILHA SOLTEIRA</text:p>
          </table:table-cell>
          <table:table-cell office:value-type="float" office:value="1.87694587622971" calcext:value-type="float">
            <text:p>1,876946</text:p>
          </table:table-cell>
        </table:table-row>
        <table:table-row table:style-name="ro1">
          <table:table-cell office:value-type="string" calcext:value-type="string">
            <text:p>IMPERATRIZ</text:p>
          </table:table-cell>
          <table:table-cell office:value-type="string" calcext:value-type="string">
            <text:p>COLINAS</text:p>
          </table:table-cell>
          <table:table-cell office:value-type="float" office:value="1.45654046763155" calcext:value-type="float">
            <text:p>1,456540</text:p>
          </table:table-cell>
          <table:table-cell/>
          <table:table-cell office:value-type="string" calcext:value-type="string">
            <text:p>IL.SOLTEIRA 2</text:p>
          </table:table-cell>
          <table:table-cell office:value-type="string" calcext:value-type="string">
            <text:p>INOCENCIA</text:p>
          </table:table-cell>
          <table:table-cell office:value-type="float" office:value="0.975598336715562" calcext:value-type="float">
            <text:p>0,975598</text:p>
          </table:table-cell>
        </table:table-row>
        <table:table-row table:style-name="ro1">
          <table:table-cell office:value-type="string" calcext:value-type="string">
            <text:p>IMPERATRIZ</text:p>
          </table:table-cell>
          <table:table-cell office:value-type="string" calcext:value-type="string">
            <text:p>P.DUTRA</text:p>
          </table:table-cell>
          <table:table-cell office:value-type="float" office:value="1.45456202944472" calcext:value-type="float">
            <text:p>1,454562</text:p>
          </table:table-cell>
          <table:table-cell/>
          <table:table-cell office:value-type="string" calcext:value-type="string">
            <text:p>ILHA SOLTEIRA</text:p>
          </table:table-cell>
          <table:table-cell office:value-type="string" calcext:value-type="string">
            <text:p>MIRASSOL II</text:p>
          </table:table-cell>
          <table:table-cell office:value-type="float" office:value="1.5882023712045" calcext:value-type="float">
            <text:p>1,588202</text:p>
          </table:table-cell>
        </table:table-row>
        <table:table-row table:style-name="ro1">
          <table:table-cell office:value-type="string" calcext:value-type="string">
            <text:p>IMPERATRIZ</text:p>
          </table:table-cell>
          <table:table-cell office:value-type="string" calcext:value-type="string">
            <text:p>PORTO FRANCO</text:p>
          </table:table-cell>
          <table:table-cell office:value-type="float" office:value="0.38851938567754" calcext:value-type="float">
            <text:p>0,388519</text:p>
          </table:table-cell>
          <table:table-cell/>
          <table:table-cell office:value-type="string" calcext:value-type="string">
            <text:p>ILHA SOLTEIRA</text:p>
          </table:table-cell>
          <table:table-cell office:value-type="string" calcext:value-type="string">
            <text:p>TRES IRMAOS</text:p>
          </table:table-cell>
          <table:table-cell office:value-type="float" office:value="1.64367416278251" calcext:value-type="float">
            <text:p>1,643674</text:p>
          </table:table-cell>
        </table:table-row>
        <table:table-row table:style-name="ro1">
          <table:table-cell office:value-type="string" calcext:value-type="string">
            <text:p>INDAIAL</text:p>
          </table:table-cell>
          <table:table-cell office:value-type="string" calcext:value-type="string">
            <text:p>RIO DO SUL</text:p>
          </table:table-cell>
          <table:table-cell office:value-type="float" office:value="0.354926035131191" calcext:value-type="float">
            <text:p>0,354926</text:p>
          </table:table-cell>
          <table:table-cell/>
          <table:table-cell office:value-type="string" calcext:value-type="string">
            <text:p>IMBIRUSSU</text:p>
          </table:table-cell>
          <table:table-cell office:value-type="string" calcext:value-type="string">
            <text:p>RIO BRILHANTE</text:p>
          </table:table-cell>
          <table:table-cell office:value-type="float" office:value="0.91839715343962" calcext:value-type="float">
            <text:p>0,918397</text:p>
          </table:table-cell>
        </table:table-row>
        <table:table-row table:style-name="ro1">
          <table:table-cell office:value-type="string" calcext:value-type="string">
            <text:p>INTEGRADORA</text:p>
          </table:table-cell>
          <table:table-cell office:value-type="string" calcext:value-type="string">
            <text:p>ONCA PUMA</text:p>
          </table:table-cell>
          <table:table-cell office:value-type="float" office:value="0.452402710208232" calcext:value-type="float">
            <text:p>0,452403</text:p>
          </table:table-cell>
          <table:table-cell/>
          <table:table-cell office:value-type="string" calcext:value-type="string">
            <text:p>IMBIRUSSU</text:p>
          </table:table-cell>
          <table:table-cell office:value-type="string" calcext:value-type="string">
            <text:p>SIDROLANDIA 2</text:p>
          </table:table-cell>
          <table:table-cell office:value-type="float" office:value="0.79129200826435" calcext:value-type="float">
            <text:p>0,791292</text:p>
          </table:table-cell>
        </table:table-row>
        <table:table-row table:style-name="ro1">
          <table:table-cell office:value-type="string" calcext:value-type="string">
            <text:p>INTEGRADORA</text:p>
          </table:table-cell>
          <table:table-cell office:value-type="string" calcext:value-type="string">
            <text:p>SERRA PELADA</text:p>
          </table:table-cell>
          <table:table-cell office:value-type="float" office:value="1.33115623234496" calcext:value-type="float">
            <text:p>1,331156</text:p>
          </table:table-cell>
          <table:table-cell/>
          <table:table-cell office:value-type="string" calcext:value-type="string">
            <text:p>IMPERATRIZ</text:p>
          </table:table-cell>
          <table:table-cell office:value-type="string" calcext:value-type="string">
            <text:p>COLINAS</text:p>
          </table:table-cell>
          <table:table-cell office:value-type="float" office:value="1.78067955772158" calcext:value-type="float">
            <text:p>1,780680</text:p>
          </table:table-cell>
        </table:table-row>
        <table:table-row table:style-name="ro1">
          <table:table-cell office:value-type="string" calcext:value-type="string">
            <text:p>INTEGRADORA</text:p>
          </table:table-cell>
          <table:table-cell office:value-type="string" calcext:value-type="string">
            <text:p>XINGUARA 2</text:p>
          </table:table-cell>
          <table:table-cell office:value-type="float" office:value="0.388780268194859" calcext:value-type="float">
            <text:p>0,388780</text:p>
          </table:table-cell>
          <table:table-cell/>
          <table:table-cell office:value-type="string" calcext:value-type="string">
            <text:p>IMPERATRIZ</text:p>
          </table:table-cell>
          <table:table-cell office:value-type="string" calcext:value-type="string">
            <text:p>P.DUTRA</text:p>
          </table:table-cell>
          <table:table-cell office:value-type="float" office:value="1.731806876313" calcext:value-type="float">
            <text:p>1,731807</text:p>
          </table:table-cell>
        </table:table-row>
        <table:table-row table:style-name="ro1">
          <table:table-cell office:value-type="string" calcext:value-type="string">
            <text:p>INTERLAGOS</text:p>
          </table:table-cell>
          <table:table-cell office:value-type="string" calcext:value-type="string">
            <text:p>PIRATININGA 2</text:p>
          </table:table-cell>
          <table:table-cell office:value-type="float" office:value="0.792490785854286" calcext:value-type="float">
            <text:p>0,792491</text:p>
          </table:table-cell>
          <table:table-cell/>
          <table:table-cell office:value-type="string" calcext:value-type="string">
            <text:p>IMPERATRIZ</text:p>
          </table:table-cell>
          <table:table-cell office:value-type="string" calcext:value-type="string">
            <text:p>PORTO FRANCO</text:p>
          </table:table-cell>
          <table:table-cell office:value-type="float" office:value="0.548827199444247" calcext:value-type="float">
            <text:p>0,548827</text:p>
          </table:table-cell>
        </table:table-row>
        <table:table-row table:style-name="ro1">
          <table:table-cell office:value-type="string" calcext:value-type="string">
            <text:p>INTERLAGOS</text:p>
          </table:table-cell>
          <table:table-cell office:value-type="string" calcext:value-type="string">
            <text:p>XAVANTES</text:p>
          </table:table-cell>
          <table:table-cell office:value-type="float" office:value="1.2666111718815" calcext:value-type="float">
            <text:p>1,266611</text:p>
          </table:table-cell>
          <table:table-cell/>
          <table:table-cell office:value-type="string" calcext:value-type="string">
            <text:p>INDAIAL</text:p>
          </table:table-cell>
          <table:table-cell office:value-type="string" calcext:value-type="string">
            <text:p>RIO DO SUL</text:p>
          </table:table-cell>
          <table:table-cell office:value-type="float" office:value="0.663696266648484" calcext:value-type="float">
            <text:p>0,663696</text:p>
          </table:table-cell>
        </table:table-row>
        <table:table-row table:style-name="ro1">
          <table:table-cell office:value-type="string" calcext:value-type="string">
            <text:p>IPATINGA 1</text:p>
          </table:table-cell>
          <table:table-cell office:value-type="string" calcext:value-type="string">
            <text:p>MESQUITA</text:p>
          </table:table-cell>
          <table:table-cell office:value-type="float" office:value="0.400273556468003" calcext:value-type="float">
            <text:p>0,400274</text:p>
          </table:table-cell>
          <table:table-cell/>
          <table:table-cell office:value-type="string" calcext:value-type="string">
            <text:p>INTEGRADORA</text:p>
          </table:table-cell>
          <table:table-cell office:value-type="string" calcext:value-type="string">
            <text:p>ONCA PUMA</text:p>
          </table:table-cell>
          <table:table-cell office:value-type="float" office:value="0.647868871117035" calcext:value-type="float">
            <text:p>0,647869</text:p>
          </table:table-cell>
        </table:table-row>
        <table:table-row table:style-name="ro1">
          <table:table-cell office:value-type="string" calcext:value-type="string">
            <text:p>IRAPE-SE</text:p>
          </table:table-cell>
          <table:table-cell office:value-type="string" calcext:value-type="string">
            <text:p>MONTESCLAROS2</text:p>
          </table:table-cell>
          <table:table-cell office:value-type="float" office:value="0.711366844551571" calcext:value-type="float">
            <text:p>0,711367</text:p>
          </table:table-cell>
          <table:table-cell/>
          <table:table-cell office:value-type="string" calcext:value-type="string">
            <text:p>INTEGRADORA</text:p>
          </table:table-cell>
          <table:table-cell office:value-type="string" calcext:value-type="string">
            <text:p>SERRA PELADA</text:p>
          </table:table-cell>
          <table:table-cell office:value-type="float" office:value="1.60669119807476" calcext:value-type="float">
            <text:p>1,606691</text:p>
          </table:table-cell>
        </table:table-row>
        <table:table-row table:style-name="ro1">
          <table:table-cell office:value-type="string" calcext:value-type="string">
            <text:p>IRATI NORTE</text:p>
          </table:table-cell>
          <table:table-cell office:value-type="string" calcext:value-type="string">
            <text:p>PONTA GROSSA</text:p>
          </table:table-cell>
          <table:table-cell office:value-type="float" office:value="0.414974998781361" calcext:value-type="float">
            <text:p>0,414975</text:p>
          </table:table-cell>
          <table:table-cell/>
          <table:table-cell office:value-type="string" calcext:value-type="string">
            <text:p>INTEGRADORA</text:p>
          </table:table-cell>
          <table:table-cell office:value-type="string" calcext:value-type="string">
            <text:p>XINGUARA 2</text:p>
          </table:table-cell>
          <table:table-cell office:value-type="float" office:value="0.556757569714927" calcext:value-type="float">
            <text:p>0,556758</text:p>
          </table:table-cell>
        </table:table-row>
        <table:table-row table:style-name="ro1">
          <table:table-cell office:value-type="string" calcext:value-type="string">
            <text:p>IRECE</text:p>
          </table:table-cell>
          <table:table-cell office:value-type="string" calcext:value-type="string">
            <text:p>OUROLANDIA II</text:p>
          </table:table-cell>
          <table:table-cell office:value-type="float" office:value="0.374863469451264" calcext:value-type="float">
            <text:p>0,374863</text:p>
          </table:table-cell>
          <table:table-cell/>
          <table:table-cell office:value-type="string" calcext:value-type="string">
            <text:p>INTERLAGOS</text:p>
          </table:table-cell>
          <table:table-cell office:value-type="string" calcext:value-type="string">
            <text:p>PIRATININGA 2</text:p>
          </table:table-cell>
          <table:table-cell office:value-type="float" office:value="1.28465222765653" calcext:value-type="float">
            <text:p>1,284652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MACHADINHO</text:p>
          </table:table-cell>
          <table:table-cell office:value-type="float" office:value="1.17917193199826" calcext:value-type="float">
            <text:p>1,179172</text:p>
          </table:table-cell>
          <table:table-cell/>
          <table:table-cell office:value-type="string" calcext:value-type="string">
            <text:p>INTERLAGOS</text:p>
          </table:table-cell>
          <table:table-cell office:value-type="string" calcext:value-type="string">
            <text:p>XAVANTES</text:p>
          </table:table-cell>
          <table:table-cell office:value-type="float" office:value="2.05321612891459" calcext:value-type="float">
            <text:p>2,053216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PINHALZINHO 2</text:p>
          </table:table-cell>
          <table:table-cell office:value-type="float" office:value="0.513228210703836" calcext:value-type="float">
            <text:p>0,513228</text:p>
          </table:table-cell>
          <table:table-cell/>
          <table:table-cell office:value-type="string" calcext:value-type="string">
            <text:p>IPATINGA 1</text:p>
          </table:table-cell>
          <table:table-cell office:value-type="string" calcext:value-type="string">
            <text:p>MESQUITA</text:p>
          </table:table-cell>
          <table:table-cell office:value-type="float" office:value="0.620546985312472" calcext:value-type="float">
            <text:p>0,620547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S.SANTIAGO</text:p>
          </table:table-cell>
          <table:table-cell office:value-type="float" office:value="1.37852359136478" calcext:value-type="float">
            <text:p>1,378524</text:p>
          </table:table-cell>
          <table:table-cell/>
          <table:table-cell office:value-type="string" calcext:value-type="string">
            <text:p>IRAPE-SE</text:p>
          </table:table-cell>
          <table:table-cell office:value-type="string" calcext:value-type="string">
            <text:p>MONTESCLAROS2</text:p>
          </table:table-cell>
          <table:table-cell office:value-type="float" office:value="1.12011955427228" calcext:value-type="float">
            <text:p>1,120120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XANXERE ESU</text:p>
          </table:table-cell>
          <table:table-cell office:value-type="float" office:value="0.487288475075005" calcext:value-type="float">
            <text:p>0,487288</text:p>
          </table:table-cell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MACHADINHO</text:p>
          </table:table-cell>
          <table:table-cell office:value-type="float" office:value="1.56619568474449" calcext:value-type="float">
            <text:p>1,566196</text:p>
          </table:table-cell>
        </table:table-row>
        <table:table-row table:style-name="ro1">
          <table:table-cell office:value-type="string" calcext:value-type="string">
            <text:p>ITABERA</text:p>
          </table:table-cell>
          <table:table-cell office:value-type="string" calcext:value-type="string">
            <text:p>IVAIPORA FUR</text:p>
          </table:table-cell>
          <table:table-cell office:value-type="float" office:value="2.39316669549539" calcext:value-type="float">
            <text:p>2,393167</text:p>
          </table:table-cell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PINHALZINHO 2</text:p>
          </table:table-cell>
          <table:table-cell office:value-type="float" office:value="0.808836467589179" calcext:value-type="float">
            <text:p>0,808836</text:p>
          </table:table-cell>
        </table:table-row>
        <table:table-row table:style-name="ro1">
          <table:table-cell office:value-type="string" calcext:value-type="string">
            <text:p>ITABIRA 2</text:p>
          </table:table-cell>
          <table:table-cell office:value-type="string" calcext:value-type="string">
            <text:p>ITABIRA 5</text:p>
          </table:table-cell>
          <table:table-cell office:value-type="float" office:value="0.411397012772047" calcext:value-type="float">
            <text:p>0,411397</text:p>
          </table:table-cell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S.SANTIAGO</text:p>
          </table:table-cell>
          <table:table-cell office:value-type="float" office:value="1.81184639096552" calcext:value-type="float">
            <text:p>1,811846</text:p>
          </table:table-cell>
        </table:table-row>
        <table:table-row table:style-name="ro1">
          <table:table-cell office:value-type="string" calcext:value-type="string">
            <text:p>ITABIRA 2</text:p>
          </table:table-cell>
          <table:table-cell office:value-type="string" calcext:value-type="string">
            <text:p>J.MONLEVADE 4</text:p>
          </table:table-cell>
          <table:table-cell office:value-type="float" office:value="0.304656362534002" calcext:value-type="float">
            <text:p>0,304656</text:p>
          </table:table-cell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XANXERE ESU</text:p>
          </table:table-cell>
          <table:table-cell office:value-type="float" office:value="0.767956009931858" calcext:value-type="float">
            <text:p>0,767956</text:p>
          </table:table-cell>
        </table:table-row>
        <table:table-row table:style-name="ro1">
          <table:table-cell office:value-type="string" calcext:value-type="string">
            <text:p>ITABIRA 2</text:p>
          </table:table-cell>
          <table:table-cell office:value-type="string" calcext:value-type="string">
            <text:p>NOVA ERA 2</text:p>
          </table:table-cell>
          <table:table-cell office:value-type="float" office:value="0.30086942192268" calcext:value-type="float">
            <text:p>0,300869</text:p>
          </table:table-cell>
          <table:table-cell/>
          <table:table-cell office:value-type="string" calcext:value-type="string">
            <text:p>ITABERA</text:p>
          </table:table-cell>
          <table:table-cell office:value-type="string" calcext:value-type="string">
            <text:p>IVAIPORA FUR</text:p>
          </table:table-cell>
          <table:table-cell office:value-type="float" office:value="2.41287910037302" calcext:value-type="float">
            <text:p>2,412879</text:p>
          </table:table-cell>
        </table:table-row>
        <table:table-row table:style-name="ro1">
          <table:table-cell office:value-type="string" calcext:value-type="string">
            <text:p>ITABIRA 4</text:p>
          </table:table-cell>
          <table:table-cell office:value-type="string" calcext:value-type="string">
            <text:p>TAQUARIL</text:p>
          </table:table-cell>
          <table:table-cell office:value-type="float" office:value="0.36502489998214" calcext:value-type="float">
            <text:p>0,365025</text:p>
          </table:table-cell>
          <table:table-cell/>
          <table:table-cell office:value-type="string" calcext:value-type="string">
            <text:p>ITABIRA 2</text:p>
          </table:table-cell>
          <table:table-cell office:value-type="string" calcext:value-type="string">
            <text:p>ITABIRA 5</text:p>
          </table:table-cell>
          <table:table-cell office:value-type="float" office:value="0.637791759952689" calcext:value-type="float">
            <text:p>0,637792</text:p>
          </table:table-cell>
        </table:table-row>
        <table:table-row table:style-name="ro1">
          <table:table-cell office:value-type="string" calcext:value-type="string">
            <text:p>ITABIRA 5</text:p>
          </table:table-cell>
          <table:table-cell office:value-type="string" calcext:value-type="string">
            <text:p>P. JUSCELINO</text:p>
          </table:table-cell>
          <table:table-cell office:value-type="float" office:value="1.75897909936002" calcext:value-type="float">
            <text:p>1,758979</text:p>
          </table:table-cell>
          <table:table-cell/>
          <table:table-cell office:value-type="string" calcext:value-type="string">
            <text:p>ITABIRA 2</text:p>
          </table:table-cell>
          <table:table-cell office:value-type="string" calcext:value-type="string">
            <text:p>J.MONLEVADE 4</text:p>
          </table:table-cell>
          <table:table-cell office:value-type="float" office:value="0.5604089240251" calcext:value-type="float">
            <text:p>0,560409</text:p>
          </table:table-cell>
        </table:table-row>
        <table:table-row table:style-name="ro1">
          <table:table-cell office:value-type="string" calcext:value-type="string">
            <text:p>ITABIRA 5</text:p>
          </table:table-cell>
          <table:table-cell office:value-type="string" calcext:value-type="string">
            <text:p>SABARA 3</text:p>
          </table:table-cell>
          <table:table-cell office:value-type="float" office:value="0.390977523527869" calcext:value-type="float">
            <text:p>0,390978</text:p>
          </table:table-cell>
          <table:table-cell/>
          <table:table-cell office:value-type="string" calcext:value-type="string">
            <text:p>ITABIRA 2</text:p>
          </table:table-cell>
          <table:table-cell office:value-type="string" calcext:value-type="string">
            <text:p>NOVA ERA 2</text:p>
          </table:table-cell>
          <table:table-cell office:value-type="float" office:value="0.553442927005751" calcext:value-type="float">
            <text:p>0,553443</text:p>
          </table:table-cell>
        </table:table-row>
        <table:table-row table:style-name="ro1">
          <table:table-cell office:value-type="string" calcext:value-type="string">
            <text:p>ITABIRA 5</text:p>
          </table:table-cell>
          <table:table-cell office:value-type="string" calcext:value-type="string">
            <text:p>VESPASIANO 2</text:p>
          </table:table-cell>
          <table:table-cell office:value-type="float" office:value="1.30876689252219" calcext:value-type="float">
            <text:p>1,308767</text:p>
          </table:table-cell>
          <table:table-cell/>
          <table:table-cell office:value-type="string" calcext:value-type="string">
            <text:p>ITABIRA 4</text:p>
          </table:table-cell>
          <table:table-cell office:value-type="string" calcext:value-type="string">
            <text:p>TAQUARIL</text:p>
          </table:table-cell>
          <table:table-cell office:value-type="float" office:value="0.621234069622381" calcext:value-type="float">
            <text:p>0,621234</text:p>
          </table:table-cell>
        </table:table-row>
        <table:table-row table:style-name="ro1">
          <table:table-cell office:value-type="string" calcext:value-type="string">
            <text:p>ITABIRITO 2</text:p>
          </table:table-cell>
          <table:table-cell office:value-type="string" calcext:value-type="string">
            <text:p>JECEABA</text:p>
          </table:table-cell>
          <table:table-cell office:value-type="float" office:value="0.814884579801449" calcext:value-type="float">
            <text:p>0,814885</text:p>
          </table:table-cell>
          <table:table-cell/>
          <table:table-cell office:value-type="string" calcext:value-type="string">
            <text:p>ITABIRA 5</text:p>
          </table:table-cell>
          <table:table-cell office:value-type="string" calcext:value-type="string">
            <text:p>NEVES 1</text:p>
          </table:table-cell>
          <table:table-cell office:value-type="float" office:value="1.73415501352197" calcext:value-type="float">
            <text:p>1,734155</text:p>
          </table:table-cell>
        </table:table-row>
        <table:table-row table:style-name="ro1">
          <table:table-cell office:value-type="string" calcext:value-type="string">
            <text:p>ITABIRITO 2</text:p>
          </table:table-cell>
          <table:table-cell office:value-type="string" calcext:value-type="string">
            <text:p>S. G. DO PARA</text:p>
          </table:table-cell>
          <table:table-cell office:value-type="float" office:value="1.32959097583726" calcext:value-type="float">
            <text:p>1,329591</text:p>
          </table:table-cell>
          <table:table-cell/>
          <table:table-cell office:value-type="string" calcext:value-type="string">
            <text:p>ITABIRA 5</text:p>
          </table:table-cell>
          <table:table-cell office:value-type="string" calcext:value-type="string">
            <text:p>P. JUSCELINO</text:p>
          </table:table-cell>
          <table:table-cell office:value-type="float" office:value="2.2982720177624" calcext:value-type="float">
            <text:p>2,298272</text:p>
          </table:table-cell>
        </table:table-row>
        <table:table-row table:style-name="ro1">
          <table:table-cell office:value-type="string" calcext:value-type="string">
            <text:p>ITABIRITO 2</text:p>
          </table:table-cell>
          <table:table-cell office:value-type="string" calcext:value-type="string">
            <text:p>VESPASIANO 2</text:p>
          </table:table-cell>
          <table:table-cell office:value-type="float" office:value="1.35556586208544" calcext:value-type="float">
            <text:p>1,355566</text:p>
          </table:table-cell>
          <table:table-cell/>
          <table:table-cell office:value-type="string" calcext:value-type="string">
            <text:p>ITABIRA 5</text:p>
          </table:table-cell>
          <table:table-cell office:value-type="string" calcext:value-type="string">
            <text:p>SABARA 3</text:p>
          </table:table-cell>
          <table:table-cell office:value-type="float" office:value="0.606135278310721" calcext:value-type="float">
            <text:p>0,606135</text:p>
          </table:table-cell>
        </table:table-row>
        <table:table-row table:style-name="ro1">
          <table:table-cell office:value-type="string" calcext:value-type="string">
            <text:p>ITABUNA III</text:p>
          </table:table-cell>
          <table:table-cell office:value-type="string" calcext:value-type="string">
            <text:p>ITAPEBI SE</text:p>
          </table:table-cell>
          <table:table-cell office:value-type="float" office:value="0.340018804345396" calcext:value-type="float">
            <text:p>0,340019</text:p>
          </table:table-cell>
          <table:table-cell/>
          <table:table-cell office:value-type="string" calcext:value-type="string">
            <text:p>ITABIRA 5</text:p>
          </table:table-cell>
          <table:table-cell office:value-type="string" calcext:value-type="string">
            <text:p>VESPASIANO 2</text:p>
          </table:table-cell>
          <table:table-cell office:value-type="float" office:value="1.71002732661916" calcext:value-type="float">
            <text:p>1,710027</text:p>
          </table:table-cell>
        </table:table-row>
        <table:table-row table:style-name="ro1">
          <table:table-cell office:value-type="string" calcext:value-type="string">
            <text:p>ITACAIUNAS</text:p>
          </table:table-cell>
          <table:table-cell office:value-type="string" calcext:value-type="string">
            <text:p>SERRA PELADA</text:p>
          </table:table-cell>
          <table:table-cell office:value-type="float" office:value="1.49804744008056" calcext:value-type="float">
            <text:p>1,498047</text:p>
          </table:table-cell>
          <table:table-cell/>
          <table:table-cell office:value-type="string" calcext:value-type="string">
            <text:p>ITABIRITO 2</text:p>
          </table:table-cell>
          <table:table-cell office:value-type="string" calcext:value-type="string">
            <text:p>JECEABA</text:p>
          </table:table-cell>
          <table:table-cell office:value-type="float" office:value="1.16883135765363" calcext:value-type="float">
            <text:p>1,168831</text:p>
          </table:table-cell>
        </table:table-row>
        <table:table-row table:style-name="ro1">
          <table:table-cell office:value-type="string" calcext:value-type="string">
            <text:p>ITAGIBA</text:p>
          </table:table-cell>
          <table:table-cell office:value-type="string" calcext:value-type="string">
            <text:p>POCOES II</text:p>
          </table:table-cell>
          <table:table-cell office:value-type="float" office:value="0.307756562100328" calcext:value-type="float">
            <text:p>0,307757</text:p>
          </table:table-cell>
          <table:table-cell/>
          <table:table-cell office:value-type="string" calcext:value-type="string">
            <text:p>ITABIRITO 2</text:p>
          </table:table-cell>
          <table:table-cell office:value-type="string" calcext:value-type="string">
            <text:p>S. G. DO PARA</text:p>
          </table:table-cell>
          <table:table-cell office:value-type="float" office:value="1.73723595462162" calcext:value-type="float">
            <text:p>1,737236</text:p>
          </table:table-cell>
        </table:table-row>
        <table:table-row table:style-name="ro1">
          <table:table-cell office:value-type="string" calcext:value-type="string">
            <text:p>ITAGUACU</text:p>
          </table:table-cell>
          <table:table-cell office:value-type="string" calcext:value-type="string">
            <text:p>SAO SIMAO-SE</text:p>
          </table:table-cell>
          <table:table-cell office:value-type="float" office:value="1.29376232517484" calcext:value-type="float">
            <text:p>1,293762</text:p>
          </table:table-cell>
          <table:table-cell/>
          <table:table-cell office:value-type="string" calcext:value-type="string">
            <text:p>ITABIRITO 2</text:p>
          </table:table-cell>
          <table:table-cell office:value-type="string" calcext:value-type="string">
            <text:p>VESPASIANO 2</text:p>
          </table:table-cell>
          <table:table-cell office:value-type="float" office:value="1.77117459223844" calcext:value-type="float">
            <text:p>1,771175</text:p>
          </table:table-cell>
        </table:table-row>
        <table:table-row table:style-name="ro1">
          <table:table-cell office:value-type="string" calcext:value-type="string">
            <text:p>ITAJAI 2</text:p>
          </table:table-cell>
          <table:table-cell office:value-type="string" calcext:value-type="string">
            <text:p>ITAJAI</text:p>
          </table:table-cell>
          <table:table-cell office:value-type="float" office:value="0.47599125620614" calcext:value-type="float">
            <text:p>0,475991</text:p>
          </table:table-cell>
          <table:table-cell/>
          <table:table-cell office:value-type="string" calcext:value-type="string">
            <text:p>ITABUNA III</text:p>
          </table:table-cell>
          <table:table-cell office:value-type="string" calcext:value-type="string">
            <text:p>ITAPEBI SE</text:p>
          </table:table-cell>
          <table:table-cell office:value-type="float" office:value="0.578289864304456" calcext:value-type="float">
            <text:p>0,578290</text:p>
          </table:table-cell>
        </table:table-row>
        <table:table-row table:style-name="ro1">
          <table:table-cell office:value-type="string" calcext:value-type="string">
            <text:p>ITAJAI 2</text:p>
          </table:table-cell>
          <table:table-cell office:value-type="string" calcext:value-type="string">
            <text:p>JOINVILLE SUL</text:p>
          </table:table-cell>
          <table:table-cell office:value-type="float" office:value="1.50004503942675" calcext:value-type="float">
            <text:p>1,500045</text:p>
          </table:table-cell>
          <table:table-cell/>
          <table:table-cell office:value-type="string" calcext:value-type="string">
            <text:p>ITACAIUNAS</text:p>
          </table:table-cell>
          <table:table-cell office:value-type="string" calcext:value-type="string">
            <text:p>SERRA PELADA</text:p>
          </table:table-cell>
          <table:table-cell office:value-type="float" office:value="1.8081270836526" calcext:value-type="float">
            <text:p>1,808127</text:p>
          </table:table-cell>
        </table:table-row>
        <table:table-row table:style-name="ro1">
          <table:table-cell office:value-type="string" calcext:value-type="string">
            <text:p>ITAPETI</text:p>
          </table:table-cell>
          <table:table-cell office:value-type="string" calcext:value-type="string">
            <text:p>MOGI CRUZES</text:p>
          </table:table-cell>
          <table:table-cell office:value-type="float" office:value="0.626524243291148" calcext:value-type="float">
            <text:p>0,626524</text:p>
          </table:table-cell>
          <table:table-cell/>
          <table:table-cell office:value-type="string" calcext:value-type="string">
            <text:p>ITAGIBA</text:p>
          </table:table-cell>
          <table:table-cell office:value-type="string" calcext:value-type="string">
            <text:p>POCOES II</text:p>
          </table:table-cell>
          <table:table-cell office:value-type="float" office:value="0.523419582274096" calcext:value-type="float">
            <text:p>0,523420</text:p>
          </table:table-cell>
        </table:table-row>
        <table:table-row table:style-name="ro1">
          <table:table-cell office:value-type="string" calcext:value-type="string">
            <text:p>ITAPETI</text:p>
          </table:table-cell>
          <table:table-cell office:value-type="string" calcext:value-type="string">
            <text:p>NORDESTE</text:p>
          </table:table-cell>
          <table:table-cell office:value-type="float" office:value="0.780829406543775" calcext:value-type="float">
            <text:p>0,780829</text:p>
          </table:table-cell>
          <table:table-cell/>
          <table:table-cell office:value-type="string" calcext:value-type="string">
            <text:p>ITAGUACU</text:p>
          </table:table-cell>
          <table:table-cell office:value-type="string" calcext:value-type="string">
            <text:p>SAO SIMAO-SE</text:p>
          </table:table-cell>
          <table:table-cell office:value-type="float" office:value="1.66162271753191" calcext:value-type="float">
            <text:p>1,661623</text:p>
          </table:table-cell>
        </table:table-row>
        <table:table-row table:style-name="ro1">
          <table:table-cell office:value-type="string" calcext:value-type="string">
            <text:p>ITAPETI</text:p>
          </table:table-cell>
          <table:table-cell office:value-type="string" calcext:value-type="string">
            <text:p>TIJUCO PRETO</text:p>
          </table:table-cell>
          <table:table-cell office:value-type="float" office:value="1.02486051940952" calcext:value-type="float">
            <text:p>1,024861</text:p>
          </table:table-cell>
          <table:table-cell/>
          <table:table-cell office:value-type="string" calcext:value-type="string">
            <text:p>ITAJAI 2</text:p>
          </table:table-cell>
          <table:table-cell office:value-type="string" calcext:value-type="string">
            <text:p>ITAJAI</text:p>
          </table:table-cell>
          <table:table-cell office:value-type="float" office:value="0.750151839364259" calcext:value-type="float">
            <text:p>0,750152</text:p>
          </table:table-cell>
        </table:table-row>
        <table:table-row table:style-name="ro1">
          <table:table-cell office:value-type="string" calcext:value-type="string">
            <text:p>ITAUBA</text:p>
          </table:table-cell>
          <table:table-cell office:value-type="string" calcext:value-type="string">
            <text:p>P.PETROQUIMIC</text:p>
          </table:table-cell>
          <table:table-cell office:value-type="float" office:value="0.39134499121127" calcext:value-type="float">
            <text:p>0,391345</text:p>
          </table:table-cell>
          <table:table-cell/>
          <table:table-cell office:value-type="string" calcext:value-type="string">
            <text:p>ITAJAI 2</text:p>
          </table:table-cell>
          <table:table-cell office:value-type="string" calcext:value-type="string">
            <text:p>JOINVILLE SUL</text:p>
          </table:table-cell>
          <table:table-cell office:value-type="float" office:value="1.99238465903039" calcext:value-type="float">
            <text:p>1,992385</text:p>
          </table:table-cell>
        </table:table-row>
        <table:table-row table:style-name="ro1">
          <table:table-cell office:value-type="string" calcext:value-type="string">
            <text:p>ITAUBA</text:p>
          </table:table-cell>
          <table:table-cell office:value-type="string" calcext:value-type="string">
            <text:p>U.D.FRANCISCA</text:p>
          </table:table-cell>
          <table:table-cell office:value-type="float" office:value="0.333093286235515" calcext:value-type="float">
            <text:p>0,333093</text:p>
          </table:table-cell>
          <table:table-cell/>
          <table:table-cell office:value-type="string" calcext:value-type="string">
            <text:p>ITAPETI</text:p>
          </table:table-cell>
          <table:table-cell office:value-type="string" calcext:value-type="string">
            <text:p>MOGI CRUZES</text:p>
          </table:table-cell>
          <table:table-cell office:value-type="float" office:value="1.0156152969743" calcext:value-type="float">
            <text:p>1,015615</text:p>
          </table:table-cell>
        </table:table-row>
        <table:table-row table:style-name="ro1">
          <table:table-cell office:value-type="string" calcext:value-type="string">
            <text:p>ITUMBIARA</text:p>
          </table:table-cell>
          <table:table-cell office:value-type="string" calcext:value-type="string">
            <text:p>BANDEIRANTES</text:p>
          </table:table-cell>
          <table:table-cell office:value-type="float" office:value="0.740098192433419" calcext:value-type="float">
            <text:p>0,740098</text:p>
          </table:table-cell>
          <table:table-cell/>
          <table:table-cell office:value-type="string" calcext:value-type="string">
            <text:p>ITAPETI</text:p>
          </table:table-cell>
          <table:table-cell office:value-type="string" calcext:value-type="string">
            <text:p>NORDESTE</text:p>
          </table:table-cell>
          <table:table-cell office:value-type="float" office:value="1.26574876887039" calcext:value-type="float">
            <text:p>1,265749</text:p>
          </table:table-cell>
        </table:table-row>
        <table:table-row table:style-name="ro1">
          <table:table-cell office:value-type="string" calcext:value-type="string">
            <text:p>ITUMBIARA</text:p>
          </table:table-cell>
          <table:table-cell office:value-type="string" calcext:value-type="string">
            <text:p>CORUMBA</text:p>
          </table:table-cell>
          <table:table-cell office:value-type="float" office:value="0.698201186707919" calcext:value-type="float">
            <text:p>0,698201</text:p>
          </table:table-cell>
          <table:table-cell/>
          <table:table-cell office:value-type="string" calcext:value-type="string">
            <text:p>ITAPETI</text:p>
          </table:table-cell>
          <table:table-cell office:value-type="string" calcext:value-type="string">
            <text:p>TIJUCO PRETO</text:p>
          </table:table-cell>
          <table:table-cell office:value-type="float" office:value="1.32127393053274" calcext:value-type="float">
            <text:p>1,321274</text:p>
          </table:table-cell>
        </table:table-row>
        <table:table-row table:style-name="ro1">
          <table:table-cell office:value-type="string" calcext:value-type="string">
            <text:p>ITUMBIARA</text:p>
          </table:table-cell>
          <table:table-cell office:value-type="string" calcext:value-type="string">
            <text:p>MONTE ALEGRE2</text:p>
          </table:table-cell>
          <table:table-cell office:value-type="float" office:value="0.688862752394444" calcext:value-type="float">
            <text:p>0,688863</text:p>
          </table:table-cell>
          <table:table-cell/>
          <table:table-cell office:value-type="string" calcext:value-type="string">
            <text:p>ITAUBA</text:p>
          </table:table-cell>
          <table:table-cell office:value-type="string" calcext:value-type="string">
            <text:p>P.PETROQUIMIC</text:p>
          </table:table-cell>
          <table:table-cell office:value-type="float" office:value="0.717888150683322" calcext:value-type="float">
            <text:p>0,717888</text:p>
          </table:table-cell>
        </table:table-row>
        <table:table-row table:style-name="ro1">
          <table:table-cell office:value-type="string" calcext:value-type="string">
            <text:p>ITUMBIARA</text:p>
          </table:table-cell>
          <table:table-cell office:value-type="string" calcext:value-type="string">
            <text:p>NOVA PONTE 3</text:p>
          </table:table-cell>
          <table:table-cell office:value-type="float" office:value="1.4135280016679" calcext:value-type="float">
            <text:p>1,413528</text:p>
          </table:table-cell>
          <table:table-cell/>
          <table:table-cell office:value-type="string" calcext:value-type="string">
            <text:p>ITAUBA</text:p>
          </table:table-cell>
          <table:table-cell office:value-type="string" calcext:value-type="string">
            <text:p>U.D.FRANCISCA</text:p>
          </table:table-cell>
          <table:table-cell office:value-type="float" office:value="0.61103049388858" calcext:value-type="float">
            <text:p>0,611030</text:p>
          </table:table-cell>
        </table:table-row>
        <table:table-row table:style-name="ro1">
          <table:table-cell office:value-type="string" calcext:value-type="string">
            <text:p>ITUMBIARA</text:p>
          </table:table-cell>
          <table:table-cell office:value-type="string" calcext:value-type="string">
            <text:p>R.VERDE NORTE</text:p>
          </table:table-cell>
          <table:table-cell office:value-type="float" office:value="1.32361372733306" calcext:value-type="float">
            <text:p>1,323614</text:p>
          </table:table-cell>
          <table:table-cell/>
          <table:table-cell office:value-type="string" calcext:value-type="string">
            <text:p>ITUMBIARA</text:p>
          </table:table-cell>
          <table:table-cell office:value-type="string" calcext:value-type="string">
            <text:p>BANDEIRANTES</text:p>
          </table:table-cell>
          <table:table-cell office:value-type="float" office:value="1.07709843559412" calcext:value-type="float">
            <text:p>1,077098</text:p>
          </table:table-cell>
        </table:table-row>
        <table:table-row table:style-name="ro1">
          <table:table-cell office:value-type="string" calcext:value-type="string">
            <text:p>ITUTINGA</text:p>
          </table:table-cell>
          <table:table-cell office:value-type="string" calcext:value-type="string">
            <text:p>JECEABA</text:p>
          </table:table-cell>
          <table:table-cell office:value-type="float" office:value="0.749548342304729" calcext:value-type="float">
            <text:p>0,749548</text:p>
          </table:table-cell>
          <table:table-cell/>
          <table:table-cell office:value-type="string" calcext:value-type="string">
            <text:p>ITUMBIARA</text:p>
          </table:table-cell>
          <table:table-cell office:value-type="string" calcext:value-type="string">
            <text:p>MONTE ALEGRE2</text:p>
          </table:table-cell>
          <table:table-cell office:value-type="float" office:value="0.988071692698366" calcext:value-type="float">
            <text:p>0,988072</text:p>
          </table:table-cell>
        </table:table-row>
        <table:table-row table:style-name="ro1">
          <table:table-cell office:value-type="string" calcext:value-type="string">
            <text:p>ITUTINGA</text:p>
          </table:table-cell>
          <table:table-cell office:value-type="string" calcext:value-type="string">
            <text:p>JUIZ DE FORA1</text:p>
          </table:table-cell>
          <table:table-cell office:value-type="float" office:value="0.735552410592539" calcext:value-type="float">
            <text:p>0,735552</text:p>
          </table:table-cell>
          <table:table-cell/>
          <table:table-cell office:value-type="string" calcext:value-type="string">
            <text:p>ITUMBIARA</text:p>
          </table:table-cell>
          <table:table-cell office:value-type="string" calcext:value-type="string">
            <text:p>NOVA PONTE 3</text:p>
          </table:table-cell>
          <table:table-cell office:value-type="float" office:value="1.84690759187469" calcext:value-type="float">
            <text:p>1,846908</text:p>
          </table:table-cell>
        </table:table-row>
        <table:table-row table:style-name="ro1">
          <table:table-cell office:value-type="string" calcext:value-type="string">
            <text:p>IVAIPORA ELS</text:p>
          </table:table-cell>
          <table:table-cell office:value-type="string" calcext:value-type="string">
            <text:p>S.SANTIAGO</text:p>
          </table:table-cell>
          <table:table-cell office:value-type="float" office:value="1.53175108222497" calcext:value-type="float">
            <text:p>1,531751</text:p>
          </table:table-cell>
          <table:table-cell/>
          <table:table-cell office:value-type="string" calcext:value-type="string">
            <text:p>ITUTINGA</text:p>
          </table:table-cell>
          <table:table-cell office:value-type="string" calcext:value-type="string">
            <text:p>JECEABA</text:p>
          </table:table-cell>
          <table:table-cell office:value-type="float" office:value="1.18024021152849" calcext:value-type="float">
            <text:p>1,180240</text:p>
          </table:table-cell>
        </table:table-row>
        <table:table-row table:style-name="ro1">
          <table:table-cell office:value-type="string" calcext:value-type="string">
            <text:p>IVINHEMA 2</text:p>
          </table:table-cell>
          <table:table-cell office:value-type="string" calcext:value-type="string">
            <text:p>N.P.PRIMAVERA</text:p>
          </table:table-cell>
          <table:table-cell office:value-type="float" office:value="0.603215403415165" calcext:value-type="float">
            <text:p>0,603215</text:p>
          </table:table-cell>
          <table:table-cell/>
          <table:table-cell office:value-type="string" calcext:value-type="string">
            <text:p>ITUTINGA</text:p>
          </table:table-cell>
          <table:table-cell office:value-type="string" calcext:value-type="string">
            <text:p>JUIZ DE FORA1</text:p>
          </table:table-cell>
          <table:table-cell office:value-type="float" office:value="1.15820219146731" calcext:value-type="float">
            <text:p>1,158202</text:p>
          </table:table-cell>
        </table:table-row>
        <table:table-row table:style-name="ro1">
          <table:table-cell office:value-type="string" calcext:value-type="string">
            <text:p>J.LACERDA-A</text:p>
          </table:table-cell>
          <table:table-cell office:value-type="string" calcext:value-type="string">
            <text:p>J.LACERDA-B</text:p>
          </table:table-cell>
          <table:table-cell office:value-type="float" office:value="0.333628552189707" calcext:value-type="float">
            <text:p>0,333629</text:p>
          </table:table-cell>
          <table:table-cell/>
          <table:table-cell office:value-type="string" calcext:value-type="string">
            <text:p>IVAIPORA ELS</text:p>
          </table:table-cell>
          <table:table-cell office:value-type="string" calcext:value-type="string">
            <text:p>S.SANTIAGO</text:p>
          </table:table-cell>
          <table:table-cell office:value-type="float" office:value="1.99220327980557" calcext:value-type="float">
            <text:p>1,992203</text:p>
          </table:table-cell>
        </table:table-row>
        <table:table-row table:style-name="ro1">
          <table:table-cell office:value-type="string" calcext:value-type="string">
            <text:p>JABOATAO II</text:p>
          </table:table-cell>
          <table:table-cell office:value-type="string" calcext:value-type="string">
            <text:p>RECIFE II</text:p>
          </table:table-cell>
          <table:table-cell office:value-type="float" office:value="0.38099943045887" calcext:value-type="float">
            <text:p>0,380999</text:p>
          </table:table-cell>
          <table:table-cell/>
          <table:table-cell office:value-type="string" calcext:value-type="string">
            <text:p>IVINHEMA 2</text:p>
          </table:table-cell>
          <table:table-cell office:value-type="string" calcext:value-type="string">
            <text:p>N.P.PRIMAVERA</text:p>
          </table:table-cell>
          <table:table-cell office:value-type="float" office:value="0.967877427176928" calcext:value-type="float">
            <text:p>0,967877</text:p>
          </table:table-cell>
        </table:table-row>
        <table:table-row table:style-name="ro1">
          <table:table-cell office:value-type="string" calcext:value-type="string">
            <text:p>JACAREPAGUA</text:p>
          </table:table-cell>
          <table:table-cell office:value-type="string" calcext:value-type="string">
            <text:p>NOVA IGUACU</text:p>
          </table:table-cell>
          <table:table-cell office:value-type="float" office:value="0.682958786652185" calcext:value-type="float">
            <text:p>0,682959</text:p>
          </table:table-cell>
          <table:table-cell/>
          <table:table-cell office:value-type="string" calcext:value-type="string">
            <text:p>J.LACERDA-A</text:p>
          </table:table-cell>
          <table:table-cell office:value-type="string" calcext:value-type="string">
            <text:p>J.LACERDA-B</text:p>
          </table:table-cell>
          <table:table-cell office:value-type="float" office:value="0.623870898774166" calcext:value-type="float">
            <text:p>0,623871</text:p>
          </table:table-cell>
        </table:table-row>
        <table:table-row table:style-name="ro1">
          <table:table-cell office:value-type="string" calcext:value-type="string">
            <text:p>JAGUARA-345</text:p>
          </table:table-cell>
          <table:table-cell office:value-type="string" calcext:value-type="string">
            <text:p>L.C.BARRETO</text:p>
          </table:table-cell>
          <table:table-cell office:value-type="float" office:value="0.678277145560366" calcext:value-type="float">
            <text:p>0,678277</text:p>
          </table:table-cell>
          <table:table-cell/>
          <table:table-cell office:value-type="string" calcext:value-type="string">
            <text:p>JABOATAO II</text:p>
          </table:table-cell>
          <table:table-cell office:value-type="string" calcext:value-type="string">
            <text:p>PIRAPAMA II</text:p>
          </table:table-cell>
          <table:table-cell office:value-type="float" office:value="0.561209071561565" calcext:value-type="float">
            <text:p>0,561209</text:p>
          </table:table-cell>
        </table:table-row>
        <table:table-row table:style-name="ro1">
          <table:table-cell office:value-type="string" calcext:value-type="string">
            <text:p>JAGUARA-345</text:p>
          </table:table-cell>
          <table:table-cell office:value-type="string" calcext:value-type="string">
            <text:p>VOLTA GRANDE-SE</text:p>
          </table:table-cell>
          <table:table-cell office:value-type="float" office:value="0.640867016156629" calcext:value-type="float">
            <text:p>0,640867</text:p>
          </table:table-cell>
          <table:table-cell/>
          <table:table-cell office:value-type="string" calcext:value-type="string">
            <text:p>JACAREPAGUA</text:p>
          </table:table-cell>
          <table:table-cell office:value-type="string" calcext:value-type="string">
            <text:p>NOVA IGUACU</text:p>
          </table:table-cell>
          <table:table-cell office:value-type="float" office:value="0.968833214844915" calcext:value-type="float">
            <text:p>0,968833</text:p>
          </table:table-cell>
        </table:table-row>
        <table:table-row table:style-name="ro1">
          <table:table-cell office:value-type="string" calcext:value-type="string">
            <text:p>JAGUARA-500</text:p>
          </table:table-cell>
          <table:table-cell office:value-type="string" calcext:value-type="string">
            <text:p>B.DESPACHO 3</text:p>
          </table:table-cell>
          <table:table-cell office:value-type="float" office:value="1.36795457064289" calcext:value-type="float">
            <text:p>1,367955</text:p>
          </table:table-cell>
          <table:table-cell/>
          <table:table-cell office:value-type="string" calcext:value-type="string">
            <text:p>JAGUARA-345</text:p>
          </table:table-cell>
          <table:table-cell office:value-type="string" calcext:value-type="string">
            <text:p>L.C.BARRETO</text:p>
          </table:table-cell>
          <table:table-cell office:value-type="float" office:value="1.08364801518805" calcext:value-type="float">
            <text:p>1,083648</text:p>
          </table:table-cell>
        </table:table-row>
        <table:table-row table:style-name="ro1">
          <table:table-cell office:value-type="string" calcext:value-type="string">
            <text:p>JAGUARA-500</text:p>
          </table:table-cell>
          <table:table-cell office:value-type="string" calcext:value-type="string">
            <text:p>SAO SIMAO-SE</text:p>
          </table:table-cell>
          <table:table-cell office:value-type="float" office:value="1.34982135123724" calcext:value-type="float">
            <text:p>1,349821</text:p>
          </table:table-cell>
          <table:table-cell/>
          <table:table-cell office:value-type="string" calcext:value-type="string">
            <text:p>JAGUARA-500</text:p>
          </table:table-cell>
          <table:table-cell office:value-type="string" calcext:value-type="string">
            <text:p>B.DESPACHO 3</text:p>
          </table:table-cell>
          <table:table-cell office:value-type="float" office:value="1.78736160789097" calcext:value-type="float">
            <text:p>1,787362</text:p>
          </table:table-cell>
        </table:table-row>
        <table:table-row table:style-name="ro1">
          <table:table-cell office:value-type="string" calcext:value-type="string">
            <text:p>JAGUARARI-SE</text:p>
          </table:table-cell>
          <table:table-cell office:value-type="string" calcext:value-type="string">
            <text:p>JUAZEIRO II</text:p>
          </table:table-cell>
          <table:table-cell office:value-type="float" office:value="0.305950764583512" calcext:value-type="float">
            <text:p>0,305951</text:p>
          </table:table-cell>
          <table:table-cell/>
          <table:table-cell office:value-type="string" calcext:value-type="string">
            <text:p>JAGUARA-500</text:p>
          </table:table-cell>
          <table:table-cell office:value-type="string" calcext:value-type="string">
            <text:p>SAO SIMAO-SE</text:p>
          </table:table-cell>
          <table:table-cell office:value-type="float" office:value="1.7636688472623" calcext:value-type="float">
            <text:p>1,763669</text:p>
          </table:table-cell>
        </table:table-row>
        <table:table-row table:style-name="ro1">
          <table:table-cell office:value-type="string" calcext:value-type="string">
            <text:p>JAGUARIAIVA</text:p>
          </table:table-cell>
          <table:table-cell office:value-type="string" calcext:value-type="string">
            <text:p>ITARARE II</text:p>
          </table:table-cell>
          <table:table-cell office:value-type="float" office:value="0.313696653218795" calcext:value-type="float">
            <text:p>0,313697</text:p>
          </table:table-cell>
          <table:table-cell/>
          <table:table-cell office:value-type="string" calcext:value-type="string">
            <text:p>JAGUARARI-SE</text:p>
          </table:table-cell>
          <table:table-cell office:value-type="string" calcext:value-type="string">
            <text:p>JUAZEIRO II</text:p>
          </table:table-cell>
          <table:table-cell office:value-type="float" office:value="0.520348356837104" calcext:value-type="float">
            <text:p>0,520348</text:p>
          </table:table-cell>
        </table:table-row>
        <table:table-row table:style-name="ro1">
          <table:table-cell office:value-type="string" calcext:value-type="string">
            <text:p>JAGUARIAIVA</text:p>
          </table:table-cell>
          <table:table-cell office:value-type="string" calcext:value-type="string">
            <text:p>SE.MAUA</text:p>
          </table:table-cell>
          <table:table-cell office:value-type="float" office:value="0.360598140022419" calcext:value-type="float">
            <text:p>0,360598</text:p>
          </table:table-cell>
          <table:table-cell/>
          <table:table-cell office:value-type="string" calcext:value-type="string">
            <text:p>JAGUARIAIVA</text:p>
          </table:table-cell>
          <table:table-cell office:value-type="string" calcext:value-type="string">
            <text:p>ITARARE II</text:p>
          </table:table-cell>
          <table:table-cell office:value-type="float" office:value="0.584144629743762" calcext:value-type="float">
            <text:p>0,584145</text:p>
          </table:table-cell>
        </table:table-row>
        <table:table-row table:style-name="ro1">
          <table:table-cell office:value-type="string" calcext:value-type="string">
            <text:p>JAGUARUANA II</text:p>
          </table:table-cell>
          <table:table-cell office:value-type="string" calcext:value-type="string">
            <text:p>ACU III</text:p>
          </table:table-cell>
          <table:table-cell office:value-type="float" office:value="1.44294876718857" calcext:value-type="float">
            <text:p>1,442949</text:p>
          </table:table-cell>
          <table:table-cell/>
          <table:table-cell office:value-type="string" calcext:value-type="string">
            <text:p>JAGUARIAIVA</text:p>
          </table:table-cell>
          <table:table-cell office:value-type="string" calcext:value-type="string">
            <text:p>SE.MAUA</text:p>
          </table:table-cell>
          <table:table-cell office:value-type="float" office:value="0.660268579088793" calcext:value-type="float">
            <text:p>0,660269</text:p>
          </table:table-cell>
        </table:table-row>
        <table:table-row table:style-name="ro1">
          <table:table-cell office:value-type="string" calcext:value-type="string">
            <text:p>JAGUARUANA II</text:p>
          </table:table-cell>
          <table:table-cell office:value-type="string" calcext:value-type="string">
            <text:p>MOSSORO IV</text:p>
          </table:table-cell>
          <table:table-cell office:value-type="float" office:value="0.569141076501476" calcext:value-type="float">
            <text:p>0,569141</text:p>
          </table:table-cell>
          <table:table-cell/>
          <table:table-cell office:value-type="string" calcext:value-type="string">
            <text:p>JAGUARUANA II</text:p>
          </table:table-cell>
          <table:table-cell office:value-type="string" calcext:value-type="string">
            <text:p>ACU III</text:p>
          </table:table-cell>
          <table:table-cell office:value-type="float" office:value="1.8113770933154" calcext:value-type="float">
            <text:p>1,811377</text:p>
          </table:table-cell>
        </table:table-row>
        <table:table-row table:style-name="ro1">
          <table:table-cell office:value-type="string" calcext:value-type="string">
            <text:p>JAGUARUANA II</text:p>
          </table:table-cell>
          <table:table-cell office:value-type="string" calcext:value-type="string">
            <text:p>PACATUBA</text:p>
          </table:table-cell>
          <table:table-cell office:value-type="float" office:value="1.46184643702825" calcext:value-type="float">
            <text:p>1,461846</text:p>
          </table:table-cell>
          <table:table-cell/>
          <table:table-cell office:value-type="string" calcext:value-type="string">
            <text:p>JAGUARUANA II</text:p>
          </table:table-cell>
          <table:table-cell office:value-type="string" calcext:value-type="string">
            <text:p>MOSSORO IV</text:p>
          </table:table-cell>
          <table:table-cell office:value-type="float" office:value="0.847704433304129" calcext:value-type="float">
            <text:p>0,847704</text:p>
          </table:table-cell>
        </table:table-row>
        <table:table-row table:style-name="ro1">
          <table:table-cell office:value-type="string" calcext:value-type="string">
            <text:p>JAGUARUANA II</text:p>
          </table:table-cell>
          <table:table-cell office:value-type="string" calcext:value-type="string">
            <text:p>RUSSAS II</text:p>
          </table:table-cell>
          <table:table-cell office:value-type="float" office:value="0.55395660020242" calcext:value-type="float">
            <text:p>0,553957</text:p>
          </table:table-cell>
          <table:table-cell/>
          <table:table-cell office:value-type="string" calcext:value-type="string">
            <text:p>JAGUARUANA II</text:p>
          </table:table-cell>
          <table:table-cell office:value-type="string" calcext:value-type="string">
            <text:p>PACATUBA</text:p>
          </table:table-cell>
          <table:table-cell office:value-type="float" office:value="1.84030653419809" calcext:value-type="float">
            <text:p>1,840307</text:p>
          </table:table-cell>
        </table:table-row>
        <table:table-row table:style-name="ro1">
          <table:table-cell office:value-type="string" calcext:value-type="string">
            <text:p>JAIBA</text:p>
          </table:table-cell>
          <table:table-cell office:value-type="string" calcext:value-type="string">
            <text:p>JANAUBA 6</text:p>
          </table:table-cell>
          <table:table-cell office:value-type="float" office:value="1.50246061017381" calcext:value-type="float">
            <text:p>1,502461</text:p>
          </table:table-cell>
          <table:table-cell/>
          <table:table-cell office:value-type="string" calcext:value-type="string">
            <text:p>JAGUARUANA II</text:p>
          </table:table-cell>
          <table:table-cell office:value-type="string" calcext:value-type="string">
            <text:p>RUSSAS II</text:p>
          </table:table-cell>
          <table:table-cell office:value-type="float" office:value="0.827431478854539" calcext:value-type="float">
            <text:p>0,827431</text:p>
          </table:table-cell>
        </table:table-row>
        <table:table-row table:style-name="ro1">
          <table:table-cell office:value-type="string" calcext:value-type="string">
            <text:p>JANAUBA 3</text:p>
          </table:table-cell>
          <table:table-cell office:value-type="string" calcext:value-type="string">
            <text:p>JANAUBA 6</text:p>
          </table:table-cell>
          <table:table-cell office:value-type="float" office:value="1.47944111200098" calcext:value-type="float">
            <text:p>1,479441</text:p>
          </table:table-cell>
          <table:table-cell/>
          <table:table-cell office:value-type="string" calcext:value-type="string">
            <text:p>JAIBA</text:p>
          </table:table-cell>
          <table:table-cell office:value-type="string" calcext:value-type="string">
            <text:p>JANAUBA 6</text:p>
          </table:table-cell>
          <table:table-cell office:value-type="float" office:value="1.96310642884218" calcext:value-type="float">
            <text:p>1,963106</text:p>
          </table:table-cell>
        </table:table-row>
        <table:table-row table:style-name="ro1">
          <table:table-cell office:value-type="string" calcext:value-type="string">
            <text:p>JANAUBA 3</text:p>
          </table:table-cell>
          <table:table-cell office:value-type="string" calcext:value-type="string">
            <text:p>P. JUSCELINO</text:p>
          </table:table-cell>
          <table:table-cell office:value-type="float" office:value="1.53806851788986" calcext:value-type="float">
            <text:p>1,538069</text:p>
          </table:table-cell>
          <table:table-cell/>
          <table:table-cell office:value-type="string" calcext:value-type="string">
            <text:p>JANAUBA 3</text:p>
          </table:table-cell>
          <table:table-cell office:value-type="string" calcext:value-type="string">
            <text:p>JANAUBA 6</text:p>
          </table:table-cell>
          <table:table-cell office:value-type="float" office:value="1.93302928435945" calcext:value-type="float">
            <text:p>1,933029</text:p>
          </table:table-cell>
        </table:table-row>
        <table:table-row table:style-name="ro1">
          <table:table-cell office:value-type="string" calcext:value-type="string">
            <text:p>JANAUBA 3</text:p>
          </table:table-cell>
          <table:table-cell office:value-type="string" calcext:value-type="string">
            <text:p>S. DAS ALMAS II</text:p>
          </table:table-cell>
          <table:table-cell office:value-type="float" office:value="1.54025220454095" calcext:value-type="float">
            <text:p>1,540252</text:p>
          </table:table-cell>
          <table:table-cell/>
          <table:table-cell office:value-type="string" calcext:value-type="string">
            <text:p>JANAUBA 3</text:p>
          </table:table-cell>
          <table:table-cell office:value-type="string" calcext:value-type="string">
            <text:p>P. JUSCELINO</text:p>
          </table:table-cell>
          <table:table-cell office:value-type="float" office:value="2.00963151714178" calcext:value-type="float">
            <text:p>2,009632</text:p>
          </table:table-cell>
        </table:table-row>
        <table:table-row table:style-name="ro1">
          <table:table-cell office:value-type="string" calcext:value-type="string">
            <text:p>JANDAIRA II</text:p>
          </table:table-cell>
          <table:table-cell office:value-type="string" calcext:value-type="string">
            <text:p>J. CAMARA III</text:p>
          </table:table-cell>
          <table:table-cell office:value-type="float" office:value="1.34000426489857" calcext:value-type="float">
            <text:p>1,340004</text:p>
          </table:table-cell>
          <table:table-cell/>
          <table:table-cell office:value-type="string" calcext:value-type="string">
            <text:p>JANAUBA 3</text:p>
          </table:table-cell>
          <table:table-cell office:value-type="string" calcext:value-type="string">
            <text:p>S. DAS ALMAS II</text:p>
          </table:table-cell>
          <table:table-cell office:value-type="float" office:value="2.01248470961438" calcext:value-type="float">
            <text:p>2,012485</text:p>
          </table:table-cell>
        </table:table-row>
        <table:table-row table:style-name="ro1">
          <table:table-cell office:value-type="string" calcext:value-type="string">
            <text:p>JARAGUA DO SUL</text:p>
          </table:table-cell>
          <table:table-cell office:value-type="string" calcext:value-type="string">
            <text:p>JOINV.NORTE</text:p>
          </table:table-cell>
          <table:table-cell office:value-type="float" office:value="0.514754204656284" calcext:value-type="float">
            <text:p>0,514754</text:p>
          </table:table-cell>
          <table:table-cell/>
          <table:table-cell office:value-type="string" calcext:value-type="string">
            <text:p>JANDAIRA II</text:p>
          </table:table-cell>
          <table:table-cell office:value-type="string" calcext:value-type="string">
            <text:p>J. CAMARA III</text:p>
          </table:table-cell>
          <table:table-cell office:value-type="float" office:value="1.67738859506237" calcext:value-type="float">
            <text:p>1,677389</text:p>
          </table:table-cell>
        </table:table-row>
        <table:table-row table:style-name="ro1">
          <table:table-cell office:value-type="string" calcext:value-type="string">
            <text:p>JARAGUA DO SUL</text:p>
          </table:table-cell>
          <table:table-cell office:value-type="string" calcext:value-type="string">
            <text:p>JOINVILLE</text:p>
          </table:table-cell>
          <table:table-cell office:value-type="float" office:value="0.511528195348867" calcext:value-type="float">
            <text:p>0,511528</text:p>
          </table:table-cell>
          <table:table-cell/>
          <table:table-cell office:value-type="string" calcext:value-type="string">
            <text:p>JARAGUA DO SUL</text:p>
          </table:table-cell>
          <table:table-cell office:value-type="string" calcext:value-type="string">
            <text:p>JOINV.NORTE</text:p>
          </table:table-cell>
          <table:table-cell office:value-type="float" office:value="0.962568000247447" calcext:value-type="float">
            <text:p>0,962568</text:p>
          </table:table-cell>
        </table:table-row>
        <table:table-row table:style-name="ro1">
          <table:table-cell office:value-type="string" calcext:value-type="string">
            <text:p>JARDIM</text:p>
          </table:table-cell>
          <table:table-cell office:value-type="string" calcext:value-type="string">
            <text:p>NSA.SRA.SOCORRO</text:p>
          </table:table-cell>
          <table:table-cell office:value-type="float" office:value="0.56173648141003" calcext:value-type="float">
            <text:p>0,561736</text:p>
          </table:table-cell>
          <table:table-cell/>
          <table:table-cell office:value-type="string" calcext:value-type="string">
            <text:p>JARAGUA DO SUL</text:p>
          </table:table-cell>
          <table:table-cell office:value-type="string" calcext:value-type="string">
            <text:p>JOINVILLE</text:p>
          </table:table-cell>
          <table:table-cell office:value-type="float" office:value="0.956535502990053" calcext:value-type="float">
            <text:p>0,956536</text:p>
          </table:table-cell>
        </table:table-row>
        <table:table-row table:style-name="ro1">
          <table:table-cell office:value-type="string" calcext:value-type="string">
            <text:p>JARDIM</text:p>
          </table:table-cell>
          <table:table-cell office:value-type="string" calcext:value-type="string">
            <text:p>USINA XINGO</text:p>
          </table:table-cell>
          <table:table-cell office:value-type="float" office:value="1.27308705075793" calcext:value-type="float">
            <text:p>1,273087</text:p>
          </table:table-cell>
          <table:table-cell/>
          <table:table-cell office:value-type="string" calcext:value-type="string">
            <text:p>JARDIM</text:p>
          </table:table-cell>
          <table:table-cell office:value-type="string" calcext:value-type="string">
            <text:p>NSA.SRA.SOCORRO</text:p>
          </table:table-cell>
          <table:table-cell office:value-type="float" office:value="0.813840242881706" calcext:value-type="float">
            <text:p>0,813840</text:p>
          </table:table-cell>
        </table:table-row>
        <table:table-row table:style-name="ro1">
          <table:table-cell office:value-type="string" calcext:value-type="string">
            <text:p>JARDIM BOTANICO</text:p>
          </table:table-cell>
          <table:table-cell office:value-type="string" calcext:value-type="string">
            <text:p>JBO LT GRA2</text:p>
          </table:table-cell>
          <table:table-cell office:value-type="float" office:value="0.325977654507652" calcext:value-type="float">
            <text:p>0,325978</text:p>
          </table:table-cell>
          <table:table-cell/>
          <table:table-cell office:value-type="string" calcext:value-type="string">
            <text:p>JARDIM</text:p>
          </table:table-cell>
          <table:table-cell office:value-type="string" calcext:value-type="string">
            <text:p>USINA XINGO</text:p>
          </table:table-cell>
          <table:table-cell office:value-type="float" office:value="1.54104061281404" calcext:value-type="float">
            <text:p>1,541041</text:p>
          </table:table-cell>
        </table:table-row>
        <table:table-row table:style-name="ro1">
          <table:table-cell office:value-type="string" calcext:value-type="string">
            <text:p>JARDIM BOTANICO</text:p>
          </table:table-cell>
          <table:table-cell office:value-type="string" calcext:value-type="string">
            <text:p>JBO LT PA10</text:p>
          </table:table-cell>
          <table:table-cell office:value-type="float" office:value="0.325977654507652" calcext:value-type="float">
            <text:p>0,325978</text:p>
          </table:table-cell>
          <table:table-cell/>
          <table:table-cell office:value-type="string" calcext:value-type="string">
            <text:p>JARDIM BOTANICO</text:p>
          </table:table-cell>
          <table:table-cell office:value-type="string" calcext:value-type="string">
            <text:p>JBO LT GRA2</text:p>
          </table:table-cell>
          <table:table-cell office:value-type="float" office:value="0.597977489974442" calcext:value-type="float">
            <text:p>0,597977</text:p>
          </table:table-cell>
        </table:table-row>
        <table:table-row table:style-name="ro1">
          <table:table-cell office:value-type="string" calcext:value-type="string">
            <text:p>JARDIM BOTANICO</text:p>
          </table:table-cell>
          <table:table-cell office:value-type="string" calcext:value-type="string">
            <text:p>PORTOALEGRE 1</text:p>
          </table:table-cell>
          <table:table-cell office:value-type="float" office:value="0.33128032032403" calcext:value-type="float">
            <text:p>0,331280</text:p>
          </table:table-cell>
          <table:table-cell/>
          <table:table-cell office:value-type="string" calcext:value-type="string">
            <text:p>JARDIM BOTANICO</text:p>
          </table:table-cell>
          <table:table-cell office:value-type="string" calcext:value-type="string">
            <text:p>JBO LT PA10</text:p>
          </table:table-cell>
          <table:table-cell office:value-type="float" office:value="0.597977489974442" calcext:value-type="float">
            <text:p>0,597977</text:p>
          </table:table-cell>
        </table:table-row>
        <table:table-row table:style-name="ro1">
          <table:table-cell office:value-type="string" calcext:value-type="string">
            <text:p>JATAI</text:p>
          </table:table-cell>
          <table:table-cell office:value-type="string" calcext:value-type="string">
            <text:p>R.VERDE NORTE</text:p>
          </table:table-cell>
          <table:table-cell office:value-type="float" office:value="0.657032018060492" calcext:value-type="float">
            <text:p>0,657032</text:p>
          </table:table-cell>
          <table:table-cell/>
          <table:table-cell office:value-type="string" calcext:value-type="string">
            <text:p>JARDIM BOTANICO</text:p>
          </table:table-cell>
          <table:table-cell office:value-type="string" calcext:value-type="string">
            <text:p>PORTOALEGRE 1</text:p>
          </table:table-cell>
          <table:table-cell office:value-type="float" office:value="0.607704766526082" calcext:value-type="float">
            <text:p>0,607705</text:p>
          </table:table-cell>
        </table:table-row>
        <table:table-row table:style-name="ro1">
          <table:table-cell office:value-type="string" calcext:value-type="string">
            <text:p>JAURU</text:p>
          </table:table-cell>
          <table:table-cell office:value-type="string" calcext:value-type="string">
            <text:p>JUBA</text:p>
          </table:table-cell>
          <table:table-cell office:value-type="float" office:value="0.598419365761458" calcext:value-type="float">
            <text:p>0,598419</text:p>
          </table:table-cell>
          <table:table-cell/>
          <table:table-cell office:value-type="string" calcext:value-type="string">
            <text:p>JATAI</text:p>
          </table:table-cell>
          <table:table-cell office:value-type="string" calcext:value-type="string">
            <text:p>R.VERDE NORTE</text:p>
          </table:table-cell>
          <table:table-cell office:value-type="float" office:value="0.984170116725991" calcext:value-type="float">
            <text:p>0,984170</text:p>
          </table:table-cell>
        </table:table-row>
        <table:table-row table:style-name="ro1">
          <table:table-cell office:value-type="string" calcext:value-type="string">
            <text:p>JAURU</text:p>
          </table:table-cell>
          <table:table-cell office:value-type="string" calcext:value-type="string">
            <text:p>SE CUIABA</text:p>
          </table:table-cell>
          <table:table-cell office:value-type="float" office:value="1.43249845957793" calcext:value-type="float">
            <text:p>1,432498</text:p>
          </table:table-cell>
          <table:table-cell/>
          <table:table-cell office:value-type="string" calcext:value-type="string">
            <text:p>JAURU</text:p>
          </table:table-cell>
          <table:table-cell office:value-type="string" calcext:value-type="string">
            <text:p>JUBA</text:p>
          </table:table-cell>
          <table:table-cell office:value-type="float" office:value="0.895530628953508" calcext:value-type="float">
            <text:p>0,895531</text:p>
          </table:table-cell>
        </table:table-row>
        <table:table-row table:style-name="ro1">
          <table:table-cell office:value-type="string" calcext:value-type="string">
            <text:p>JAURU</text:p>
          </table:table-cell>
          <table:table-cell office:value-type="string" calcext:value-type="string">
            <text:p>VARZ.GRANDE 2</text:p>
          </table:table-cell>
          <table:table-cell office:value-type="float" office:value="0.664393333838411" calcext:value-type="float">
            <text:p>0,664393</text:p>
          </table:table-cell>
          <table:table-cell/>
          <table:table-cell office:value-type="string" calcext:value-type="string">
            <text:p>JAURU</text:p>
          </table:table-cell>
          <table:table-cell office:value-type="string" calcext:value-type="string">
            <text:p>SE CUIABA</text:p>
          </table:table-cell>
          <table:table-cell office:value-type="float" office:value="1.80676072709649" calcext:value-type="float">
            <text:p>1,806761</text:p>
          </table:table-cell>
        </table:table-row>
        <table:table-row table:style-name="ro1">
          <table:table-cell office:value-type="string" calcext:value-type="string">
            <text:p>JAURU</text:p>
          </table:table-cell>
          <table:table-cell office:value-type="string" calcext:value-type="string">
            <text:p>VILHENA</text:p>
          </table:table-cell>
          <table:table-cell office:value-type="float" office:value="0.670672780806" calcext:value-type="float">
            <text:p>0,670673</text:p>
          </table:table-cell>
          <table:table-cell/>
          <table:table-cell office:value-type="string" calcext:value-type="string">
            <text:p>JAURU</text:p>
          </table:table-cell>
          <table:table-cell office:value-type="string" calcext:value-type="string">
            <text:p>VARZ.GRANDE 2</text:p>
          </table:table-cell>
          <table:table-cell office:value-type="float" office:value="0.994260236494423" calcext:value-type="float">
            <text:p>0,994260</text:p>
          </table:table-cell>
        </table:table-row>
        <table:table-row table:style-name="ro1">
          <table:table-cell office:value-type="string" calcext:value-type="string">
            <text:p>JEREMOABO</text:p>
          </table:table-cell>
          <table:table-cell office:value-type="string" calcext:value-type="string">
            <text:p>OLINDINA</text:p>
          </table:table-cell>
          <table:table-cell office:value-type="float" office:value="1.21788558258398" calcext:value-type="float">
            <text:p>1,217886</text:p>
          </table:table-cell>
          <table:table-cell/>
          <table:table-cell office:value-type="string" calcext:value-type="string">
            <text:p>JAURU</text:p>
          </table:table-cell>
          <table:table-cell office:value-type="string" calcext:value-type="string">
            <text:p>VILHENA</text:p>
          </table:table-cell>
          <table:table-cell office:value-type="float" office:value="0.986571473044446" calcext:value-type="float">
            <text:p>0,986571</text:p>
          </table:table-cell>
        </table:table-row>
        <table:table-row table:style-name="ro1">
          <table:table-cell office:value-type="string" calcext:value-type="string">
            <text:p>JI-PARANA</text:p>
          </table:table-cell>
          <table:table-cell office:value-type="string" calcext:value-type="string">
            <text:p>PIMENTA BUENO</text:p>
          </table:table-cell>
          <table:table-cell office:value-type="float" office:value="0.467387067067316" calcext:value-type="float">
            <text:p>0,467387</text:p>
          </table:table-cell>
          <table:table-cell/>
          <table:table-cell office:value-type="string" calcext:value-type="string">
            <text:p>JEREMOABO</text:p>
          </table:table-cell>
          <table:table-cell office:value-type="string" calcext:value-type="string">
            <text:p>OLINDINA</text:p>
          </table:table-cell>
          <table:table-cell office:value-type="float" office:value="1.47140309276552" calcext:value-type="float">
            <text:p>1,471403</text:p>
          </table:table-cell>
        </table:table-row>
        <table:table-row table:style-name="ro1">
          <table:table-cell office:value-type="string" calcext:value-type="string">
            <text:p>JOAO CAMARA 2</text:p>
          </table:table-cell>
          <table:table-cell office:value-type="string" calcext:value-type="string">
            <text:p>J. CAMARA III</text:p>
          </table:table-cell>
          <table:table-cell office:value-type="float" office:value="0.57255875353027" calcext:value-type="float">
            <text:p>0,572559</text:p>
          </table:table-cell>
          <table:table-cell/>
          <table:table-cell office:value-type="string" calcext:value-type="string">
            <text:p>JI-PARANA</text:p>
          </table:table-cell>
          <table:table-cell office:value-type="string" calcext:value-type="string">
            <text:p>PIMENTA BUENO</text:p>
          </table:table-cell>
          <table:table-cell office:value-type="float" office:value="0.801873678658237" calcext:value-type="float">
            <text:p>0,801874</text:p>
          </table:table-cell>
        </table:table-row>
        <table:table-row table:style-name="ro1">
          <table:table-cell office:value-type="string" calcext:value-type="string">
            <text:p>JOAO NEIVA 2</text:p>
          </table:table-cell>
          <table:table-cell office:value-type="string" calcext:value-type="string">
            <text:p>VIANA 2</text:p>
          </table:table-cell>
          <table:table-cell office:value-type="float" office:value="1.439205752658" calcext:value-type="float">
            <text:p>1,439206</text:p>
          </table:table-cell>
          <table:table-cell/>
          <table:table-cell office:value-type="string" calcext:value-type="string">
            <text:p>JOAO CAMARA 2</text:p>
          </table:table-cell>
          <table:table-cell office:value-type="string" calcext:value-type="string">
            <text:p>J. CAMARA III</text:p>
          </table:table-cell>
          <table:table-cell office:value-type="float" office:value="0.850382134296407" calcext:value-type="float">
            <text:p>0,850382</text:p>
          </table:table-cell>
        </table:table-row>
        <table:table-row table:style-name="ro1">
          <table:table-cell office:value-type="string" calcext:value-type="string">
            <text:p>JOAO PESSOA II</text:p>
          </table:table-cell>
          <table:table-cell office:value-type="string" calcext:value-type="string">
            <text:p>MUSSURE II</text:p>
          </table:table-cell>
          <table:table-cell office:value-type="float" office:value="0.322461888172552" calcext:value-type="float">
            <text:p>0,322462</text:p>
          </table:table-cell>
          <table:table-cell/>
          <table:table-cell office:value-type="string" calcext:value-type="string">
            <text:p>JOAO NEIVA 2</text:p>
          </table:table-cell>
          <table:table-cell office:value-type="string" calcext:value-type="string">
            <text:p>VIANA 2</text:p>
          </table:table-cell>
          <table:table-cell office:value-type="float" office:value="1.87528492226527" calcext:value-type="float">
            <text:p>1,875285</text:p>
          </table:table-cell>
        </table:table-row>
        <table:table-row table:style-name="ro1">
          <table:table-cell office:value-type="string" calcext:value-type="string">
            <text:p>JORG.TEIXEIRA</text:p>
          </table:table-cell>
          <table:table-cell office:value-type="string" calcext:value-type="string">
            <text:p>LECHUGA</text:p>
          </table:table-cell>
          <table:table-cell office:value-type="float" office:value="0.664488050280051" calcext:value-type="float">
            <text:p>0,664488</text:p>
          </table:table-cell>
          <table:table-cell/>
          <table:table-cell office:value-type="string" calcext:value-type="string">
            <text:p>JOAO PESSOA II</text:p>
          </table:table-cell>
          <table:table-cell office:value-type="string" calcext:value-type="string">
            <text:p>MUSSURE II</text:p>
          </table:table-cell>
          <table:table-cell office:value-type="float" office:value="0.465380364516462" calcext:value-type="float">
            <text:p>0,465380</text:p>
          </table:table-cell>
        </table:table-row>
        <table:table-row table:style-name="ro1">
          <table:table-cell office:value-type="string" calcext:value-type="string">
            <text:p>JORG.TEIXEIRA</text:p>
          </table:table-cell>
          <table:table-cell office:value-type="string" calcext:value-type="string">
            <text:p>MAUA III</text:p>
          </table:table-cell>
          <table:table-cell office:value-type="float" office:value="0.554577218348165" calcext:value-type="float">
            <text:p>0,554577</text:p>
          </table:table-cell>
          <table:table-cell/>
          <table:table-cell office:value-type="string" calcext:value-type="string">
            <text:p>JORG.TEIXEIRA</text:p>
          </table:table-cell>
          <table:table-cell office:value-type="string" calcext:value-type="string">
            <text:p>LECHUGA</text:p>
          </table:table-cell>
          <table:table-cell office:value-type="float" office:value="0.960850573755624" calcext:value-type="float">
            <text:p>0,960851</text:p>
          </table:table-cell>
        </table:table-row>
        <table:table-row table:style-name="ro1">
          <table:table-cell office:value-type="string" calcext:value-type="string">
            <text:p>JUAZEIRO II</text:p>
          </table:table-cell>
          <table:table-cell office:value-type="string" calcext:value-type="string">
            <text:p>JUAZEIRO III</text:p>
          </table:table-cell>
          <table:table-cell office:value-type="float" office:value="0.675019338589853" calcext:value-type="float">
            <text:p>0,675019</text:p>
          </table:table-cell>
          <table:table-cell/>
          <table:table-cell office:value-type="string" calcext:value-type="string">
            <text:p>JORG.TEIXEIRA</text:p>
          </table:table-cell>
          <table:table-cell office:value-type="string" calcext:value-type="string">
            <text:p>MAUA III</text:p>
          </table:table-cell>
          <table:table-cell office:value-type="float" office:value="0.951461658892771" calcext:value-type="float">
            <text:p>0,951462</text:p>
          </table:table-cell>
        </table:table-row>
        <table:table-row table:style-name="ro1">
          <table:table-cell office:value-type="string" calcext:value-type="string">
            <text:p>JUAZEIRO II</text:p>
          </table:table-cell>
          <table:table-cell office:value-type="string" calcext:value-type="string">
            <text:p>SR.BONFIM II</text:p>
          </table:table-cell>
          <table:table-cell office:value-type="float" office:value="0.339534967829697" calcext:value-type="float">
            <text:p>0,339535</text:p>
          </table:table-cell>
          <table:table-cell/>
          <table:table-cell office:value-type="string" calcext:value-type="string">
            <text:p>JUAZEIRO II</text:p>
          </table:table-cell>
          <table:table-cell office:value-type="string" calcext:value-type="string">
            <text:p>JUAZEIRO III</text:p>
          </table:table-cell>
          <table:table-cell office:value-type="float" office:value="0.967609503148707" calcext:value-type="float">
            <text:p>0,967610</text:p>
          </table:table-cell>
        </table:table-row>
        <table:table-row table:style-name="ro1">
          <table:table-cell office:value-type="string" calcext:value-type="string">
            <text:p>JUAZEIRO III</text:p>
          </table:table-cell>
          <table:table-cell office:value-type="string" calcext:value-type="string">
            <text:p>US. L.GONZAGA</text:p>
          </table:table-cell>
          <table:table-cell office:value-type="float" office:value="1.27369721826998" calcext:value-type="float">
            <text:p>1,273697</text:p>
          </table:table-cell>
          <table:table-cell/>
          <table:table-cell office:value-type="string" calcext:value-type="string">
            <text:p>JUAZEIRO II</text:p>
          </table:table-cell>
          <table:table-cell office:value-type="string" calcext:value-type="string">
            <text:p>SR.BONFIM II</text:p>
          </table:table-cell>
          <table:table-cell office:value-type="float" office:value="0.577466975248223" calcext:value-type="float">
            <text:p>0,577467</text:p>
          </table:table-cell>
        </table:table-row>
        <table:table-row table:style-name="ro1">
          <table:table-cell office:value-type="string" calcext:value-type="string">
            <text:p>JUPIA</text:p>
          </table:table-cell>
          <table:table-cell office:value-type="string" calcext:value-type="string">
            <text:p>MARECH.RONDON</text:p>
          </table:table-cell>
          <table:table-cell office:value-type="float" office:value="1.10234175772783" calcext:value-type="float">
            <text:p>1,102342</text:p>
          </table:table-cell>
          <table:table-cell/>
          <table:table-cell office:value-type="string" calcext:value-type="string">
            <text:p>JUAZEIRO III</text:p>
          </table:table-cell>
          <table:table-cell office:value-type="string" calcext:value-type="string">
            <text:p>US. L.GONZAGA</text:p>
          </table:table-cell>
          <table:table-cell office:value-type="float" office:value="1.55968662194226" calcext:value-type="float">
            <text:p>1,559687</text:p>
          </table:table-cell>
        </table:table-row>
        <table:table-row table:style-name="ro1">
          <table:table-cell office:value-type="string" calcext:value-type="string">
            <text:p>JURUMIRIM</text:p>
          </table:table-cell>
          <table:table-cell office:value-type="string" calcext:value-type="string">
            <text:p>PIRAJU</text:p>
          </table:table-cell>
          <table:table-cell office:value-type="float" office:value="0.323816090606392" calcext:value-type="float">
            <text:p>0,323816</text:p>
          </table:table-cell>
          <table:table-cell/>
          <table:table-cell office:value-type="string" calcext:value-type="string">
            <text:p>JURUMIRIM</text:p>
          </table:table-cell>
          <table:table-cell office:value-type="string" calcext:value-type="string">
            <text:p>PIRAJU</text:p>
          </table:table-cell>
          <table:table-cell office:value-type="float" office:value="0.613228433150613" calcext:value-type="float">
            <text:p>0,613228</text:p>
          </table:table-cell>
        </table:table-row>
        <table:table-row table:style-name="ro1">
          <table:table-cell office:value-type="string" calcext:value-type="string">
            <text:p>JURUPARI</text:p>
          </table:table-cell>
          <table:table-cell office:value-type="string" calcext:value-type="string">
            <text:p>ORIXIMINA</text:p>
          </table:table-cell>
          <table:table-cell office:value-type="float" office:value="1.53743230761904" calcext:value-type="float">
            <text:p>1,537432</text:p>
          </table:table-cell>
          <table:table-cell/>
          <table:table-cell office:value-type="string" calcext:value-type="string">
            <text:p>JURUPARI</text:p>
          </table:table-cell>
          <table:table-cell office:value-type="string" calcext:value-type="string">
            <text:p>ORIXIMINA</text:p>
          </table:table-cell>
          <table:table-cell office:value-type="float" office:value="1.85566419347775" calcext:value-type="float">
            <text:p>1,855664</text:p>
          </table:table-cell>
        </table:table-row>
        <table:table-row table:style-name="ro1">
          <table:table-cell office:value-type="string" calcext:value-type="string">
            <text:p>JURUPARI</text:p>
          </table:table-cell>
          <table:table-cell office:value-type="string" calcext:value-type="string">
            <text:p>XINGU</text:p>
          </table:table-cell>
          <table:table-cell office:value-type="float" office:value="1.80127988928231" calcext:value-type="float">
            <text:p>1,801280</text:p>
          </table:table-cell>
          <table:table-cell/>
          <table:table-cell office:value-type="string" calcext:value-type="string">
            <text:p>JURUPARI</text:p>
          </table:table-cell>
          <table:table-cell office:value-type="string" calcext:value-type="string">
            <text:p>XINGU</text:p>
          </table:table-cell>
          <table:table-cell office:value-type="float" office:value="1.86791466607827" calcext:value-type="float">
            <text:p>1,867915</text:p>
          </table:table-cell>
        </table:table-row>
        <table:table-row table:style-name="ro1">
          <table:table-cell office:value-type="string" calcext:value-type="string">
            <text:p>JURUTI</text:p>
          </table:table-cell>
          <table:table-cell office:value-type="string" calcext:value-type="string">
            <text:p>ORIXIMINA</text:p>
          </table:table-cell>
          <table:table-cell office:value-type="float" office:value="0.459905259349895" calcext:value-type="float">
            <text:p>0,459905</text:p>
          </table:table-cell>
          <table:table-cell/>
          <table:table-cell office:value-type="string" calcext:value-type="string">
            <text:p>JURUTI</text:p>
          </table:table-cell>
          <table:table-cell office:value-type="string" calcext:value-type="string">
            <text:p>ORIXIMINA</text:p>
          </table:table-cell>
          <table:table-cell office:value-type="float" office:value="0.658612988986426" calcext:value-type="float">
            <text:p>0,658613</text:p>
          </table:table-cell>
        </table:table-row>
        <table:table-row table:style-name="ro1">
          <table:table-cell office:value-type="string" calcext:value-type="string">
            <text:p>JURUTI</text:p>
          </table:table-cell>
          <table:table-cell office:value-type="string" calcext:value-type="string">
            <text:p>PARINTINS</text:p>
          </table:table-cell>
          <table:table-cell office:value-type="float" office:value="0.361911947966748" calcext:value-type="float">
            <text:p>0,361912</text:p>
          </table:table-cell>
          <table:table-cell/>
          <table:table-cell office:value-type="string" calcext:value-type="string">
            <text:p>JURUTI</text:p>
          </table:table-cell>
          <table:table-cell office:value-type="string" calcext:value-type="string">
            <text:p>PARINTINS</text:p>
          </table:table-cell>
          <table:table-cell office:value-type="float" office:value="0.617913633578149" calcext:value-type="float">
            <text:p>0,617914</text:p>
          </table:table-cell>
        </table:table-row>
        <table:table-row table:style-name="ro1">
          <table:table-cell office:value-type="string" calcext:value-type="string">
            <text:p>L.D.RIO VERDE</text:p>
          </table:table-cell>
          <table:table-cell office:value-type="string" calcext:value-type="string">
            <text:p>NOVA MUTUM</text:p>
          </table:table-cell>
          <table:table-cell office:value-type="float" office:value="0.319519605791706" calcext:value-type="float">
            <text:p>0,319520</text:p>
          </table:table-cell>
          <table:table-cell/>
          <table:table-cell office:value-type="string" calcext:value-type="string">
            <text:p>L.C.BARRETO</text:p>
          </table:table-cell>
          <table:table-cell office:value-type="string" calcext:value-type="string">
            <text:p>POCOS CALDAS</text:p>
          </table:table-cell>
          <table:table-cell office:value-type="float" office:value="1.08656294768266" calcext:value-type="float">
            <text:p>1,086563</text:p>
          </table:table-cell>
        </table:table-row>
        <table:table-row table:style-name="ro1">
          <table:table-cell office:value-type="string" calcext:value-type="string">
            <text:p>L.GRANDE</text:p>
          </table:table-cell>
          <table:table-cell office:value-type="string" calcext:value-type="string">
            <text:p>FORQUILHINHA</text:p>
          </table:table-cell>
          <table:table-cell office:value-type="float" office:value="0.321202439784786" calcext:value-type="float">
            <text:p>0,321202</text:p>
          </table:table-cell>
          <table:table-cell/>
          <table:table-cell office:value-type="string" calcext:value-type="string">
            <text:p>L.C.BARRETO</text:p>
          </table:table-cell>
          <table:table-cell office:value-type="string" calcext:value-type="string">
            <text:p>VOLTA GRANDE-SE</text:p>
          </table:table-cell>
          <table:table-cell office:value-type="float" office:value="1.02326216196493" calcext:value-type="float">
            <text:p>1,023262</text:p>
          </table:table-cell>
        </table:table-row>
        <table:table-row table:style-name="ro1">
          <table:table-cell office:value-type="string" calcext:value-type="string">
            <text:p>L.VERMELHA 2</text:p>
          </table:table-cell>
          <table:table-cell office:value-type="string" calcext:value-type="string">
            <text:p>BARRA GRANDE</text:p>
          </table:table-cell>
          <table:table-cell office:value-type="float" office:value="0.344285902107429" calcext:value-type="float">
            <text:p>0,344286</text:p>
          </table:table-cell>
          <table:table-cell/>
          <table:table-cell office:value-type="string" calcext:value-type="string">
            <text:p>L.D.RIO VERDE</text:p>
          </table:table-cell>
          <table:table-cell office:value-type="string" calcext:value-type="string">
            <text:p>NOVA MUTUM</text:p>
          </table:table-cell>
          <table:table-cell office:value-type="float" office:value="0.567336392467623" calcext:value-type="float">
            <text:p>0,567336</text:p>
          </table:table-cell>
        </table:table-row>
        <table:table-row table:style-name="ro1">
          <table:table-cell office:value-type="string" calcext:value-type="string">
            <text:p>LAGOA DO CARRO</text:p>
          </table:table-cell>
          <table:table-cell office:value-type="string" calcext:value-type="string">
            <text:p>COTEMINAS</text:p>
          </table:table-cell>
          <table:table-cell office:value-type="float" office:value="0.415496974371217" calcext:value-type="float">
            <text:p>0,415497</text:p>
          </table:table-cell>
          <table:table-cell/>
          <table:table-cell office:value-type="string" calcext:value-type="string">
            <text:p>L.GRANDE</text:p>
          </table:table-cell>
          <table:table-cell office:value-type="string" calcext:value-type="string">
            <text:p>FORQUILHINHA</text:p>
          </table:table-cell>
          <table:table-cell office:value-type="float" office:value="0.594898805125415" calcext:value-type="float">
            <text:p>0,594899</text:p>
          </table:table-cell>
        </table:table-row>
        <table:table-row table:style-name="ro1">
          <table:table-cell office:value-type="string" calcext:value-type="string">
            <text:p>LAGOA DO CARRO</text:p>
          </table:table-cell>
          <table:table-cell office:value-type="string" calcext:value-type="string">
            <text:p>PAU FERRO</text:p>
          </table:table-cell>
          <table:table-cell office:value-type="float" office:value="0.486939465390477" calcext:value-type="float">
            <text:p>0,486939</text:p>
          </table:table-cell>
          <table:table-cell/>
          <table:table-cell office:value-type="string" calcext:value-type="string">
            <text:p>L.VERMELHA 2</text:p>
          </table:table-cell>
          <table:table-cell office:value-type="string" calcext:value-type="string">
            <text:p>BARRA GRANDE</text:p>
          </table:table-cell>
          <table:table-cell office:value-type="float" office:value="0.637651668905339" calcext:value-type="float">
            <text:p>0,637652</text:p>
          </table:table-cell>
        </table:table-row>
        <table:table-row table:style-name="ro1">
          <table:table-cell office:value-type="string" calcext:value-type="string">
            <text:p>LAGOA NOVA II</text:p>
          </table:table-cell>
          <table:table-cell office:value-type="string" calcext:value-type="string">
            <text:p>PARAISO</text:p>
          </table:table-cell>
          <table:table-cell office:value-type="float" office:value="0.448892560720366" calcext:value-type="float">
            <text:p>0,448893</text:p>
          </table:table-cell>
          <table:table-cell/>
          <table:table-cell office:value-type="string" calcext:value-type="string">
            <text:p>LAGOA DO CARRO</text:p>
          </table:table-cell>
          <table:table-cell office:value-type="string" calcext:value-type="string">
            <text:p>COTEMINAS</text:p>
          </table:table-cell>
          <table:table-cell office:value-type="float" office:value="0.718680650938299" calcext:value-type="float">
            <text:p>0,718681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string" calcext:value-type="string">
            <text:p>CAMPOS 2</text:p>
          </table:table-cell>
          <table:table-cell office:value-type="float" office:value="1.48369101537802" calcext:value-type="float">
            <text:p>1,483691</text:p>
          </table:table-cell>
          <table:table-cell/>
          <table:table-cell office:value-type="string" calcext:value-type="string">
            <text:p>LAGOA DO CARRO</text:p>
          </table:table-cell>
          <table:table-cell office:value-type="string" calcext:value-type="string">
            <text:p>PAU FERRO</text:p>
          </table:table-cell>
          <table:table-cell office:value-type="float" office:value="0.717061990452523" calcext:value-type="float">
            <text:p>0,717062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string" calcext:value-type="string">
            <text:p>LEOPOLDINA2</text:p>
          </table:table-cell>
          <table:table-cell office:value-type="float" office:value="0.836488716945828" calcext:value-type="float">
            <text:p>0,836489</text:p>
          </table:table-cell>
          <table:table-cell/>
          <table:table-cell office:value-type="string" calcext:value-type="string">
            <text:p>LAGOA NOVA II</text:p>
          </table:table-cell>
          <table:table-cell office:value-type="string" calcext:value-type="string">
            <text:p>PARAISO</text:p>
          </table:table-cell>
          <table:table-cell office:value-type="float" office:value="0.791048370807438" calcext:value-type="float">
            <text:p>0,791048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string" calcext:value-type="string">
            <text:p>MACAE MERCHAN</text:p>
          </table:table-cell>
          <table:table-cell office:value-type="float" office:value="0.823911262420112" calcext:value-type="float">
            <text:p>0,823911</text:p>
          </table:table-cell>
          <table:table-cell/>
          <table:table-cell office:value-type="string" calcext:value-type="string">
            <text:p>LAGOS</text:p>
          </table:table-cell>
          <table:table-cell office:value-type="string" calcext:value-type="string">
            <text:p>CAMPOS 2</text:p>
          </table:table-cell>
          <table:table-cell office:value-type="float" office:value="1.9172742263507" calcext:value-type="float">
            <text:p>1,917274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string" calcext:value-type="string">
            <text:p>TERMINAL RIO</text:p>
          </table:table-cell>
          <table:table-cell office:value-type="float" office:value="1.84098796491851" calcext:value-type="float">
            <text:p>1,840988</text:p>
          </table:table-cell>
          <table:table-cell/>
          <table:table-cell office:value-type="string" calcext:value-type="string">
            <text:p>LAGOS</text:p>
          </table:table-cell>
          <table:table-cell office:value-type="string" calcext:value-type="string">
            <text:p>LEOPOLDINA2</text:p>
          </table:table-cell>
          <table:table-cell office:value-type="float" office:value="1.19320715964269" calcext:value-type="float">
            <text:p>1,193207</text:p>
          </table:table-cell>
        </table:table-row>
        <table:table-row table:style-name="ro1">
          <table:table-cell office:value-type="string" calcext:value-type="string">
            <text:p>LAJEADO 2</text:p>
          </table:table-cell>
          <table:table-cell office:value-type="string" calcext:value-type="string">
            <text:p>NOVA STA RITA</text:p>
          </table:table-cell>
          <table:table-cell office:value-type="float" office:value="0.38151069692875" calcext:value-type="float">
            <text:p>0,381511</text:p>
          </table:table-cell>
          <table:table-cell/>
          <table:table-cell office:value-type="string" calcext:value-type="string">
            <text:p>LAGOS</text:p>
          </table:table-cell>
          <table:table-cell office:value-type="string" calcext:value-type="string">
            <text:p>MACAE MERCHAN</text:p>
          </table:table-cell>
          <table:table-cell office:value-type="float" office:value="1.16878589560329" calcext:value-type="float">
            <text:p>1,168786</text:p>
          </table:table-cell>
        </table:table-row>
        <table:table-row table:style-name="ro1">
          <table:table-cell office:value-type="string" calcext:value-type="string">
            <text:p>LAJEADO 2</text:p>
          </table:table-cell>
          <table:table-cell office:value-type="string" calcext:value-type="string">
            <text:p>PASSO REAL</text:p>
          </table:table-cell>
          <table:table-cell office:value-type="float" office:value="0.332079111676493" calcext:value-type="float">
            <text:p>0,332079</text:p>
          </table:table-cell>
          <table:table-cell/>
          <table:table-cell office:value-type="string" calcext:value-type="string">
            <text:p>LAGOS</text:p>
          </table:table-cell>
          <table:table-cell office:value-type="string" calcext:value-type="string">
            <text:p>TERMINAL RIO</text:p>
          </table:table-cell>
          <table:table-cell office:value-type="float" office:value="2.04390960817624" calcext:value-type="float">
            <text:p>2,043910</text:p>
          </table:table-cell>
        </table:table-row>
        <table:table-row table:style-name="ro1">
          <table:table-cell office:value-type="string" calcext:value-type="string">
            <text:p>LARANJAL</text:p>
          </table:table-cell>
          <table:table-cell office:value-type="string" calcext:value-type="string">
            <text:p>JURUPARI</text:p>
          </table:table-cell>
          <table:table-cell office:value-type="float" office:value="0.565342105596143" calcext:value-type="float">
            <text:p>0,565342</text:p>
          </table:table-cell>
          <table:table-cell/>
          <table:table-cell office:value-type="string" calcext:value-type="string">
            <text:p>LAJEADO 2</text:p>
          </table:table-cell>
          <table:table-cell office:value-type="string" calcext:value-type="string">
            <text:p>PASSO REAL</text:p>
          </table:table-cell>
          <table:table-cell office:value-type="float" office:value="0.609170079382205" calcext:value-type="float">
            <text:p>0,609170</text:p>
          </table:table-cell>
        </table:table-row>
        <table:table-row table:style-name="ro1">
          <table:table-cell office:value-type="string" calcext:value-type="string">
            <text:p>LARANJAL</text:p>
          </table:table-cell>
          <table:table-cell office:value-type="string" calcext:value-type="string">
            <text:p>MACAPA</text:p>
          </table:table-cell>
          <table:table-cell office:value-type="float" office:value="0.510120993508349" calcext:value-type="float">
            <text:p>0,510121</text:p>
          </table:table-cell>
          <table:table-cell/>
          <table:table-cell office:value-type="string" calcext:value-type="string">
            <text:p>LARANJAL</text:p>
          </table:table-cell>
          <table:table-cell office:value-type="string" calcext:value-type="string">
            <text:p>JURUPARI</text:p>
          </table:table-cell>
          <table:table-cell office:value-type="float" office:value="0.808817628195574" calcext:value-type="float">
            <text:p>0,808818</text:p>
          </table:table-cell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EQUADOR</text:p>
          </table:table-cell>
          <table:table-cell office:value-type="float" office:value="1.32300639297573" calcext:value-type="float">
            <text:p>1,323006</text:p>
          </table:table-cell>
          <table:table-cell/>
          <table:table-cell office:value-type="string" calcext:value-type="string">
            <text:p>LARANJAL</text:p>
          </table:table-cell>
          <table:table-cell office:value-type="string" calcext:value-type="string">
            <text:p>MACAPA</text:p>
          </table:table-cell>
          <table:table-cell office:value-type="float" office:value="0.865064249466112" calcext:value-type="float">
            <text:p>0,865064</text:p>
          </table:table-cell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MANAUS</text:p>
          </table:table-cell>
          <table:table-cell office:value-type="float" office:value="0.504657750923633" calcext:value-type="float">
            <text:p>0,504658</text:p>
          </table:table-cell>
          <table:table-cell/>
          <table:table-cell office:value-type="string" calcext:value-type="string">
            <text:p>LECHUGA</text:p>
          </table:table-cell>
          <table:table-cell office:value-type="string" calcext:value-type="string">
            <text:p>EQUADOR</text:p>
          </table:table-cell>
          <table:table-cell office:value-type="float" office:value="1.61161186233139" calcext:value-type="float">
            <text:p>1,611612</text:p>
          </table:table-cell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SILVES</text:p>
          </table:table-cell>
          <table:table-cell office:value-type="float" office:value="1.49614914639712" calcext:value-type="float">
            <text:p>1,496149</text:p>
          </table:table-cell>
          <table:table-cell/>
          <table:table-cell office:value-type="string" calcext:value-type="string">
            <text:p>LECHUGA</text:p>
          </table:table-cell>
          <table:table-cell office:value-type="string" calcext:value-type="string">
            <text:p>MANAUS</text:p>
          </table:table-cell>
          <table:table-cell office:value-type="float" office:value="0.729735755700697" calcext:value-type="float">
            <text:p>0,729736</text:p>
          </table:table-cell>
        </table:table-row>
        <table:table-row table:style-name="ro1">
          <table:table-cell office:value-type="string" calcext:value-type="string">
            <text:p>LESTE</text:p>
          </table:table-cell>
          <table:table-cell office:value-type="string" calcext:value-type="string">
            <text:p>RAM REBERT F</text:p>
          </table:table-cell>
          <table:table-cell office:value-type="float" office:value="1.01873029852615" calcext:value-type="float">
            <text:p>1,018730</text:p>
          </table:table-cell>
          <table:table-cell/>
          <table:table-cell office:value-type="string" calcext:value-type="string">
            <text:p>LECHUGA</text:p>
          </table:table-cell>
          <table:table-cell office:value-type="string" calcext:value-type="string">
            <text:p>SILVES</text:p>
          </table:table-cell>
          <table:table-cell office:value-type="float" office:value="1.82340431875727" calcext:value-type="float">
            <text:p>1,823404</text:p>
          </table:table-cell>
        </table:table-row>
        <table:table-row table:style-name="ro1">
          <table:table-cell office:value-type="string" calcext:value-type="string">
            <text:p>LESTE</text:p>
          </table:table-cell>
          <table:table-cell office:value-type="string" calcext:value-type="string">
            <text:p>TIJUCO PRETO</text:p>
          </table:table-cell>
          <table:table-cell office:value-type="float" office:value="0.836449222732356" calcext:value-type="float">
            <text:p>0,836449</text:p>
          </table:table-cell>
          <table:table-cell/>
          <table:table-cell office:value-type="string" calcext:value-type="string">
            <text:p>LESTE</text:p>
          </table:table-cell>
          <table:table-cell office:value-type="string" calcext:value-type="string">
            <text:p>RAM REBERT F</text:p>
          </table:table-cell>
          <table:table-cell office:value-type="float" office:value="1.65139351869191" calcext:value-type="float">
            <text:p>1,651394</text:p>
          </table:table-cell>
        </table:table-row>
        <table:table-row table:style-name="ro1">
          <table:table-cell office:value-type="string" calcext:value-type="string">
            <text:p>LINHARES</text:p>
          </table:table-cell>
          <table:table-cell office:value-type="string" calcext:value-type="string">
            <text:p>MASCARENHAS</text:p>
          </table:table-cell>
          <table:table-cell office:value-type="float" office:value="0.31171807821681" calcext:value-type="float">
            <text:p>0,311718</text:p>
          </table:table-cell>
          <table:table-cell/>
          <table:table-cell office:value-type="string" calcext:value-type="string">
            <text:p>LESTE</text:p>
          </table:table-cell>
          <table:table-cell office:value-type="string" calcext:value-type="string">
            <text:p>TIJUCO PRETO</text:p>
          </table:table-cell>
          <table:table-cell office:value-type="float" office:value="1.07836972083518" calcext:value-type="float">
            <text:p>1,078370</text:p>
          </table:table-cell>
        </table:table-row>
        <table:table-row table:style-name="ro1">
          <table:table-cell office:value-type="string" calcext:value-type="string">
            <text:p>LINHARES</text:p>
          </table:table-cell>
          <table:table-cell office:value-type="string" calcext:value-type="string">
            <text:p>SAO MATEUS 2</text:p>
          </table:table-cell>
          <table:table-cell office:value-type="float" office:value="0.346148407962019" calcext:value-type="float">
            <text:p>0,346148</text:p>
          </table:table-cell>
          <table:table-cell/>
          <table:table-cell office:value-type="string" calcext:value-type="string">
            <text:p>LINHARES</text:p>
          </table:table-cell>
          <table:table-cell office:value-type="string" calcext:value-type="string">
            <text:p>MASCARENHAS</text:p>
          </table:table-cell>
          <table:table-cell office:value-type="float" office:value="0.571819544727012" calcext:value-type="float">
            <text:p>0,571820</text:p>
          </table:table-cell>
        </table:table-row>
        <table:table-row table:style-name="ro1">
          <table:table-cell office:value-type="string" calcext:value-type="string">
            <text:p>LIVRAMENTO 3</text:p>
          </table:table-cell>
          <table:table-cell office:value-type="string" calcext:value-type="string">
            <text:p>SANTA MARIA 3</text:p>
          </table:table-cell>
          <table:table-cell office:value-type="float" office:value="0.513976322696293" calcext:value-type="float">
            <text:p>0,513976</text:p>
          </table:table-cell>
          <table:table-cell/>
          <table:table-cell office:value-type="string" calcext:value-type="string">
            <text:p>LINHARES</text:p>
          </table:table-cell>
          <table:table-cell office:value-type="string" calcext:value-type="string">
            <text:p>SAO MATEUS 2</text:p>
          </table:table-cell>
          <table:table-cell office:value-type="float" office:value="0.634978972605984" calcext:value-type="float">
            <text:p>0,634979</text:p>
          </table:table-cell>
        </table:table-row>
        <table:table-row table:style-name="ro1">
          <table:table-cell office:value-type="string" calcext:value-type="string">
            <text:p>LONDRINA ESU</text:p>
          </table:table-cell>
          <table:table-cell office:value-type="string" calcext:value-type="string">
            <text:p>ASSIS</text:p>
          </table:table-cell>
          <table:table-cell office:value-type="float" office:value="1.49918384830732" calcext:value-type="float">
            <text:p>1,499184</text:p>
          </table:table-cell>
          <table:table-cell/>
          <table:table-cell office:value-type="string" calcext:value-type="string">
            <text:p>LIVRAMENTO 3</text:p>
          </table:table-cell>
          <table:table-cell office:value-type="string" calcext:value-type="string">
            <text:p>MACAMBARA 3</text:p>
          </table:table-cell>
          <table:table-cell office:value-type="float" office:value="0.91065354344846" calcext:value-type="float">
            <text:p>0,910654</text:p>
          </table:table-cell>
        </table:table-row>
        <table:table-row table:style-name="ro1">
          <table:table-cell office:value-type="string" calcext:value-type="string">
            <text:p>LONDRINA ESU</text:p>
          </table:table-cell>
          <table:table-cell office:value-type="string" calcext:value-type="string">
            <text:p>LONDRINA COT</text:p>
          </table:table-cell>
          <table:table-cell office:value-type="float" office:value="0.435137814190952" calcext:value-type="float">
            <text:p>0,435138</text:p>
          </table:table-cell>
          <table:table-cell/>
          <table:table-cell office:value-type="string" calcext:value-type="string">
            <text:p>LIVRAMENTO 3</text:p>
          </table:table-cell>
          <table:table-cell office:value-type="string" calcext:value-type="string">
            <text:p>SANTA MARIA 3</text:p>
          </table:table-cell>
          <table:table-cell office:value-type="float" office:value="0.942844600242402" calcext:value-type="float">
            <text:p>0,942845</text:p>
          </table:table-cell>
        </table:table-row>
        <table:table-row table:style-name="ro1">
          <table:table-cell office:value-type="string" calcext:value-type="string">
            <text:p>LONDRINA ESU</text:p>
          </table:table-cell>
          <table:table-cell office:value-type="string" calcext:value-type="string">
            <text:p>LONDRINA SUL</text:p>
          </table:table-cell>
          <table:table-cell office:value-type="float" office:value="0.423554156910934" calcext:value-type="float">
            <text:p>0,423554</text:p>
          </table:table-cell>
          <table:table-cell/>
          <table:table-cell office:value-type="string" calcext:value-type="string">
            <text:p>LONDRINA ESU</text:p>
          </table:table-cell>
          <table:table-cell office:value-type="string" calcext:value-type="string">
            <text:p>ASSIS</text:p>
          </table:table-cell>
          <table:table-cell office:value-type="float" office:value="1.98291831369558" calcext:value-type="float">
            <text:p>1,982918</text:p>
          </table:table-cell>
        </table:table-row>
        <table:table-row table:style-name="ro1">
          <table:table-cell office:value-type="string" calcext:value-type="string">
            <text:p>LONDRINA ESU</text:p>
          </table:table-cell>
          <table:table-cell office:value-type="string" calcext:value-type="string">
            <text:p>MARINGA</text:p>
          </table:table-cell>
          <table:table-cell office:value-type="float" office:value="0.392761207790324" calcext:value-type="float">
            <text:p>0,392761</text:p>
          </table:table-cell>
          <table:table-cell/>
          <table:table-cell office:value-type="string" calcext:value-type="string">
            <text:p>LONDRINA ESU</text:p>
          </table:table-cell>
          <table:table-cell office:value-type="string" calcext:value-type="string">
            <text:p>IVAIPORA ELS</text:p>
          </table:table-cell>
          <table:table-cell office:value-type="float" office:value="1.70033703099881" calcext:value-type="float">
            <text:p>1,700337</text:p>
          </table:table-cell>
        </table:table-row>
        <table:table-row table:style-name="ro1">
          <table:table-cell office:value-type="string" calcext:value-type="string">
            <text:p>LONDRINA ESU</text:p>
          </table:table-cell>
          <table:table-cell office:value-type="string" calcext:value-type="string">
            <text:p>SARANDI</text:p>
          </table:table-cell>
          <table:table-cell office:value-type="float" office:value="1.49751478967638" calcext:value-type="float">
            <text:p>1,497515</text:p>
          </table:table-cell>
          <table:table-cell/>
          <table:table-cell office:value-type="string" calcext:value-type="string">
            <text:p>LONDRINA ESU</text:p>
          </table:table-cell>
          <table:table-cell office:value-type="string" calcext:value-type="string">
            <text:p>LONDRINA COT</text:p>
          </table:table-cell>
          <table:table-cell office:value-type="float" office:value="0.671503263085903" calcext:value-type="float">
            <text:p>0,671503</text:p>
          </table:table-cell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SANTA CABECA</text:p>
          </table:table-cell>
          <table:table-cell office:value-type="float" office:value="0.615431036385187" calcext:value-type="float">
            <text:p>0,615431</text:p>
          </table:table-cell>
          <table:table-cell/>
          <table:table-cell office:value-type="string" calcext:value-type="string">
            <text:p>LONDRINA ESU</text:p>
          </table:table-cell>
          <table:table-cell office:value-type="string" calcext:value-type="string">
            <text:p>LONDRINA SUL</text:p>
          </table:table-cell>
          <table:table-cell office:value-type="float" office:value="0.653627400753728" calcext:value-type="float">
            <text:p>0,653627</text:p>
          </table:table-cell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TIJUCO PRETO</text:p>
          </table:table-cell>
          <table:table-cell office:value-type="float" office:value="1.672251802763" calcext:value-type="float">
            <text:p>1,672252</text:p>
          </table:table-cell>
          <table:table-cell/>
          <table:table-cell office:value-type="string" calcext:value-type="string">
            <text:p>LONDRINA ESU</text:p>
          </table:table-cell>
          <table:table-cell office:value-type="string" calcext:value-type="string">
            <text:p>MARINGA</text:p>
          </table:table-cell>
          <table:table-cell office:value-type="float" office:value="0.606107821576327" calcext:value-type="float">
            <text:p>0,606108</text:p>
          </table:table-cell>
        </table:table-row>
        <table:table-row table:style-name="ro1">
          <table:table-cell office:value-type="string" calcext:value-type="string">
            <text:p>LUZIANIA</text:p>
          </table:table-cell>
          <table:table-cell office:value-type="string" calcext:value-type="string">
            <text:p>SERRA MESA 2</text:p>
          </table:table-cell>
          <table:table-cell office:value-type="float" office:value="1.40555890799991" calcext:value-type="float">
            <text:p>1,405559</text:p>
          </table:table-cell>
          <table:table-cell/>
          <table:table-cell office:value-type="string" calcext:value-type="string">
            <text:p>LONDRINA ESU</text:p>
          </table:table-cell>
          <table:table-cell office:value-type="string" calcext:value-type="string">
            <text:p>SARANDI</text:p>
          </table:table-cell>
          <table:table-cell office:value-type="float" office:value="1.94767538288081" calcext:value-type="float">
            <text:p>1,947675</text:p>
          </table:table-cell>
        </table:table-row>
        <table:table-row table:style-name="ro1">
          <table:table-cell office:value-type="string" calcext:value-type="string">
            <text:p>MACAMBARA</text:p>
          </table:table-cell>
          <table:table-cell office:value-type="string" calcext:value-type="string">
            <text:p>U.URUGUAIANA</text:p>
          </table:table-cell>
          <table:table-cell office:value-type="float" office:value="0.402594495983461" calcext:value-type="float">
            <text:p>0,402594</text:p>
          </table:table-cell>
          <table:table-cell/>
          <table:table-cell office:value-type="string" calcext:value-type="string">
            <text:p>LORENA</text:p>
          </table:table-cell>
          <table:table-cell office:value-type="string" calcext:value-type="string">
            <text:p>C. PAULISTA</text:p>
          </table:table-cell>
          <table:table-cell office:value-type="float" office:value="1.83520161232979" calcext:value-type="float">
            <text:p>1,835202</text:p>
          </table:table-cell>
        </table:table-row>
        <table:table-row table:style-name="ro1">
          <table:table-cell office:value-type="string" calcext:value-type="string">
            <text:p>MACAMBARA 3</text:p>
          </table:table-cell>
          <table:table-cell office:value-type="string" calcext:value-type="string">
            <text:p>SANTO ANGELO</text:p>
          </table:table-cell>
          <table:table-cell office:value-type="float" office:value="0.561541578055073" calcext:value-type="float">
            <text:p>0,561542</text:p>
          </table:table-cell>
          <table:table-cell/>
          <table:table-cell office:value-type="string" calcext:value-type="string">
            <text:p>LORENA</text:p>
          </table:table-cell>
          <table:table-cell office:value-type="string" calcext:value-type="string">
            <text:p>SANTA CABECA</text:p>
          </table:table-cell>
          <table:table-cell office:value-type="float" office:value="0.982242055358342" calcext:value-type="float">
            <text:p>0,982242</text:p>
          </table:table-cell>
        </table:table-row>
        <table:table-row table:style-name="ro1">
          <table:table-cell office:value-type="string" calcext:value-type="string">
            <text:p>MACAPA</text:p>
          </table:table-cell>
          <table:table-cell office:value-type="string" calcext:value-type="string">
            <text:p>MACAPA III</text:p>
          </table:table-cell>
          <table:table-cell office:value-type="float" office:value="0.457704523175032" calcext:value-type="float">
            <text:p>0,457705</text:p>
          </table:table-cell>
          <table:table-cell/>
          <table:table-cell office:value-type="string" calcext:value-type="string">
            <text:p>LORENA</text:p>
          </table:table-cell>
          <table:table-cell office:value-type="string" calcext:value-type="string">
            <text:p>TIJUCO PRETO</text:p>
          </table:table-cell>
          <table:table-cell office:value-type="float" office:value="1.96386351199149" calcext:value-type="float">
            <text:p>1,963864</text:p>
          </table:table-cell>
        </table:table-row>
        <table:table-row table:style-name="ro1">
          <table:table-cell office:value-type="string" calcext:value-type="string">
            <text:p>MARANGATU</text:p>
          </table:table-cell>
          <table:table-cell office:value-type="string" calcext:value-type="string">
            <text:p>PIRIPIRI</text:p>
          </table:table-cell>
          <table:table-cell office:value-type="float" office:value="0.474166712627071" calcext:value-type="float">
            <text:p>0,474167</text:p>
          </table:table-cell>
          <table:table-cell/>
          <table:table-cell office:value-type="string" calcext:value-type="string">
            <text:p>LUZIANIA</text:p>
          </table:table-cell>
          <table:table-cell office:value-type="string" calcext:value-type="string">
            <text:p>SERRA MESA 2</text:p>
          </table:table-cell>
          <table:table-cell office:value-type="float" office:value="1.77445154128032" calcext:value-type="float">
            <text:p>1,774452</text:p>
          </table:table-cell>
        </table:table-row>
        <table:table-row table:style-name="ro1">
          <table:table-cell office:value-type="string" calcext:value-type="string">
            <text:p>MARIMBONDO</text:p>
          </table:table-cell>
          <table:table-cell office:value-type="string" calcext:value-type="string">
            <text:p>MORRO AGUDO</text:p>
          </table:table-cell>
          <table:table-cell office:value-type="float" office:value="1.20002633292873" calcext:value-type="float">
            <text:p>1,200026</text:p>
          </table:table-cell>
          <table:table-cell/>
          <table:table-cell office:value-type="string" calcext:value-type="string">
            <text:p>MACAMBARA</text:p>
          </table:table-cell>
          <table:table-cell office:value-type="string" calcext:value-type="string">
            <text:p>U.URUGUAIANA</text:p>
          </table:table-cell>
          <table:table-cell office:value-type="float" office:value="0.738524383057257" calcext:value-type="float">
            <text:p>0,738524</text:p>
          </table:table-cell>
        </table:table-row>
        <table:table-row table:style-name="ro1">
          <table:table-cell office:value-type="string" calcext:value-type="string">
            <text:p>MARITUBA</text:p>
          </table:table-cell>
          <table:table-cell office:value-type="string" calcext:value-type="string">
            <text:p>TUCURUI</text:p>
          </table:table-cell>
          <table:table-cell office:value-type="float" office:value="1.48937898547399" calcext:value-type="float">
            <text:p>1,489379</text:p>
          </table:table-cell>
          <table:table-cell/>
          <table:table-cell office:value-type="string" calcext:value-type="string">
            <text:p>MACAMBARA 3</text:p>
          </table:table-cell>
          <table:table-cell office:value-type="string" calcext:value-type="string">
            <text:p>SANTO ANGELO</text:p>
          </table:table-cell>
          <table:table-cell office:value-type="float" office:value="0.868165670165861" calcext:value-type="float">
            <text:p>0,868166</text:p>
          </table:table-cell>
        </table:table-row>
        <table:table-row table:style-name="ro1">
          <table:table-cell office:value-type="string" calcext:value-type="string">
            <text:p>MARITUBA</text:p>
          </table:table-cell>
          <table:table-cell office:value-type="string" calcext:value-type="string">
            <text:p>UTINGA</text:p>
          </table:table-cell>
          <table:table-cell office:value-type="float" office:value="0.543831039067232" calcext:value-type="float">
            <text:p>0,543831</text:p>
          </table:table-cell>
          <table:table-cell/>
          <table:table-cell office:value-type="string" calcext:value-type="string">
            <text:p>MACAPA</text:p>
          </table:table-cell>
          <table:table-cell office:value-type="string" calcext:value-type="string">
            <text:p>MACAPA III</text:p>
          </table:table-cell>
          <table:table-cell office:value-type="float" office:value="0.77617628926533" calcext:value-type="float">
            <text:p>0,776176</text:p>
          </table:table-cell>
        </table:table-row>
        <table:table-row table:style-name="ro1">
          <table:table-cell office:value-type="string" calcext:value-type="string">
            <text:p>MARITUBA</text:p>
          </table:table-cell>
          <table:table-cell office:value-type="string" calcext:value-type="string">
            <text:p>VILA DO CONDE</text:p>
          </table:table-cell>
          <table:table-cell office:value-type="float" office:value="1.61986732284185" calcext:value-type="float">
            <text:p>1,619867</text:p>
          </table:table-cell>
          <table:table-cell/>
          <table:table-cell office:value-type="string" calcext:value-type="string">
            <text:p>MARANGATU</text:p>
          </table:table-cell>
          <table:table-cell office:value-type="string" calcext:value-type="string">
            <text:p>PIRIPIRI</text:p>
          </table:table-cell>
          <table:table-cell office:value-type="float" office:value="0.805659455734677" calcext:value-type="float">
            <text:p>0,805659</text:p>
          </table:table-cell>
        </table:table-row>
        <table:table-row table:style-name="ro1">
          <table:table-cell office:value-type="string" calcext:value-type="string">
            <text:p>MARMELEIRO 2</text:p>
          </table:table-cell>
          <table:table-cell office:value-type="string" calcext:value-type="string">
            <text:p>S V PALMAR 2</text:p>
          </table:table-cell>
          <table:table-cell office:value-type="float" office:value="1.63624513159642" calcext:value-type="float">
            <text:p>1,636245</text:p>
          </table:table-cell>
          <table:table-cell/>
          <table:table-cell office:value-type="string" calcext:value-type="string">
            <text:p>MARIMBONDO</text:p>
          </table:table-cell>
          <table:table-cell office:value-type="string" calcext:value-type="string">
            <text:p>MORRO AGUDO</text:p>
          </table:table-cell>
          <table:table-cell office:value-type="float" office:value="1.5908834102775" calcext:value-type="float">
            <text:p>1,590883</text:p>
          </table:table-cell>
        </table:table-row>
        <table:table-row table:style-name="ro1">
          <table:table-cell office:value-type="string" calcext:value-type="string">
            <text:p>MASCARENHAS</text:p>
          </table:table-cell>
          <table:table-cell office:value-type="string" calcext:value-type="string">
            <text:p>AIMORES-SE</text:p>
          </table:table-cell>
          <table:table-cell office:value-type="float" office:value="0.311517076414314" calcext:value-type="float">
            <text:p>0,311517</text:p>
          </table:table-cell>
          <table:table-cell/>
          <table:table-cell office:value-type="string" calcext:value-type="string">
            <text:p>MARITUBA</text:p>
          </table:table-cell>
          <table:table-cell office:value-type="string" calcext:value-type="string">
            <text:p>TUCURUI</text:p>
          </table:table-cell>
          <table:table-cell office:value-type="float" office:value="1.79766435254797" calcext:value-type="float">
            <text:p>1,797664</text:p>
          </table:table-cell>
        </table:table-row>
        <table:table-row table:style-name="ro1">
          <table:table-cell office:value-type="string" calcext:value-type="string">
            <text:p>MASCARENHAS</text:p>
          </table:table-cell>
          <table:table-cell office:value-type="string" calcext:value-type="string">
            <text:p>VERONA</text:p>
          </table:table-cell>
          <table:table-cell office:value-type="float" office:value="0.314736214774475" calcext:value-type="float">
            <text:p>0,314736</text:p>
          </table:table-cell>
          <table:table-cell/>
          <table:table-cell office:value-type="string" calcext:value-type="string">
            <text:p>MARITUBA</text:p>
          </table:table-cell>
          <table:table-cell office:value-type="string" calcext:value-type="string">
            <text:p>UTINGA</text:p>
          </table:table-cell>
          <table:table-cell office:value-type="float" office:value="0.778799935121345" calcext:value-type="float">
            <text:p>0,778800</text:p>
          </table:table-cell>
        </table:table-row>
        <table:table-row table:style-name="ro1">
          <table:table-cell office:value-type="string" calcext:value-type="string">
            <text:p>MATA NORTE</text:p>
          </table:table-cell>
          <table:table-cell office:value-type="string" calcext:value-type="string">
            <text:p>PAU FERRO</text:p>
          </table:table-cell>
          <table:table-cell office:value-type="float" office:value="0.337863938397963" calcext:value-type="float">
            <text:p>0,337864</text:p>
          </table:table-cell>
          <table:table-cell/>
          <table:table-cell office:value-type="string" calcext:value-type="string">
            <text:p>MARITUBA</text:p>
          </table:table-cell>
          <table:table-cell office:value-type="string" calcext:value-type="string">
            <text:p>VILA DO CONDE</text:p>
          </table:table-cell>
          <table:table-cell office:value-type="float" office:value="1.95516236668491" calcext:value-type="float">
            <text:p>1,955162</text:p>
          </table:table-cell>
        </table:table-row>
        <table:table-row table:style-name="ro1">
          <table:table-cell office:value-type="string" calcext:value-type="string">
            <text:p>MAURITI II</text:p>
          </table:table-cell>
          <table:table-cell office:value-type="string" calcext:value-type="string">
            <text:p>MILAGRES</text:p>
          </table:table-cell>
          <table:table-cell office:value-type="float" office:value="0.411356263919845" calcext:value-type="float">
            <text:p>0,411356</text:p>
          </table:table-cell>
          <table:table-cell/>
          <table:table-cell office:value-type="string" calcext:value-type="string">
            <text:p>MARMELEIRO 2</text:p>
          </table:table-cell>
          <table:table-cell office:value-type="string" calcext:value-type="string">
            <text:p>S V PALMAR 2</text:p>
          </table:table-cell>
          <table:table-cell office:value-type="float" office:value="2.13202720927553" calcext:value-type="float">
            <text:p>2,132027</text:p>
          </table:table-cell>
        </table:table-row>
        <table:table-row table:style-name="ro1">
          <table:table-cell office:value-type="string" calcext:value-type="string">
            <text:p>MEDEIROS NETOII</text:p>
          </table:table-cell>
          <table:table-cell office:value-type="string" calcext:value-type="string">
            <text:p>JOAO NEIVA 2</text:p>
          </table:table-cell>
          <table:table-cell office:value-type="float" office:value="1.49145197786524" calcext:value-type="float">
            <text:p>1,491452</text:p>
          </table:table-cell>
          <table:table-cell/>
          <table:table-cell office:value-type="string" calcext:value-type="string">
            <text:p>MASCARENHAS</text:p>
          </table:table-cell>
          <table:table-cell office:value-type="string" calcext:value-type="string">
            <text:p>AIMORES-SE</text:p>
          </table:table-cell>
          <table:table-cell office:value-type="float" office:value="0.572239399078609" calcext:value-type="float">
            <text:p>0,572239</text:p>
          </table:table-cell>
        </table:table-row>
        <table:table-row table:style-name="ro1">
          <table:table-cell office:value-type="string" calcext:value-type="string">
            <text:p>MEDEIROS NETOII</text:p>
          </table:table-cell>
          <table:table-cell office:value-type="string" calcext:value-type="string">
            <text:p>POCOES III</text:p>
          </table:table-cell>
          <table:table-cell office:value-type="float" office:value="1.4958146533243" calcext:value-type="float">
            <text:p>1,495815</text:p>
          </table:table-cell>
          <table:table-cell/>
          <table:table-cell office:value-type="string" calcext:value-type="string">
            <text:p>MASCARENHAS</text:p>
          </table:table-cell>
          <table:table-cell office:value-type="string" calcext:value-type="string">
            <text:p>VERONA</text:p>
          </table:table-cell>
          <table:table-cell office:value-type="float" office:value="0.577356052209031" calcext:value-type="float">
            <text:p>0,577356</text:p>
          </table:table-cell>
        </table:table-row>
        <table:table-row table:style-name="ro1">
          <table:table-cell office:value-type="string" calcext:value-type="string">
            <text:p>MEDEIROS NETOII</text:p>
          </table:table-cell>
          <table:table-cell office:value-type="string" calcext:value-type="string">
            <text:p>TEIX FREITAS II</text:p>
          </table:table-cell>
          <table:table-cell office:value-type="float" office:value="0.425932725262528" calcext:value-type="float">
            <text:p>0,425933</text:p>
          </table:table-cell>
          <table:table-cell/>
          <table:table-cell office:value-type="string" calcext:value-type="string">
            <text:p>MATA NORTE</text:p>
          </table:table-cell>
          <table:table-cell office:value-type="string" calcext:value-type="string">
            <text:p>PAU FERRO</text:p>
          </table:table-cell>
          <table:table-cell office:value-type="float" office:value="0.497534920435123" calcext:value-type="float">
            <text:p>0,497535</text:p>
          </table:table-cell>
        </table:table-row>
        <table:table-row table:style-name="ro1">
          <table:table-cell office:value-type="string" calcext:value-type="string">
            <text:p>MESQUITA</text:p>
          </table:table-cell>
          <table:table-cell office:value-type="string" calcext:value-type="string">
            <text:p>JOAO NEIVA 2</text:p>
          </table:table-cell>
          <table:table-cell office:value-type="float" office:value="1.53264098962992" calcext:value-type="float">
            <text:p>1,532641</text:p>
          </table:table-cell>
          <table:table-cell/>
          <table:table-cell office:value-type="string" calcext:value-type="string">
            <text:p>MAURITI II</text:p>
          </table:table-cell>
          <table:table-cell office:value-type="string" calcext:value-type="string">
            <text:p>BOM NOME</text:p>
          </table:table-cell>
          <table:table-cell office:value-type="float" office:value="0.63298790972005" calcext:value-type="float">
            <text:p>0,632988</text:p>
          </table:table-cell>
        </table:table-row>
        <table:table-row table:style-name="ro1">
          <table:table-cell office:value-type="string" calcext:value-type="string">
            <text:p>MESQUITA</text:p>
          </table:table-cell>
          <table:table-cell office:value-type="string" calcext:value-type="string">
            <text:p>PORTO ESTRELA</text:p>
          </table:table-cell>
          <table:table-cell office:value-type="float" office:value="0.380653501936926" calcext:value-type="float">
            <text:p>0,380654</text:p>
          </table:table-cell>
          <table:table-cell/>
          <table:table-cell office:value-type="string" calcext:value-type="string">
            <text:p>MEDEIROS NETOII</text:p>
          </table:table-cell>
          <table:table-cell office:value-type="string" calcext:value-type="string">
            <text:p>JOAO NEIVA 2</text:p>
          </table:table-cell>
          <table:table-cell office:value-type="float" office:value="1.87130272411514" calcext:value-type="float">
            <text:p>1,871303</text:p>
          </table:table-cell>
        </table:table-row>
        <table:table-row table:style-name="ro1">
          <table:table-cell office:value-type="string" calcext:value-type="string">
            <text:p>MESQUITA</text:p>
          </table:table-cell>
          <table:table-cell office:value-type="string" calcext:value-type="string">
            <text:p>TIMOTEO 2</text:p>
          </table:table-cell>
          <table:table-cell office:value-type="float" office:value="0.404167488590764" calcext:value-type="float">
            <text:p>0,404167</text:p>
          </table:table-cell>
          <table:table-cell/>
          <table:table-cell office:value-type="string" calcext:value-type="string">
            <text:p>MEDEIROS NETOII</text:p>
          </table:table-cell>
          <table:table-cell office:value-type="string" calcext:value-type="string">
            <text:p>POCOES III</text:p>
          </table:table-cell>
          <table:table-cell office:value-type="float" office:value="1.80718643736273" calcext:value-type="float">
            <text:p>1,807186</text:p>
          </table:table-cell>
        </table:table-row>
        <table:table-row table:style-name="ro1">
          <table:table-cell office:value-type="string" calcext:value-type="string">
            <text:p>MESSIAS</text:p>
          </table:table-cell>
          <table:table-cell office:value-type="string" calcext:value-type="string">
            <text:p>MACEIO</text:p>
          </table:table-cell>
          <table:table-cell office:value-type="float" office:value="0.441153873346324" calcext:value-type="float">
            <text:p>0,441154</text:p>
          </table:table-cell>
          <table:table-cell/>
          <table:table-cell office:value-type="string" calcext:value-type="string">
            <text:p>MEDEIROS NETOII</text:p>
          </table:table-cell>
          <table:table-cell office:value-type="string" calcext:value-type="string">
            <text:p>TEIX FREITAS II</text:p>
          </table:table-cell>
          <table:table-cell office:value-type="float" office:value="0.610555178355367" calcext:value-type="float">
            <text:p>0,610555</text:p>
          </table:table-cell>
        </table:table-row>
        <table:table-row table:style-name="ro1">
          <table:table-cell office:value-type="string" calcext:value-type="string">
            <text:p>MESSIAS</text:p>
          </table:table-cell>
          <table:table-cell office:value-type="string" calcext:value-type="string">
            <text:p>MACEIO II</text:p>
          </table:table-cell>
          <table:table-cell office:value-type="float" office:value="0.553714721191167" calcext:value-type="float">
            <text:p>0,553715</text:p>
          </table:table-cell>
          <table:table-cell/>
          <table:table-cell office:value-type="string" calcext:value-type="string">
            <text:p>MESQUITA</text:p>
          </table:table-cell>
          <table:table-cell office:value-type="string" calcext:value-type="string">
            <text:p>JOAO NEIVA 2</text:p>
          </table:table-cell>
          <table:table-cell office:value-type="float" office:value="1.99978358532625" calcext:value-type="float">
            <text:p>1,999784</text:p>
          </table:table-cell>
        </table:table-row>
        <table:table-row table:style-name="ro1">
          <table:table-cell office:value-type="string" calcext:value-type="string">
            <text:p>MESSIAS</text:p>
          </table:table-cell>
          <table:table-cell office:value-type="string" calcext:value-type="string">
            <text:p>RIO LARGO II</text:p>
          </table:table-cell>
          <table:table-cell office:value-type="float" office:value="0.532169530486651" calcext:value-type="float">
            <text:p>0,532170</text:p>
          </table:table-cell>
          <table:table-cell/>
          <table:table-cell office:value-type="string" calcext:value-type="string">
            <text:p>MESQUITA</text:p>
          </table:table-cell>
          <table:table-cell office:value-type="string" calcext:value-type="string">
            <text:p>PORTO ESTRELA</text:p>
          </table:table-cell>
          <table:table-cell office:value-type="float" office:value="0.590129873079628" calcext:value-type="float">
            <text:p>0,590130</text:p>
          </table:table-cell>
        </table:table-row>
        <table:table-row table:style-name="ro1">
          <table:table-cell office:value-type="string" calcext:value-type="string">
            <text:p>MESSIAS</text:p>
          </table:table-cell>
          <table:table-cell office:value-type="string" calcext:value-type="string">
            <text:p>SUAPE II</text:p>
          </table:table-cell>
          <table:table-cell office:value-type="float" office:value="1.23784755495087" calcext:value-type="float">
            <text:p>1,237848</text:p>
          </table:table-cell>
          <table:table-cell/>
          <table:table-cell office:value-type="string" calcext:value-type="string">
            <text:p>MESQUITA</text:p>
          </table:table-cell>
          <table:table-cell office:value-type="string" calcext:value-type="string">
            <text:p>TIMOTEO 2</text:p>
          </table:table-cell>
          <table:table-cell office:value-type="float" office:value="0.626583776403826" calcext:value-type="float">
            <text:p>0,626584</text:p>
          </table:table-cell>
        </table:table-row>
        <table:table-row table:style-name="ro1">
          <table:table-cell office:value-type="string" calcext:value-type="string">
            <text:p>MESSIAS</text:p>
          </table:table-cell>
          <table:table-cell office:value-type="string" calcext:value-type="string">
            <text:p>USINA XINGO</text:p>
          </table:table-cell>
          <table:table-cell office:value-type="float" office:value="1.2479521657772" calcext:value-type="float">
            <text:p>1,247952</text:p>
          </table:table-cell>
          <table:table-cell/>
          <table:table-cell office:value-type="string" calcext:value-type="string">
            <text:p>MESSIAS</text:p>
          </table:table-cell>
          <table:table-cell office:value-type="string" calcext:value-type="string">
            <text:p>MACEIO</text:p>
          </table:table-cell>
          <table:table-cell office:value-type="float" office:value="0.628078393325791" calcext:value-type="float">
            <text:p>0,628078</text:p>
          </table:table-cell>
        </table:table-row>
        <table:table-row table:style-name="ro1">
          <table:table-cell office:value-type="string" calcext:value-type="string">
            <text:p>MIGUEL REALE</text:p>
          </table:table-cell>
          <table:table-cell office:value-type="string" calcext:value-type="string">
            <text:p>S.CAETANO SUL</text:p>
          </table:table-cell>
          <table:table-cell office:value-type="float" office:value="0.459960928069891" calcext:value-type="float">
            <text:p>0,459961</text:p>
          </table:table-cell>
          <table:table-cell/>
          <table:table-cell office:value-type="string" calcext:value-type="string">
            <text:p>MESSIAS</text:p>
          </table:table-cell>
          <table:table-cell office:value-type="string" calcext:value-type="string">
            <text:p>MACEIO II</text:p>
          </table:table-cell>
          <table:table-cell office:value-type="float" office:value="0.788333217633494" calcext:value-type="float">
            <text:p>0,788333</text:p>
          </table:table-cell>
        </table:table-row>
        <table:table-row table:style-name="ro1">
          <table:table-cell office:value-type="string" calcext:value-type="string">
            <text:p>MILAGRES</text:p>
          </table:table-cell>
          <table:table-cell office:value-type="string" calcext:value-type="string">
            <text:p>COREMAS</text:p>
          </table:table-cell>
          <table:table-cell office:value-type="float" office:value="0.4070586318178" calcext:value-type="float">
            <text:p>0,407059</text:p>
          </table:table-cell>
          <table:table-cell/>
          <table:table-cell office:value-type="string" calcext:value-type="string">
            <text:p>MESSIAS</text:p>
          </table:table-cell>
          <table:table-cell office:value-type="string" calcext:value-type="string">
            <text:p>RIO LARGO II</text:p>
          </table:table-cell>
          <table:table-cell office:value-type="float" office:value="0.757658957292212" calcext:value-type="float">
            <text:p>0,757659</text:p>
          </table:table-cell>
        </table:table-row>
        <table:table-row table:style-name="ro1">
          <table:table-cell office:value-type="string" calcext:value-type="string">
            <text:p>MILAGRES</text:p>
          </table:table-cell>
          <table:table-cell office:value-type="string" calcext:value-type="string">
            <text:p>US. L.GONZAGA</text:p>
          </table:table-cell>
          <table:table-cell office:value-type="float" office:value="1.30606309619539" calcext:value-type="float">
            <text:p>1,306063</text:p>
          </table:table-cell>
          <table:table-cell/>
          <table:table-cell office:value-type="string" calcext:value-type="string">
            <text:p>MESSIAS</text:p>
          </table:table-cell>
          <table:table-cell office:value-type="string" calcext:value-type="string">
            <text:p>SUAPE II</text:p>
          </table:table-cell>
          <table:table-cell office:value-type="float" office:value="1.51063291286466" calcext:value-type="float">
            <text:p>1,510633</text:p>
          </table:table-cell>
        </table:table-row>
        <table:table-row table:style-name="ro1">
          <table:table-cell office:value-type="string" calcext:value-type="string">
            <text:p>MILAGRES II</text:p>
          </table:table-cell>
          <table:table-cell office:value-type="string" calcext:value-type="string">
            <text:p>QUEIMADA NOVA 2</text:p>
          </table:table-cell>
          <table:table-cell office:value-type="float" office:value="1.496676179433" calcext:value-type="float">
            <text:p>1,496676</text:p>
          </table:table-cell>
          <table:table-cell/>
          <table:table-cell office:value-type="string" calcext:value-type="string">
            <text:p>MIGUEL REALE</text:p>
          </table:table-cell>
          <table:table-cell office:value-type="string" calcext:value-type="string">
            <text:p>S.CAETANO SUL</text:p>
          </table:table-cell>
          <table:table-cell office:value-type="float" office:value="0.745610979240582" calcext:value-type="float">
            <text:p>0,745611</text:p>
          </table:table-cell>
        </table:table-row>
        <table:table-row table:style-name="ro1">
          <table:table-cell office:value-type="string" calcext:value-type="string">
            <text:p>MILAGRES II</text:p>
          </table:table-cell>
          <table:table-cell office:value-type="string" calcext:value-type="string">
            <text:p>SANTA LUZIA II</text:p>
          </table:table-cell>
          <table:table-cell office:value-type="float" office:value="1.49644612046225" calcext:value-type="float">
            <text:p>1,496446</text:p>
          </table:table-cell>
          <table:table-cell/>
          <table:table-cell office:value-type="string" calcext:value-type="string">
            <text:p>MILAGRES</text:p>
          </table:table-cell>
          <table:table-cell office:value-type="string" calcext:value-type="string">
            <text:p>COREMAS</text:p>
          </table:table-cell>
          <table:table-cell office:value-type="float" office:value="0.597648858123532" calcext:value-type="float">
            <text:p>0,597649</text:p>
          </table:table-cell>
        </table:table-row>
        <table:table-row table:style-name="ro1">
          <table:table-cell office:value-type="string" calcext:value-type="string">
            <text:p>MIRAMAR</text:p>
          </table:table-cell>
          <table:table-cell office:value-type="string" calcext:value-type="string">
            <text:p>UTINGA</text:p>
          </table:table-cell>
          <table:table-cell office:value-type="float" office:value="0.446787495201372" calcext:value-type="float">
            <text:p>0,446787</text:p>
          </table:table-cell>
          <table:table-cell/>
          <table:table-cell office:value-type="string" calcext:value-type="string">
            <text:p>MILAGRES</text:p>
          </table:table-cell>
          <table:table-cell office:value-type="string" calcext:value-type="string">
            <text:p>US. L.GONZAGA</text:p>
          </table:table-cell>
          <table:table-cell office:value-type="float" office:value="1.63255162929257" calcext:value-type="float">
            <text:p>1,632552</text:p>
          </table:table-cell>
        </table:table-row>
        <table:table-row table:style-name="ro1">
          <table:table-cell office:value-type="string" calcext:value-type="string">
            <text:p>MIRANDA II</text:p>
          </table:table-cell>
          <table:table-cell office:value-type="string" calcext:value-type="string">
            <text:p>SAO LUIS II</text:p>
          </table:table-cell>
          <table:table-cell office:value-type="float" office:value="1.45930965608792" calcext:value-type="float">
            <text:p>1,459310</text:p>
          </table:table-cell>
          <table:table-cell/>
          <table:table-cell office:value-type="string" calcext:value-type="string">
            <text:p>MILAGRES II</text:p>
          </table:table-cell>
          <table:table-cell office:value-type="string" calcext:value-type="string">
            <text:p>QUEIMADA NOVA 2</text:p>
          </table:table-cell>
          <table:table-cell office:value-type="float" office:value="1.84490388862629" calcext:value-type="float">
            <text:p>1,844904</text:p>
          </table:table-cell>
        </table:table-row>
        <table:table-row table:style-name="ro1">
          <table:table-cell office:value-type="string" calcext:value-type="string">
            <text:p>MIRANDA II</text:p>
          </table:table-cell>
          <table:table-cell office:value-type="string" calcext:value-type="string">
            <text:p>STA LUZIA III</text:p>
          </table:table-cell>
          <table:table-cell office:value-type="float" office:value="1.93396721372565" calcext:value-type="float">
            <text:p>1,933967</text:p>
          </table:table-cell>
          <table:table-cell/>
          <table:table-cell office:value-type="string" calcext:value-type="string">
            <text:p>MILAGRES II</text:p>
          </table:table-cell>
          <table:table-cell office:value-type="string" calcext:value-type="string">
            <text:p>SANTA LUZIA II</text:p>
          </table:table-cell>
          <table:table-cell office:value-type="float" office:value="1.85178275987338" calcext:value-type="float">
            <text:p>1,851783</text:p>
          </table:table-cell>
        </table:table-row>
        <table:table-row table:style-name="ro1">
          <table:table-cell office:value-type="string" calcext:value-type="string">
            <text:p>MIRUEIRA II</text:p>
          </table:table-cell>
          <table:table-cell office:value-type="string" calcext:value-type="string">
            <text:p>PAU FERRO</text:p>
          </table:table-cell>
          <table:table-cell office:value-type="float" office:value="0.497259268644952" calcext:value-type="float">
            <text:p>0,497259</text:p>
          </table:table-cell>
          <table:table-cell/>
          <table:table-cell office:value-type="string" calcext:value-type="string">
            <text:p>MIRAMAR</text:p>
          </table:table-cell>
          <table:table-cell office:value-type="string" calcext:value-type="string">
            <text:p>UTINGA</text:p>
          </table:table-cell>
          <table:table-cell office:value-type="float" office:value="0.75913926605831" calcext:value-type="float">
            <text:p>0,759139</text:p>
          </table:table-cell>
        </table:table-row>
        <table:table-row table:style-name="ro1">
          <table:table-cell office:value-type="string" calcext:value-type="string">
            <text:p>MISSOES</text:p>
          </table:table-cell>
          <table:table-cell office:value-type="string" calcext:value-type="string">
            <text:p>SANTO ANGELO</text:p>
          </table:table-cell>
          <table:table-cell office:value-type="float" office:value="0.420389589420788" calcext:value-type="float">
            <text:p>0,420390</text:p>
          </table:table-cell>
          <table:table-cell/>
          <table:table-cell office:value-type="string" calcext:value-type="string">
            <text:p>MIRANDA II</text:p>
          </table:table-cell>
          <table:table-cell office:value-type="string" calcext:value-type="string">
            <text:p>SAO LUIS II</text:p>
          </table:table-cell>
          <table:table-cell office:value-type="float" office:value="1.73745941797188" calcext:value-type="float">
            <text:p>1,737459</text:p>
          </table:table-cell>
        </table:table-row>
        <table:table-row table:style-name="ro1">
          <table:table-cell office:value-type="string" calcext:value-type="string">
            <text:p>MISSOES</text:p>
          </table:table-cell>
          <table:table-cell office:value-type="string" calcext:value-type="string">
            <text:p>SAO BORJA2</text:p>
          </table:table-cell>
          <table:table-cell office:value-type="float" office:value="0.36766472080612" calcext:value-type="float">
            <text:p>0,367665</text:p>
          </table:table-cell>
          <table:table-cell/>
          <table:table-cell office:value-type="string" calcext:value-type="string">
            <text:p>MIRANDA II</text:p>
          </table:table-cell>
          <table:table-cell office:value-type="string" calcext:value-type="string">
            <text:p>STA LUZIA III</text:p>
          </table:table-cell>
          <table:table-cell office:value-type="float" office:value="2.3025884434592" calcext:value-type="float">
            <text:p>2,302588</text:p>
          </table:table-cell>
        </table:table-row>
        <table:table-row table:style-name="ro1">
          <table:table-cell office:value-type="string" calcext:value-type="string">
            <text:p>MOGI</text:p>
          </table:table-cell>
          <table:table-cell office:value-type="string" calcext:value-type="string">
            <text:p>MOGI CRUZES</text:p>
          </table:table-cell>
          <table:table-cell office:value-type="float" office:value="0.482310239011346" calcext:value-type="float">
            <text:p>0,482310</text:p>
          </table:table-cell>
          <table:table-cell/>
          <table:table-cell office:value-type="string" calcext:value-type="string">
            <text:p>MIRUEIRA II</text:p>
          </table:table-cell>
          <table:table-cell office:value-type="string" calcext:value-type="string">
            <text:p>PAU FERRO</text:p>
          </table:table-cell>
          <table:table-cell office:value-type="float" office:value="0.732258825354369" calcext:value-type="float">
            <text:p>0,732259</text:p>
          </table:table-cell>
        </table:table-row>
        <table:table-row table:style-name="ro1">
          <table:table-cell office:value-type="string" calcext:value-type="string">
            <text:p>MONTE ALEGRE2</text:p>
          </table:table-cell>
          <table:table-cell office:value-type="string" calcext:value-type="string">
            <text:p>P. COLOMBIA</text:p>
          </table:table-cell>
          <table:table-cell office:value-type="float" office:value="0.651942838728788" calcext:value-type="float">
            <text:p>0,651943</text:p>
          </table:table-cell>
          <table:table-cell/>
          <table:table-cell office:value-type="string" calcext:value-type="string">
            <text:p>MISSOES</text:p>
          </table:table-cell>
          <table:table-cell office:value-type="string" calcext:value-type="string">
            <text:p>SANTO ANGELO</text:p>
          </table:table-cell>
          <table:table-cell office:value-type="float" office:value="0.649939067547472" calcext:value-type="float">
            <text:p>0,649939</text:p>
          </table:table-cell>
        </table:table-row>
        <table:table-row table:style-name="ro1">
          <table:table-cell office:value-type="string" calcext:value-type="string">
            <text:p>MONTESCLAROS2</text:p>
          </table:table-cell>
          <table:table-cell office:value-type="string" calcext:value-type="string">
            <text:p>PIRAPORA 2</text:p>
          </table:table-cell>
          <table:table-cell office:value-type="float" office:value="0.855529508750124" calcext:value-type="float">
            <text:p>0,855530</text:p>
          </table:table-cell>
          <table:table-cell/>
          <table:table-cell office:value-type="string" calcext:value-type="string">
            <text:p>MISSOES</text:p>
          </table:table-cell>
          <table:table-cell office:value-type="string" calcext:value-type="string">
            <text:p>SAO BORJA2</text:p>
          </table:table-cell>
          <table:table-cell office:value-type="float" office:value="0.674448766225591" calcext:value-type="float">
            <text:p>0,674449</text:p>
          </table:table-cell>
        </table:table-row>
        <table:table-row table:style-name="ro1">
          <table:table-cell office:value-type="string" calcext:value-type="string">
            <text:p>MORRO CHAPEU II</text:p>
          </table:table-cell>
          <table:table-cell office:value-type="string" calcext:value-type="string">
            <text:p>POCOES III</text:p>
          </table:table-cell>
          <table:table-cell office:value-type="float" office:value="1.70151595163274" calcext:value-type="float">
            <text:p>1,701516</text:p>
          </table:table-cell>
          <table:table-cell/>
          <table:table-cell office:value-type="string" calcext:value-type="string">
            <text:p>MOGI</text:p>
          </table:table-cell>
          <table:table-cell office:value-type="string" calcext:value-type="string">
            <text:p>MOGI CRUZES</text:p>
          </table:table-cell>
          <table:table-cell office:value-type="float" office:value="0.845053270975928" calcext:value-type="float">
            <text:p>0,845053</text:p>
          </table:table-cell>
        </table:table-row>
        <table:table-row table:style-name="ro1">
          <table:table-cell office:value-type="string" calcext:value-type="string">
            <text:p>MUTUM</text:p>
          </table:table-cell>
          <table:table-cell office:value-type="string" calcext:value-type="string">
            <text:p>CAMPOS 2</text:p>
          </table:table-cell>
          <table:table-cell office:value-type="float" office:value="1.53434040729281" calcext:value-type="float">
            <text:p>1,534340</text:p>
          </table:table-cell>
          <table:table-cell/>
          <table:table-cell office:value-type="string" calcext:value-type="string">
            <text:p>MONTE ALEGRE2</text:p>
          </table:table-cell>
          <table:table-cell office:value-type="string" calcext:value-type="string">
            <text:p>P. COLOMBIA</text:p>
          </table:table-cell>
          <table:table-cell office:value-type="float" office:value="1.02655040436729" calcext:value-type="float">
            <text:p>1,026550</text:p>
          </table:table-cell>
        </table:table-row>
        <table:table-row table:style-name="ro1">
          <table:table-cell office:value-type="string" calcext:value-type="string">
            <text:p>N.P.PRIMAVERA</text:p>
          </table:table-cell>
          <table:table-cell office:value-type="string" calcext:value-type="string">
            <text:p>P. PRIMAVERA</text:p>
          </table:table-cell>
          <table:table-cell office:value-type="float" office:value="1.05249284077452" calcext:value-type="float">
            <text:p>1,052493</text:p>
          </table:table-cell>
          <table:table-cell/>
          <table:table-cell office:value-type="string" calcext:value-type="string">
            <text:p>MONTESCLAROS2</text:p>
          </table:table-cell>
          <table:table-cell office:value-type="string" calcext:value-type="string">
            <text:p>PIRAPORA 2</text:p>
          </table:table-cell>
          <table:table-cell office:value-type="float" office:value="1.22713049431957" calcext:value-type="float">
            <text:p>1,227130</text:p>
          </table:table-cell>
        </table:table-row>
        <table:table-row table:style-name="ro1">
          <table:table-cell office:value-type="string" calcext:value-type="string">
            <text:p>N.P.PRIMAVERA</text:p>
          </table:table-cell>
          <table:table-cell office:value-type="string" calcext:value-type="string">
            <text:p>RIO BRILHANTE</text:p>
          </table:table-cell>
          <table:table-cell office:value-type="float" office:value="0.638434809665894" calcext:value-type="float">
            <text:p>0,638435</text:p>
          </table:table-cell>
          <table:table-cell/>
          <table:table-cell office:value-type="string" calcext:value-type="string">
            <text:p>MORRO CHAPEU II</text:p>
          </table:table-cell>
          <table:table-cell office:value-type="string" calcext:value-type="string">
            <text:p>POCOES III</text:p>
          </table:table-cell>
          <table:table-cell office:value-type="float" office:value="2.0557069312787" calcext:value-type="float">
            <text:p>2,055707</text:p>
          </table:table-cell>
        </table:table-row>
        <table:table-row table:style-name="ro1">
          <table:table-cell office:value-type="string" calcext:value-type="string">
            <text:p>N.P.PRIMAVERA</text:p>
          </table:table-cell>
          <table:table-cell office:value-type="string" calcext:value-type="string">
            <text:p>ROSANA</text:p>
          </table:table-cell>
          <table:table-cell office:value-type="float" office:value="0.476211068563919" calcext:value-type="float">
            <text:p>0,476211</text:p>
          </table:table-cell>
          <table:table-cell/>
          <table:table-cell office:value-type="string" calcext:value-type="string">
            <text:p>MUTUM</text:p>
          </table:table-cell>
          <table:table-cell office:value-type="string" calcext:value-type="string">
            <text:p>CAMPOS 2</text:p>
          </table:table-cell>
          <table:table-cell office:value-type="float" office:value="1.99371226828324" calcext:value-type="float">
            <text:p>1,993712</text:p>
          </table:table-cell>
        </table:table-row>
        <table:table-row table:style-name="ro1">
          <table:table-cell office:value-type="string" calcext:value-type="string">
            <text:p>N.PETROPOLIS2</text:p>
          </table:table-cell>
          <table:table-cell office:value-type="string" calcext:value-type="string">
            <text:p>TAQUARA</text:p>
          </table:table-cell>
          <table:table-cell office:value-type="float" office:value="0.340025766763273" calcext:value-type="float">
            <text:p>0,340026</text:p>
          </table:table-cell>
          <table:table-cell/>
          <table:table-cell office:value-type="string" calcext:value-type="string">
            <text:p>N.P.PRIMAVERA</text:p>
          </table:table-cell>
          <table:table-cell office:value-type="string" calcext:value-type="string">
            <text:p>P. PRIMAVERA</text:p>
          </table:table-cell>
          <table:table-cell office:value-type="float" office:value="1.51747557836089" calcext:value-type="float">
            <text:p>1,517476</text:p>
          </table:table-cell>
        </table:table-row>
        <table:table-row table:style-name="ro1">
          <table:table-cell office:value-type="string" calcext:value-type="string">
            <text:p>NATAL III</text:p>
          </table:table-cell>
          <table:table-cell office:value-type="string" calcext:value-type="string">
            <text:p>NATAL II</text:p>
          </table:table-cell>
          <table:table-cell office:value-type="float" office:value="0.402856413048683" calcext:value-type="float">
            <text:p>0,402856</text:p>
          </table:table-cell>
          <table:table-cell/>
          <table:table-cell office:value-type="string" calcext:value-type="string">
            <text:p>N.P.PRIMAVERA</text:p>
          </table:table-cell>
          <table:table-cell office:value-type="string" calcext:value-type="string">
            <text:p>RIO BRILHANTE</text:p>
          </table:table-cell>
          <table:table-cell office:value-type="float" office:value="1.02438803369603" calcext:value-type="float">
            <text:p>1,024388</text:p>
          </table:table-cell>
        </table:table-row>
        <table:table-row table:style-name="ro1">
          <table:table-cell office:value-type="string" calcext:value-type="string">
            <text:p>NEVES 1</text:p>
          </table:table-cell>
          <table:table-cell office:value-type="string" calcext:value-type="string">
            <text:p>B.DESPACHO 3</text:p>
          </table:table-cell>
          <table:table-cell office:value-type="float" office:value="1.33197599530857" calcext:value-type="float">
            <text:p>1,331976</text:p>
          </table:table-cell>
          <table:table-cell/>
          <table:table-cell office:value-type="string" calcext:value-type="string">
            <text:p>N.P.PRIMAVERA</text:p>
          </table:table-cell>
          <table:table-cell office:value-type="string" calcext:value-type="string">
            <text:p>ROSANA</text:p>
          </table:table-cell>
          <table:table-cell office:value-type="float" office:value="0.786887587113052" calcext:value-type="float">
            <text:p>0,786888</text:p>
          </table:table-cell>
        </table:table-row>
        <table:table-row table:style-name="ro1">
          <table:table-cell office:value-type="string" calcext:value-type="string">
            <text:p>NILO PECANHA</text:p>
          </table:table-cell>
          <table:table-cell office:value-type="string" calcext:value-type="string">
            <text:p>SANTA CABECA</text:p>
          </table:table-cell>
          <table:table-cell office:value-type="float" office:value="0.340738045031679" calcext:value-type="float">
            <text:p>0,340738</text:p>
          </table:table-cell>
          <table:table-cell/>
          <table:table-cell office:value-type="string" calcext:value-type="string">
            <text:p>N.PETROPOLIS2</text:p>
          </table:table-cell>
          <table:table-cell office:value-type="string" calcext:value-type="string">
            <text:p>TAQUARA</text:p>
          </table:table-cell>
          <table:table-cell office:value-type="float" office:value="0.623747522948584" calcext:value-type="float">
            <text:p>0,623748</text:p>
          </table:table-cell>
        </table:table-row>
        <table:table-row table:style-name="ro1">
          <table:table-cell office:value-type="string" calcext:value-type="string">
            <text:p>NOBRES</text:p>
          </table:table-cell>
          <table:table-cell office:value-type="string" calcext:value-type="string">
            <text:p>SE CUIABA</text:p>
          </table:table-cell>
          <table:table-cell office:value-type="float" office:value="0.581255658054967" calcext:value-type="float">
            <text:p>0,581256</text:p>
          </table:table-cell>
          <table:table-cell/>
          <table:table-cell office:value-type="string" calcext:value-type="string">
            <text:p>NATAL III</text:p>
          </table:table-cell>
          <table:table-cell office:value-type="string" calcext:value-type="string">
            <text:p>NATAL II</text:p>
          </table:table-cell>
          <table:table-cell office:value-type="float" office:value="0.709922456055152" calcext:value-type="float">
            <text:p>0,709922</text:p>
          </table:table-cell>
        </table:table-row>
        <table:table-row table:style-name="ro1">
          <table:table-cell office:value-type="string" calcext:value-type="string">
            <text:p>NOVA IGUACU</text:p>
          </table:table-cell>
          <table:table-cell office:value-type="string" calcext:value-type="string">
            <text:p>TERMINAL RIO</text:p>
          </table:table-cell>
          <table:table-cell office:value-type="float" office:value="2.03585952672134" calcext:value-type="float">
            <text:p>2,035860</text:p>
          </table:table-cell>
          <table:table-cell/>
          <table:table-cell office:value-type="string" calcext:value-type="string">
            <text:p>NEVES 1</text:p>
          </table:table-cell>
          <table:table-cell office:value-type="string" calcext:value-type="string">
            <text:p>B.DESPACHO 3</text:p>
          </table:table-cell>
          <table:table-cell office:value-type="float" office:value="1.74035220740411" calcext:value-type="float">
            <text:p>1,740352</text:p>
          </table:table-cell>
        </table:table-row>
        <table:table-row table:style-name="ro1">
          <table:table-cell office:value-type="string" calcext:value-type="string">
            <text:p>NOVA PONTE</text:p>
          </table:table-cell>
          <table:table-cell office:value-type="string" calcext:value-type="string">
            <text:p>ARAXA 3</text:p>
          </table:table-cell>
          <table:table-cell office:value-type="float" office:value="0.763513854188706" calcext:value-type="float">
            <text:p>0,763514</text:p>
          </table:table-cell>
          <table:table-cell/>
          <table:table-cell office:value-type="string" calcext:value-type="string">
            <text:p>NILO PECANHA</text:p>
          </table:table-cell>
          <table:table-cell office:value-type="string" calcext:value-type="string">
            <text:p>SANTA CABECA</text:p>
          </table:table-cell>
          <table:table-cell office:value-type="float" office:value="0.632451400898824" calcext:value-type="float">
            <text:p>0,632451</text:p>
          </table:table-cell>
        </table:table-row>
        <table:table-row table:style-name="ro1">
          <table:table-cell office:value-type="string" calcext:value-type="string">
            <text:p>NOVA PONTE</text:p>
          </table:table-cell>
          <table:table-cell office:value-type="string" calcext:value-type="string">
            <text:p>UBERLANDIA 10</text:p>
          </table:table-cell>
          <table:table-cell office:value-type="float" office:value="0.743627161352508" calcext:value-type="float">
            <text:p>0,743627</text:p>
          </table:table-cell>
          <table:table-cell/>
          <table:table-cell office:value-type="string" calcext:value-type="string">
            <text:p>NOBRES</text:p>
          </table:table-cell>
          <table:table-cell office:value-type="string" calcext:value-type="string">
            <text:p>SE CUIABA</text:p>
          </table:table-cell>
          <table:table-cell office:value-type="float" office:value="0.869845253718349" calcext:value-type="float">
            <text:p>0,869845</text:p>
          </table:table-cell>
        </table:table-row>
        <table:table-row table:style-name="ro1">
          <table:table-cell office:value-type="string" calcext:value-type="string">
            <text:p>NOVA PONTE 3</text:p>
          </table:table-cell>
          <table:table-cell office:value-type="string" calcext:value-type="string">
            <text:p>PARACATU 4</text:p>
          </table:table-cell>
          <table:table-cell office:value-type="float" office:value="1.51873106540138" calcext:value-type="float">
            <text:p>1,518731</text:p>
          </table:table-cell>
          <table:table-cell/>
          <table:table-cell office:value-type="string" calcext:value-type="string">
            <text:p>NOVA IGUACU</text:p>
          </table:table-cell>
          <table:table-cell office:value-type="string" calcext:value-type="string">
            <text:p>TERMINAL RIO</text:p>
          </table:table-cell>
          <table:table-cell office:value-type="float" office:value="2.26026075501643" calcext:value-type="float">
            <text:p>2,260261</text:p>
          </table:table-cell>
        </table:table-row>
        <table:table-row table:style-name="ro1">
          <table:table-cell office:value-type="string" calcext:value-type="string">
            <text:p>NOVA PRATA 2</text:p>
          </table:table-cell>
          <table:table-cell office:value-type="string" calcext:value-type="string">
            <text:p>VILA MARIA</text:p>
          </table:table-cell>
          <table:table-cell office:value-type="float" office:value="0.288817040104922" calcext:value-type="float">
            <text:p>0,288817</text:p>
          </table:table-cell>
          <table:table-cell/>
          <table:table-cell office:value-type="string" calcext:value-type="string">
            <text:p>NOVA MUTUM</text:p>
          </table:table-cell>
          <table:table-cell office:value-type="string" calcext:value-type="string">
            <text:p>SORRISO</text:p>
          </table:table-cell>
          <table:table-cell office:value-type="float" office:value="0.625139822656352" calcext:value-type="float">
            <text:p>0,625140</text:p>
          </table:table-cell>
        </table:table-row>
        <table:table-row table:style-name="ro1">
          <table:table-cell office:value-type="string" calcext:value-type="string">
            <text:p>NOVA STA RITA</text:p>
          </table:table-cell>
          <table:table-cell office:value-type="string" calcext:value-type="string">
            <text:p>C.NOVOS</text:p>
          </table:table-cell>
          <table:table-cell office:value-type="float" office:value="1.39692299473334" calcext:value-type="float">
            <text:p>1,396923</text:p>
          </table:table-cell>
          <table:table-cell/>
          <table:table-cell office:value-type="string" calcext:value-type="string">
            <text:p>NOVA PONTE</text:p>
          </table:table-cell>
          <table:table-cell office:value-type="string" calcext:value-type="string">
            <text:p>ARAXA 3</text:p>
          </table:table-cell>
          <table:table-cell office:value-type="float" office:value="1.09514765268498" calcext:value-type="float">
            <text:p>1,095148</text:p>
          </table:table-cell>
        </table:table-row>
        <table:table-row table:style-name="ro1">
          <table:table-cell office:value-type="string" calcext:value-type="string">
            <text:p>NOVA STA RITA</text:p>
          </table:table-cell>
          <table:table-cell office:value-type="string" calcext:value-type="string">
            <text:p>GUAIBA 3</text:p>
          </table:table-cell>
          <table:table-cell office:value-type="float" office:value="1.6308657929903" calcext:value-type="float">
            <text:p>1,630866</text:p>
          </table:table-cell>
          <table:table-cell/>
          <table:table-cell office:value-type="string" calcext:value-type="string">
            <text:p>NOVA PONTE</text:p>
          </table:table-cell>
          <table:table-cell office:value-type="string" calcext:value-type="string">
            <text:p>UBERLANDIA 10</text:p>
          </table:table-cell>
          <table:table-cell office:value-type="float" office:value="1.06662313428921" calcext:value-type="float">
            <text:p>1,066623</text:p>
          </table:table-cell>
        </table:table-row>
        <table:table-row table:style-name="ro1">
          <table:table-cell office:value-type="string" calcext:value-type="string">
            <text:p>NOVA STA RITA</text:p>
          </table:table-cell>
          <table:table-cell office:value-type="string" calcext:value-type="string">
            <text:p>ITA</text:p>
          </table:table-cell>
          <table:table-cell office:value-type="float" office:value="1.3594699345787" calcext:value-type="float">
            <text:p>1,359470</text:p>
          </table:table-cell>
          <table:table-cell/>
          <table:table-cell office:value-type="string" calcext:value-type="string">
            <text:p>NOVA PONTE 3</text:p>
          </table:table-cell>
          <table:table-cell office:value-type="string" calcext:value-type="string">
            <text:p>PARACATU 4</text:p>
          </table:table-cell>
          <table:table-cell office:value-type="float" office:value="1.98436531246358" calcext:value-type="float">
            <text:p>1,984365</text:p>
          </table:table-cell>
        </table:table-row>
        <table:table-row table:style-name="ro1">
          <table:table-cell office:value-type="string" calcext:value-type="string">
            <text:p>NOVA STA RITA</text:p>
          </table:table-cell>
          <table:table-cell office:value-type="string" calcext:value-type="string">
            <text:p>P.PETROQUIMIC</text:p>
          </table:table-cell>
          <table:table-cell office:value-type="float" office:value="0.509918962399551" calcext:value-type="float">
            <text:p>0,509919</text:p>
          </table:table-cell>
          <table:table-cell/>
          <table:table-cell office:value-type="string" calcext:value-type="string">
            <text:p>NOVA PRATA 2</text:p>
          </table:table-cell>
          <table:table-cell office:value-type="string" calcext:value-type="string">
            <text:p>VILA MARIA</text:p>
          </table:table-cell>
          <table:table-cell office:value-type="float" office:value="0.529809593742367" calcext:value-type="float">
            <text:p>0,529810</text:p>
          </table:table-cell>
        </table:table-row>
        <table:table-row table:style-name="ro1">
          <table:table-cell office:value-type="string" calcext:value-type="string">
            <text:p>NOVA STA RITA</text:p>
          </table:table-cell>
          <table:table-cell office:value-type="string" calcext:value-type="string">
            <text:p>PORTO ALEGRE9</text:p>
          </table:table-cell>
          <table:table-cell office:value-type="float" office:value="0.510324871917671" calcext:value-type="float">
            <text:p>0,510325</text:p>
          </table:table-cell>
          <table:table-cell/>
          <table:table-cell office:value-type="string" calcext:value-type="string">
            <text:p>NOVA STA RITA</text:p>
          </table:table-cell>
          <table:table-cell office:value-type="string" calcext:value-type="string">
            <text:p>C.NOVOS</text:p>
          </table:table-cell>
          <table:table-cell office:value-type="float" office:value="1.83771897293996" calcext:value-type="float">
            <text:p>1,837719</text:p>
          </table:table-cell>
        </table:table-row>
        <table:table-row table:style-name="ro1">
          <table:table-cell office:value-type="string" calcext:value-type="string">
            <text:p>NOVA STA RITA</text:p>
          </table:table-cell>
          <table:table-cell office:value-type="string" calcext:value-type="string">
            <text:p>SCHARLAU 2</text:p>
          </table:table-cell>
          <table:table-cell office:value-type="float" office:value="0.374060238535872" calcext:value-type="float">
            <text:p>0,374060</text:p>
          </table:table-cell>
          <table:table-cell/>
          <table:table-cell office:value-type="string" calcext:value-type="string">
            <text:p>NOVA STA RITA</text:p>
          </table:table-cell>
          <table:table-cell office:value-type="string" calcext:value-type="string">
            <text:p>GUAIBA 3</text:p>
          </table:table-cell>
          <table:table-cell office:value-type="float" office:value="2.12501793172005" calcext:value-type="float">
            <text:p>2,125018</text:p>
          </table:table-cell>
        </table:table-row>
        <table:table-row table:style-name="ro1">
          <table:table-cell office:value-type="string" calcext:value-type="string">
            <text:p>NSA.SRA.SOCORRO</text:p>
          </table:table-cell>
          <table:table-cell office:value-type="string" calcext:value-type="string">
            <text:p>PENEDO</text:p>
          </table:table-cell>
          <table:table-cell office:value-type="float" office:value="0.319261402959297" calcext:value-type="float">
            <text:p>0,319261</text:p>
          </table:table-cell>
          <table:table-cell/>
          <table:table-cell office:value-type="string" calcext:value-type="string">
            <text:p>NOVA STA RITA</text:p>
          </table:table-cell>
          <table:table-cell office:value-type="string" calcext:value-type="string">
            <text:p>ITA</text:p>
          </table:table-cell>
          <table:table-cell office:value-type="float" office:value="1.7884476820382" calcext:value-type="float">
            <text:p>1,788448</text:p>
          </table:table-cell>
        </table:table-row>
        <table:table-row table:style-name="ro1">
          <table:table-cell office:value-type="string" calcext:value-type="string">
            <text:p>OLINDINA</text:p>
          </table:table-cell>
          <table:table-cell office:value-type="string" calcext:value-type="string">
            <text:p>PORTO SERGIPE I</text:p>
          </table:table-cell>
          <table:table-cell office:value-type="float" office:value="1.42420916926599" calcext:value-type="float">
            <text:p>1,424209</text:p>
          </table:table-cell>
          <table:table-cell/>
          <table:table-cell office:value-type="string" calcext:value-type="string">
            <text:p>NOVA STA RITA</text:p>
          </table:table-cell>
          <table:table-cell office:value-type="string" calcext:value-type="string">
            <text:p>P.PETROQUIMIC</text:p>
          </table:table-cell>
          <table:table-cell office:value-type="float" office:value="0.788355048000506" calcext:value-type="float">
            <text:p>0,788355</text:p>
          </table:table-cell>
        </table:table-row>
        <table:table-row table:style-name="ro1">
          <table:table-cell office:value-type="string" calcext:value-type="string">
            <text:p>ORIXIMINA</text:p>
          </table:table-cell>
          <table:table-cell office:value-type="string" calcext:value-type="string">
            <text:p>SILVES</text:p>
          </table:table-cell>
          <table:table-cell office:value-type="float" office:value="1.53012225362072" calcext:value-type="float">
            <text:p>1,530122</text:p>
          </table:table-cell>
          <table:table-cell/>
          <table:table-cell office:value-type="string" calcext:value-type="string">
            <text:p>NOVA STA RITA</text:p>
          </table:table-cell>
          <table:table-cell office:value-type="string" calcext:value-type="string">
            <text:p>PORTO ALEGRE9</text:p>
          </table:table-cell>
          <table:table-cell office:value-type="float" office:value="0.788982600300455" calcext:value-type="float">
            <text:p>0,788983</text:p>
          </table:table-cell>
        </table:table-row>
        <table:table-row table:style-name="ro1">
          <table:table-cell office:value-type="string" calcext:value-type="string">
            <text:p>OSORIO 2</text:p>
          </table:table-cell>
          <table:table-cell office:value-type="string" calcext:value-type="string">
            <text:p>TAQUARA</text:p>
          </table:table-cell>
          <table:table-cell office:value-type="float" office:value="0.351154155562205" calcext:value-type="float">
            <text:p>0,351154</text:p>
          </table:table-cell>
          <table:table-cell/>
          <table:table-cell office:value-type="string" calcext:value-type="string">
            <text:p>NOVA STA RITA</text:p>
          </table:table-cell>
          <table:table-cell office:value-type="string" calcext:value-type="string">
            <text:p>SCHARLAU 2</text:p>
          </table:table-cell>
          <table:table-cell office:value-type="float" office:value="0.57831204377719" calcext:value-type="float">
            <text:p>0,578312</text:p>
          </table:table-cell>
        </table:table-row>
        <table:table-row table:style-name="ro1">
          <table:table-cell office:value-type="string" calcext:value-type="string">
            <text:p>OURO PRETO 2</text:p>
          </table:table-cell>
          <table:table-cell office:value-type="string" calcext:value-type="string">
            <text:p>B.DESPACHO 3</text:p>
          </table:table-cell>
          <table:table-cell office:value-type="float" office:value="1.40041470789639" calcext:value-type="float">
            <text:p>1,400415</text:p>
          </table:table-cell>
          <table:table-cell/>
          <table:table-cell office:value-type="string" calcext:value-type="string">
            <text:p>NSA.SRA.SOCORRO</text:p>
          </table:table-cell>
          <table:table-cell office:value-type="string" calcext:value-type="string">
            <text:p>PENEDO</text:p>
          </table:table-cell>
          <table:table-cell office:value-type="float" office:value="0.544027335877047" calcext:value-type="float">
            <text:p>0,544027</text:p>
          </table:table-cell>
        </table:table-row>
        <table:table-row table:style-name="ro1">
          <table:table-cell office:value-type="string" calcext:value-type="string">
            <text:p>OURO PRETO 2</text:p>
          </table:table-cell>
          <table:table-cell office:value-type="string" calcext:value-type="string">
            <text:p>NOVA LIMA 6</text:p>
          </table:table-cell>
          <table:table-cell office:value-type="float" office:value="0.692574669313365" calcext:value-type="float">
            <text:p>0,692575</text:p>
          </table:table-cell>
          <table:table-cell/>
          <table:table-cell office:value-type="string" calcext:value-type="string">
            <text:p>OLINDINA</text:p>
          </table:table-cell>
          <table:table-cell office:value-type="string" calcext:value-type="string">
            <text:p>PORTO SERGIPE I</text:p>
          </table:table-cell>
          <table:table-cell office:value-type="float" office:value="1.72985271828721" calcext:value-type="float">
            <text:p>1,729853</text:p>
          </table:table-cell>
        </table:table-row>
        <table:table-row table:style-name="ro1">
          <table:table-cell office:value-type="string" calcext:value-type="string">
            <text:p>OUROLANDIA II</text:p>
          </table:table-cell>
          <table:table-cell office:value-type="string" calcext:value-type="string">
            <text:p>GENTIO OURO II</text:p>
          </table:table-cell>
          <table:table-cell office:value-type="float" office:value="1.54574030739844" calcext:value-type="float">
            <text:p>1,545740</text:p>
          </table:table-cell>
          <table:table-cell/>
          <table:table-cell office:value-type="string" calcext:value-type="string">
            <text:p>ORIXIMINA</text:p>
          </table:table-cell>
          <table:table-cell office:value-type="string" calcext:value-type="string">
            <text:p>SILVES</text:p>
          </table:table-cell>
          <table:table-cell office:value-type="float" office:value="1.85580298422968" calcext:value-type="float">
            <text:p>1,855803</text:p>
          </table:table-cell>
        </table:table-row>
        <table:table-row table:style-name="ro1">
          <table:table-cell office:value-type="string" calcext:value-type="string">
            <text:p>OUROLANDIA II</text:p>
          </table:table-cell>
          <table:table-cell office:value-type="string" calcext:value-type="string">
            <text:p>MORRO CHAPEU II</text:p>
          </table:table-cell>
          <table:table-cell office:value-type="float" office:value="1.53069253277341" calcext:value-type="float">
            <text:p>1,530693</text:p>
          </table:table-cell>
          <table:table-cell/>
          <table:table-cell office:value-type="string" calcext:value-type="string">
            <text:p>OSORIO 2</text:p>
          </table:table-cell>
          <table:table-cell office:value-type="string" calcext:value-type="string">
            <text:p>TAQUARA</text:p>
          </table:table-cell>
          <table:table-cell office:value-type="float" office:value="0.644161578665057" calcext:value-type="float">
            <text:p>0,644162</text:p>
          </table:table-cell>
        </table:table-row>
        <table:table-row table:style-name="ro1">
          <table:table-cell office:value-type="string" calcext:value-type="string">
            <text:p>P. AFONSO IV_SE</text:p>
          </table:table-cell>
          <table:table-cell office:value-type="string" calcext:value-type="string">
            <text:p>ANGELIM II</text:p>
          </table:table-cell>
          <table:table-cell office:value-type="float" office:value="1.25455989657881" calcext:value-type="float">
            <text:p>1,254560</text:p>
          </table:table-cell>
          <table:table-cell/>
          <table:table-cell office:value-type="string" calcext:value-type="string">
            <text:p>OURO PRETO 2</text:p>
          </table:table-cell>
          <table:table-cell office:value-type="string" calcext:value-type="string">
            <text:p>B.DESPACHO 3</text:p>
          </table:table-cell>
          <table:table-cell office:value-type="float" office:value="1.82977383733109" calcext:value-type="float">
            <text:p>1,829774</text:p>
          </table:table-cell>
        </table:table-row>
        <table:table-row table:style-name="ro1">
          <table:table-cell office:value-type="string" calcext:value-type="string">
            <text:p>P. AFONSO IV_SE</text:p>
          </table:table-cell>
          <table:table-cell office:value-type="string" calcext:value-type="string">
            <text:p>P.AFONSO III</text:p>
          </table:table-cell>
          <table:table-cell office:value-type="float" office:value="0.619101941726801" calcext:value-type="float">
            <text:p>0,619102</text:p>
          </table:table-cell>
          <table:table-cell/>
          <table:table-cell office:value-type="string" calcext:value-type="string">
            <text:p>OURO PRETO 2</text:p>
          </table:table-cell>
          <table:table-cell office:value-type="string" calcext:value-type="string">
            <text:p>NOVA LIMA 6</text:p>
          </table:table-cell>
          <table:table-cell office:value-type="float" office:value="0.993395888295364" calcext:value-type="float">
            <text:p>0,993396</text:p>
          </table:table-cell>
        </table:table-row>
        <table:table-row table:style-name="ro1">
          <table:table-cell office:value-type="string" calcext:value-type="string">
            <text:p>P. JUSCELINO</text:p>
          </table:table-cell>
          <table:table-cell office:value-type="string" calcext:value-type="string">
            <text:p>PIRAPORA 2</text:p>
          </table:table-cell>
          <table:table-cell office:value-type="float" office:value="1.76689705996521" calcext:value-type="float">
            <text:p>1,766897</text:p>
          </table:table-cell>
          <table:table-cell/>
          <table:table-cell office:value-type="string" calcext:value-type="string">
            <text:p>OUROLANDIA II</text:p>
          </table:table-cell>
          <table:table-cell office:value-type="string" calcext:value-type="string">
            <text:p>GENTIO OURO II</text:p>
          </table:table-cell>
          <table:table-cell office:value-type="float" office:value="1.8675047159133" calcext:value-type="float">
            <text:p>1,867505</text:p>
          </table:table-cell>
        </table:table-row>
        <table:table-row table:style-name="ro1">
          <table:table-cell office:value-type="string" calcext:value-type="string">
            <text:p>P. JUSCELINO</text:p>
          </table:table-cell>
          <table:table-cell office:value-type="string" calcext:value-type="string">
            <text:p>SETE LAGOAS 4</text:p>
          </table:table-cell>
          <table:table-cell office:value-type="float" office:value="0.809077417180763" calcext:value-type="float">
            <text:p>0,809077</text:p>
          </table:table-cell>
          <table:table-cell/>
          <table:table-cell office:value-type="string" calcext:value-type="string">
            <text:p>P. AFONSO IV_SE</text:p>
          </table:table-cell>
          <table:table-cell office:value-type="string" calcext:value-type="string">
            <text:p>ANGELIM II</text:p>
          </table:table-cell>
          <table:table-cell office:value-type="float" office:value="1.53625230474868" calcext:value-type="float">
            <text:p>1,536252</text:p>
          </table:table-cell>
        </table:table-row>
        <table:table-row table:style-name="ro1">
          <table:table-cell office:value-type="string" calcext:value-type="string">
            <text:p>P. PRIMAVERA</text:p>
          </table:table-cell>
          <table:table-cell office:value-type="string" calcext:value-type="string">
            <text:p>TAQUARUCU</text:p>
          </table:table-cell>
          <table:table-cell office:value-type="float" office:value="1.08046206065167" calcext:value-type="float">
            <text:p>1,080462</text:p>
          </table:table-cell>
          <table:table-cell/>
          <table:table-cell office:value-type="string" calcext:value-type="string">
            <text:p>P. AFONSO IV_SE</text:p>
          </table:table-cell>
          <table:table-cell office:value-type="string" calcext:value-type="string">
            <text:p>P.AFONSO III</text:p>
          </table:table-cell>
          <table:table-cell office:value-type="float" office:value="0.887454459429431" calcext:value-type="float">
            <text:p>0,887454</text:p>
          </table:table-cell>
        </table:table-row>
        <table:table-row table:style-name="ro1">
          <table:table-cell office:value-type="string" calcext:value-type="string">
            <text:p>P.AFONSO III</text:p>
          </table:table-cell>
          <table:table-cell office:value-type="string" calcext:value-type="string">
            <text:p>BOM NOME</text:p>
          </table:table-cell>
          <table:table-cell office:value-type="float" office:value="0.390883561775373" calcext:value-type="float">
            <text:p>0,390884</text:p>
          </table:table-cell>
          <table:table-cell/>
          <table:table-cell office:value-type="string" calcext:value-type="string">
            <text:p>P. AFONSO IV_SE</text:p>
          </table:table-cell>
          <table:table-cell office:value-type="string" calcext:value-type="string">
            <text:p>US. L.GONZAGA</text:p>
          </table:table-cell>
          <table:table-cell office:value-type="float" office:value="1.50927051837603" calcext:value-type="float">
            <text:p>1,509271</text:p>
          </table:table-cell>
        </table:table-row>
        <table:table-row table:style-name="ro1">
          <table:table-cell office:value-type="string" calcext:value-type="string">
            <text:p>P.AFONSO III</text:p>
          </table:table-cell>
          <table:table-cell office:value-type="string" calcext:value-type="string">
            <text:p>ITABAIANA</text:p>
          </table:table-cell>
          <table:table-cell office:value-type="float" office:value="0.347583918497736" calcext:value-type="float">
            <text:p>0,347584</text:p>
          </table:table-cell>
          <table:table-cell/>
          <table:table-cell office:value-type="string" calcext:value-type="string">
            <text:p>P. JUSCELINO</text:p>
          </table:table-cell>
          <table:table-cell office:value-type="string" calcext:value-type="string">
            <text:p>PIRAPORA 2</text:p>
          </table:table-cell>
          <table:table-cell office:value-type="float" office:value="2.30861757974393" calcext:value-type="float">
            <text:p>2,308618</text:p>
          </table:table-cell>
        </table:table-row>
        <table:table-row table:style-name="ro1">
          <table:table-cell office:value-type="string" calcext:value-type="string">
            <text:p>P.AFONSO III</text:p>
          </table:table-cell>
          <table:table-cell office:value-type="string" calcext:value-type="string">
            <text:p>ZEBU</text:p>
          </table:table-cell>
          <table:table-cell office:value-type="float" office:value="0.263080655541325" calcext:value-type="float">
            <text:p>0,263081</text:p>
          </table:table-cell>
          <table:table-cell/>
          <table:table-cell office:value-type="string" calcext:value-type="string">
            <text:p>P. JUSCELINO</text:p>
          </table:table-cell>
          <table:table-cell office:value-type="string" calcext:value-type="string">
            <text:p>SETE LAGOAS 4</text:p>
          </table:table-cell>
          <table:table-cell office:value-type="float" office:value="1.1605018421145" calcext:value-type="float">
            <text:p>1,160502</text:p>
          </table:table-cell>
        </table:table-row>
        <table:table-row table:style-name="ro1">
          <table:table-cell office:value-type="string" calcext:value-type="string">
            <text:p>P.DUTRA</text:p>
          </table:table-cell>
          <table:table-cell office:value-type="string" calcext:value-type="string">
            <text:p>B. ESPERANCA</text:p>
          </table:table-cell>
          <table:table-cell office:value-type="float" office:value="1.14033073543636" calcext:value-type="float">
            <text:p>1,140331</text:p>
          </table:table-cell>
          <table:table-cell/>
          <table:table-cell office:value-type="string" calcext:value-type="string">
            <text:p>P. PRIMAVERA</text:p>
          </table:table-cell>
          <table:table-cell office:value-type="string" calcext:value-type="string">
            <text:p>TAQUARUCU</text:p>
          </table:table-cell>
          <table:table-cell office:value-type="float" office:value="1.55780137105525" calcext:value-type="float">
            <text:p>1,557801</text:p>
          </table:table-cell>
        </table:table-row>
        <table:table-row table:style-name="ro1">
          <table:table-cell office:value-type="string" calcext:value-type="string">
            <text:p>P.DUTRA</text:p>
          </table:table-cell>
          <table:table-cell office:value-type="string" calcext:value-type="string">
            <text:p>PERITORO</text:p>
          </table:table-cell>
          <table:table-cell office:value-type="float" office:value="0.395848438484903" calcext:value-type="float">
            <text:p>0,395848</text:p>
          </table:table-cell>
          <table:table-cell/>
          <table:table-cell office:value-type="string" calcext:value-type="string">
            <text:p>P.AFONSO III</text:p>
          </table:table-cell>
          <table:table-cell office:value-type="string" calcext:value-type="string">
            <text:p>BOM NOME</text:p>
          </table:table-cell>
          <table:table-cell office:value-type="float" office:value="0.673816897825116" calcext:value-type="float">
            <text:p>0,673817</text:p>
          </table:table-cell>
        </table:table-row>
        <table:table-row table:style-name="ro1">
          <table:table-cell office:value-type="string" calcext:value-type="string">
            <text:p>P.DUTRA</text:p>
          </table:table-cell>
          <table:table-cell office:value-type="string" calcext:value-type="string">
            <text:p>S.ANTON LOPES</text:p>
          </table:table-cell>
          <table:table-cell office:value-type="float" office:value="1.19065358372598" calcext:value-type="float">
            <text:p>1,190654</text:p>
          </table:table-cell>
          <table:table-cell/>
          <table:table-cell office:value-type="string" calcext:value-type="string">
            <text:p>P.AFONSO III</text:p>
          </table:table-cell>
          <table:table-cell office:value-type="string" calcext:value-type="string">
            <text:p>ITABAIANA</text:p>
          </table:table-cell>
          <table:table-cell office:value-type="float" office:value="0.594312364213331" calcext:value-type="float">
            <text:p>0,594312</text:p>
          </table:table-cell>
        </table:table-row>
        <table:table-row table:style-name="ro1">
          <table:table-cell office:value-type="string" calcext:value-type="string">
            <text:p>PACATUBA</text:p>
          </table:table-cell>
          <table:table-cell office:value-type="string" calcext:value-type="string">
            <text:p>PECEM II</text:p>
          </table:table-cell>
          <table:table-cell office:value-type="float" office:value="1.39070493687818" calcext:value-type="float">
            <text:p>1,390705</text:p>
          </table:table-cell>
          <table:table-cell/>
          <table:table-cell office:value-type="string" calcext:value-type="string">
            <text:p>P.AFONSO III</text:p>
          </table:table-cell>
          <table:table-cell office:value-type="string" calcext:value-type="string">
            <text:p>ZEBU</text:p>
          </table:table-cell>
          <table:table-cell office:value-type="float" office:value="0.445913657302346" calcext:value-type="float">
            <text:p>0,445914</text:p>
          </table:table-cell>
        </table:table-row>
        <table:table-row table:style-name="ro1">
          <table:table-cell office:value-type="string" calcext:value-type="string">
            <text:p>PADRE FIALHO</text:p>
          </table:table-cell>
          <table:table-cell office:value-type="string" calcext:value-type="string">
            <text:p>VITORIA</text:p>
          </table:table-cell>
          <table:table-cell office:value-type="float" office:value="0.673197615145871" calcext:value-type="float">
            <text:p>0,673198</text:p>
          </table:table-cell>
          <table:table-cell/>
          <table:table-cell office:value-type="string" calcext:value-type="string">
            <text:p>P.DUTRA</text:p>
          </table:table-cell>
          <table:table-cell office:value-type="string" calcext:value-type="string">
            <text:p>B. ESPERANCA</text:p>
          </table:table-cell>
          <table:table-cell office:value-type="float" office:value="1.36699249136007" calcext:value-type="float">
            <text:p>1,366992</text:p>
          </table:table-cell>
        </table:table-row>
        <table:table-row table:style-name="ro1">
          <table:table-cell office:value-type="string" calcext:value-type="string">
            <text:p>PARANAIBA</text:p>
          </table:table-cell>
          <table:table-cell office:value-type="string" calcext:value-type="string">
            <text:p>ITUMBIARA</text:p>
          </table:table-cell>
          <table:table-cell office:value-type="float" office:value="0.322451728277515" calcext:value-type="float">
            <text:p>0,322452</text:p>
          </table:table-cell>
          <table:table-cell/>
          <table:table-cell office:value-type="string" calcext:value-type="string">
            <text:p>P.DUTRA</text:p>
          </table:table-cell>
          <table:table-cell office:value-type="string" calcext:value-type="string">
            <text:p>PERITORO</text:p>
          </table:table-cell>
          <table:table-cell office:value-type="float" office:value="0.559180308388424" calcext:value-type="float">
            <text:p>0,559180</text:p>
          </table:table-cell>
        </table:table-row>
        <table:table-row table:style-name="ro1">
          <table:table-cell office:value-type="string" calcext:value-type="string">
            <text:p>PARANAVAI NOR</text:p>
          </table:table-cell>
          <table:table-cell office:value-type="string" calcext:value-type="string">
            <text:p>SARANDI</text:p>
          </table:table-cell>
          <table:table-cell office:value-type="float" office:value="0.416641152476601" calcext:value-type="float">
            <text:p>0,416641</text:p>
          </table:table-cell>
          <table:table-cell/>
          <table:table-cell office:value-type="string" calcext:value-type="string">
            <text:p>P.DUTRA</text:p>
          </table:table-cell>
          <table:table-cell office:value-type="string" calcext:value-type="string">
            <text:p>S.ANTON LOPES</text:p>
          </table:table-cell>
          <table:table-cell office:value-type="float" office:value="1.4175965148702" calcext:value-type="float">
            <text:p>1,417597</text:p>
          </table:table-cell>
        </table:table-row>
        <table:table-row table:style-name="ro1">
          <table:table-cell office:value-type="string" calcext:value-type="string">
            <text:p>PARIGOT SOUZA</text:p>
          </table:table-cell>
          <table:table-cell office:value-type="string" calcext:value-type="string">
            <text:p>SANTA MONICA</text:p>
          </table:table-cell>
          <table:table-cell office:value-type="float" office:value="0.260199849779139" calcext:value-type="float">
            <text:p>0,260200</text:p>
          </table:table-cell>
          <table:table-cell/>
          <table:table-cell office:value-type="string" calcext:value-type="string">
            <text:p>PACATUBA</text:p>
          </table:table-cell>
          <table:table-cell office:value-type="string" calcext:value-type="string">
            <text:p>PECEM II</text:p>
          </table:table-cell>
          <table:table-cell office:value-type="float" office:value="1.75074708098701" calcext:value-type="float">
            <text:p>1,750747</text:p>
          </table:table-cell>
        </table:table-row>
        <table:table-row table:style-name="ro1">
          <table:table-cell office:value-type="string" calcext:value-type="string">
            <text:p>PASSO FUNDO</text:p>
          </table:table-cell>
          <table:table-cell office:value-type="string" calcext:value-type="string">
            <text:p>SANTA MARTA</text:p>
          </table:table-cell>
          <table:table-cell office:value-type="float" office:value="0.301594474293718" calcext:value-type="float">
            <text:p>0,301594</text:p>
          </table:table-cell>
          <table:table-cell/>
          <table:table-cell office:value-type="string" calcext:value-type="string">
            <text:p>PADRE FIALHO</text:p>
          </table:table-cell>
          <table:table-cell office:value-type="string" calcext:value-type="string">
            <text:p>VITORIA</text:p>
          </table:table-cell>
          <table:table-cell office:value-type="float" office:value="1.05855840686865" calcext:value-type="float">
            <text:p>1,058558</text:p>
          </table:table-cell>
        </table:table-row>
        <table:table-row table:style-name="ro1">
          <table:table-cell office:value-type="string" calcext:value-type="string">
            <text:p>PASSO FUNDO</text:p>
          </table:table-cell>
          <table:table-cell office:value-type="string" calcext:value-type="string">
            <text:p>VILA MARIA</text:p>
          </table:table-cell>
          <table:table-cell office:value-type="float" office:value="0.331707455176962" calcext:value-type="float">
            <text:p>0,331707</text:p>
          </table:table-cell>
          <table:table-cell/>
          <table:table-cell office:value-type="string" calcext:value-type="string">
            <text:p>PARANAIBA</text:p>
          </table:table-cell>
          <table:table-cell office:value-type="string" calcext:value-type="string">
            <text:p>ITUMBIARA</text:p>
          </table:table-cell>
          <table:table-cell office:value-type="float" office:value="0.491372874789777" calcext:value-type="float">
            <text:p>0,491373</text:p>
          </table:table-cell>
        </table:table-row>
        <table:table-row table:style-name="ro1">
          <table:table-cell office:value-type="string" calcext:value-type="string">
            <text:p>PASSO FUNDO</text:p>
          </table:table-cell>
          <table:table-cell office:value-type="string" calcext:value-type="string">
            <text:p>XANXERE ESU</text:p>
          </table:table-cell>
          <table:table-cell office:value-type="float" office:value="0.314651242009969" calcext:value-type="float">
            <text:p>0,314651</text:p>
          </table:table-cell>
          <table:table-cell/>
          <table:table-cell office:value-type="string" calcext:value-type="string">
            <text:p>PARANAVAI NOR</text:p>
          </table:table-cell>
          <table:table-cell office:value-type="string" calcext:value-type="string">
            <text:p>SARANDI</text:p>
          </table:table-cell>
          <table:table-cell office:value-type="float" office:value="0.642959274739416" calcext:value-type="float">
            <text:p>0,642959</text:p>
          </table:table-cell>
        </table:table-row>
        <table:table-row table:style-name="ro1">
          <table:table-cell office:value-type="string" calcext:value-type="string">
            <text:p>PASSO REAL</text:p>
          </table:table-cell>
          <table:table-cell office:value-type="string" calcext:value-type="string">
            <text:p>V.AIRES</text:p>
          </table:table-cell>
          <table:table-cell office:value-type="float" office:value="0.314488098298821" calcext:value-type="float">
            <text:p>0,314488</text:p>
          </table:table-cell>
          <table:table-cell/>
          <table:table-cell office:value-type="string" calcext:value-type="string">
            <text:p>PARIGOT SOUZA</text:p>
          </table:table-cell>
          <table:table-cell office:value-type="string" calcext:value-type="string">
            <text:p>SANTA MONICA</text:p>
          </table:table-cell>
          <table:table-cell office:value-type="float" office:value="0.476435583062377" calcext:value-type="float">
            <text:p>0,476436</text:p>
          </table:table-cell>
        </table:table-row>
        <table:table-row table:style-name="ro1">
          <table:table-cell office:value-type="string" calcext:value-type="string">
            <text:p>PATO BRANCO</text:p>
          </table:table-cell>
          <table:table-cell office:value-type="string" calcext:value-type="string">
            <text:p>S. OSORIO</text:p>
          </table:table-cell>
          <table:table-cell office:value-type="float" office:value="0.391102319604569" calcext:value-type="float">
            <text:p>0,391102</text:p>
          </table:table-cell>
          <table:table-cell/>
          <table:table-cell office:value-type="string" calcext:value-type="string">
            <text:p>PASSO FUNDO</text:p>
          </table:table-cell>
          <table:table-cell office:value-type="string" calcext:value-type="string">
            <text:p>SANTA MARTA</text:p>
          </table:table-cell>
          <table:table-cell office:value-type="float" office:value="0.553248678964543" calcext:value-type="float">
            <text:p>0,553249</text:p>
          </table:table-cell>
        </table:table-row>
        <table:table-row table:style-name="ro1">
          <table:table-cell office:value-type="string" calcext:value-type="string">
            <text:p>PAU FERRO</text:p>
          </table:table-cell>
          <table:table-cell office:value-type="string" calcext:value-type="string">
            <text:p>SANTA RITA II</text:p>
          </table:table-cell>
          <table:table-cell office:value-type="float" office:value="0.604693523256773" calcext:value-type="float">
            <text:p>0,604694</text:p>
          </table:table-cell>
          <table:table-cell/>
          <table:table-cell office:value-type="string" calcext:value-type="string">
            <text:p>PASSO FUNDO</text:p>
          </table:table-cell>
          <table:table-cell office:value-type="string" calcext:value-type="string">
            <text:p>VILA MARIA</text:p>
          </table:table-cell>
          <table:table-cell office:value-type="float" office:value="0.608488308047119" calcext:value-type="float">
            <text:p>0,608488</text:p>
          </table:table-cell>
        </table:table-row>
        <table:table-row table:style-name="ro1">
          <table:table-cell office:value-type="string" calcext:value-type="string">
            <text:p>PECEM II</text:p>
          </table:table-cell>
          <table:table-cell office:value-type="string" calcext:value-type="string">
            <text:p>SOBRAL III</text:p>
          </table:table-cell>
          <table:table-cell office:value-type="float" office:value="1.4004970141061" calcext:value-type="float">
            <text:p>1,400497</text:p>
          </table:table-cell>
          <table:table-cell/>
          <table:table-cell office:value-type="string" calcext:value-type="string">
            <text:p>PASSO FUNDO</text:p>
          </table:table-cell>
          <table:table-cell office:value-type="string" calcext:value-type="string">
            <text:p>XANXERE ESU</text:p>
          </table:table-cell>
          <table:table-cell office:value-type="float" office:value="0.582765336491148" calcext:value-type="float">
            <text:p>0,582765</text:p>
          </table:table-cell>
        </table:table-row>
        <table:table-row table:style-name="ro1">
          <table:table-cell office:value-type="string" calcext:value-type="string">
            <text:p>PELOTAS3</text:p>
          </table:table-cell>
          <table:table-cell office:value-type="string" calcext:value-type="string">
            <text:p>PRE.MEDICI</text:p>
          </table:table-cell>
          <table:table-cell office:value-type="float" office:value="0.381168834645119" calcext:value-type="float">
            <text:p>0,381169</text:p>
          </table:table-cell>
          <table:table-cell/>
          <table:table-cell office:value-type="string" calcext:value-type="string">
            <text:p>PASSO REAL</text:p>
          </table:table-cell>
          <table:table-cell office:value-type="string" calcext:value-type="string">
            <text:p>V.AIRES</text:p>
          </table:table-cell>
          <table:table-cell office:value-type="float" office:value="0.576900904240202" calcext:value-type="float">
            <text:p>0,576901</text:p>
          </table:table-cell>
        </table:table-row>
        <table:table-row table:style-name="ro1">
          <table:table-cell office:value-type="string" calcext:value-type="string">
            <text:p>PEROXIDOS</text:p>
          </table:table-cell>
          <table:table-cell office:value-type="string" calcext:value-type="string">
            <text:p>UMBARA</text:p>
          </table:table-cell>
          <table:table-cell office:value-type="float" office:value="0.250728685059496" calcext:value-type="float">
            <text:p>0,250729</text:p>
          </table:table-cell>
          <table:table-cell/>
          <table:table-cell office:value-type="string" calcext:value-type="string">
            <text:p>PATO BRANCO</text:p>
          </table:table-cell>
          <table:table-cell office:value-type="string" calcext:value-type="string">
            <text:p>XANXERE ESU</text:p>
          </table:table-cell>
          <table:table-cell office:value-type="float" office:value="0.716842557978272" calcext:value-type="float">
            <text:p>0,716843</text:p>
          </table:table-cell>
        </table:table-row>
        <table:table-row table:style-name="ro1">
          <table:table-cell office:value-type="string" calcext:value-type="string">
            <text:p>PICOS</text:p>
          </table:table-cell>
          <table:table-cell office:value-type="string" calcext:value-type="string">
            <text:p>S.JOAO PIAUI</text:p>
          </table:table-cell>
          <table:table-cell office:value-type="float" office:value="0.394989112491589" calcext:value-type="float">
            <text:p>0,394989</text:p>
          </table:table-cell>
          <table:table-cell/>
          <table:table-cell office:value-type="string" calcext:value-type="string">
            <text:p>PAU FERRO</text:p>
          </table:table-cell>
          <table:table-cell office:value-type="string" calcext:value-type="string">
            <text:p>SANTA RITA II</text:p>
          </table:table-cell>
          <table:table-cell office:value-type="float" office:value="0.881533445916871" calcext:value-type="float">
            <text:p>0,881533</text:p>
          </table:table-cell>
        </table:table-row>
        <table:table-row table:style-name="ro1">
          <table:table-cell office:value-type="string" calcext:value-type="string">
            <text:p>PIMENTA BUENO</text:p>
          </table:table-cell>
          <table:table-cell office:value-type="string" calcext:value-type="string">
            <text:p>VILHENA</text:p>
          </table:table-cell>
          <table:table-cell office:value-type="float" office:value="0.482403370141224" calcext:value-type="float">
            <text:p>0,482403</text:p>
          </table:table-cell>
          <table:table-cell/>
          <table:table-cell office:value-type="string" calcext:value-type="string">
            <text:p>PECEM II</text:p>
          </table:table-cell>
          <table:table-cell office:value-type="string" calcext:value-type="string">
            <text:p>SOBRAL III</text:p>
          </table:table-cell>
          <table:table-cell office:value-type="float" office:value="1.76307424699395" calcext:value-type="float">
            <text:p>1,763074</text:p>
          </table:table-cell>
        </table:table-row>
        <table:table-row table:style-name="ro1">
          <table:table-cell office:value-type="string" calcext:value-type="string">
            <text:p>PIRAPAMA II</text:p>
          </table:table-cell>
          <table:table-cell office:value-type="string" calcext:value-type="string">
            <text:p>SUAPE II</text:p>
          </table:table-cell>
          <table:table-cell office:value-type="float" office:value="0.512693047620108" calcext:value-type="float">
            <text:p>0,512693</text:p>
          </table:table-cell>
          <table:table-cell/>
          <table:table-cell office:value-type="string" calcext:value-type="string">
            <text:p>PELOTAS3</text:p>
          </table:table-cell>
          <table:table-cell office:value-type="string" calcext:value-type="string">
            <text:p>PRE.MEDICI</text:p>
          </table:table-cell>
          <table:table-cell office:value-type="float" office:value="0.699220881694578" calcext:value-type="float">
            <text:p>0,699221</text:p>
          </table:table-cell>
        </table:table-row>
        <table:table-row table:style-name="ro1">
          <table:table-cell office:value-type="string" calcext:value-type="string">
            <text:p>PIRAPORA 2</text:p>
          </table:table-cell>
          <table:table-cell office:value-type="string" calcext:value-type="string">
            <text:p>ARINOS 2</text:p>
          </table:table-cell>
          <table:table-cell office:value-type="float" office:value="1.48311969280286" calcext:value-type="float">
            <text:p>1,483120</text:p>
          </table:table-cell>
          <table:table-cell/>
          <table:table-cell office:value-type="string" calcext:value-type="string">
            <text:p>PEROXIDOS</text:p>
          </table:table-cell>
          <table:table-cell office:value-type="string" calcext:value-type="string">
            <text:p>UMBARA</text:p>
          </table:table-cell>
          <table:table-cell office:value-type="float" office:value="0.459093528909336" calcext:value-type="float">
            <text:p>0,459094</text:p>
          </table:table-cell>
        </table:table-row>
        <table:table-row table:style-name="ro1">
          <table:table-cell office:value-type="string" calcext:value-type="string">
            <text:p>PIRAPORA 2</text:p>
          </table:table-cell>
          <table:table-cell office:value-type="string" calcext:value-type="string">
            <text:p>LUZIANIA</text:p>
          </table:table-cell>
          <table:table-cell office:value-type="float" office:value="1.76056516434866" calcext:value-type="float">
            <text:p>1,760565</text:p>
          </table:table-cell>
          <table:table-cell/>
          <table:table-cell office:value-type="string" calcext:value-type="string">
            <text:p>PICOS</text:p>
          </table:table-cell>
          <table:table-cell office:value-type="string" calcext:value-type="string">
            <text:p>S.JOAO PIAUI</text:p>
          </table:table-cell>
          <table:table-cell office:value-type="float" office:value="0.565649021633091" calcext:value-type="float">
            <text:p>0,565649</text:p>
          </table:table-cell>
        </table:table-row>
        <table:table-row table:style-name="ro1">
          <table:table-cell office:value-type="string" calcext:value-type="string">
            <text:p>PIRAPORA 2</text:p>
          </table:table-cell>
          <table:table-cell office:value-type="string" calcext:value-type="string">
            <text:p>VARZEA PALMA 4</text:p>
          </table:table-cell>
          <table:table-cell office:value-type="float" office:value="0.76999755469528" calcext:value-type="float">
            <text:p>0,769998</text:p>
          </table:table-cell>
          <table:table-cell/>
          <table:table-cell office:value-type="string" calcext:value-type="string">
            <text:p>PICOS</text:p>
          </table:table-cell>
          <table:table-cell office:value-type="string" calcext:value-type="string">
            <text:p>TAUA II</text:p>
          </table:table-cell>
          <table:table-cell office:value-type="float" office:value="0.616296893094552" calcext:value-type="float">
            <text:p>0,616297</text:p>
          </table:table-cell>
        </table:table-row>
        <table:table-row table:style-name="ro1">
          <table:table-cell office:value-type="string" calcext:value-type="string">
            <text:p>PIRATININGA</text:p>
          </table:table-cell>
          <table:table-cell office:value-type="string" calcext:value-type="string">
            <text:p>INTERLAGOS</text:p>
          </table:table-cell>
          <table:table-cell office:value-type="float" office:value="0.376068943903087" calcext:value-type="float">
            <text:p>0,376069</text:p>
          </table:table-cell>
          <table:table-cell/>
          <table:table-cell office:value-type="string" calcext:value-type="string">
            <text:p>PIMENTA BUENO</text:p>
          </table:table-cell>
          <table:table-cell office:value-type="string" calcext:value-type="string">
            <text:p>VILHENA</text:p>
          </table:table-cell>
          <table:table-cell office:value-type="float" office:value="0.82763643298791" calcext:value-type="float">
            <text:p>0,827636</text:p>
          </table:table-cell>
        </table:table-row>
        <table:table-row table:style-name="ro1">
          <table:table-cell office:value-type="string" calcext:value-type="string">
            <text:p>PIRINEUS</text:p>
          </table:table-cell>
          <table:table-cell office:value-type="string" calcext:value-type="string">
            <text:p>SAMAMBAIA</text:p>
          </table:table-cell>
          <table:table-cell office:value-type="float" office:value="0.700918065698422" calcext:value-type="float">
            <text:p>0,700918</text:p>
          </table:table-cell>
          <table:table-cell/>
          <table:table-cell office:value-type="string" calcext:value-type="string">
            <text:p>PIRAPAMA II</text:p>
          </table:table-cell>
          <table:table-cell office:value-type="string" calcext:value-type="string">
            <text:p>SUAPE II</text:p>
          </table:table-cell>
          <table:table-cell office:value-type="float" office:value="0.754986447694971" calcext:value-type="float">
            <text:p>0,754986</text:p>
          </table:table-cell>
        </table:table-row>
        <table:table-row table:style-name="ro1">
          <table:table-cell office:value-type="string" calcext:value-type="string">
            <text:p>PIRIPIRI</text:p>
          </table:table-cell>
          <table:table-cell office:value-type="string" calcext:value-type="string">
            <text:p>TERESINA III</text:p>
          </table:table-cell>
          <table:table-cell office:value-type="float" office:value="0.512646685300476" calcext:value-type="float">
            <text:p>0,512647</text:p>
          </table:table-cell>
          <table:table-cell/>
          <table:table-cell office:value-type="string" calcext:value-type="string">
            <text:p>PIRAPORA 2</text:p>
          </table:table-cell>
          <table:table-cell office:value-type="string" calcext:value-type="string">
            <text:p>ARINOS 2</text:p>
          </table:table-cell>
          <table:table-cell office:value-type="float" office:value="1.93783569696841" calcext:value-type="float">
            <text:p>1,937836</text:p>
          </table:table-cell>
        </table:table-row>
        <table:table-row table:style-name="ro1">
          <table:table-cell office:value-type="string" calcext:value-type="string">
            <text:p>PITUACU</text:p>
          </table:table-cell>
          <table:table-cell office:value-type="string" calcext:value-type="string">
            <text:p>NARANDIBA</text:p>
          </table:table-cell>
          <table:table-cell office:value-type="float" office:value="0.39690658499163" calcext:value-type="float">
            <text:p>0,396907</text:p>
          </table:table-cell>
          <table:table-cell/>
          <table:table-cell office:value-type="string" calcext:value-type="string">
            <text:p>PIRAPORA 2</text:p>
          </table:table-cell>
          <table:table-cell office:value-type="string" calcext:value-type="string">
            <text:p>LUZIANIA</text:p>
          </table:table-cell>
          <table:table-cell office:value-type="float" office:value="2.26115339413807" calcext:value-type="float">
            <text:p>2,261153</text:p>
          </table:table-cell>
        </table:table-row>
        <table:table-row table:style-name="ro1">
          <table:table-cell office:value-type="string" calcext:value-type="string">
            <text:p>POCOES II</text:p>
          </table:table-cell>
          <table:table-cell office:value-type="string" calcext:value-type="string">
            <text:p>POCOES III</text:p>
          </table:table-cell>
          <table:table-cell office:value-type="float" office:value="0.581399900443678" calcext:value-type="float">
            <text:p>0,581400</text:p>
          </table:table-cell>
          <table:table-cell/>
          <table:table-cell office:value-type="string" calcext:value-type="string">
            <text:p>PIRAPORA 2</text:p>
          </table:table-cell>
          <table:table-cell office:value-type="string" calcext:value-type="string">
            <text:p>VARZEA PALMA 4</text:p>
          </table:table-cell>
          <table:table-cell office:value-type="float" office:value="1.10444756171941" calcext:value-type="float">
            <text:p>1,104448</text:p>
          </table:table-cell>
        </table:table-row>
        <table:table-row table:style-name="ro1">
          <table:table-cell office:value-type="string" calcext:value-type="string">
            <text:p>POCOES III</text:p>
          </table:table-cell>
          <table:table-cell office:value-type="string" calcext:value-type="string">
            <text:p>PE. PARAISO 2</text:p>
          </table:table-cell>
          <table:table-cell office:value-type="float" office:value="1.51507866084724" calcext:value-type="float">
            <text:p>1,515079</text:p>
          </table:table-cell>
          <table:table-cell/>
          <table:table-cell office:value-type="string" calcext:value-type="string">
            <text:p>PIRATININGA</text:p>
          </table:table-cell>
          <table:table-cell office:value-type="string" calcext:value-type="string">
            <text:p>INTERLAGOS</text:p>
          </table:table-cell>
          <table:table-cell office:value-type="float" office:value="0.658908448241113" calcext:value-type="float">
            <text:p>0,658908</text:p>
          </table:table-cell>
        </table:table-row>
        <table:table-row table:style-name="ro1">
          <table:table-cell office:value-type="string" calcext:value-type="string">
            <text:p>POCOS CALDAS</text:p>
          </table:table-cell>
          <table:table-cell office:value-type="string" calcext:value-type="string">
            <text:p>ITAJUBA 3</text:p>
          </table:table-cell>
          <table:table-cell office:value-type="float" office:value="1.16343044471528" calcext:value-type="float">
            <text:p>1,163430</text:p>
          </table:table-cell>
          <table:table-cell/>
          <table:table-cell office:value-type="string" calcext:value-type="string">
            <text:p>PIRINEUS</text:p>
          </table:table-cell>
          <table:table-cell office:value-type="string" calcext:value-type="string">
            <text:p>SAMAMBAIA</text:p>
          </table:table-cell>
          <table:table-cell office:value-type="float" office:value="1.00628084295079" calcext:value-type="float">
            <text:p>1,006281</text:p>
          </table:table-cell>
        </table:table-row>
        <table:table-row table:style-name="ro1">
          <table:table-cell office:value-type="string" calcext:value-type="string">
            <text:p>PONTA G NORTE</text:p>
          </table:table-cell>
          <table:table-cell office:value-type="string" calcext:value-type="string">
            <text:p>PONTA GROSSA</text:p>
          </table:table-cell>
          <table:table-cell office:value-type="float" office:value="0.384766013507649" calcext:value-type="float">
            <text:p>0,384766</text:p>
          </table:table-cell>
          <table:table-cell/>
          <table:table-cell office:value-type="string" calcext:value-type="string">
            <text:p>PIRIPIRI</text:p>
          </table:table-cell>
          <table:table-cell office:value-type="string" calcext:value-type="string">
            <text:p>TERESINA III</text:p>
          </table:table-cell>
          <table:table-cell office:value-type="float" office:value="0.871041004070237" calcext:value-type="float">
            <text:p>0,871041</text:p>
          </table:table-cell>
        </table:table-row>
        <table:table-row table:style-name="ro1">
          <table:table-cell office:value-type="string" calcext:value-type="string">
            <text:p>PONTA GROSSA</text:p>
          </table:table-cell>
          <table:table-cell office:value-type="string" calcext:value-type="string">
            <text:p>IVAIPORA ELS</text:p>
          </table:table-cell>
          <table:table-cell office:value-type="float" office:value="1.57631898241064" calcext:value-type="float">
            <text:p>1,576319</text:p>
          </table:table-cell>
          <table:table-cell/>
          <table:table-cell office:value-type="string" calcext:value-type="string">
            <text:p>PITUACU</text:p>
          </table:table-cell>
          <table:table-cell office:value-type="string" calcext:value-type="string">
            <text:p>NARANDIBA</text:p>
          </table:table-cell>
          <table:table-cell office:value-type="float" office:value="0.675042239555662" calcext:value-type="float">
            <text:p>0,675042</text:p>
          </table:table-cell>
        </table:table-row>
        <table:table-row table:style-name="ro1">
          <table:table-cell office:value-type="string" calcext:value-type="string">
            <text:p>PONTA GROSSA</text:p>
          </table:table-cell>
          <table:table-cell office:value-type="string" calcext:value-type="string">
            <text:p>PONTA G SUL</text:p>
          </table:table-cell>
          <table:table-cell office:value-type="float" office:value="0.444470832808792" calcext:value-type="float">
            <text:p>0,444471</text:p>
          </table:table-cell>
          <table:table-cell/>
          <table:table-cell office:value-type="string" calcext:value-type="string">
            <text:p>POCOES II</text:p>
          </table:table-cell>
          <table:table-cell office:value-type="string" calcext:value-type="string">
            <text:p>POCOES III</text:p>
          </table:table-cell>
          <table:table-cell office:value-type="float" office:value="0.833410298991205" calcext:value-type="float">
            <text:p>0,833410</text:p>
          </table:table-cell>
        </table:table-row>
        <table:table-row table:style-name="ro1">
          <table:table-cell office:value-type="string" calcext:value-type="string">
            <text:p>PONTA GROSSA</text:p>
          </table:table-cell>
          <table:table-cell office:value-type="string" calcext:value-type="string">
            <text:p>S.MATEUS SUL</text:p>
          </table:table-cell>
          <table:table-cell office:value-type="float" office:value="0.479529429150555" calcext:value-type="float">
            <text:p>0,479529</text:p>
          </table:table-cell>
          <table:table-cell/>
          <table:table-cell office:value-type="string" calcext:value-type="string">
            <text:p>POCOES III</text:p>
          </table:table-cell>
          <table:table-cell office:value-type="string" calcext:value-type="string">
            <text:p>PE. PARAISO 2</text:p>
          </table:table-cell>
          <table:table-cell office:value-type="float" office:value="1.90356689868198" calcext:value-type="float">
            <text:p>1,903567</text:p>
          </table:table-cell>
        </table:table-row>
        <table:table-row table:style-name="ro1">
          <table:table-cell office:value-type="string" calcext:value-type="string">
            <text:p>PORTO ALEGRE8</text:p>
          </table:table-cell>
          <table:table-cell office:value-type="string" calcext:value-type="string">
            <text:p>PORTO ALEGRE9</text:p>
          </table:table-cell>
          <table:table-cell office:value-type="float" office:value="0.318566382768388" calcext:value-type="float">
            <text:p>0,318566</text:p>
          </table:table-cell>
          <table:table-cell/>
          <table:table-cell office:value-type="string" calcext:value-type="string">
            <text:p>POCOS CALDAS</text:p>
          </table:table-cell>
          <table:table-cell office:value-type="string" calcext:value-type="string">
            <text:p>ITAJUBA 3</text:p>
          </table:table-cell>
          <table:table-cell office:value-type="float" office:value="1.52013155623898" calcext:value-type="float">
            <text:p>1,520132</text:p>
          </table:table-cell>
        </table:table-row>
        <table:table-row table:style-name="ro1">
          <table:table-cell office:value-type="string" calcext:value-type="string">
            <text:p>PORTO ALEGRE8</text:p>
          </table:table-cell>
          <table:table-cell office:value-type="string" calcext:value-type="string">
            <text:p>PORTOALEGRE 1</text:p>
          </table:table-cell>
          <table:table-cell office:value-type="float" office:value="0.331586323000696" calcext:value-type="float">
            <text:p>0,331586</text:p>
          </table:table-cell>
          <table:table-cell/>
          <table:table-cell office:value-type="string" calcext:value-type="string">
            <text:p>PONTA G NORTE</text:p>
          </table:table-cell>
          <table:table-cell office:value-type="string" calcext:value-type="string">
            <text:p>PONTA GROSSA</text:p>
          </table:table-cell>
          <table:table-cell office:value-type="float" office:value="0.593769663699141" calcext:value-type="float">
            <text:p>0,593770</text:p>
          </table:table-cell>
        </table:table-row>
        <table:table-row table:style-name="ro1">
          <table:table-cell office:value-type="string" calcext:value-type="string">
            <text:p>PORTO VELHO</text:p>
          </table:table-cell>
          <table:table-cell office:value-type="string" calcext:value-type="string">
            <text:p>SAMUEL</text:p>
          </table:table-cell>
          <table:table-cell office:value-type="float" office:value="0.43972035678654" calcext:value-type="float">
            <text:p>0,439720</text:p>
          </table:table-cell>
          <table:table-cell/>
          <table:table-cell office:value-type="string" calcext:value-type="string">
            <text:p>PONTA GROSSA</text:p>
          </table:table-cell>
          <table:table-cell office:value-type="string" calcext:value-type="string">
            <text:p>IVAIPORA ELS</text:p>
          </table:table-cell>
          <table:table-cell office:value-type="float" office:value="2.050168518384" calcext:value-type="float">
            <text:p>2,050169</text:p>
          </table:table-cell>
        </table:table-row>
        <table:table-row table:style-name="ro1">
          <table:table-cell office:value-type="string" calcext:value-type="string">
            <text:p>PORTOALEGRE 4</text:p>
          </table:table-cell>
          <table:table-cell office:value-type="string" calcext:value-type="string">
            <text:p>PORTO ALEGRE9</text:p>
          </table:table-cell>
          <table:table-cell office:value-type="float" office:value="0.327134612347924" calcext:value-type="float">
            <text:p>0,327135</text:p>
          </table:table-cell>
          <table:table-cell/>
          <table:table-cell office:value-type="string" calcext:value-type="string">
            <text:p>PONTA GROSSA</text:p>
          </table:table-cell>
          <table:table-cell office:value-type="string" calcext:value-type="string">
            <text:p>PONTA G SUL</text:p>
          </table:table-cell>
          <table:table-cell office:value-type="float" office:value="0.685905947136641" calcext:value-type="float">
            <text:p>0,685906</text:p>
          </table:table-cell>
        </table:table-row>
        <table:table-row table:style-name="ro1">
          <table:table-cell office:value-type="string" calcext:value-type="string">
            <text:p>PORTOALEGRE 4</text:p>
          </table:table-cell>
          <table:table-cell office:value-type="string" calcext:value-type="string">
            <text:p>PORTOALEGRE10</text:p>
          </table:table-cell>
          <table:table-cell office:value-type="float" office:value="0.312415310766279" calcext:value-type="float">
            <text:p>0,312415</text:p>
          </table:table-cell>
          <table:table-cell/>
          <table:table-cell office:value-type="string" calcext:value-type="string">
            <text:p>PONTA GROSSA</text:p>
          </table:table-cell>
          <table:table-cell office:value-type="string" calcext:value-type="string">
            <text:p>S.MATEUS SUL</text:p>
          </table:table-cell>
          <table:table-cell office:value-type="float" office:value="0.740008259266136" calcext:value-type="float">
            <text:p>0,740008</text:p>
          </table:table-cell>
        </table:table-row>
        <table:table-row table:style-name="ro1">
          <table:table-cell office:value-type="string" calcext:value-type="string">
            <text:p>PORTOALEGRE13</text:p>
          </table:table-cell>
          <table:table-cell office:value-type="string" calcext:value-type="string">
            <text:p>PORTOALEGRE6</text:p>
          </table:table-cell>
          <table:table-cell office:value-type="float" office:value="0.280379317171022" calcext:value-type="float">
            <text:p>0,280379</text:p>
          </table:table-cell>
          <table:table-cell/>
          <table:table-cell office:value-type="string" calcext:value-type="string">
            <text:p>PORTO ALEGRE8</text:p>
          </table:table-cell>
          <table:table-cell office:value-type="string" calcext:value-type="string">
            <text:p>PORTO ALEGRE9</text:p>
          </table:table-cell>
          <table:table-cell office:value-type="float" office:value="0.584382160322607" calcext:value-type="float">
            <text:p>0,584382</text:p>
          </table:table-cell>
        </table:table-row>
        <table:table-row table:style-name="ro1">
          <table:table-cell office:value-type="string" calcext:value-type="string">
            <text:p>POVO NOVO</text:p>
          </table:table-cell>
          <table:table-cell office:value-type="string" calcext:value-type="string">
            <text:p>GUAIBA 3</text:p>
          </table:table-cell>
          <table:table-cell office:value-type="float" office:value="1.70348235916258" calcext:value-type="float">
            <text:p>1,703482</text:p>
          </table:table-cell>
          <table:table-cell/>
          <table:table-cell office:value-type="string" calcext:value-type="string">
            <text:p>PORTO ALEGRE8</text:p>
          </table:table-cell>
          <table:table-cell office:value-type="string" calcext:value-type="string">
            <text:p>PORTOALEGRE 1</text:p>
          </table:table-cell>
          <table:table-cell office:value-type="float" office:value="0.60826610166666" calcext:value-type="float">
            <text:p>0,608266</text:p>
          </table:table-cell>
        </table:table-row>
        <table:table-row table:style-name="ro1">
          <table:table-cell office:value-type="string" calcext:value-type="string">
            <text:p>POVO NOVO</text:p>
          </table:table-cell>
          <table:table-cell office:value-type="string" calcext:value-type="string">
            <text:p>MARMELEIRO 2</text:p>
          </table:table-cell>
          <table:table-cell office:value-type="float" office:value="1.67324378844416" calcext:value-type="float">
            <text:p>1,673244</text:p>
          </table:table-cell>
          <table:table-cell/>
          <table:table-cell office:value-type="string" calcext:value-type="string">
            <text:p>PORTO VELHO</text:p>
          </table:table-cell>
          <table:table-cell office:value-type="string" calcext:value-type="string">
            <text:p>SAMUEL</text:p>
          </table:table-cell>
          <table:table-cell office:value-type="float" office:value="0.754407224593897" calcext:value-type="float">
            <text:p>0,754407</text:p>
          </table:table-cell>
        </table:table-row>
        <table:table-row table:style-name="ro1">
          <table:table-cell office:value-type="string" calcext:value-type="string">
            <text:p>POVO NOVO</text:p>
          </table:table-cell>
          <table:table-cell office:value-type="string" calcext:value-type="string">
            <text:p>QUINTA</text:p>
          </table:table-cell>
          <table:table-cell office:value-type="float" office:value="0.533232461458869" calcext:value-type="float">
            <text:p>0,533232</text:p>
          </table:table-cell>
          <table:table-cell/>
          <table:table-cell office:value-type="string" calcext:value-type="string">
            <text:p>PORTOALEGRE 4</text:p>
          </table:table-cell>
          <table:table-cell office:value-type="string" calcext:value-type="string">
            <text:p>PORTO ALEGRE9</text:p>
          </table:table-cell>
          <table:table-cell office:value-type="float" office:value="0.600099827919283" calcext:value-type="float">
            <text:p>0,600100</text:p>
          </table:table-cell>
        </table:table-row>
        <table:table-row table:style-name="ro1">
          <table:table-cell office:value-type="string" calcext:value-type="string">
            <text:p>PRE.MEDICI</text:p>
          </table:table-cell>
          <table:table-cell office:value-type="string" calcext:value-type="string">
            <text:p>QUINTA</text:p>
          </table:table-cell>
          <table:table-cell office:value-type="float" office:value="0.360063601620152" calcext:value-type="float">
            <text:p>0,360064</text:p>
          </table:table-cell>
          <table:table-cell/>
          <table:table-cell office:value-type="string" calcext:value-type="string">
            <text:p>PORTOALEGRE 4</text:p>
          </table:table-cell>
          <table:table-cell office:value-type="string" calcext:value-type="string">
            <text:p>PORTOALEGRE10</text:p>
          </table:table-cell>
          <table:table-cell office:value-type="float" office:value="0.573098556843624" calcext:value-type="float">
            <text:p>0,573099</text:p>
          </table:table-cell>
        </table:table-row>
        <table:table-row table:style-name="ro1">
          <table:table-cell office:value-type="string" calcext:value-type="string">
            <text:p>PRE.MEDICI</text:p>
          </table:table-cell>
          <table:table-cell office:value-type="string" calcext:value-type="string">
            <text:p>SANTA CRUZ1</text:p>
          </table:table-cell>
          <table:table-cell office:value-type="float" office:value="0.398320578461811" calcext:value-type="float">
            <text:p>0,398321</text:p>
          </table:table-cell>
          <table:table-cell/>
          <table:table-cell office:value-type="string" calcext:value-type="string">
            <text:p>PORTOALEGRE13</text:p>
          </table:table-cell>
          <table:table-cell office:value-type="string" calcext:value-type="string">
            <text:p>PORTOALEGRE6</text:p>
          </table:table-cell>
          <table:table-cell office:value-type="float" office:value="0.51433132917011" calcext:value-type="float">
            <text:p>0,514331</text:p>
          </table:table-cell>
        </table:table-row>
        <table:table-row table:style-name="ro1">
          <table:table-cell office:value-type="string" calcext:value-type="string">
            <text:p>QUIXERE</text:p>
          </table:table-cell>
          <table:table-cell office:value-type="string" calcext:value-type="string">
            <text:p>MOSSORO II</text:p>
          </table:table-cell>
          <table:table-cell office:value-type="float" office:value="0.290099509712039" calcext:value-type="float">
            <text:p>0,290100</text:p>
          </table:table-cell>
          <table:table-cell/>
          <table:table-cell office:value-type="string" calcext:value-type="string">
            <text:p>POVO NOVO</text:p>
          </table:table-cell>
          <table:table-cell office:value-type="string" calcext:value-type="string">
            <text:p>GUAIBA 3</text:p>
          </table:table-cell>
          <table:table-cell office:value-type="float" office:value="2.21963730869103" calcext:value-type="float">
            <text:p>2,219637</text:p>
          </table:table-cell>
        </table:table-row>
        <table:table-row table:style-name="ro1">
          <table:table-cell office:value-type="string" calcext:value-type="string">
            <text:p>R.VERDE NORTE</text:p>
          </table:table-cell>
          <table:table-cell office:value-type="string" calcext:value-type="string">
            <text:p>MARIMBONDO II</text:p>
          </table:table-cell>
          <table:table-cell office:value-type="float" office:value="1.51181260180435" calcext:value-type="float">
            <text:p>1,511813</text:p>
          </table:table-cell>
          <table:table-cell/>
          <table:table-cell office:value-type="string" calcext:value-type="string">
            <text:p>POVO NOVO</text:p>
          </table:table-cell>
          <table:table-cell office:value-type="string" calcext:value-type="string">
            <text:p>MARMELEIRO 2</text:p>
          </table:table-cell>
          <table:table-cell office:value-type="float" office:value="2.18023645468918" calcext:value-type="float">
            <text:p>2,180236</text:p>
          </table:table-cell>
        </table:table-row>
        <table:table-row table:style-name="ro1">
          <table:table-cell office:value-type="string" calcext:value-type="string">
            <text:p>RECIFE II</text:p>
          </table:table-cell>
          <table:table-cell office:value-type="string" calcext:value-type="string">
            <text:p>JOAIRAM</text:p>
          </table:table-cell>
          <table:table-cell office:value-type="float" office:value="0.370040551723019" calcext:value-type="float">
            <text:p>0,370041</text:p>
          </table:table-cell>
          <table:table-cell/>
          <table:table-cell office:value-type="string" calcext:value-type="string">
            <text:p>POVO NOVO</text:p>
          </table:table-cell>
          <table:table-cell office:value-type="string" calcext:value-type="string">
            <text:p>QUINTA</text:p>
          </table:table-cell>
          <table:table-cell office:value-type="float" office:value="0.824398647131395" calcext:value-type="float">
            <text:p>0,824399</text:p>
          </table:table-cell>
        </table:table-row>
        <table:table-row table:style-name="ro1">
          <table:table-cell office:value-type="string" calcext:value-type="string">
            <text:p>RECIFE II</text:p>
          </table:table-cell>
          <table:table-cell office:value-type="string" calcext:value-type="string">
            <text:p>MIRUEIRA</text:p>
          </table:table-cell>
          <table:table-cell office:value-type="float" office:value="0.340995851385694" calcext:value-type="float">
            <text:p>0,340996</text:p>
          </table:table-cell>
          <table:table-cell/>
          <table:table-cell office:value-type="string" calcext:value-type="string">
            <text:p>PRE.MEDICI</text:p>
          </table:table-cell>
          <table:table-cell office:value-type="string" calcext:value-type="string">
            <text:p>QUINTA</text:p>
          </table:table-cell>
          <table:table-cell office:value-type="float" office:value="0.660505178041035" calcext:value-type="float">
            <text:p>0,660505</text:p>
          </table:table-cell>
        </table:table-row>
        <table:table-row table:style-name="ro1">
          <table:table-cell office:value-type="string" calcext:value-type="string">
            <text:p>RECIFE II</text:p>
          </table:table-cell>
          <table:table-cell office:value-type="string" calcext:value-type="string">
            <text:p>RIBEIRAO</text:p>
          </table:table-cell>
          <table:table-cell office:value-type="float" office:value="0.314150290453326" calcext:value-type="float">
            <text:p>0,314150</text:p>
          </table:table-cell>
          <table:table-cell/>
          <table:table-cell office:value-type="string" calcext:value-type="string">
            <text:p>PRE.MEDICI</text:p>
          </table:table-cell>
          <table:table-cell office:value-type="string" calcext:value-type="string">
            <text:p>SANTA CRUZ1</text:p>
          </table:table-cell>
          <table:table-cell office:value-type="float" office:value="0.730684255255202" calcext:value-type="float">
            <text:p>0,730684</text:p>
          </table:table-cell>
        </table:table-row>
        <table:table-row table:style-name="ro1">
          <table:table-cell office:value-type="string" calcext:value-type="string">
            <text:p>RECIFE II</text:p>
          </table:table-cell>
          <table:table-cell office:value-type="string" calcext:value-type="string">
            <text:p>SUAPE II</text:p>
          </table:table-cell>
          <table:table-cell office:value-type="float" office:value="1.23770874340438" calcext:value-type="float">
            <text:p>1,237709</text:p>
          </table:table-cell>
          <table:table-cell/>
          <table:table-cell office:value-type="string" calcext:value-type="string">
            <text:p>QUIXERE</text:p>
          </table:table-cell>
          <table:table-cell office:value-type="string" calcext:value-type="string">
            <text:p>MOSSORO II</text:p>
          </table:table-cell>
          <table:table-cell office:value-type="float" office:value="0.512671767386472" calcext:value-type="float">
            <text:p>0,512672</text:p>
          </table:table-cell>
        </table:table-row>
        <table:table-row table:style-name="ro1">
          <table:table-cell office:value-type="string" calcext:value-type="string">
            <text:p>RESTINGA</text:p>
          </table:table-cell>
          <table:table-cell office:value-type="string" calcext:value-type="string">
            <text:p>VIAMAO 3</text:p>
          </table:table-cell>
          <table:table-cell office:value-type="float" office:value="0.276539379206533" calcext:value-type="float">
            <text:p>0,276539</text:p>
          </table:table-cell>
          <table:table-cell/>
          <table:table-cell office:value-type="string" calcext:value-type="string">
            <text:p>R.VERDE NORTE</text:p>
          </table:table-cell>
          <table:table-cell office:value-type="string" calcext:value-type="string">
            <text:p>MARIMBONDO II</text:p>
          </table:table-cell>
          <table:table-cell office:value-type="float" office:value="1.94167206366104" calcext:value-type="float">
            <text:p>1,941672</text:p>
          </table:table-cell>
        </table:table-row>
        <table:table-row table:style-name="ro1">
          <table:table-cell office:value-type="string" calcext:value-type="string">
            <text:p>RIB.GONCALVES</text:p>
          </table:table-cell>
          <table:table-cell office:value-type="string" calcext:value-type="string">
            <text:p>COLINAS</text:p>
          </table:table-cell>
          <table:table-cell office:value-type="float" office:value="1.2801836377937" calcext:value-type="float">
            <text:p>1,280184</text:p>
          </table:table-cell>
          <table:table-cell/>
          <table:table-cell office:value-type="string" calcext:value-type="string">
            <text:p>RECIFE II</text:p>
          </table:table-cell>
          <table:table-cell office:value-type="string" calcext:value-type="string">
            <text:p>JOAIRAM</text:p>
          </table:table-cell>
          <table:table-cell office:value-type="float" office:value="0.544917866441325" calcext:value-type="float">
            <text:p>0,544918</text:p>
          </table:table-cell>
        </table:table-row>
        <table:table-row table:style-name="ro1">
          <table:table-cell office:value-type="string" calcext:value-type="string">
            <text:p>RIBEIRAOPRETO</text:p>
          </table:table-cell>
          <table:table-cell office:value-type="string" calcext:value-type="string">
            <text:p>MORRO AGUDO</text:p>
          </table:table-cell>
          <table:table-cell office:value-type="float" office:value="1.17943480930934" calcext:value-type="float">
            <text:p>1,179435</text:p>
          </table:table-cell>
          <table:table-cell/>
          <table:table-cell office:value-type="string" calcext:value-type="string">
            <text:p>RECIFE II</text:p>
          </table:table-cell>
          <table:table-cell office:value-type="string" calcext:value-type="string">
            <text:p>MIRUEIRA</text:p>
          </table:table-cell>
          <table:table-cell office:value-type="float" office:value="0.502146942915382" calcext:value-type="float">
            <text:p>0,502147</text:p>
          </table:table-cell>
        </table:table-row>
        <table:table-row table:style-name="ro1">
          <table:table-cell office:value-type="string" calcext:value-type="string">
            <text:p>RIBEIRAOPRETO</text:p>
          </table:table-cell>
          <table:table-cell office:value-type="string" calcext:value-type="string">
            <text:p>POCOS CALDAS</text:p>
          </table:table-cell>
          <table:table-cell office:value-type="float" office:value="1.20088458762653" calcext:value-type="float">
            <text:p>1,200885</text:p>
          </table:table-cell>
          <table:table-cell/>
          <table:table-cell office:value-type="string" calcext:value-type="string">
            <text:p>RECIFE II</text:p>
          </table:table-cell>
          <table:table-cell office:value-type="string" calcext:value-type="string">
            <text:p>SUAPE II</text:p>
          </table:table-cell>
          <table:table-cell office:value-type="float" office:value="1.53615690408018" calcext:value-type="float">
            <text:p>1,536157</text:p>
          </table:table-cell>
        </table:table-row>
        <table:table-row table:style-name="ro1">
          <table:table-cell office:value-type="string" calcext:value-type="string">
            <text:p>RIBEIRAOPRETO</text:p>
          </table:table-cell>
          <table:table-cell office:value-type="string" calcext:value-type="string">
            <text:p>SANTA BARBARA</text:p>
          </table:table-cell>
          <table:table-cell office:value-type="float" office:value="1.10476940298861" calcext:value-type="float">
            <text:p>1,104769</text:p>
          </table:table-cell>
          <table:table-cell/>
          <table:table-cell office:value-type="string" calcext:value-type="string">
            <text:p>RESTINGA</text:p>
          </table:table-cell>
          <table:table-cell office:value-type="string" calcext:value-type="string">
            <text:p>VIAMAO 3</text:p>
          </table:table-cell>
          <table:table-cell office:value-type="float" office:value="0.507287298900211" calcext:value-type="float">
            <text:p>0,507287</text:p>
          </table:table-cell>
        </table:table-row>
        <table:table-row table:style-name="ro1">
          <table:table-cell office:value-type="string" calcext:value-type="string">
            <text:p>RIBEIRAOZINHO</text:p>
          </table:table-cell>
          <table:table-cell office:value-type="string" calcext:value-type="string">
            <text:p>PARANATINGA</text:p>
          </table:table-cell>
          <table:table-cell office:value-type="float" office:value="1.50896177186556" calcext:value-type="float">
            <text:p>1,508962</text:p>
          </table:table-cell>
          <table:table-cell/>
          <table:table-cell office:value-type="string" calcext:value-type="string">
            <text:p>RIB.GONCALVES</text:p>
          </table:table-cell>
          <table:table-cell office:value-type="string" calcext:value-type="string">
            <text:p>COLINAS</text:p>
          </table:table-cell>
          <table:table-cell office:value-type="float" office:value="1.57580899607611" calcext:value-type="float">
            <text:p>1,575809</text:p>
          </table:table-cell>
        </table:table-row>
        <table:table-row table:style-name="ro1">
          <table:table-cell office:value-type="string" calcext:value-type="string">
            <text:p>RIBEIRAOZINHO</text:p>
          </table:table-cell>
          <table:table-cell office:value-type="string" calcext:value-type="string">
            <text:p>R.VERDE NORTE</text:p>
          </table:table-cell>
          <table:table-cell office:value-type="float" office:value="1.46676872648629" calcext:value-type="float">
            <text:p>1,466769</text:p>
          </table:table-cell>
          <table:table-cell/>
          <table:table-cell office:value-type="string" calcext:value-type="string">
            <text:p>RIBEIRAOPRETO</text:p>
          </table:table-cell>
          <table:table-cell office:value-type="string" calcext:value-type="string">
            <text:p>MORRO AGUDO</text:p>
          </table:table-cell>
          <table:table-cell office:value-type="float" office:value="1.5864571438395" calcext:value-type="float">
            <text:p>1,586457</text:p>
          </table:table-cell>
        </table:table-row>
        <table:table-row table:style-name="ro1">
          <table:table-cell office:value-type="string" calcext:value-type="string">
            <text:p>RIBEIRAOZINHO</text:p>
          </table:table-cell>
          <table:table-cell office:value-type="string" calcext:value-type="string">
            <text:p>SE CUIABA</text:p>
          </table:table-cell>
          <table:table-cell office:value-type="float" office:value="1.48512375152231" calcext:value-type="float">
            <text:p>1,485124</text:p>
          </table:table-cell>
          <table:table-cell/>
          <table:table-cell office:value-type="string" calcext:value-type="string">
            <text:p>RIBEIRAOPRETO</text:p>
          </table:table-cell>
          <table:table-cell office:value-type="string" calcext:value-type="string">
            <text:p>POCOS CALDAS</text:p>
          </table:table-cell>
          <table:table-cell office:value-type="float" office:value="1.59202120461006" calcext:value-type="float">
            <text:p>1,592021</text:p>
          </table:table-cell>
        </table:table-row>
        <table:table-row table:style-name="ro1">
          <table:table-cell office:value-type="string" calcext:value-type="string">
            <text:p>RIO BRANCO I</text:p>
          </table:table-cell>
          <table:table-cell office:value-type="string" calcext:value-type="string">
            <text:p>ABUNA</text:p>
          </table:table-cell>
          <table:table-cell office:value-type="float" office:value="0.567081010523858" calcext:value-type="float">
            <text:p>0,567081</text:p>
          </table:table-cell>
          <table:table-cell/>
          <table:table-cell office:value-type="string" calcext:value-type="string">
            <text:p>RIBEIRAOPRETO</text:p>
          </table:table-cell>
          <table:table-cell office:value-type="string" calcext:value-type="string">
            <text:p>SANTA BARBARA</text:p>
          </table:table-cell>
          <table:table-cell office:value-type="float" office:value="1.53850927779724" calcext:value-type="float">
            <text:p>1,538509</text:p>
          </table:table-cell>
        </table:table-row>
        <table:table-row table:style-name="ro1">
          <table:table-cell office:value-type="string" calcext:value-type="string">
            <text:p>RIO CLARO 2</text:p>
          </table:table-cell>
          <table:table-cell office:value-type="string" calcext:value-type="string">
            <text:p>RONDONOPOLIS</text:p>
          </table:table-cell>
          <table:table-cell office:value-type="float" office:value="0.437168581808446" calcext:value-type="float">
            <text:p>0,437169</text:p>
          </table:table-cell>
          <table:table-cell/>
          <table:table-cell office:value-type="string" calcext:value-type="string">
            <text:p>RIBEIRAOZINHO</text:p>
          </table:table-cell>
          <table:table-cell office:value-type="string" calcext:value-type="string">
            <text:p>PARANATINGA</text:p>
          </table:table-cell>
          <table:table-cell office:value-type="float" office:value="1.90320125642572" calcext:value-type="float">
            <text:p>1,903201</text:p>
          </table:table-cell>
        </table:table-row>
        <table:table-row table:style-name="ro1">
          <table:table-cell office:value-type="string" calcext:value-type="string">
            <text:p>RIO DAS EGUAS</text:p>
          </table:table-cell>
          <table:table-cell office:value-type="string" calcext:value-type="string">
            <text:p>LUZIANIA</text:p>
          </table:table-cell>
          <table:table-cell office:value-type="float" office:value="2.08888531428723" calcext:value-type="float">
            <text:p>2,088885</text:p>
          </table:table-cell>
          <table:table-cell/>
          <table:table-cell office:value-type="string" calcext:value-type="string">
            <text:p>RIBEIRAOZINHO</text:p>
          </table:table-cell>
          <table:table-cell office:value-type="string" calcext:value-type="string">
            <text:p>R.VERDE NORTE</text:p>
          </table:table-cell>
          <table:table-cell office:value-type="float" office:value="1.85085512834085" calcext:value-type="float">
            <text:p>1,850855</text:p>
          </table:table-cell>
        </table:table-row>
        <table:table-row table:style-name="ro1">
          <table:table-cell office:value-type="string" calcext:value-type="string">
            <text:p>RIO DAS EGUAS</text:p>
          </table:table-cell>
          <table:table-cell office:value-type="string" calcext:value-type="string">
            <text:p>RIO FORMOSO II</text:p>
          </table:table-cell>
          <table:table-cell office:value-type="float" office:value="0.563952847422763" calcext:value-type="float">
            <text:p>0,563953</text:p>
          </table:table-cell>
          <table:table-cell/>
          <table:table-cell office:value-type="string" calcext:value-type="string">
            <text:p>RIBEIRAOZINHO</text:p>
          </table:table-cell>
          <table:table-cell office:value-type="string" calcext:value-type="string">
            <text:p>SE CUIABA</text:p>
          </table:table-cell>
          <table:table-cell office:value-type="float" office:value="1.87313518642059" calcext:value-type="float">
            <text:p>1,873135</text:p>
          </table:table-cell>
        </table:table-row>
        <table:table-row table:style-name="ro1">
          <table:table-cell office:value-type="string" calcext:value-type="string">
            <text:p>RIO DAS EGUAS</text:p>
          </table:table-cell>
          <table:table-cell office:value-type="string" calcext:value-type="string">
            <text:p>RIO GRANDE II</text:p>
          </table:table-cell>
          <table:table-cell office:value-type="float" office:value="0.438694452984942" calcext:value-type="float">
            <text:p>0,438694</text:p>
          </table:table-cell>
          <table:table-cell/>
          <table:table-cell office:value-type="string" calcext:value-type="string">
            <text:p>RIO BRANCO I</text:p>
          </table:table-cell>
          <table:table-cell office:value-type="string" calcext:value-type="string">
            <text:p>ABUNA</text:p>
          </table:table-cell>
          <table:table-cell office:value-type="float" office:value="0.977606920566425" calcext:value-type="float">
            <text:p>0,977607</text:p>
          </table:table-cell>
        </table:table-row>
        <table:table-row table:style-name="ro1">
          <table:table-cell office:value-type="string" calcext:value-type="string">
            <text:p>RIO NOVO SUL</text:p>
          </table:table-cell>
          <table:table-cell office:value-type="string" calcext:value-type="string">
            <text:p>MUTUM</text:p>
          </table:table-cell>
          <table:table-cell office:value-type="float" office:value="1.40794241313812" calcext:value-type="float">
            <text:p>1,407942</text:p>
          </table:table-cell>
          <table:table-cell/>
          <table:table-cell office:value-type="string" calcext:value-type="string">
            <text:p>RIO CLARO 2</text:p>
          </table:table-cell>
          <table:table-cell office:value-type="string" calcext:value-type="string">
            <text:p>RONDONOPOLIS</text:p>
          </table:table-cell>
          <table:table-cell office:value-type="float" office:value="0.776598598792113" calcext:value-type="float">
            <text:p>0,776599</text:p>
          </table:table-cell>
        </table:table-row>
        <table:table-row table:style-name="ro1">
          <table:table-cell office:value-type="string" calcext:value-type="string">
            <text:p>RIO NOVO SUL</text:p>
          </table:table-cell>
          <table:table-cell office:value-type="string" calcext:value-type="string">
            <text:p>VITORIA</text:p>
          </table:table-cell>
          <table:table-cell office:value-type="float" office:value="0.658598497205163" calcext:value-type="float">
            <text:p>0,658598</text:p>
          </table:table-cell>
          <table:table-cell/>
          <table:table-cell office:value-type="string" calcext:value-type="string">
            <text:p>RIO DAS EGUAS</text:p>
          </table:table-cell>
          <table:table-cell office:value-type="string" calcext:value-type="string">
            <text:p>LUZIANIA</text:p>
          </table:table-cell>
          <table:table-cell office:value-type="float" office:value="2.57979222850736" calcext:value-type="float">
            <text:p>2,579792</text:p>
          </table:table-cell>
        </table:table-row>
        <table:table-row table:style-name="ro1">
          <table:table-cell office:value-type="string" calcext:value-type="string">
            <text:p>RIO VERDE FUR</text:p>
          </table:table-cell>
          <table:table-cell office:value-type="string" calcext:value-type="string">
            <text:p>ITUMBIARA</text:p>
          </table:table-cell>
          <table:table-cell office:value-type="float" office:value="0.579701251523225" calcext:value-type="float">
            <text:p>0,579701</text:p>
          </table:table-cell>
          <table:table-cell/>
          <table:table-cell office:value-type="string" calcext:value-type="string">
            <text:p>RIO DAS EGUAS</text:p>
          </table:table-cell>
          <table:table-cell office:value-type="string" calcext:value-type="string">
            <text:p>RIO FORMOSO II</text:p>
          </table:table-cell>
          <table:table-cell office:value-type="float" office:value="0.808400742464656" calcext:value-type="float">
            <text:p>0,808401</text:p>
          </table:table-cell>
        </table:table-row>
        <table:table-row table:style-name="ro1">
          <table:table-cell office:value-type="string" calcext:value-type="string">
            <text:p>RONDONOPOLIS</text:p>
          </table:table-cell>
          <table:table-cell office:value-type="string" calcext:value-type="string">
            <text:p>SE CUIABA</text:p>
          </table:table-cell>
          <table:table-cell office:value-type="float" office:value="0.56957366929996" calcext:value-type="float">
            <text:p>0,569574</text:p>
          </table:table-cell>
          <table:table-cell/>
          <table:table-cell office:value-type="string" calcext:value-type="string">
            <text:p>RIO DAS EGUAS</text:p>
          </table:table-cell>
          <table:table-cell office:value-type="string" calcext:value-type="string">
            <text:p>RIO GRANDE II</text:p>
          </table:table-cell>
          <table:table-cell office:value-type="float" office:value="0.628848534285881" calcext:value-type="float">
            <text:p>0,628849</text:p>
          </table:table-cell>
        </table:table-row>
        <table:table-row table:style-name="ro1">
          <table:table-cell office:value-type="string" calcext:value-type="string">
            <text:p>RUROPOLIS</text:p>
          </table:table-cell>
          <table:table-cell office:value-type="string" calcext:value-type="string">
            <text:p>TRANSAMAZONIC</text:p>
          </table:table-cell>
          <table:table-cell office:value-type="float" office:value="0.415836481681008" calcext:value-type="float">
            <text:p>0,415836</text:p>
          </table:table-cell>
          <table:table-cell/>
          <table:table-cell office:value-type="string" calcext:value-type="string">
            <text:p>RIO NOVO SUL</text:p>
          </table:table-cell>
          <table:table-cell office:value-type="string" calcext:value-type="string">
            <text:p>MUTUM</text:p>
          </table:table-cell>
          <table:table-cell office:value-type="float" office:value="1.83707740164128" calcext:value-type="float">
            <text:p>1,837077</text:p>
          </table:table-cell>
        </table:table-row>
        <table:table-row table:style-name="ro1">
          <table:table-cell office:value-type="string" calcext:value-type="string">
            <text:p>S.DA MESA</text:p>
          </table:table-cell>
          <table:table-cell office:value-type="string" calcext:value-type="string">
            <text:p>GURUPI</text:p>
          </table:table-cell>
          <table:table-cell office:value-type="float" office:value="1.43015588307192" calcext:value-type="float">
            <text:p>1,430156</text:p>
          </table:table-cell>
          <table:table-cell/>
          <table:table-cell office:value-type="string" calcext:value-type="string">
            <text:p>RIO VERDE FUR</text:p>
          </table:table-cell>
          <table:table-cell office:value-type="string" calcext:value-type="string">
            <text:p>BARRA PEIXE</text:p>
          </table:table-cell>
          <table:table-cell office:value-type="float" office:value="0.863449670505679" calcext:value-type="float">
            <text:p>0,863450</text:p>
          </table:table-cell>
        </table:table-row>
        <table:table-row table:style-name="ro1">
          <table:table-cell office:value-type="string" calcext:value-type="string">
            <text:p>S.DA MESA</text:p>
          </table:table-cell>
          <table:table-cell office:value-type="string" calcext:value-type="string">
            <text:p>NIQUELANDIA</text:p>
          </table:table-cell>
          <table:table-cell office:value-type="float" office:value="0.609959764326798" calcext:value-type="float">
            <text:p>0,609960</text:p>
          </table:table-cell>
          <table:table-cell/>
          <table:table-cell office:value-type="string" calcext:value-type="string">
            <text:p>RIO VERDE FUR</text:p>
          </table:table-cell>
          <table:table-cell office:value-type="string" calcext:value-type="string">
            <text:p>ITUMBIARA</text:p>
          </table:table-cell>
          <table:table-cell office:value-type="float" office:value="0.883386397095215" calcext:value-type="float">
            <text:p>0,883386</text:p>
          </table:table-cell>
        </table:table-row>
        <table:table-row table:style-name="ro1">
          <table:table-cell office:value-type="string" calcext:value-type="string">
            <text:p>S.DA MESA</text:p>
          </table:table-cell>
          <table:table-cell office:value-type="string" calcext:value-type="string">
            <text:p>SAMAMBAIA</text:p>
          </table:table-cell>
          <table:table-cell office:value-type="float" office:value="1.4395543865848" calcext:value-type="float">
            <text:p>1,439554</text:p>
          </table:table-cell>
          <table:table-cell/>
          <table:table-cell office:value-type="string" calcext:value-type="string">
            <text:p>RUROPOLIS</text:p>
          </table:table-cell>
          <table:table-cell office:value-type="string" calcext:value-type="string">
            <text:p>TRANSAMAZONIC</text:p>
          </table:table-cell>
          <table:table-cell office:value-type="float" office:value="0.706550216588563" calcext:value-type="float">
            <text:p>0,706550</text:p>
          </table:table-cell>
        </table:table-row>
        <table:table-row table:style-name="ro1">
          <table:table-cell office:value-type="string" calcext:value-type="string">
            <text:p>S.JOAO PIAUI</text:p>
          </table:table-cell>
          <table:table-cell office:value-type="string" calcext:value-type="string">
            <text:p>ELISEU MARTINS</text:p>
          </table:table-cell>
          <table:table-cell office:value-type="float" office:value="0.398335849724832" calcext:value-type="float">
            <text:p>0,398336</text:p>
          </table:table-cell>
          <table:table-cell/>
          <table:table-cell office:value-type="string" calcext:value-type="string">
            <text:p>S. OSORIO</text:p>
          </table:table-cell>
          <table:table-cell office:value-type="string" calcext:value-type="string">
            <text:p>XANXERE ESU</text:p>
          </table:table-cell>
          <table:table-cell office:value-type="float" office:value="0.805626503963585" calcext:value-type="float">
            <text:p>0,805627</text:p>
          </table:table-cell>
        </table:table-row>
        <table:table-row table:style-name="ro1">
          <table:table-cell office:value-type="string" calcext:value-type="string">
            <text:p>S.JOAO PIAUI</text:p>
          </table:table-cell>
          <table:table-cell office:value-type="string" calcext:value-type="string">
            <text:p>GILBUES II</text:p>
          </table:table-cell>
          <table:table-cell office:value-type="float" office:value="1.97867120242677" calcext:value-type="float">
            <text:p>1,978671</text:p>
          </table:table-cell>
          <table:table-cell/>
          <table:table-cell office:value-type="string" calcext:value-type="string">
            <text:p>S.DA MESA</text:p>
          </table:table-cell>
          <table:table-cell office:value-type="string" calcext:value-type="string">
            <text:p>GURUPI</text:p>
          </table:table-cell>
          <table:table-cell office:value-type="float" office:value="1.80040634096501" calcext:value-type="float">
            <text:p>1,800406</text:p>
          </table:table-cell>
        </table:table-row>
        <table:table-row table:style-name="ro1">
          <table:table-cell office:value-type="string" calcext:value-type="string">
            <text:p>S.JOSE CAMPOS</text:p>
          </table:table-cell>
          <table:table-cell office:value-type="string" calcext:value-type="string">
            <text:p>TAUBATE</text:p>
          </table:table-cell>
          <table:table-cell office:value-type="float" office:value="0.592909796629487" calcext:value-type="float">
            <text:p>0,592910</text:p>
          </table:table-cell>
          <table:table-cell/>
          <table:table-cell office:value-type="string" calcext:value-type="string">
            <text:p>S.DA MESA</text:p>
          </table:table-cell>
          <table:table-cell office:value-type="string" calcext:value-type="string">
            <text:p>NIQUELANDIA</text:p>
          </table:table-cell>
          <table:table-cell office:value-type="float" office:value="0.913660454824889" calcext:value-type="float">
            <text:p>0,913660</text:p>
          </table:table-cell>
        </table:table-row>
        <table:table-row table:style-name="ro1">
          <table:table-cell office:value-type="string" calcext:value-type="string">
            <text:p>S.MATEUS SUL</text:p>
          </table:table-cell>
          <table:table-cell office:value-type="string" calcext:value-type="string">
            <text:p>CANOINHAS ESU</text:p>
          </table:table-cell>
          <table:table-cell office:value-type="float" office:value="0.297731421345299" calcext:value-type="float">
            <text:p>0,297731</text:p>
          </table:table-cell>
          <table:table-cell/>
          <table:table-cell office:value-type="string" calcext:value-type="string">
            <text:p>S.DA MESA</text:p>
          </table:table-cell>
          <table:table-cell office:value-type="string" calcext:value-type="string">
            <text:p>SAMAMBAIA</text:p>
          </table:table-cell>
          <table:table-cell office:value-type="float" office:value="1.88264649257471" calcext:value-type="float">
            <text:p>1,882646</text:p>
          </table:table-cell>
        </table:table-row>
        <table:table-row table:style-name="ro1">
          <table:table-cell office:value-type="string" calcext:value-type="string">
            <text:p>S.SANTIAGO</text:p>
          </table:table-cell>
          <table:table-cell office:value-type="string" calcext:value-type="string">
            <text:p>SALTO CAXIAS</text:p>
          </table:table-cell>
          <table:table-cell office:value-type="float" office:value="1.05342138598746" calcext:value-type="float">
            <text:p>1,053421</text:p>
          </table:table-cell>
          <table:table-cell/>
          <table:table-cell office:value-type="string" calcext:value-type="string">
            <text:p>S.JOAO PIAUI</text:p>
          </table:table-cell>
          <table:table-cell office:value-type="string" calcext:value-type="string">
            <text:p>GILBUES II</text:p>
          </table:table-cell>
          <table:table-cell office:value-type="float" office:value="2.3882347748339" calcext:value-type="float">
            <text:p>2,388235</text:p>
          </table:table-cell>
        </table:table-row>
        <table:table-row table:style-name="ro1">
          <table:table-cell office:value-type="string" calcext:value-type="string">
            <text:p>S.SANTIAGO</text:p>
          </table:table-cell>
          <table:table-cell office:value-type="string" calcext:value-type="string">
            <text:p>SEGREDO</text:p>
          </table:table-cell>
          <table:table-cell office:value-type="float" office:value="1.28587635019045" calcext:value-type="float">
            <text:p>1,285876</text:p>
          </table:table-cell>
          <table:table-cell/>
          <table:table-cell office:value-type="string" calcext:value-type="string">
            <text:p>S.JOSE CAMPOS</text:p>
          </table:table-cell>
          <table:table-cell office:value-type="string" calcext:value-type="string">
            <text:p>TAUBATE</text:p>
          </table:table-cell>
          <table:table-cell office:value-type="float" office:value="0.946297639950259" calcext:value-type="float">
            <text:p>0,946298</text:p>
          </table:table-cell>
        </table:table-row>
        <table:table-row table:style-name="ro1">
          <table:table-cell office:value-type="string" calcext:value-type="string">
            <text:p>SANT. ARAGUAIA</text:p>
          </table:table-cell>
          <table:table-cell office:value-type="string" calcext:value-type="string">
            <text:p>XINGUARA 2</text:p>
          </table:table-cell>
          <table:table-cell office:value-type="float" office:value="0.407864386162245" calcext:value-type="float">
            <text:p>0,407864</text:p>
          </table:table-cell>
          <table:table-cell/>
          <table:table-cell office:value-type="string" calcext:value-type="string">
            <text:p>S.MATEUS SUL</text:p>
          </table:table-cell>
          <table:table-cell office:value-type="string" calcext:value-type="string">
            <text:p>CANOINHAS ESU</text:p>
          </table:table-cell>
          <table:table-cell office:value-type="float" office:value="0.550920589316862" calcext:value-type="float">
            <text:p>0,550921</text:p>
          </table:table-cell>
        </table:table-row>
        <table:table-row table:style-name="ro1">
          <table:table-cell office:value-type="string" calcext:value-type="string">
            <text:p>SANT.DUMONT 2</text:p>
          </table:table-cell>
          <table:table-cell office:value-type="string" calcext:value-type="string">
            <text:p>LEOPOLDINA2</text:p>
          </table:table-cell>
          <table:table-cell office:value-type="float" office:value="0.730897121019593" calcext:value-type="float">
            <text:p>0,730897</text:p>
          </table:table-cell>
          <table:table-cell/>
          <table:table-cell office:value-type="string" calcext:value-type="string">
            <text:p>S.MATEUS SUL</text:p>
          </table:table-cell>
          <table:table-cell office:value-type="string" calcext:value-type="string">
            <text:p>U.VITORIA NORTE</text:p>
          </table:table-cell>
          <table:table-cell office:value-type="float" office:value="0.726923929910697" calcext:value-type="float">
            <text:p>0,726924</text:p>
          </table:table-cell>
        </table:table-row>
        <table:table-row table:style-name="ro1">
          <table:table-cell office:value-type="string" calcext:value-type="string">
            <text:p>SANTA MARIA 3</text:p>
          </table:table-cell>
          <table:table-cell office:value-type="string" calcext:value-type="string">
            <text:p>SANTO ANGELO2</text:p>
          </table:table-cell>
          <table:table-cell office:value-type="float" office:value="0.499183116196488" calcext:value-type="float">
            <text:p>0,499183</text:p>
          </table:table-cell>
          <table:table-cell/>
          <table:table-cell office:value-type="string" calcext:value-type="string">
            <text:p>S.SANTIAGO</text:p>
          </table:table-cell>
          <table:table-cell office:value-type="string" calcext:value-type="string">
            <text:p>SALTO CAXIAS</text:p>
          </table:table-cell>
          <table:table-cell office:value-type="float" office:value="1.37008523417078" calcext:value-type="float">
            <text:p>1,370085</text:p>
          </table:table-cell>
        </table:table-row>
        <table:table-row table:style-name="ro1">
          <table:table-cell office:value-type="string" calcext:value-type="string">
            <text:p>SANTA MARTA</text:p>
          </table:table-cell>
          <table:table-cell office:value-type="string" calcext:value-type="string">
            <text:p>TAPERA 2</text:p>
          </table:table-cell>
          <table:table-cell office:value-type="float" office:value="0.266056515760168" calcext:value-type="float">
            <text:p>0,266057</text:p>
          </table:table-cell>
          <table:table-cell/>
          <table:table-cell office:value-type="string" calcext:value-type="string">
            <text:p>S.SANTIAGO</text:p>
          </table:table-cell>
          <table:table-cell office:value-type="string" calcext:value-type="string">
            <text:p>SEGREDO</text:p>
          </table:table-cell>
          <table:table-cell office:value-type="float" office:value="1.67241734770165" calcext:value-type="float">
            <text:p>1,672417</text:p>
          </table:table-cell>
        </table:table-row>
        <table:table-row table:style-name="ro1">
          <table:table-cell office:value-type="string" calcext:value-type="string">
            <text:p>SANTANA II</text:p>
          </table:table-cell>
          <table:table-cell office:value-type="string" calcext:value-type="string">
            <text:p>ANGELIM</text:p>
          </table:table-cell>
          <table:table-cell office:value-type="float" office:value="0.306478097599413" calcext:value-type="float">
            <text:p>0,306478</text:p>
          </table:table-cell>
          <table:table-cell/>
          <table:table-cell office:value-type="string" calcext:value-type="string">
            <text:p>SANT. ARAGUAIA</text:p>
          </table:table-cell>
          <table:table-cell office:value-type="string" calcext:value-type="string">
            <text:p>XINGUARA 2</text:p>
          </table:table-cell>
          <table:table-cell office:value-type="float" office:value="0.693004782112306" calcext:value-type="float">
            <text:p>0,693005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CV.GARABI 1</text:p>
          </table:table-cell>
          <table:table-cell office:value-type="float" office:value="1.26741364353524" calcext:value-type="float">
            <text:p>1,267414</text:p>
          </table:table-cell>
          <table:table-cell/>
          <table:table-cell office:value-type="string" calcext:value-type="string">
            <text:p>SANT.DUMONT 2</text:p>
          </table:table-cell>
          <table:table-cell office:value-type="string" calcext:value-type="string">
            <text:p>LEOPOLDINA2</text:p>
          </table:table-cell>
          <table:table-cell office:value-type="float" office:value="1.15087196386197" calcext:value-type="float">
            <text:p>1,150872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CV.GARABI 2</text:p>
          </table:table-cell>
          <table:table-cell office:value-type="float" office:value="1.27001497301797" calcext:value-type="float">
            <text:p>1,270015</text:p>
          </table:table-cell>
          <table:table-cell/>
          <table:table-cell office:value-type="string" calcext:value-type="string">
            <text:p>SANTA MARIA 3</text:p>
          </table:table-cell>
          <table:table-cell office:value-type="string" calcext:value-type="string">
            <text:p>SANTO ANGELO2</text:p>
          </table:table-cell>
          <table:table-cell office:value-type="float" office:value="0.915707757059737" calcext:value-type="float">
            <text:p>0,915708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ITA</text:p>
          </table:table-cell>
          <table:table-cell office:value-type="float" office:value="1.30837456748236" calcext:value-type="float">
            <text:p>1,308375</text:p>
          </table:table-cell>
          <table:table-cell/>
          <table:table-cell office:value-type="string" calcext:value-type="string">
            <text:p>SANTA MARTA</text:p>
          </table:table-cell>
          <table:table-cell office:value-type="string" calcext:value-type="string">
            <text:p>TAPERA 2</text:p>
          </table:table-cell>
          <table:table-cell office:value-type="float" office:value="0.488057402971087" calcext:value-type="float">
            <text:p>0,488057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MOGI MIRIM 3</text:p>
          </table:table-cell>
          <table:table-cell office:value-type="float" office:value="1.10296606829031" calcext:value-type="float">
            <text:p>1,102966</text:p>
          </table:table-cell>
          <table:table-cell/>
          <table:table-cell office:value-type="string" calcext:value-type="string">
            <text:p>SANTANA II</text:p>
          </table:table-cell>
          <table:table-cell office:value-type="string" calcext:value-type="string">
            <text:p>ANGELIM</text:p>
          </table:table-cell>
          <table:table-cell office:value-type="float" office:value="0.526517909292257" calcext:value-type="float">
            <text:p>0,526518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REPLAN</text:p>
          </table:table-cell>
          <table:table-cell office:value-type="float" office:value="1.0883712505322" calcext:value-type="float">
            <text:p>1,088371</text:p>
          </table:table-cell>
          <table:table-cell/>
          <table:table-cell office:value-type="string" calcext:value-type="string">
            <text:p>SANTO ANGELO</text:p>
          </table:table-cell>
          <table:table-cell office:value-type="string" calcext:value-type="string">
            <text:p>CV.GARABI 1</text:p>
          </table:table-cell>
          <table:table-cell office:value-type="float" office:value="1.6514398247821" calcext:value-type="float">
            <text:p>1,651440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SANTA ROSA 1</text:p>
          </table:table-cell>
          <table:table-cell office:value-type="float" office:value="0.405574518045942" calcext:value-type="float">
            <text:p>0,405575</text:p>
          </table:table-cell>
          <table:table-cell/>
          <table:table-cell office:value-type="string" calcext:value-type="string">
            <text:p>SANTO ANGELO</text:p>
          </table:table-cell>
          <table:table-cell office:value-type="string" calcext:value-type="string">
            <text:p>CV.GARABI 2</text:p>
          </table:table-cell>
          <table:table-cell office:value-type="float" office:value="1.6548293567846" calcext:value-type="float">
            <text:p>1,654829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SANTO ANGELO2</text:p>
          </table:table-cell>
          <table:table-cell office:value-type="float" office:value="0.508178608517547" calcext:value-type="float">
            <text:p>0,508179</text:p>
          </table:table-cell>
          <table:table-cell/>
          <table:table-cell office:value-type="string" calcext:value-type="string">
            <text:p>SANTO ANGELO</text:p>
          </table:table-cell>
          <table:table-cell office:value-type="string" calcext:value-type="string">
            <text:p>ITA</text:p>
          </table:table-cell>
          <table:table-cell office:value-type="float" office:value="1.721229284248" calcext:value-type="float">
            <text:p>1,721229</text:p>
          </table:table-cell>
        </table:table-row>
        <table:table-row table:style-name="ro1">
          <table:table-cell office:value-type="string" calcext:value-type="string">
            <text:p>SANTO ANGELO</text:p>
          </table:table-cell>
          <table:table-cell office:value-type="string" calcext:value-type="string">
            <text:p>SOLVAY</text:p>
          </table:table-cell>
          <table:table-cell office:value-type="float" office:value="1.0522734797621" calcext:value-type="float">
            <text:p>1,052273</text:p>
          </table:table-cell>
          <table:table-cell/>
          <table:table-cell office:value-type="string" calcext:value-type="string">
            <text:p>SANTO ANGELO</text:p>
          </table:table-cell>
          <table:table-cell office:value-type="string" calcext:value-type="string">
            <text:p>REPLAN</text:p>
          </table:table-cell>
          <table:table-cell office:value-type="float" office:value="1.49176539728988" calcext:value-type="float">
            <text:p>1,491765</text:p>
          </table:table-cell>
        </table:table-row>
        <table:table-row table:style-name="ro1">
          <table:table-cell office:value-type="string" calcext:value-type="string">
            <text:p>SAO GOTARDO 2</text:p>
          </table:table-cell>
          <table:table-cell office:value-type="string" calcext:value-type="string">
            <text:p>EMBORCACAO</text:p>
          </table:table-cell>
          <table:table-cell office:value-type="float" office:value="1.37363947008927" calcext:value-type="float">
            <text:p>1,373639</text:p>
          </table:table-cell>
          <table:table-cell/>
          <table:table-cell office:value-type="string" calcext:value-type="string">
            <text:p>SANTO ANGELO</text:p>
          </table:table-cell>
          <table:table-cell office:value-type="string" calcext:value-type="string">
            <text:p>SANTA ROSA 1</text:p>
          </table:table-cell>
          <table:table-cell office:value-type="float" office:value="0.627034376476784" calcext:value-type="float">
            <text:p>0,627034</text:p>
          </table:table-cell>
        </table:table-row>
        <table:table-row table:style-name="ro1">
          <table:table-cell office:value-type="string" calcext:value-type="string">
            <text:p>SAO GOTARDO 2</text:p>
          </table:table-cell>
          <table:table-cell office:value-type="string" calcext:value-type="string">
            <text:p>TRES MARIAS-SE</text:p>
          </table:table-cell>
          <table:table-cell office:value-type="float" office:value="0.848142361469893" calcext:value-type="float">
            <text:p>0,848142</text:p>
          </table:table-cell>
          <table:table-cell/>
          <table:table-cell office:value-type="string" calcext:value-type="string">
            <text:p>SAO GOTARDO 2</text:p>
          </table:table-cell>
          <table:table-cell office:value-type="string" calcext:value-type="string">
            <text:p>EMBORCACAO</text:p>
          </table:table-cell>
          <table:table-cell office:value-type="float" office:value="1.79478946495087" calcext:value-type="float">
            <text:p>1,794789</text:p>
          </table:table-cell>
        </table:table-row>
        <table:table-row table:style-name="ro1">
          <table:table-cell office:value-type="string" calcext:value-type="string">
            <text:p>SAO LUIS II</text:p>
          </table:table-cell>
          <table:table-cell office:value-type="string" calcext:value-type="string">
            <text:p>SAO LUIS I</text:p>
          </table:table-cell>
          <table:table-cell office:value-type="float" office:value="0.477447890470798" calcext:value-type="float">
            <text:p>0,477448</text:p>
          </table:table-cell>
          <table:table-cell/>
          <table:table-cell office:value-type="string" calcext:value-type="string">
            <text:p>SAO GOTARDO 2</text:p>
          </table:table-cell>
          <table:table-cell office:value-type="string" calcext:value-type="string">
            <text:p>TRES MARIAS-SE</text:p>
          </table:table-cell>
          <table:table-cell office:value-type="float" office:value="1.21653472456425" calcext:value-type="float">
            <text:p>1,216535</text:p>
          </table:table-cell>
        </table:table-row>
        <table:table-row table:style-name="ro1">
          <table:table-cell office:value-type="string" calcext:value-type="string">
            <text:p>SAO LUIS II</text:p>
          </table:table-cell>
          <table:table-cell office:value-type="string" calcext:value-type="string">
            <text:p>SAO LUIS III</text:p>
          </table:table-cell>
          <table:table-cell office:value-type="float" office:value="0.469842621148103" calcext:value-type="float">
            <text:p>0,469843</text:p>
          </table:table-cell>
          <table:table-cell/>
          <table:table-cell office:value-type="string" calcext:value-type="string">
            <text:p>SAO LUIS II</text:p>
          </table:table-cell>
          <table:table-cell office:value-type="string" calcext:value-type="string">
            <text:p>SAO LUIS I</text:p>
          </table:table-cell>
          <table:table-cell office:value-type="float" office:value="0.67444868458928" calcext:value-type="float">
            <text:p>0,674449</text:p>
          </table:table-cell>
        </table:table-row>
        <table:table-row table:style-name="ro1">
          <table:table-cell office:value-type="string" calcext:value-type="string">
            <text:p>SAO LUIS II</text:p>
          </table:table-cell>
          <table:table-cell office:value-type="string" calcext:value-type="string">
            <text:p>SAO LUIS IV</text:p>
          </table:table-cell>
          <table:table-cell office:value-type="float" office:value="1.42052578919864" calcext:value-type="float">
            <text:p>1,420526</text:p>
          </table:table-cell>
          <table:table-cell/>
          <table:table-cell office:value-type="string" calcext:value-type="string">
            <text:p>SAO LUIS II</text:p>
          </table:table-cell>
          <table:table-cell office:value-type="string" calcext:value-type="string">
            <text:p>SAO LUIS III</text:p>
          </table:table-cell>
          <table:table-cell office:value-type="float" office:value="0.663705388843264" calcext:value-type="float">
            <text:p>0,663705</text:p>
          </table:table-cell>
        </table:table-row>
        <table:table-row table:style-name="ro1">
          <table:table-cell office:value-type="string" calcext:value-type="string">
            <text:p>SAPEACU</text:p>
          </table:table-cell>
          <table:table-cell office:value-type="string" calcext:value-type="string">
            <text:p>MORRO CHAPEU II</text:p>
          </table:table-cell>
          <table:table-cell office:value-type="float" office:value="1.4881892892964" calcext:value-type="float">
            <text:p>1,488189</text:p>
          </table:table-cell>
          <table:table-cell/>
          <table:table-cell office:value-type="string" calcext:value-type="string">
            <text:p>SAO LUIS II</text:p>
          </table:table-cell>
          <table:table-cell office:value-type="string" calcext:value-type="string">
            <text:p>SAO LUIS IV</text:p>
          </table:table-cell>
          <table:table-cell office:value-type="float" office:value="1.69128320409498" calcext:value-type="float">
            <text:p>1,691283</text:p>
          </table:table-cell>
        </table:table-row>
        <table:table-row table:style-name="ro1">
          <table:table-cell office:value-type="string" calcext:value-type="string">
            <text:p>SAPEACU</text:p>
          </table:table-cell>
          <table:table-cell office:value-type="string" calcext:value-type="string">
            <text:p>OLINDINA</text:p>
          </table:table-cell>
          <table:table-cell office:value-type="float" office:value="1.42987337102318" calcext:value-type="float">
            <text:p>1,429873</text:p>
          </table:table-cell>
          <table:table-cell/>
          <table:table-cell office:value-type="string" calcext:value-type="string">
            <text:p>SAPEACU</text:p>
          </table:table-cell>
          <table:table-cell office:value-type="string" calcext:value-type="string">
            <text:p>MORRO CHAPEU II</text:p>
          </table:table-cell>
          <table:table-cell office:value-type="float" office:value="1.7979737622358" calcext:value-type="float">
            <text:p>1,797974</text:p>
          </table:table-cell>
        </table:table-row>
        <table:table-row table:style-name="ro1">
          <table:table-cell office:value-type="string" calcext:value-type="string">
            <text:p>SAPEACU</text:p>
          </table:table-cell>
          <table:table-cell office:value-type="string" calcext:value-type="string">
            <text:p>STO.A.JESUS</text:p>
          </table:table-cell>
          <table:table-cell office:value-type="float" office:value="0.383681903541869" calcext:value-type="float">
            <text:p>0,383682</text:p>
          </table:table-cell>
          <table:table-cell/>
          <table:table-cell office:value-type="string" calcext:value-type="string">
            <text:p>SAPEACU</text:p>
          </table:table-cell>
          <table:table-cell office:value-type="string" calcext:value-type="string">
            <text:p>OLINDINA</text:p>
          </table:table-cell>
          <table:table-cell office:value-type="float" office:value="1.72751868523043" calcext:value-type="float">
            <text:p>1,727519</text:p>
          </table:table-cell>
        </table:table-row>
        <table:table-row table:style-name="ro1">
          <table:table-cell office:value-type="string" calcext:value-type="string">
            <text:p>SE BALBINA</text:p>
          </table:table-cell>
          <table:table-cell office:value-type="string" calcext:value-type="string">
            <text:p>PR.FIGUEIREDO</text:p>
          </table:table-cell>
          <table:table-cell office:value-type="float" office:value="0.413973606964054" calcext:value-type="float">
            <text:p>0,413974</text:p>
          </table:table-cell>
          <table:table-cell/>
          <table:table-cell office:value-type="string" calcext:value-type="string">
            <text:p>SE BALBINA</text:p>
          </table:table-cell>
          <table:table-cell office:value-type="string" calcext:value-type="string">
            <text:p>PR.FIGUEIREDO</text:p>
          </table:table-cell>
          <table:table-cell office:value-type="float" office:value="0.710234755032011" calcext:value-type="float">
            <text:p>0,710235</text:p>
          </table:table-cell>
        </table:table-row>
        <table:table-row table:style-name="ro1">
          <table:table-cell office:value-type="string" calcext:value-type="string">
            <text:p>SE LAJEADO</text:p>
          </table:table-cell>
          <table:table-cell office:value-type="string" calcext:value-type="string">
            <text:p>MIRACEMA</text:p>
          </table:table-cell>
          <table:table-cell office:value-type="float" office:value="1.17900980925171" calcext:value-type="float">
            <text:p>1,179010</text:p>
          </table:table-cell>
          <table:table-cell/>
          <table:table-cell office:value-type="string" calcext:value-type="string">
            <text:p>SE LAJEADO</text:p>
          </table:table-cell>
          <table:table-cell office:value-type="string" calcext:value-type="string">
            <text:p>MIRACEMA</text:p>
          </table:table-cell>
          <table:table-cell office:value-type="float" office:value="1.48005086286446" calcext:value-type="float">
            <text:p>1,480051</text:p>
          </table:table-cell>
        </table:table-row>
        <table:table-row table:style-name="ro1">
          <table:table-cell office:value-type="string" calcext:value-type="string">
            <text:p>SERRA PELADA</text:p>
          </table:table-cell>
          <table:table-cell office:value-type="string" calcext:value-type="string">
            <text:p>MIRACEMA</text:p>
          </table:table-cell>
          <table:table-cell office:value-type="float" office:value="1.62479198801555" calcext:value-type="float">
            <text:p>1,624792</text:p>
          </table:table-cell>
          <table:table-cell/>
          <table:table-cell office:value-type="string" calcext:value-type="string">
            <text:p>SERRA PELADA</text:p>
          </table:table-cell>
          <table:table-cell office:value-type="string" calcext:value-type="string">
            <text:p>MIRACEMA</text:p>
          </table:table-cell>
          <table:table-cell office:value-type="float" office:value="1.99999574739127" calcext:value-type="float">
            <text:p>1,999996</text:p>
          </table:table-cell>
        </table:table-row>
        <table:table-row table:style-name="ro1">
          <table:table-cell office:value-type="string" calcext:value-type="string">
            <text:p>SERRA PELADA</text:p>
          </table:table-cell>
          <table:table-cell office:value-type="string" calcext:value-type="string">
            <text:p>XINGU</text:p>
          </table:table-cell>
          <table:table-cell office:value-type="float" office:value="1.95913999554038" calcext:value-type="float">
            <text:p>1,959140</text:p>
          </table:table-cell>
          <table:table-cell/>
          <table:table-cell office:value-type="string" calcext:value-type="string">
            <text:p>SERRA PELADA</text:p>
          </table:table-cell>
          <table:table-cell office:value-type="string" calcext:value-type="string">
            <text:p>XINGU</text:p>
          </table:table-cell>
          <table:table-cell office:value-type="float" office:value="2.03161449386328" calcext:value-type="float">
            <text:p>2,031614</text:p>
          </table:table-cell>
        </table:table-row>
        <table:table-row table:style-name="ro1">
          <table:table-cell office:value-type="string" calcext:value-type="string">
            <text:p>SIDEROPOL.ESU</text:p>
          </table:table-cell>
          <table:table-cell office:value-type="string" calcext:value-type="string">
            <text:p>SIDEROPOLIS 2</text:p>
          </table:table-cell>
          <table:table-cell office:value-type="float" office:value="0.56750736613726" calcext:value-type="float">
            <text:p>0,567507</text:p>
          </table:table-cell>
          <table:table-cell/>
          <table:table-cell office:value-type="string" calcext:value-type="string">
            <text:p>SIDEROPOL.ESU</text:p>
          </table:table-cell>
          <table:table-cell office:value-type="string" calcext:value-type="string">
            <text:p>SIDEROPOLIS 2</text:p>
          </table:table-cell>
          <table:table-cell office:value-type="float" office:value="0.894379232832512" calcext:value-type="float">
            <text:p>0,894379</text:p>
          </table:table-cell>
        </table:table-row>
        <table:table-row table:style-name="ro1">
          <table:table-cell office:value-type="string" calcext:value-type="string">
            <text:p>SIDEROPOL.ESU</text:p>
          </table:table-cell>
          <table:table-cell office:value-type="string" calcext:value-type="string">
            <text:p>TUBARAO SUL</text:p>
          </table:table-cell>
          <table:table-cell office:value-type="float" office:value="0.310613065718061" calcext:value-type="float">
            <text:p>0,310613</text:p>
          </table:table-cell>
          <table:table-cell/>
          <table:table-cell office:value-type="string" calcext:value-type="string">
            <text:p>SIDEROPOL.ESU</text:p>
          </table:table-cell>
          <table:table-cell office:value-type="string" calcext:value-type="string">
            <text:p>TUBARAO SUL</text:p>
          </table:table-cell>
          <table:table-cell office:value-type="float" office:value="0.580832938933648" calcext:value-type="float">
            <text:p>0,580833</text:p>
          </table:table-cell>
        </table:table-row>
        <table:table-row table:style-name="ro1">
          <table:table-cell office:value-type="string" calcext:value-type="string">
            <text:p>SINOP</text:p>
          </table:table-cell>
          <table:table-cell office:value-type="string" calcext:value-type="string">
            <text:p>PARANATINGA</text:p>
          </table:table-cell>
          <table:table-cell office:value-type="float" office:value="1.48678114421386" calcext:value-type="float">
            <text:p>1,486781</text:p>
          </table:table-cell>
          <table:table-cell/>
          <table:table-cell office:value-type="string" calcext:value-type="string">
            <text:p>SINOP</text:p>
          </table:table-cell>
          <table:table-cell office:value-type="string" calcext:value-type="string">
            <text:p>PARANATINGA</text:p>
          </table:table-cell>
          <table:table-cell office:value-type="float" office:value="1.87522559845869" calcext:value-type="float">
            <text:p>1,875226</text:p>
          </table:table-cell>
        </table:table-row>
        <table:table-row table:style-name="ro1">
          <table:table-cell office:value-type="string" calcext:value-type="string">
            <text:p>SINOP</text:p>
          </table:table-cell>
          <table:table-cell office:value-type="string" calcext:value-type="string">
            <text:p>SORRISO</text:p>
          </table:table-cell>
          <table:table-cell office:value-type="float" office:value="0.3856802334655" calcext:value-type="float">
            <text:p>0,385680</text:p>
          </table:table-cell>
          <table:table-cell/>
          <table:table-cell office:value-type="string" calcext:value-type="string">
            <text:p>SINOP</text:p>
          </table:table-cell>
          <table:table-cell office:value-type="string" calcext:value-type="string">
            <text:p>SORRISO II</text:p>
          </table:table-cell>
          <table:table-cell office:value-type="float" office:value="0.546614132945492" calcext:value-type="float">
            <text:p>0,546614</text:p>
          </table:table-cell>
        </table:table-row>
        <table:table-row table:style-name="ro1">
          <table:table-cell office:value-type="string" calcext:value-type="string">
            <text:p>SINOP</text:p>
          </table:table-cell>
          <table:table-cell office:value-type="string" calcext:value-type="string">
            <text:p>SORRISO II</text:p>
          </table:table-cell>
          <table:table-cell office:value-type="float" office:value="0.365263311134021" calcext:value-type="float">
            <text:p>0,365263</text:p>
          </table:table-cell>
          <table:table-cell/>
          <table:table-cell office:value-type="string" calcext:value-type="string">
            <text:p>SOBRAL II</text:p>
          </table:table-cell>
          <table:table-cell office:value-type="string" calcext:value-type="string">
            <text:p>SOBRAL III</text:p>
          </table:table-cell>
          <table:table-cell office:value-type="float" office:value="0.801008623630749" calcext:value-type="float">
            <text:p>0,801009</text:p>
          </table:table-cell>
        </table:table-row>
        <table:table-row table:style-name="ro1">
          <table:table-cell office:value-type="string" calcext:value-type="string">
            <text:p>SOBRAL II</text:p>
          </table:table-cell>
          <table:table-cell office:value-type="string" calcext:value-type="string">
            <text:p>SOBRAL III</text:p>
          </table:table-cell>
          <table:table-cell office:value-type="float" office:value="0.536266778843829" calcext:value-type="float">
            <text:p>0,536267</text:p>
          </table:table-cell>
          <table:table-cell/>
          <table:table-cell office:value-type="string" calcext:value-type="string">
            <text:p>SUAPE II</text:p>
          </table:table-cell>
          <table:table-cell office:value-type="string" calcext:value-type="string">
            <text:p>ANGELIM II</text:p>
          </table:table-cell>
          <table:table-cell office:value-type="float" office:value="1.56092430852776" calcext:value-type="float">
            <text:p>1,560924</text:p>
          </table:table-cell>
        </table:table-row>
        <table:table-row table:style-name="ro1">
          <table:table-cell office:value-type="string" calcext:value-type="string">
            <text:p>SUAPE II</text:p>
          </table:table-cell>
          <table:table-cell office:value-type="string" calcext:value-type="string">
            <text:p>ANGELIM II</text:p>
          </table:table-cell>
          <table:table-cell office:value-type="float" office:value="1.25766427851591" calcext:value-type="float">
            <text:p>1,257664</text:p>
          </table:table-cell>
          <table:table-cell/>
          <table:table-cell office:value-type="string" calcext:value-type="string">
            <text:p>SUAPE II</text:p>
          </table:table-cell>
          <table:table-cell office:value-type="string" calcext:value-type="string">
            <text:p>SUAPE III</text:p>
          </table:table-cell>
          <table:table-cell office:value-type="float" office:value="0.742893526941944" calcext:value-type="float">
            <text:p>0,742894</text:p>
          </table:table-cell>
        </table:table-row>
        <table:table-row table:style-name="ro1">
          <table:table-cell office:value-type="string" calcext:value-type="string">
            <text:p>SUAPE II</text:p>
          </table:table-cell>
          <table:table-cell office:value-type="string" calcext:value-type="string">
            <text:p>SUAPE III</text:p>
          </table:table-cell>
          <table:table-cell office:value-type="float" office:value="0.504481037438433" calcext:value-type="float">
            <text:p>0,504481</text:p>
          </table:table-cell>
          <table:table-cell/>
          <table:table-cell office:value-type="string" calcext:value-type="string">
            <text:p>SUL</text:p>
          </table:table-cell>
          <table:table-cell office:value-type="string" calcext:value-type="string">
            <text:p>S.CAETANO SUL</text:p>
          </table:table-cell>
          <table:table-cell office:value-type="float" office:value="0.819849250636373" calcext:value-type="float">
            <text:p>0,819849</text:p>
          </table:table-cell>
        </table:table-row>
        <table:table-row table:style-name="ro1">
          <table:table-cell office:value-type="string" calcext:value-type="string">
            <text:p>SUL</text:p>
          </table:table-cell>
          <table:table-cell office:value-type="string" calcext:value-type="string">
            <text:p>S.CAETANO SUL</text:p>
          </table:table-cell>
          <table:table-cell office:value-type="float" office:value="0.505757871999407" calcext:value-type="float">
            <text:p>0,505758</text:p>
          </table:table-cell>
          <table:table-cell/>
          <table:table-cell office:value-type="string" calcext:value-type="string">
            <text:p>SUL</text:p>
          </table:table-cell>
          <table:table-cell office:value-type="string" calcext:value-type="string">
            <text:p>TIJUCO PRETO</text:p>
          </table:table-cell>
          <table:table-cell office:value-type="float" office:value="1.36592686792647" calcext:value-type="float">
            <text:p>1,365927</text:p>
          </table:table-cell>
        </table:table-row>
        <table:table-row table:style-name="ro1">
          <table:table-cell office:value-type="string" calcext:value-type="string">
            <text:p>SUL</text:p>
          </table:table-cell>
          <table:table-cell office:value-type="string" calcext:value-type="string">
            <text:p>TIJUCO PRETO</text:p>
          </table:table-cell>
          <table:table-cell office:value-type="float" office:value="1.05949605678976" calcext:value-type="float">
            <text:p>1,059496</text:p>
          </table:table-cell>
          <table:table-cell/>
          <table:table-cell office:value-type="string" calcext:value-type="string">
            <text:p>TAPAJOS II</text:p>
          </table:table-cell>
          <table:table-cell office:value-type="string" calcext:value-type="string">
            <text:p>TRANSAMAZONIC</text:p>
          </table:table-cell>
          <table:table-cell office:value-type="float" office:value="0.672809589796542" calcext:value-type="float">
            <text:p>0,672810</text:p>
          </table:table-cell>
        </table:table-row>
        <table:table-row table:style-name="ro1">
          <table:table-cell office:value-type="string" calcext:value-type="string">
            <text:p>TAPAJOS II</text:p>
          </table:table-cell>
          <table:table-cell office:value-type="string" calcext:value-type="string">
            <text:p>TRANSAMAZONIC</text:p>
          </table:table-cell>
          <table:table-cell office:value-type="float" office:value="0.395978610003253" calcext:value-type="float">
            <text:p>0,395979</text:p>
          </table:table-cell>
          <table:table-cell/>
          <table:table-cell office:value-type="string" calcext:value-type="string">
            <text:p>TAQUARIL</text:p>
          </table:table-cell>
          <table:table-cell office:value-type="string" calcext:value-type="string">
            <text:p>NEVES 1</text:p>
          </table:table-cell>
          <table:table-cell office:value-type="float" office:value="1.15132456929658" calcext:value-type="float">
            <text:p>1,151325</text:p>
          </table:table-cell>
        </table:table-row>
        <table:table-row table:style-name="ro1">
          <table:table-cell office:value-type="string" calcext:value-type="string">
            <text:p>TAQUARIL</text:p>
          </table:table-cell>
          <table:table-cell office:value-type="string" calcext:value-type="string">
            <text:p>NEVES 1</text:p>
          </table:table-cell>
          <table:table-cell office:value-type="float" office:value="0.802679216058776" calcext:value-type="float">
            <text:p>0,802679</text:p>
          </table:table-cell>
          <table:table-cell/>
          <table:table-cell office:value-type="string" calcext:value-type="string">
            <text:p>TAQUARIL</text:p>
          </table:table-cell>
          <table:table-cell office:value-type="string" calcext:value-type="string">
            <text:p>PIMENTA</text:p>
          </table:table-cell>
          <table:table-cell office:value-type="float" office:value="1.06858506477828" calcext:value-type="float">
            <text:p>1,068585</text:p>
          </table:table-cell>
        </table:table-row>
        <table:table-row table:style-name="ro1">
          <table:table-cell office:value-type="string" calcext:value-type="string">
            <text:p>TERESINA II</text:p>
          </table:table-cell>
          <table:table-cell office:value-type="string" calcext:value-type="string">
            <text:p>TIANGUA II</text:p>
          </table:table-cell>
          <table:table-cell office:value-type="float" office:value="1.28956155920188" calcext:value-type="float">
            <text:p>1,289562</text:p>
          </table:table-cell>
          <table:table-cell/>
          <table:table-cell office:value-type="string" calcext:value-type="string">
            <text:p>TERESINA II</text:p>
          </table:table-cell>
          <table:table-cell office:value-type="string" calcext:value-type="string">
            <text:p>TIANGUA II</text:p>
          </table:table-cell>
          <table:table-cell office:value-type="float" office:value="1.58960045458586" calcext:value-type="float">
            <text:p>1,589600</text:p>
          </table:table-cell>
        </table:table-row>
        <table:table-row table:style-name="ro1">
          <table:table-cell office:value-type="string" calcext:value-type="string">
            <text:p>TERMINAL RIO</text:p>
          </table:table-cell>
          <table:table-cell office:value-type="string" calcext:value-type="string">
            <text:p>RESENDE</text:p>
          </table:table-cell>
          <table:table-cell office:value-type="float" office:value="1.37206030539376" calcext:value-type="float">
            <text:p>1,372060</text:p>
          </table:table-cell>
          <table:table-cell/>
          <table:table-cell office:value-type="string" calcext:value-type="string">
            <text:p>TERMINAL RIO</text:p>
          </table:table-cell>
          <table:table-cell office:value-type="string" calcext:value-type="string">
            <text:p>RESENDE</text:p>
          </table:table-cell>
          <table:table-cell office:value-type="float" office:value="1.52329471709265" calcext:value-type="float">
            <text:p>1,523295</text:p>
          </table:table-cell>
        </table:table-row>
        <table:table-row table:style-name="ro1">
          <table:table-cell office:value-type="string" calcext:value-type="string">
            <text:p>TIJUCO PRETO</text:p>
          </table:table-cell>
          <table:table-cell office:value-type="string" calcext:value-type="string">
            <text:p>ITABERA</text:p>
          </table:table-cell>
          <table:table-cell office:value-type="float" office:value="2.42830220156315" calcext:value-type="float">
            <text:p>2,428302</text:p>
          </table:table-cell>
          <table:table-cell/>
          <table:table-cell office:value-type="string" calcext:value-type="string">
            <text:p>TIJUCO PRETO</text:p>
          </table:table-cell>
          <table:table-cell office:value-type="string" calcext:value-type="string">
            <text:p>ITABERA</text:p>
          </table:table-cell>
          <table:table-cell office:value-type="float" office:value="2.48981791096995" calcext:value-type="float">
            <text:p>2,489818</text:p>
          </table:table-cell>
        </table:table-row>
        <table:table-row table:style-name="ro1">
          <table:table-cell office:value-type="string" calcext:value-type="string">
            <text:p>TOME ACU</text:p>
          </table:table-cell>
          <table:table-cell office:value-type="string" calcext:value-type="string">
            <text:p>VILA DO CONDE</text:p>
          </table:table-cell>
          <table:table-cell office:value-type="float" office:value="0.412772094426174" calcext:value-type="float">
            <text:p>0,412772</text:p>
          </table:table-cell>
          <table:table-cell/>
          <table:table-cell office:value-type="string" calcext:value-type="string">
            <text:p>TOME ACU</text:p>
          </table:table-cell>
          <table:table-cell office:value-type="string" calcext:value-type="string">
            <text:p>VILA DO CONDE</text:p>
          </table:table-cell>
          <table:table-cell office:value-type="float" office:value="0.591115359855847" calcext:value-type="float">
            <text:p>0,591115</text:p>
          </table:table-cell>
        </table:table-row>
        <table:table-row table:style-name="ro1">
          <table:table-cell office:value-type="string" calcext:value-type="string">
            <text:p>TRES MARIAS-SE</text:p>
          </table:table-cell>
          <table:table-cell office:value-type="string" calcext:value-type="string">
            <text:p>VARZEA PALMA1</text:p>
          </table:table-cell>
          <table:table-cell office:value-type="float" office:value="0.707060201263003" calcext:value-type="float">
            <text:p>0,707060</text:p>
          </table:table-cell>
          <table:table-cell/>
          <table:table-cell office:value-type="string" calcext:value-type="string">
            <text:p>TRES MARIAS-SE</text:p>
          </table:table-cell>
          <table:table-cell office:value-type="string" calcext:value-type="string">
            <text:p>VARZEA PALMA1</text:p>
          </table:table-cell>
          <table:table-cell office:value-type="float" office:value="1.11333830575368" calcext:value-type="float">
            <text:p>1,113338</text:p>
          </table:table-cell>
        </table:table-row>
        <table:table-row table:style-name="ro1">
          <table:table-cell office:value-type="string" calcext:value-type="string">
            <text:p>TRINDADE</text:p>
          </table:table-cell>
          <table:table-cell office:value-type="string" calcext:value-type="string">
            <text:p>R.VERDE NORTE</text:p>
          </table:table-cell>
          <table:table-cell office:value-type="float" office:value="1.39046822410262" calcext:value-type="float">
            <text:p>1,390468</text:p>
          </table:table-cell>
          <table:table-cell/>
          <table:table-cell office:value-type="string" calcext:value-type="string">
            <text:p>TRINDADE</text:p>
          </table:table-cell>
          <table:table-cell office:value-type="string" calcext:value-type="string">
            <text:p>R.VERDE NORTE</text:p>
          </table:table-cell>
          <table:table-cell office:value-type="float" office:value="1.75540026769219" calcext:value-type="float">
            <text:p>1,755400</text:p>
          </table:table-cell>
        </table:table-row>
        <table:table-row table:style-name="ro1">
          <table:table-cell office:value-type="string" calcext:value-type="string">
            <text:p>TRINDADE</text:p>
          </table:table-cell>
          <table:table-cell office:value-type="string" calcext:value-type="string">
            <text:p>SILVANIA</text:p>
          </table:table-cell>
          <table:table-cell office:value-type="float" office:value="1.51350738656312" calcext:value-type="float">
            <text:p>1,513507</text:p>
          </table:table-cell>
          <table:table-cell/>
          <table:table-cell office:value-type="string" calcext:value-type="string">
            <text:p>TRINDADE</text:p>
          </table:table-cell>
          <table:table-cell office:value-type="string" calcext:value-type="string">
            <text:p>SILVANIA</text:p>
          </table:table-cell>
          <table:table-cell office:value-type="float" office:value="1.91073138204339" calcext:value-type="float">
            <text:p>1,910731</text:p>
          </table:table-cell>
        </table:table-row>
        <table:table-row table:style-name="ro1">
          <table:table-cell office:value-type="string" calcext:value-type="string">
            <text:p>TUCURUI</text:p>
          </table:table-cell>
          <table:table-cell office:value-type="string" calcext:value-type="string">
            <text:p>MARABA</text:p>
          </table:table-cell>
          <table:table-cell office:value-type="float" office:value="1.39992395479554" calcext:value-type="float">
            <text:p>1,399924</text:p>
          </table:table-cell>
          <table:table-cell/>
          <table:table-cell office:value-type="string" calcext:value-type="string">
            <text:p>TUCURUI</text:p>
          </table:table-cell>
          <table:table-cell office:value-type="string" calcext:value-type="string">
            <text:p>MARABA</text:p>
          </table:table-cell>
          <table:table-cell office:value-type="float" office:value="1.68969309649082" calcext:value-type="float">
            <text:p>1,689693</text:p>
          </table:table-cell>
        </table:table-row>
        <table:table-row table:style-name="ro1">
          <table:table-cell office:value-type="string" calcext:value-type="string">
            <text:p>TUCURUI</text:p>
          </table:table-cell>
          <table:table-cell office:value-type="string" calcext:value-type="string">
            <text:p>XINGU</text:p>
          </table:table-cell>
          <table:table-cell office:value-type="float" office:value="1.80816089638534" calcext:value-type="float">
            <text:p>1,808161</text:p>
          </table:table-cell>
          <table:table-cell/>
          <table:table-cell office:value-type="string" calcext:value-type="string">
            <text:p>TUCURUI</text:p>
          </table:table-cell>
          <table:table-cell office:value-type="string" calcext:value-type="string">
            <text:p>XINGU</text:p>
          </table:table-cell>
          <table:table-cell office:value-type="float" office:value="1.8750502223911" calcext:value-type="float">
            <text:p>1,875050</text:p>
          </table:table-cell>
        </table:table-row>
        <table:table-row table:style-name="ro1">
          <table:table-cell office:value-type="string" calcext:value-type="string">
            <text:p>U.SOBRADINHO</text:p>
          </table:table-cell>
          <table:table-cell office:value-type="string" calcext:value-type="string">
            <text:p>FUTURA</text:p>
          </table:table-cell>
          <table:table-cell office:value-type="float" office:value="1.18488499130003" calcext:value-type="float">
            <text:p>1,184885</text:p>
          </table:table-cell>
          <table:table-cell/>
          <table:table-cell office:value-type="string" calcext:value-type="string">
            <text:p>U.SOBRADINHO</text:p>
          </table:table-cell>
          <table:table-cell office:value-type="string" calcext:value-type="string">
            <text:p>FUTURA</text:p>
          </table:table-cell>
          <table:table-cell office:value-type="float" office:value="1.43153303208604" calcext:value-type="float">
            <text:p>1,431533</text:p>
          </table:table-cell>
        </table:table-row>
        <table:table-row table:style-name="ro1">
          <table:table-cell office:value-type="string" calcext:value-type="string">
            <text:p>VIANA</text:p>
          </table:table-cell>
          <table:table-cell office:value-type="string" calcext:value-type="string">
            <text:p>VIANA 2</text:p>
          </table:table-cell>
          <table:table-cell office:value-type="float" office:value="0.758797451821491" calcext:value-type="float">
            <text:p>0,758797</text:p>
          </table:table-cell>
          <table:table-cell/>
          <table:table-cell office:value-type="string" calcext:value-type="string">
            <text:p>VIANA</text:p>
          </table:table-cell>
          <table:table-cell office:value-type="string" calcext:value-type="string">
            <text:p>VIANA 2</text:p>
          </table:table-cell>
          <table:table-cell office:value-type="float" office:value="1.08538778259897" calcext:value-type="float">
            <text:p>1,085388</text:p>
          </table:table-cell>
        </table:table-row>
      </table:table>
      <table:table table:name="intersection" table:style-name="ta1">
        <table:table-column table:style-name="co13" table:number-columns-repeated="2" table:default-cell-style-name="Default"/>
        <table:table-column table:style-name="co14" table:number-columns-repeated="2" table:default-cell-style-name="ce14"/>
        <table:table-row table:style-name="ro1">
          <table:table-cell office:value-type="string" calcext:value-type="string">
            <text:p>node1</text:p>
          </table:table-cell>
          <table:table-cell office:value-type="string" calcext:value-type="string">
            <text:p>node2</text:p>
          </table:table-cell>
          <table:table-cell table:style-name="Default" office:value-type="string" calcext:value-type="string">
            <text:p>weight_t</text:p>
          </table:table-cell>
          <table:table-cell table:style-name="Default" office:value-type="string" calcext:value-type="string">
            <text:p>weight_s</text:p>
          </table:table-cell>
        </table:table-row>
        <table:table-row table:style-name="ro1" table:visibility="filter">
          <table:table-cell office:value-type="string" calcext:value-type="string">
            <text:p>ABDON BATISTA</text:p>
          </table:table-cell>
          <table:table-cell office:value-type="string" calcext:value-type="string">
            <text:p>C.NOVOS</text:p>
          </table:table-cell>
          <table:table-cell office:value-type="float" office:value="1.45844517419606" calcext:value-type="float">
            <text:p>1,458445</text:p>
          </table:table-cell>
          <table:table-cell office:value-type="float" office:value="1.93713102922268" calcext:value-type="float">
            <text:p>1,937131</text:p>
          </table:table-cell>
        </table:table-row>
        <table:table-row table:style-name="ro1" table:visibility="filter">
          <table:table-cell office:value-type="string" calcext:value-type="string">
            <text:p>ABDON BATISTA</text:p>
          </table:table-cell>
          <table:table-cell office:value-type="string" calcext:value-type="string">
            <text:p>LAGES</text:p>
          </table:table-cell>
          <table:table-cell office:value-type="float" office:value="0.422536577714626" calcext:value-type="float">
            <text:p>0,422537</text:p>
          </table:table-cell>
          <table:table-cell office:value-type="float" office:value="0.665908431801182" calcext:value-type="float">
            <text:p>0,665908</text:p>
          </table:table-cell>
        </table:table-row>
        <table:table-row table:style-name="ro1" table:visibility="filter">
          <table:table-cell office:value-type="string" calcext:value-type="string">
            <text:p>ABDON BATISTA</text:p>
          </table:table-cell>
          <table:table-cell office:value-type="string" calcext:value-type="string">
            <text:p>SIDEROPOLIS 2</text:p>
          </table:table-cell>
          <table:table-cell office:value-type="float" office:value="1.60349858550115" calcext:value-type="float">
            <text:p>1,603499</text:p>
          </table:table-cell>
          <table:table-cell office:value-type="float" office:value="2.12979337190456" calcext:value-type="float">
            <text:p>2,129793</text:p>
          </table:table-cell>
        </table:table-row>
        <table:table-row table:style-name="ro1" table:visibility="filter">
          <table:table-cell office:value-type="string" calcext:value-type="string">
            <text:p>ABDON BATISTA</text:p>
          </table:table-cell>
          <table:table-cell office:value-type="string" calcext:value-type="string">
            <text:p>VIDEIRA</text:p>
          </table:table-cell>
          <table:table-cell office:value-type="float" office:value="0.493297235280295" calcext:value-type="float">
            <text:p>0,493297</text:p>
          </table:table-cell>
          <table:table-cell office:value-type="float" office:value="0.77742568497636" calcext:value-type="float">
            <text:p>0,777426</text:p>
          </table:table-cell>
        </table:table-row>
        <table:table-row table:style-name="ro1" table:visibility="filter">
          <table:table-cell office:value-type="string" calcext:value-type="string">
            <text:p>ABUNA</text:p>
          </table:table-cell>
          <table:table-cell office:value-type="string" calcext:value-type="string">
            <text:p>PORTO VELHO</text:p>
          </table:table-cell>
          <table:table-cell office:value-type="float" office:value="0.526741063844838" calcext:value-type="float">
            <text:p>0,526741</text:p>
          </table:table-cell>
          <table:table-cell office:value-type="float" office:value="0.903704497464796" calcext:value-type="float">
            <text:p>0,903704</text:p>
          </table:table-cell>
        </table:table-row>
        <table:table-row table:style-name="ro1" table:visibility="filter">
          <table:table-cell office:value-type="string" calcext:value-type="string">
            <text:p>ABUNA</text:p>
          </table:table-cell>
          <table:table-cell office:value-type="string" calcext:value-type="string">
            <text:p>TUCUMA</text:p>
          </table:table-cell>
          <table:table-cell office:value-type="float" office:value="0.558896853066807" calcext:value-type="float">
            <text:p>0,558897</text:p>
          </table:table-cell>
          <table:table-cell office:value-type="float" office:value="0.963498021096087" calcext:value-type="float">
            <text:p>0,963498</text:p>
          </table:table-cell>
        </table:table-row>
        <table:table-row table:style-name="ro1" table:visibility="filter">
          <table:table-cell office:value-type="string" calcext:value-type="string">
            <text:p>ACAILANDIA</text:p>
          </table:table-cell>
          <table:table-cell office:value-type="string" calcext:value-type="string">
            <text:p>DOM ELISEU II</text:p>
          </table:table-cell>
          <table:table-cell office:value-type="float" office:value="0.37821641282245" calcext:value-type="float">
            <text:p>0,378216</text:p>
          </table:table-cell>
          <table:table-cell office:value-type="float" office:value="0.53794044888476" calcext:value-type="float">
            <text:p>0,537940</text:p>
          </table:table-cell>
        </table:table-row>
        <table:table-row table:style-name="ro1" table:visibility="filter">
          <table:table-cell office:value-type="string" calcext:value-type="string">
            <text:p>ACAILANDIA</text:p>
          </table:table-cell>
          <table:table-cell office:value-type="string" calcext:value-type="string">
            <text:p>MARABA</text:p>
          </table:table-cell>
          <table:table-cell office:value-type="float" office:value="1.39167511728203" calcext:value-type="float">
            <text:p>1,391675</text:p>
          </table:table-cell>
          <table:table-cell office:value-type="float" office:value="1.66829620268826" calcext:value-type="float">
            <text:p>1,668296</text:p>
          </table:table-cell>
        </table:table-row>
        <table:table-row table:style-name="ro1" table:visibility="filter">
          <table:table-cell office:value-type="string" calcext:value-type="string">
            <text:p>ACAILANDIA</text:p>
          </table:table-cell>
          <table:table-cell office:value-type="string" calcext:value-type="string">
            <text:p>STA LUZIA III</text:p>
          </table:table-cell>
          <table:table-cell office:value-type="float" office:value="1.9613296098083" calcext:value-type="float">
            <text:p>1,961330</text:p>
          </table:table-cell>
          <table:table-cell office:value-type="float" office:value="2.33516621238834" calcext:value-type="float">
            <text:p>2,335166</text:p>
          </table:table-cell>
        </table:table-row>
        <table:table-row table:style-name="ro1" table:visibility="filter">
          <table:table-cell office:value-type="string" calcext:value-type="string">
            <text:p>ACARAU II</text:p>
          </table:table-cell>
          <table:table-cell office:value-type="string" calcext:value-type="string">
            <text:p>ACARAU III</text:p>
          </table:table-cell>
          <table:table-cell office:value-type="float" office:value="0.571106543753625" calcext:value-type="float">
            <text:p>0,571107</text:p>
          </table:table-cell>
          <table:table-cell office:value-type="float" office:value="0.853047931749332" calcext:value-type="float">
            <text:p>0,853048</text:p>
          </table:table-cell>
        </table:table-row>
        <table:table-row table:style-name="ro1" table:visibility="filter">
          <table:table-cell office:value-type="string" calcext:value-type="string">
            <text:p>ACARAU III</text:p>
          </table:table-cell>
          <table:table-cell office:value-type="string" calcext:value-type="string">
            <text:p>PARNAIBA III</text:p>
          </table:table-cell>
          <table:table-cell office:value-type="float" office:value="1.43340702517706" calcext:value-type="float">
            <text:p>1,433407</text:p>
          </table:table-cell>
          <table:table-cell office:value-type="float" office:value="1.76691406669893" calcext:value-type="float">
            <text:p>1,766914</text:p>
          </table:table-cell>
        </table:table-row>
        <table:table-row table:style-name="ro1" table:visibility="filter">
          <table:table-cell office:value-type="string" calcext:value-type="string">
            <text:p>ACARAU III</text:p>
          </table:table-cell>
          <table:table-cell office:value-type="string" calcext:value-type="string">
            <text:p>PECEM II</text:p>
          </table:table-cell>
          <table:table-cell office:value-type="float" office:value="1.43378681262438" calcext:value-type="float">
            <text:p>1,433787</text:p>
          </table:table-cell>
          <table:table-cell office:value-type="float" office:value="1.80498250232334" calcext:value-type="float">
            <text:p>1,804983</text:p>
          </table:table-cell>
        </table:table-row>
        <table:table-row table:style-name="ro1" table:visibility="filter">
          <table:table-cell office:value-type="string" calcext:value-type="string">
            <text:p>ACARAU III</text:p>
          </table:table-cell>
          <table:table-cell office:value-type="string" calcext:value-type="string">
            <text:p>TIANGUA II</text:p>
          </table:table-cell>
          <table:table-cell office:value-type="float" office:value="1.42787051096191" calcext:value-type="float">
            <text:p>1,427871</text:p>
          </table:table-cell>
          <table:table-cell office:value-type="float" office:value="1.79753451850511" calcext:value-type="float">
            <text:p>1,797535</text:p>
          </table:table-cell>
        </table:table-row>
        <table:table-row table:style-name="ro1" table:visibility="filter">
          <table:table-cell office:value-type="string" calcext:value-type="string">
            <text:p>ACU II</text:p>
          </table:table-cell>
          <table:table-cell office:value-type="string" calcext:value-type="string">
            <text:p>PARAISO</text:p>
          </table:table-cell>
          <table:table-cell office:value-type="float" office:value="0.356769812818643" calcext:value-type="float">
            <text:p>0,356770</text:p>
          </table:table-cell>
          <table:table-cell office:value-type="float" office:value="0.628707632691801" calcext:value-type="float">
            <text:p>0,628708</text:p>
          </table:table-cell>
        </table:table-row>
        <table:table-row table:style-name="ro1" table:visibility="filter">
          <table:table-cell office:value-type="string" calcext:value-type="string">
            <text:p>ACU III</text:p>
          </table:table-cell>
          <table:table-cell office:value-type="string" calcext:value-type="string">
            <text:p>CARAUBAS II</text:p>
          </table:table-cell>
          <table:table-cell office:value-type="float" office:value="0.432068167019325" calcext:value-type="float">
            <text:p>0,432068</text:p>
          </table:table-cell>
          <table:table-cell office:value-type="float" office:value="0.64172112951899" calcext:value-type="float">
            <text:p>0,641721</text:p>
          </table:table-cell>
        </table:table-row>
        <table:table-row table:style-name="ro1" table:visibility="filter">
          <table:table-cell office:value-type="string" calcext:value-type="string">
            <text:p>ACU III</text:p>
          </table:table-cell>
          <table:table-cell office:value-type="string" calcext:value-type="string">
            <text:p>J. CAMARA III</text:p>
          </table:table-cell>
          <table:table-cell office:value-type="float" office:value="1.47375497196522" calcext:value-type="float">
            <text:p>1,473755</text:p>
          </table:table-cell>
          <table:table-cell office:value-type="float" office:value="1.84481486115125" calcext:value-type="float">
            <text:p>1,844815</text:p>
          </table:table-cell>
        </table:table-row>
        <table:table-row table:style-name="ro1" table:visibility="filter">
          <table:table-cell office:value-type="string" calcext:value-type="string">
            <text:p>ACU III</text:p>
          </table:table-cell>
          <table:table-cell office:value-type="string" calcext:value-type="string">
            <text:p>MILAGRES II</text:p>
          </table:table-cell>
          <table:table-cell office:value-type="float" office:value="1.66284758320196" calcext:value-type="float">
            <text:p>1,662848</text:p>
          </table:table-cell>
          <table:table-cell office:value-type="float" office:value="2.08742270715234" calcext:value-type="float">
            <text:p>2,087423</text:p>
          </table:table-cell>
        </table:table-row>
        <table:table-row table:style-name="ro1" table:visibility="filter">
          <table:table-cell office:value-type="string" calcext:value-type="string">
            <text:p>ACU III</text:p>
          </table:table-cell>
          <table:table-cell office:value-type="string" calcext:value-type="string">
            <text:p>MONTE VERDE</text:p>
          </table:table-cell>
          <table:table-cell office:value-type="float" office:value="1.3856936787204" calcext:value-type="float">
            <text:p>1,385694</text:p>
          </table:table-cell>
          <table:table-cell office:value-type="float" office:value="1.73458162322458" calcext:value-type="float">
            <text:p>1,734582</text:p>
          </table:table-cell>
        </table:table-row>
        <table:table-row table:style-name="ro1" table:visibility="filter">
          <table:table-cell office:value-type="string" calcext:value-type="string">
            <text:p>ACU III</text:p>
          </table:table-cell>
          <table:table-cell office:value-type="string" calcext:value-type="string">
            <text:p>QUIXADA</text:p>
          </table:table-cell>
          <table:table-cell office:value-type="float" office:value="1.43523044989314" calcext:value-type="float">
            <text:p>1,435230</text:p>
          </table:table-cell>
          <table:table-cell office:value-type="float" office:value="1.80168805690206" calcext:value-type="float">
            <text:p>1,801688</text:p>
          </table:table-cell>
        </table:table-row>
        <table:table-row table:style-name="ro1" table:visibility="filter">
          <table:table-cell office:value-type="string" calcext:value-type="string">
            <text:p>ACU III</text:p>
          </table:table-cell>
          <table:table-cell office:value-type="string" calcext:value-type="string">
            <text:p>SIMPLICE</text:p>
          </table:table-cell>
          <table:table-cell office:value-type="float" office:value="0.189625940287564" calcext:value-type="float">
            <text:p>0,189626</text:p>
          </table:table-cell>
          <table:table-cell office:value-type="float" office:value="0.281638366063644" calcext:value-type="float">
            <text:p>0,281638</text:p>
          </table:table-cell>
        </table:table-row>
        <table:table-row table:style-name="ro1" table:visibility="filter">
          <table:table-cell office:value-type="string" calcext:value-type="string">
            <text:p>ADRIANOPOLIS</text:p>
          </table:table-cell>
          <table:table-cell office:value-type="string" calcext:value-type="string">
            <text:p>GRAJAU</text:p>
          </table:table-cell>
          <table:table-cell office:value-type="float" office:value="1.37920280470151" calcext:value-type="float">
            <text:p>1,379203</text:p>
          </table:table-cell>
          <table:table-cell office:value-type="float" office:value="1.78225113110297" calcext:value-type="float">
            <text:p>1,782251</text:p>
          </table:table-cell>
        </table:table-row>
        <table:table-row table:style-name="ro1" table:visibility="filter">
          <table:table-cell office:value-type="string" calcext:value-type="string">
            <text:p>ADRIANOPOLIS</text:p>
          </table:table-cell>
          <table:table-cell office:value-type="string" calcext:value-type="string">
            <text:p>SAO JOSE</text:p>
          </table:table-cell>
          <table:table-cell office:value-type="float" office:value="1.37126111026055" calcext:value-type="float">
            <text:p>1,371261</text:p>
          </table:table-cell>
          <table:table-cell office:value-type="float" office:value="1.77198861289171" calcext:value-type="float">
            <text:p>1,771989</text:p>
          </table:table-cell>
        </table:table-row>
        <table:table-row table:style-name="ro1" table:visibility="filter">
          <table:table-cell office:value-type="string" calcext:value-type="string">
            <text:p>ADRIANOPOLIS</text:p>
          </table:table-cell>
          <table:table-cell office:value-type="string" calcext:value-type="string">
            <text:p>VENDA PEDRAS</text:p>
          </table:table-cell>
          <table:table-cell office:value-type="float" office:value="0.70802661586413" calcext:value-type="float">
            <text:p>0,708027</text:p>
          </table:table-cell>
          <table:table-cell office:value-type="float" office:value="1.00439399250713" calcext:value-type="float">
            <text:p>1,004394</text:p>
          </table:table-cell>
        </table:table-row>
        <table:table-row table:style-name="ro1" table:visibility="filter">
          <table:table-cell office:value-type="string" calcext:value-type="string">
            <text:p>AGUA AZUL</text:p>
          </table:table-cell>
          <table:table-cell office:value-type="string" calcext:value-type="string">
            <text:p>BOM JARDIM</text:p>
          </table:table-cell>
          <table:table-cell office:value-type="float" office:value="1.05986086072935" calcext:value-type="float">
            <text:p>1,059861</text:p>
          </table:table-cell>
          <table:table-cell office:value-type="float" office:value="1.52809872933082" calcext:value-type="float">
            <text:p>1,528099</text:p>
          </table:table-cell>
        </table:table-row>
        <table:table-row table:style-name="ro1" table:visibility="filter">
          <table:table-cell office:value-type="string" calcext:value-type="string">
            <text:p>AGUA VERMELHA</text:p>
          </table:table-cell>
          <table:table-cell office:value-type="string" calcext:value-type="string">
            <text:p>SAO SIMAO-SE</text:p>
          </table:table-cell>
          <table:table-cell office:value-type="float" office:value="1.26619302632699" calcext:value-type="float">
            <text:p>1,266193</text:p>
          </table:table-cell>
          <table:table-cell office:value-type="float" office:value="1.6786010644254" calcext:value-type="float">
            <text:p>1,678601</text:p>
          </table:table-cell>
        </table:table-row>
        <table:table-row table:style-name="ro1" table:visibility="filter">
          <table:table-cell office:value-type="string" calcext:value-type="string">
            <text:p>AIMORES-SE</text:p>
          </table:table-cell>
          <table:table-cell office:value-type="string" calcext:value-type="string">
            <text:p>CONSE. PENA</text:p>
          </table:table-cell>
          <table:table-cell office:value-type="float" office:value="0.344481089871363" calcext:value-type="float">
            <text:p>0,344481</text:p>
          </table:table-cell>
          <table:table-cell office:value-type="float" office:value="0.633665666182364" calcext:value-type="float">
            <text:p>0,633666</text:p>
          </table:table-cell>
        </table:table-row>
        <table:table-row table:style-name="ro1" table:visibility="filter">
          <table:table-cell office:value-type="string" calcext:value-type="string">
            <text:p>ALAGOINHAS II</text:p>
          </table:table-cell>
          <table:table-cell office:value-type="string" calcext:value-type="string">
            <text:p>OLINDINA</text:p>
          </table:table-cell>
          <table:table-cell office:value-type="float" office:value="0.32969210634486" calcext:value-type="float">
            <text:p>0,329692</text:p>
          </table:table-cell>
          <table:table-cell office:value-type="float" office:value="0.472598630846391" calcext:value-type="float">
            <text:p>0,472599</text:p>
          </table:table-cell>
        </table:table-row>
        <table:table-row table:style-name="ro1" table:visibility="filter">
          <table:table-cell office:value-type="string" calcext:value-type="string">
            <text:p>ALEGRETE2</text:p>
          </table:table-cell>
          <table:table-cell office:value-type="string" calcext:value-type="string">
            <text:p>LIVRAMENTO 3</text:p>
          </table:table-cell>
          <table:table-cell office:value-type="float" office:value="0.472360254600418" calcext:value-type="float">
            <text:p>0,472360</text:p>
          </table:table-cell>
          <table:table-cell office:value-type="float" office:value="0.866503563982837" calcext:value-type="float">
            <text:p>0,866504</text:p>
          </table:table-cell>
        </table:table-row>
        <table:table-row table:style-name="ro1" table:visibility="filter">
          <table:table-cell office:value-type="string" calcext:value-type="string">
            <text:p>ALEGRETE2</text:p>
          </table:table-cell>
          <table:table-cell office:value-type="string" calcext:value-type="string">
            <text:p>S.VICENTE SUL</text:p>
          </table:table-cell>
          <table:table-cell office:value-type="float" office:value="0.339065480767745" calcext:value-type="float">
            <text:p>0,339065</text:p>
          </table:table-cell>
          <table:table-cell office:value-type="float" office:value="0.621985962297653" calcext:value-type="float">
            <text:p>0,621986</text:p>
          </table:table-cell>
        </table:table-row>
        <table:table-row table:style-name="ro1" table:visibility="filter">
          <table:table-cell office:value-type="string" calcext:value-type="string">
            <text:p>ALEGRETE2</text:p>
          </table:table-cell>
          <table:table-cell office:value-type="string" calcext:value-type="string">
            <text:p>U.URUGUAIANA</text:p>
          </table:table-cell>
          <table:table-cell office:value-type="float" office:value="0.44130795085742" calcext:value-type="float">
            <text:p>0,441308</text:p>
          </table:table-cell>
          <table:table-cell office:value-type="float" office:value="0.809540829288009" calcext:value-type="float">
            <text:p>0,809541</text:p>
          </table:table-cell>
        </table:table-row>
        <table:table-row table:style-name="ro1" table:visibility="filter">
          <table:table-cell office:value-type="string" calcext:value-type="string">
            <text:p>ALEGRETE2</text:p>
          </table:table-cell>
          <table:table-cell office:value-type="string" calcext:value-type="string">
            <text:p>URUGUAIANA5</text:p>
          </table:table-cell>
          <table:table-cell office:value-type="float" office:value="0.345805174347467" calcext:value-type="float">
            <text:p>0,345805</text:p>
          </table:table-cell>
          <table:table-cell office:value-type="float" office:value="0.634349340566895" calcext:value-type="float">
            <text:p>0,634349</text:p>
          </table:table-cell>
        </table:table-row>
        <table:table-row table:style-name="ro1" table:visibility="filter">
          <table:table-cell office:value-type="string" calcext:value-type="string">
            <text:p>ALEX</text:p>
          </table:table-cell>
          <table:table-cell office:value-type="string" calcext:value-type="string">
            <text:p>BANABUIU</text:p>
          </table:table-cell>
          <table:table-cell office:value-type="float" office:value="0.323448618782534" calcext:value-type="float">
            <text:p>0,323449</text:p>
          </table:table-cell>
          <table:table-cell office:value-type="float" office:value="0.573230753956314" calcext:value-type="float">
            <text:p>0,573231</text:p>
          </table:table-cell>
        </table:table-row>
        <table:table-row table:style-name="ro1" table:visibility="filter">
          <table:table-cell office:value-type="string" calcext:value-type="string">
            <text:p>ALTA PAULISTA</text:p>
          </table:table-cell>
          <table:table-cell office:value-type="string" calcext:value-type="string">
            <text:p>MARECH.RONDON</text:p>
          </table:table-cell>
          <table:table-cell office:value-type="float" office:value="1.38370834951402" calcext:value-type="float">
            <text:p>1,383708</text:p>
          </table:table-cell>
          <table:table-cell office:value-type="float" office:value="1.93729081582201" calcext:value-type="float">
            <text:p>1,937291</text:p>
          </table:table-cell>
        </table:table-row>
        <table:table-row table:style-name="ro1" table:visibility="filter">
          <table:table-cell office:value-type="string" calcext:value-type="string">
            <text:p>ALTA PAULISTA</text:p>
          </table:table-cell>
          <table:table-cell office:value-type="string" calcext:value-type="string">
            <text:p>TAQUARUCU</text:p>
          </table:table-cell>
          <table:table-cell office:value-type="float" office:value="1.30489258756251" calcext:value-type="float">
            <text:p>1,304893</text:p>
          </table:table-cell>
          <table:table-cell office:value-type="float" office:value="1.88138347102968" calcext:value-type="float">
            <text:p>1,881383</text:p>
          </table:table-cell>
        </table:table-row>
        <table:table-row table:style-name="ro1" table:visibility="filter">
          <table:table-cell office:value-type="string" calcext:value-type="string">
            <text:p>ALTAMIRA</text:p>
          </table:table-cell>
          <table:table-cell office:value-type="string" calcext:value-type="string">
            <text:p>TRANSAMAZONIC</text:p>
          </table:table-cell>
          <table:table-cell office:value-type="float" office:value="0.53106233324385" calcext:value-type="float">
            <text:p>0,531062</text:p>
          </table:table-cell>
          <table:table-cell office:value-type="float" office:value="0.902331140016008" calcext:value-type="float">
            <text:p>0,902331</text:p>
          </table:table-cell>
        </table:table-row>
        <table:table-row table:style-name="ro1" table:visibility="filter">
          <table:table-cell office:value-type="string" calcext:value-type="string">
            <text:p>ALTAMIRA</text:p>
          </table:table-cell>
          <table:table-cell office:value-type="string" calcext:value-type="string">
            <text:p>XINGU</text:p>
          </table:table-cell>
          <table:table-cell office:value-type="float" office:value="0.714057026964796" calcext:value-type="float">
            <text:p>0,714057</text:p>
          </table:table-cell>
          <table:table-cell office:value-type="float" office:value="0.878551571329753" calcext:value-type="float">
            <text:p>0,878552</text:p>
          </table:table-cell>
        </table:table-row>
        <table:table-row table:style-name="ro1" table:visibility="filter">
          <table:table-cell office:value-type="string" calcext:value-type="string">
            <text:p>ANASTACIO</text:p>
          </table:table-cell>
          <table:table-cell office:value-type="string" calcext:value-type="string">
            <text:p>CORUMBA 2</text:p>
          </table:table-cell>
          <table:table-cell office:value-type="float" office:value="0.574681036446689" calcext:value-type="float">
            <text:p>0,574681</text:p>
          </table:table-cell>
          <table:table-cell office:value-type="float" office:value="1.02617205379515" calcext:value-type="float">
            <text:p>1,026172</text:p>
          </table:table-cell>
        </table:table-row>
        <table:table-row table:style-name="ro1" table:visibility="filter">
          <table:table-cell office:value-type="string" calcext:value-type="string">
            <text:p>ANASTACIO</text:p>
          </table:table-cell>
          <table:table-cell office:value-type="string" calcext:value-type="string">
            <text:p>SIDROLANDIA 2</text:p>
          </table:table-cell>
          <table:table-cell office:value-type="float" office:value="0.467426009828034" calcext:value-type="float">
            <text:p>0,467426</text:p>
          </table:table-cell>
          <table:table-cell office:value-type="float" office:value="0.834653447881784" calcext:value-type="float">
            <text:p>0,834653</text:p>
          </table:table-cell>
        </table:table-row>
        <table:table-row table:style-name="ro1" table:visibility="filter">
          <table:table-cell office:value-type="string" calcext:value-type="string">
            <text:p>ANDIRA LESTE</text:p>
          </table:table-cell>
          <table:table-cell office:value-type="string" calcext:value-type="string">
            <text:p>ASSIS</text:p>
          </table:table-cell>
          <table:table-cell office:value-type="float" office:value="0.413324528759071" calcext:value-type="float">
            <text:p>0,413325</text:p>
          </table:table-cell>
          <table:table-cell office:value-type="float" office:value="0.648659757127348" calcext:value-type="float">
            <text:p>0,648660</text:p>
          </table:table-cell>
        </table:table-row>
        <table:table-row table:style-name="ro1" table:visibility="filter">
          <table:table-cell office:value-type="string" calcext:value-type="string">
            <text:p>ANGELIM</text:p>
          </table:table-cell>
          <table:table-cell office:value-type="string" calcext:value-type="string">
            <text:p>GARANHUNS II</text:p>
          </table:table-cell>
          <table:table-cell office:value-type="float" office:value="0.490394117975783" calcext:value-type="float">
            <text:p>0,490394</text:p>
          </table:table-cell>
          <table:table-cell office:value-type="float" office:value="0.72214927590628" calcext:value-type="float">
            <text:p>0,722149</text:p>
          </table:table-cell>
        </table:table-row>
        <table:table-row table:style-name="ro1" table:visibility="filter">
          <table:table-cell office:value-type="string" calcext:value-type="string">
            <text:p>ANGRA FUR</text:p>
          </table:table-cell>
          <table:table-cell office:value-type="string" calcext:value-type="string">
            <text:p>C. PAULISTA</text:p>
          </table:table-cell>
          <table:table-cell office:value-type="float" office:value="1.15154231090794" calcext:value-type="float">
            <text:p>1,151542</text:p>
          </table:table-cell>
          <table:table-cell office:value-type="float" office:value="1.51819474976226" calcext:value-type="float">
            <text:p>1,518195</text:p>
          </table:table-cell>
        </table:table-row>
        <table:table-row table:style-name="ro1" table:visibility="filter">
          <table:table-cell office:value-type="string" calcext:value-type="string">
            <text:p>ANGRA FUR</text:p>
          </table:table-cell>
          <table:table-cell office:value-type="string" calcext:value-type="string">
            <text:p>ZONA OESTE</text:p>
          </table:table-cell>
          <table:table-cell office:value-type="float" office:value="1.14433179647059" calcext:value-type="float">
            <text:p>1,144332</text:p>
          </table:table-cell>
          <table:table-cell office:value-type="float" office:value="1.4787431055567" calcext:value-type="float">
            <text:p>1,478743</text:p>
          </table:table-cell>
        </table:table-row>
        <table:table-row table:style-name="ro1" table:visibility="filter">
          <table:table-cell office:value-type="string" calcext:value-type="string">
            <text:p>ANHANGUERA</text:p>
          </table:table-cell>
          <table:table-cell office:value-type="string" calcext:value-type="string">
            <text:p>C. DOURADA</text:p>
          </table:table-cell>
          <table:table-cell office:value-type="float" office:value="0.384288540404269" calcext:value-type="float">
            <text:p>0,384289</text:p>
          </table:table-cell>
          <table:table-cell office:value-type="float" office:value="0.652272703798613" calcext:value-type="float">
            <text:p>0,652273</text:p>
          </table:table-cell>
        </table:table-row>
        <table:table-row table:style-name="ro1" table:visibility="filter">
          <table:table-cell office:value-type="string" calcext:value-type="string">
            <text:p>ANHANGUERA</text:p>
          </table:table-cell>
          <table:table-cell office:value-type="string" calcext:value-type="string">
            <text:p>CENTRO-CTT</text:p>
          </table:table-cell>
          <table:table-cell office:value-type="float" office:value="0.346276138340875" calcext:value-type="float">
            <text:p>0,346276</text:p>
          </table:table-cell>
          <table:table-cell office:value-type="float" office:value="0.606708627968782" calcext:value-type="float">
            <text:p>0,606709</text:p>
          </table:table-cell>
        </table:table-row>
        <table:table-row table:style-name="ro1" table:visibility="filter">
          <table:table-cell office:value-type="string" calcext:value-type="string">
            <text:p>ANHANGUERA</text:p>
          </table:table-cell>
          <table:table-cell office:value-type="string" calcext:value-type="string">
            <text:p>GUARULHOS</text:p>
          </table:table-cell>
          <table:table-cell office:value-type="float" office:value="1.2721857607914" calcext:value-type="float">
            <text:p>1,272186</text:p>
          </table:table-cell>
          <table:table-cell office:value-type="float" office:value="2.06225271102911" calcext:value-type="float">
            <text:p>2,062253</text:p>
          </table:table-cell>
        </table:table-row>
        <table:table-row table:style-name="ro1" table:visibility="filter">
          <table:table-cell office:value-type="string" calcext:value-type="string">
            <text:p>ANHANGUERA</text:p>
          </table:table-cell>
          <table:table-cell office:value-type="string" calcext:value-type="string">
            <text:p>M. FORNASARO</text:p>
          </table:table-cell>
          <table:table-cell office:value-type="float" office:value="1.1431923962286" calcext:value-type="float">
            <text:p>1,143192</text:p>
          </table:table-cell>
          <table:table-cell office:value-type="float" office:value="1.85315045255948" calcext:value-type="float">
            <text:p>1,853150</text:p>
          </table:table-cell>
        </table:table-row>
        <table:table-row table:style-name="ro1" table:visibility="filter">
          <table:table-cell office:value-type="string" calcext:value-type="string">
            <text:p>ANHANGUERA</text:p>
          </table:table-cell>
          <table:table-cell office:value-type="string" calcext:value-type="string">
            <text:p>PLANALTO</text:p>
          </table:table-cell>
          <table:table-cell office:value-type="float" office:value="0.331704258906996" calcext:value-type="float">
            <text:p>0,331704</text:p>
          </table:table-cell>
          <table:table-cell office:value-type="float" office:value="0.563018698374847" calcext:value-type="float">
            <text:p>0,563019</text:p>
          </table:table-cell>
        </table:table-row>
        <table:table-row table:style-name="ro1" table:visibility="filter">
          <table:table-cell office:value-type="string" calcext:value-type="string">
            <text:p>APARECIDA</text:p>
          </table:table-cell>
          <table:table-cell office:value-type="string" calcext:value-type="string">
            <text:p>LORENA</text:p>
          </table:table-cell>
          <table:table-cell office:value-type="float" office:value="0.572990324464935" calcext:value-type="float">
            <text:p>0,572990</text:p>
          </table:table-cell>
          <table:table-cell office:value-type="float" office:value="0.914505705316144" calcext:value-type="float">
            <text:p>0,914506</text:p>
          </table:table-cell>
        </table:table-row>
        <table:table-row table:style-name="ro1" table:visibility="filter">
          <table:table-cell office:value-type="string" calcext:value-type="string">
            <text:p>APERAM</text:p>
          </table:table-cell>
          <table:table-cell office:value-type="string" calcext:value-type="string">
            <text:p>TIMOTEO 2</text:p>
          </table:table-cell>
          <table:table-cell office:value-type="float" office:value="0.254113708349989" calcext:value-type="float">
            <text:p>0,254114</text:p>
          </table:table-cell>
          <table:table-cell office:value-type="float" office:value="0.467436782517718" calcext:value-type="float">
            <text:p>0,467437</text:p>
          </table:table-cell>
        </table:table-row>
        <table:table-row table:style-name="ro1" table:visibility="filter">
          <table:table-cell office:value-type="string" calcext:value-type="string">
            <text:p>AQUIRAZ II</text:p>
          </table:table-cell>
          <table:table-cell office:value-type="string" calcext:value-type="string">
            <text:p>BANABUIU</text:p>
          </table:table-cell>
          <table:table-cell office:value-type="float" office:value="0.367143277789237" calcext:value-type="float">
            <text:p>0,367143</text:p>
          </table:table-cell>
          <table:table-cell office:value-type="float" office:value="0.650668470093592" calcext:value-type="float">
            <text:p>0,650668</text:p>
          </table:table-cell>
        </table:table-row>
        <table:table-row table:style-name="ro1" table:visibility="filter">
          <table:table-cell office:value-type="string" calcext:value-type="string">
            <text:p>ARACUAI 2</text:p>
          </table:table-cell>
          <table:table-cell office:value-type="string" calcext:value-type="string">
            <text:p>IRAPE-SE</text:p>
          </table:table-cell>
          <table:table-cell office:value-type="float" office:value="0.516951689143522" calcext:value-type="float">
            <text:p>0,516952</text:p>
          </table:table-cell>
          <table:table-cell office:value-type="float" office:value="0.879797519732235" calcext:value-type="float">
            <text:p>0,879798</text:p>
          </table:table-cell>
        </table:table-row>
        <table:table-row table:style-name="ro1" table:visibility="filter">
          <table:table-cell office:value-type="string" calcext:value-type="string">
            <text:p>ARAPIRACA III</text:p>
          </table:table-cell>
          <table:table-cell office:value-type="string" calcext:value-type="string">
            <text:p>RIO LARGO II</text:p>
          </table:table-cell>
          <table:table-cell office:value-type="float" office:value="0.326608140826521" calcext:value-type="float">
            <text:p>0,326608</text:p>
          </table:table-cell>
          <table:table-cell office:value-type="float" office:value="0.551706471330735" calcext:value-type="float">
            <text:p>0,551706</text:p>
          </table:table-cell>
        </table:table-row>
        <table:table-row table:style-name="ro1" table:visibility="filter">
          <table:table-cell office:value-type="string" calcext:value-type="string">
            <text:p>ARARAQUARA 2</text:p>
          </table:table-cell>
          <table:table-cell office:value-type="string" calcext:value-type="string">
            <text:p>ARARAQUARA FUR</text:p>
          </table:table-cell>
          <table:table-cell office:value-type="float" office:value="1.26441122672939" calcext:value-type="float">
            <text:p>1,264411</text:p>
          </table:table-cell>
          <table:table-cell office:value-type="float" office:value="1.61079058414708" calcext:value-type="float">
            <text:p>1,610791</text:p>
          </table:table-cell>
        </table:table-row>
        <table:table-row table:style-name="ro1" table:visibility="filter">
          <table:table-cell office:value-type="string" calcext:value-type="string">
            <text:p>ARARAQUARA 2</text:p>
          </table:table-cell>
          <table:table-cell office:value-type="string" calcext:value-type="string">
            <text:p>FERNAO DIAS</text:p>
          </table:table-cell>
          <table:table-cell office:value-type="float" office:value="1.71803352649392" calcext:value-type="float">
            <text:p>1,718034</text:p>
          </table:table-cell>
          <table:table-cell office:value-type="float" office:value="2.1886805251514" calcext:value-type="float">
            <text:p>2,188681</text:p>
          </table:table-cell>
        </table:table-row>
        <table:table-row table:style-name="ro1" table:visibility="filter">
          <table:table-cell office:value-type="string" calcext:value-type="string">
            <text:p>ARARAQUARA 2</text:p>
          </table:table-cell>
          <table:table-cell office:value-type="string" calcext:value-type="string">
            <text:p>ITATIBA</text:p>
          </table:table-cell>
          <table:table-cell office:value-type="float" office:value="1.70458704417875" calcext:value-type="float">
            <text:p>1,704587</text:p>
          </table:table-cell>
          <table:table-cell office:value-type="float" office:value="2.1715504438572" calcext:value-type="float">
            <text:p>2,171550</text:p>
          </table:table-cell>
        </table:table-row>
        <table:table-row table:style-name="ro1" table:visibility="filter">
          <table:table-cell office:value-type="string" calcext:value-type="string">
            <text:p>ARARAQUARA 2</text:p>
          </table:table-cell>
          <table:table-cell office:value-type="string" calcext:value-type="string">
            <text:p>NOVA PONTE 3</text:p>
          </table:table-cell>
          <table:table-cell office:value-type="float" office:value="1.63167595000855" calcext:value-type="float">
            <text:p>1,631676</text:p>
          </table:table-cell>
          <table:table-cell office:value-type="float" office:value="2.04869743991797" calcext:value-type="float">
            <text:p>2,048697</text:p>
          </table:table-cell>
        </table:table-row>
        <table:table-row table:style-name="ro1" table:visibility="filter">
          <table:table-cell office:value-type="string" calcext:value-type="string">
            <text:p>ARARAQUARA 2</text:p>
          </table:table-cell>
          <table:table-cell office:value-type="string" calcext:value-type="string">
            <text:p>TAUBATE</text:p>
          </table:table-cell>
          <table:table-cell office:value-type="float" office:value="1.55484604496447" calcext:value-type="float">
            <text:p>1,554846</text:p>
          </table:table-cell>
          <table:table-cell office:value-type="float" office:value="1.98078862009593" calcext:value-type="float">
            <text:p>1,980789</text:p>
          </table:table-cell>
        </table:table-row>
        <table:table-row table:style-name="ro1" table:visibility="filter">
          <table:table-cell office:value-type="string" calcext:value-type="string">
            <text:p>ARARAQUARA CTP</text:p>
          </table:table-cell>
          <table:table-cell office:value-type="string" calcext:value-type="string">
            <text:p>ARARAS</text:p>
          </table:table-cell>
          <table:table-cell office:value-type="float" office:value="1.0378444008979" calcext:value-type="float">
            <text:p>1,037844</text:p>
          </table:table-cell>
          <table:table-cell office:value-type="float" office:value="1.4963555774329" calcext:value-type="float">
            <text:p>1,496356</text:p>
          </table:table-cell>
        </table:table-row>
        <table:table-row table:style-name="ro1" table:visibility="filter">
          <table:table-cell office:value-type="string" calcext:value-type="string">
            <text:p>ARARAQUARA CTP</text:p>
          </table:table-cell>
          <table:table-cell office:value-type="string" calcext:value-type="string">
            <text:p>MIRASSOL II</text:p>
          </table:table-cell>
          <table:table-cell office:value-type="float" office:value="1.15577064170095" calcext:value-type="float">
            <text:p>1,155771</text:p>
          </table:table-cell>
          <table:table-cell office:value-type="float" office:value="1.66638066789797" calcext:value-type="float">
            <text:p>1,666381</text:p>
          </table:table-cell>
        </table:table-row>
        <table:table-row table:style-name="ro1" table:visibility="filter">
          <table:table-cell office:value-type="string" calcext:value-type="string">
            <text:p>ARARAQUARA CTP</text:p>
          </table:table-cell>
          <table:table-cell office:value-type="string" calcext:value-type="string">
            <text:p>PIRACICABA</text:p>
          </table:table-cell>
          <table:table-cell office:value-type="float" office:value="1.06533005947673" calcext:value-type="float">
            <text:p>1,065330</text:p>
          </table:table-cell>
          <table:table-cell office:value-type="float" office:value="1.53598417539831" calcext:value-type="float">
            <text:p>1,535984</text:p>
          </table:table-cell>
        </table:table-row>
        <table:table-row table:style-name="ro1" table:visibility="filter">
          <table:table-cell office:value-type="string" calcext:value-type="string">
            <text:p>ARCOVERDE II</text:p>
          </table:table-cell>
          <table:table-cell office:value-type="string" calcext:value-type="string">
            <text:p>CAETES II</text:p>
          </table:table-cell>
          <table:table-cell office:value-type="float" office:value="0.35743098104898" calcext:value-type="float">
            <text:p>0,357431</text:p>
          </table:table-cell>
          <table:table-cell office:value-type="float" office:value="0.624508753920696" calcext:value-type="float">
            <text:p>0,624509</text:p>
          </table:table-cell>
        </table:table-row>
        <table:table-row table:style-name="ro1" table:visibility="filter">
          <table:table-cell office:value-type="string" calcext:value-type="string">
            <text:p>ARCOVERDE II</text:p>
          </table:table-cell>
          <table:table-cell office:value-type="string" calcext:value-type="string">
            <text:p>GARANHUNS II</text:p>
          </table:table-cell>
          <table:table-cell office:value-type="float" office:value="0.457734459562872" calcext:value-type="float">
            <text:p>0,457734</text:p>
          </table:table-cell>
          <table:table-cell office:value-type="float" office:value="0.674055002729466" calcext:value-type="float">
            <text:p>0,674055</text:p>
          </table:table-cell>
        </table:table-row>
        <table:table-row table:style-name="ro1" table:visibility="filter">
          <table:table-cell office:value-type="string" calcext:value-type="string">
            <text:p>AREIA</text:p>
          </table:table-cell>
          <table:table-cell office:value-type="string" calcext:value-type="string">
            <text:p>CURITIBA</text:p>
          </table:table-cell>
          <table:table-cell office:value-type="float" office:value="1.34902396990287" calcext:value-type="float">
            <text:p>1,349024</text:p>
          </table:table-cell>
          <table:table-cell office:value-type="float" office:value="1.75454746437849" calcext:value-type="float">
            <text:p>1,754547</text:p>
          </table:table-cell>
        </table:table-row>
        <table:table-row table:style-name="ro1" table:visibility="filter">
          <table:table-cell office:value-type="string" calcext:value-type="string">
            <text:p>AREIA</text:p>
          </table:table-cell>
          <table:table-cell office:value-type="string" calcext:value-type="string">
            <text:p>GUARAPUAVA OEST</text:p>
          </table:table-cell>
          <table:table-cell office:value-type="float" office:value="0.419213687575842" calcext:value-type="float">
            <text:p>0,419214</text:p>
          </table:table-cell>
          <table:table-cell office:value-type="float" office:value="0.646929202558157" calcext:value-type="float">
            <text:p>0,646929</text:p>
          </table:table-cell>
        </table:table-row>
        <table:table-row table:style-name="ro1" table:visibility="filter">
          <table:table-cell office:value-type="string" calcext:value-type="string">
            <text:p>AREIA</text:p>
          </table:table-cell>
          <table:table-cell office:value-type="string" calcext:value-type="string">
            <text:p>JOINVILLE SUL</text:p>
          </table:table-cell>
          <table:table-cell office:value-type="float" office:value="1.54337097824043" calcext:value-type="float">
            <text:p>1,543371</text:p>
          </table:table-cell>
          <table:table-cell office:value-type="float" office:value="2.02851162966124" calcext:value-type="float">
            <text:p>2,028512</text:p>
          </table:table-cell>
        </table:table-row>
        <table:table-row table:style-name="ro1" table:visibility="filter">
          <table:table-cell office:value-type="string" calcext:value-type="string">
            <text:p>ARINOS 2</text:p>
          </table:table-cell>
          <table:table-cell office:value-type="string" calcext:value-type="string">
            <text:p>PARACATU 4</text:p>
          </table:table-cell>
          <table:table-cell office:value-type="float" office:value="1.4809141422646" calcext:value-type="float">
            <text:p>1,480914</text:p>
          </table:table-cell>
          <table:table-cell office:value-type="float" office:value="1.93495393726603" calcext:value-type="float">
            <text:p>1,934954</text:p>
          </table:table-cell>
        </table:table-row>
        <table:table-row table:style-name="ro1" table:visibility="filter">
          <table:table-cell office:value-type="string" calcext:value-type="string">
            <text:p>ARIQUEMES</text:p>
          </table:table-cell>
          <table:table-cell office:value-type="string" calcext:value-type="string">
            <text:p>JARU</text:p>
          </table:table-cell>
          <table:table-cell office:value-type="float" office:value="0.30156406538179" calcext:value-type="float">
            <text:p>0,301564</text:p>
          </table:table-cell>
          <table:table-cell office:value-type="float" office:value="0.517379070790593" calcext:value-type="float">
            <text:p>0,517379</text:p>
          </table:table-cell>
        </table:table-row>
        <table:table-row table:style-name="ro1" table:visibility="filter">
          <table:table-cell office:value-type="string" calcext:value-type="string">
            <text:p>ARIQUEMES</text:p>
          </table:table-cell>
          <table:table-cell office:value-type="string" calcext:value-type="string">
            <text:p>JI-PARANA</text:p>
          </table:table-cell>
          <table:table-cell office:value-type="float" office:value="0.484083187143711" calcext:value-type="float">
            <text:p>0,484083</text:p>
          </table:table-cell>
          <table:table-cell office:value-type="float" office:value="0.830518414827306" calcext:value-type="float">
            <text:p>0,830518</text:p>
          </table:table-cell>
        </table:table-row>
        <table:table-row table:style-name="ro1" table:visibility="filter">
          <table:table-cell office:value-type="string" calcext:value-type="string">
            <text:p>ARIQUEMES</text:p>
          </table:table-cell>
          <table:table-cell office:value-type="string" calcext:value-type="string">
            <text:p>SAMUEL</text:p>
          </table:table-cell>
          <table:table-cell office:value-type="float" office:value="0.480307196578256" calcext:value-type="float">
            <text:p>0,480307</text:p>
          </table:table-cell>
          <table:table-cell office:value-type="float" office:value="0.82404012807389" calcext:value-type="float">
            <text:p>0,824040</text:p>
          </table:table-cell>
        </table:table-row>
        <table:table-row table:style-name="ro1" table:visibility="filter">
          <table:table-cell office:value-type="string" calcext:value-type="string">
            <text:p>ASOLO 2</text:p>
          </table:table-cell>
          <table:table-cell office:value-type="string" calcext:value-type="string">
            <text:p>C. DOURADA</text:p>
          </table:table-cell>
          <table:table-cell office:value-type="float" office:value="0.159700914136278" calcext:value-type="float">
            <text:p>0,159701</text:p>
          </table:table-cell>
          <table:table-cell office:value-type="float" office:value="0.283830845358862" calcext:value-type="float">
            <text:p>0,283831</text:p>
          </table:table-cell>
        </table:table-row>
        <table:table-row table:style-name="ro1" table:visibility="filter">
          <table:table-cell office:value-type="string" calcext:value-type="string">
            <text:p>ASSIS</text:p>
          </table:table-cell>
          <table:table-cell office:value-type="string" calcext:value-type="string">
            <text:p>CAPIVARA</text:p>
          </table:table-cell>
          <table:table-cell office:value-type="float" office:value="1.19957964913367" calcext:value-type="float">
            <text:p>1,199580</text:p>
          </table:table-cell>
          <table:table-cell office:value-type="float" office:value="1.67054266225721" calcext:value-type="float">
            <text:p>1,670543</text:p>
          </table:table-cell>
        </table:table-row>
        <table:table-row table:style-name="ro1" table:visibility="filter">
          <table:table-cell office:value-type="string" calcext:value-type="string">
            <text:p>ASSIS</text:p>
          </table:table-cell>
          <table:table-cell office:value-type="string" calcext:value-type="string">
            <text:p>MARIMBONDO II</text:p>
          </table:table-cell>
          <table:table-cell office:value-type="float" office:value="1.65544862478274" calcext:value-type="float">
            <text:p>1,655449</text:p>
          </table:table-cell>
          <table:table-cell office:value-type="float" office:value="2.1946399686964" calcext:value-type="float">
            <text:p>2,194640</text:p>
          </table:table-cell>
        </table:table-row>
        <table:table-row table:style-name="ro1" table:visibility="filter">
          <table:table-cell office:value-type="string" calcext:value-type="string">
            <text:p>ASSIS</text:p>
          </table:table-cell>
          <table:table-cell office:value-type="string" calcext:value-type="string">
            <text:p>PAR.PAULISTA2</text:p>
          </table:table-cell>
          <table:table-cell office:value-type="float" office:value="0.40953015792543" calcext:value-type="float">
            <text:p>0,409530</text:p>
          </table:table-cell>
          <table:table-cell office:value-type="float" office:value="0.653619528866489" calcext:value-type="float">
            <text:p>0,653620</text:p>
          </table:table-cell>
        </table:table-row>
        <table:table-row table:style-name="ro1" table:visibility="filter">
          <table:table-cell office:value-type="string" calcext:value-type="string">
            <text:p>ASSIS</text:p>
          </table:table-cell>
          <table:table-cell office:value-type="string" calcext:value-type="string">
            <text:p>SUMARE</text:p>
          </table:table-cell>
          <table:table-cell office:value-type="float" office:value="1.19385027279464" calcext:value-type="float">
            <text:p>1,193850</text:p>
          </table:table-cell>
          <table:table-cell office:value-type="float" office:value="1.66256389435348" calcext:value-type="float">
            <text:p>1,662564</text:p>
          </table:table-cell>
        </table:table-row>
        <table:table-row table:style-name="ro1" table:visibility="filter">
          <table:table-cell office:value-type="string" calcext:value-type="string">
            <text:p>ASSIS</text:p>
          </table:table-cell>
          <table:table-cell office:value-type="string" calcext:value-type="string">
            <text:p>TAQUARUCU</text:p>
          </table:table-cell>
          <table:table-cell office:value-type="float" office:value="1.14047592356821" calcext:value-type="float">
            <text:p>1,140476</text:p>
          </table:table-cell>
          <table:table-cell office:value-type="float" office:value="1.58823441775944" calcext:value-type="float">
            <text:p>1,588234</text:p>
          </table:table-cell>
        </table:table-row>
        <table:table-row table:style-name="ro1" table:visibility="filter">
          <table:table-cell office:value-type="string" calcext:value-type="string">
            <text:p>ATIBAIA II</text:p>
          </table:table-cell>
          <table:table-cell office:value-type="string" calcext:value-type="string">
            <text:p>POCOS CALDAS</text:p>
          </table:table-cell>
          <table:table-cell office:value-type="float" office:value="0.726141070210951" calcext:value-type="float">
            <text:p>0,726141</text:p>
          </table:table-cell>
          <table:table-cell office:value-type="float" office:value="1.05678600318324" calcext:value-type="float">
            <text:p>1,056786</text:p>
          </table:table-cell>
        </table:table-row>
        <table:table-row table:style-name="ro1" table:visibility="filter">
          <table:table-cell office:value-type="string" calcext:value-type="string">
            <text:p>ATLANTIDA 2</text:p>
          </table:table-cell>
          <table:table-cell office:value-type="string" calcext:value-type="string">
            <text:p>GRAVATAI3</text:p>
          </table:table-cell>
          <table:table-cell office:value-type="float" office:value="0.324040047946906" calcext:value-type="float">
            <text:p>0,324040</text:p>
          </table:table-cell>
          <table:table-cell office:value-type="float" office:value="0.594423120244704" calcext:value-type="float">
            <text:p>0,594423</text:p>
          </table:table-cell>
        </table:table-row>
        <table:table-row table:style-name="ro1" table:visibility="filter">
          <table:table-cell office:value-type="string" calcext:value-type="string">
            <text:p>ATLANTIDA 2</text:p>
          </table:table-cell>
          <table:table-cell office:value-type="string" calcext:value-type="string">
            <text:p>TORRES 2</text:p>
          </table:table-cell>
          <table:table-cell office:value-type="float" office:value="0.344501244947412" calcext:value-type="float">
            <text:p>0,344501</text:p>
          </table:table-cell>
          <table:table-cell office:value-type="float" office:value="0.631957396153018" calcext:value-type="float">
            <text:p>0,631957</text:p>
          </table:table-cell>
        </table:table-row>
        <table:table-row table:style-name="ro1" table:visibility="filter">
          <table:table-cell office:value-type="string" calcext:value-type="string">
            <text:p>AVARE NOVA</text:p>
          </table:table-cell>
          <table:table-cell office:value-type="string" calcext:value-type="string">
            <text:p>BOTUCATU</text:p>
          </table:table-cell>
          <table:table-cell office:value-type="float" office:value="0.323383646964245" calcext:value-type="float">
            <text:p>0,323384</text:p>
          </table:table-cell>
          <table:table-cell office:value-type="float" office:value="0.612409490717571" calcext:value-type="float">
            <text:p>0,612409</text:p>
          </table:table-cell>
        </table:table-row>
        <table:table-row table:style-name="ro1" table:visibility="filter">
          <table:table-cell office:value-type="string" calcext:value-type="string">
            <text:p>B. ESPERANCA</text:p>
          </table:table-cell>
          <table:table-cell office:value-type="string" calcext:value-type="string">
            <text:p>TERESINA</text:p>
          </table:table-cell>
          <table:table-cell office:value-type="float" office:value="0.415227907572883" calcext:value-type="float">
            <text:p>0,415228</text:p>
          </table:table-cell>
          <table:table-cell office:value-type="float" office:value="0.594632237308461" calcext:value-type="float">
            <text:p>0,594632</text:p>
          </table:table-cell>
        </table:table-row>
        <table:table-row table:style-name="ro1" table:visibility="filter">
          <table:table-cell office:value-type="string" calcext:value-type="string">
            <text:p>B. ESPERANCA</text:p>
          </table:table-cell>
          <table:table-cell office:value-type="string" calcext:value-type="string">
            <text:p>UB.ESPERANCA</text:p>
          </table:table-cell>
          <table:table-cell office:value-type="float" office:value="0.30839411753623" calcext:value-type="float">
            <text:p>0,308394</text:p>
          </table:table-cell>
          <table:table-cell office:value-type="float" office:value="0.441639592953297" calcext:value-type="float">
            <text:p>0,441640</text:p>
          </table:table-cell>
        </table:table-row>
        <table:table-row table:style-name="ro1" table:visibility="filter">
          <table:table-cell office:value-type="string" calcext:value-type="string">
            <text:p>B. FLUMINENSE</text:p>
          </table:table-cell>
          <table:table-cell office:value-type="string" calcext:value-type="string">
            <text:p>C. PAULISTA</text:p>
          </table:table-cell>
          <table:table-cell office:value-type="float" office:value="1.36985972398325" calcext:value-type="float">
            <text:p>1,369860</text:p>
          </table:table-cell>
          <table:table-cell office:value-type="float" office:value="1.80602468633774" calcext:value-type="float">
            <text:p>1,806025</text:p>
          </table:table-cell>
        </table:table-row>
        <table:table-row table:style-name="ro1" table:visibility="filter">
          <table:table-cell office:value-type="string" calcext:value-type="string">
            <text:p>B. SANTISTA</text:p>
          </table:table-cell>
          <table:table-cell office:value-type="string" calcext:value-type="string">
            <text:p>CARBOCLORO</text:p>
          </table:table-cell>
          <table:table-cell office:value-type="float" office:value="0.490077843994271" calcext:value-type="float">
            <text:p>0,490078</text:p>
          </table:table-cell>
          <table:table-cell office:value-type="float" office:value="0.858662851423412" calcext:value-type="float">
            <text:p>0,858663</text:p>
          </table:table-cell>
        </table:table-row>
        <table:table-row table:style-name="ro1" table:visibility="filter">
          <table:table-cell office:value-type="string" calcext:value-type="string">
            <text:p>B. SANTISTA</text:p>
          </table:table-cell>
          <table:table-cell office:value-type="string" calcext:value-type="string">
            <text:p>PBR CUBATAO</text:p>
          </table:table-cell>
          <table:table-cell office:value-type="float" office:value="0.490326588200022" calcext:value-type="float">
            <text:p>0,490327</text:p>
          </table:table-cell>
          <table:table-cell office:value-type="float" office:value="0.859098674857592" calcext:value-type="float">
            <text:p>0,859099</text:p>
          </table:table-cell>
        </table:table-row>
        <table:table-row table:style-name="ro1" table:visibility="filter">
          <table:table-cell office:value-type="string" calcext:value-type="string">
            <text:p>B. SANTISTA</text:p>
          </table:table-cell>
          <table:table-cell office:value-type="string" calcext:value-type="string">
            <text:p>TIJUCO PRETO</text:p>
          </table:table-cell>
          <table:table-cell office:value-type="float" office:value="0.981301455461796" calcext:value-type="float">
            <text:p>0,981301</text:p>
          </table:table-cell>
          <table:table-cell office:value-type="float" office:value="1.26511657590492" calcext:value-type="float">
            <text:p>1,265117</text:p>
          </table:table-cell>
        </table:table-row>
        <table:table-row table:style-name="ro1" table:visibility="filter">
          <table:table-cell office:value-type="string" calcext:value-type="string">
            <text:p>B.JESUS LAPA</text:p>
          </table:table-cell>
          <table:table-cell office:value-type="string" calcext:value-type="string">
            <text:p>BOM.JES.LAPA II</text:p>
          </table:table-cell>
          <table:table-cell office:value-type="float" office:value="0.630643399239596" calcext:value-type="float">
            <text:p>0,630643</text:p>
          </table:table-cell>
          <table:table-cell office:value-type="float" office:value="0.903998613546403" calcext:value-type="float">
            <text:p>0,903999</text:p>
          </table:table-cell>
        </table:table-row>
        <table:table-row table:style-name="ro1" table:visibility="filter">
          <table:table-cell office:value-type="string" calcext:value-type="string">
            <text:p>BACABEIRA</text:p>
          </table:table-cell>
          <table:table-cell office:value-type="string" calcext:value-type="string">
            <text:p>PARNAIBA III</text:p>
          </table:table-cell>
          <table:table-cell office:value-type="float" office:value="1.4625475168008" calcext:value-type="float">
            <text:p>1,462548</text:p>
          </table:table-cell>
          <table:table-cell office:value-type="float" office:value="1.75325579816015" calcext:value-type="float">
            <text:p>1,753256</text:p>
          </table:table-cell>
        </table:table-row>
        <table:table-row table:style-name="ro1" table:visibility="filter">
          <table:table-cell office:value-type="string" calcext:value-type="string">
            <text:p>BAGE2</text:p>
          </table:table-cell>
          <table:table-cell office:value-type="string" calcext:value-type="string">
            <text:p>LIVRAMENTO 2</text:p>
          </table:table-cell>
          <table:table-cell office:value-type="float" office:value="0.359140119189172" calcext:value-type="float">
            <text:p>0,359140</text:p>
          </table:table-cell>
          <table:table-cell office:value-type="float" office:value="0.658811130309614" calcext:value-type="float">
            <text:p>0,658811</text:p>
          </table:table-cell>
        </table:table-row>
        <table:table-row table:style-name="ro1" table:visibility="filter">
          <table:table-cell office:value-type="string" calcext:value-type="string">
            <text:p>BAGUACU</text:p>
          </table:table-cell>
          <table:table-cell office:value-type="string" calcext:value-type="string">
            <text:p>ILHA SOLTEIRA</text:p>
          </table:table-cell>
          <table:table-cell office:value-type="float" office:value="1.07994787310911" calcext:value-type="float">
            <text:p>1,079948</text:p>
          </table:table-cell>
          <table:table-cell office:value-type="float" office:value="1.5570600196576" calcext:value-type="float">
            <text:p>1,557060</text:p>
          </table:table-cell>
        </table:table-row>
        <table:table-row table:style-name="ro1" table:visibility="filter">
          <table:table-cell office:value-type="string" calcext:value-type="string">
            <text:p>BAGUARI-SE</text:p>
          </table:table-cell>
          <table:table-cell office:value-type="string" calcext:value-type="string">
            <text:p>MESQUITA</text:p>
          </table:table-cell>
          <table:table-cell office:value-type="float" office:value="0.36965228578206" calcext:value-type="float">
            <text:p>0,369652</text:p>
          </table:table-cell>
          <table:table-cell office:value-type="float" office:value="0.573074608225482" calcext:value-type="float">
            <text:p>0,573075</text:p>
          </table:table-cell>
        </table:table-row>
        <table:table-row table:style-name="ro1" table:visibility="filter">
          <table:table-cell office:value-type="string" calcext:value-type="string">
            <text:p>BAIXO IGUACU</text:p>
          </table:table-cell>
          <table:table-cell office:value-type="string" calcext:value-type="string">
            <text:p>CASCAVEL OEST</text:p>
          </table:table-cell>
          <table:table-cell office:value-type="float" office:value="0.457339237056954" calcext:value-type="float">
            <text:p>0,457339</text:p>
          </table:table-cell>
          <table:table-cell office:value-type="float" office:value="0.705764426821786" calcext:value-type="float">
            <text:p>0,705764</text:p>
          </table:table-cell>
        </table:table-row>
        <table:table-row table:style-name="ro1" table:visibility="filter">
          <table:table-cell office:value-type="string" calcext:value-type="string">
            <text:p>BAIXO IGUACU</text:p>
          </table:table-cell>
          <table:table-cell office:value-type="string" calcext:value-type="string">
            <text:p>REALEZA SUL</text:p>
          </table:table-cell>
          <table:table-cell office:value-type="float" office:value="0.345990041349693" calcext:value-type="float">
            <text:p>0,345990</text:p>
          </table:table-cell>
          <table:table-cell office:value-type="float" office:value="0.633520608194573" calcext:value-type="float">
            <text:p>0,633521</text:p>
          </table:table-cell>
        </table:table-row>
        <table:table-row table:style-name="ro1" table:visibility="filter">
          <table:table-cell office:value-type="string" calcext:value-type="string">
            <text:p>BALSAS</text:p>
          </table:table-cell>
          <table:table-cell office:value-type="string" calcext:value-type="string">
            <text:p>RIB.GONCALVES</text:p>
          </table:table-cell>
          <table:table-cell office:value-type="float" office:value="0.394606513124301" calcext:value-type="float">
            <text:p>0,394607</text:p>
          </table:table-cell>
          <table:table-cell office:value-type="float" office:value="0.561248596497777" calcext:value-type="float">
            <text:p>0,561249</text:p>
          </table:table-cell>
        </table:table-row>
        <table:table-row table:style-name="ro1" table:visibility="filter">
          <table:table-cell office:value-type="string" calcext:value-type="string">
            <text:p>BAR.COQUEIROS</text:p>
          </table:table-cell>
          <table:table-cell office:value-type="string" calcext:value-type="string">
            <text:p>ITAGUACU</text:p>
          </table:table-cell>
          <table:table-cell office:value-type="float" office:value="0.694766736745832" calcext:value-type="float">
            <text:p>0,694767</text:p>
          </table:table-cell>
          <table:table-cell office:value-type="float" office:value="1.04069305848886" calcext:value-type="float">
            <text:p>1,040693</text:p>
          </table:table-cell>
        </table:table-row>
        <table:table-row table:style-name="ro1" table:visibility="filter">
          <table:table-cell office:value-type="string" calcext:value-type="string">
            <text:p>BAR.COQUEIROS</text:p>
          </table:table-cell>
          <table:table-cell office:value-type="string" calcext:value-type="string">
            <text:p>QUIRINOPOLIS2</text:p>
          </table:table-cell>
          <table:table-cell office:value-type="float" office:value="0.325930748929232" calcext:value-type="float">
            <text:p>0,325931</text:p>
          </table:table-cell>
          <table:table-cell office:value-type="float" office:value="0.579265312896641" calcext:value-type="float">
            <text:p>0,579265</text:p>
          </table:table-cell>
        </table:table-row>
        <table:table-row table:style-name="ro1" table:visibility="filter">
          <table:table-cell office:value-type="string" calcext:value-type="string">
            <text:p>BARAO COCAIS3</text:p>
          </table:table-cell>
          <table:table-cell office:value-type="string" calcext:value-type="string">
            <text:p>J.MONLEVADE 2</text:p>
          </table:table-cell>
          <table:table-cell office:value-type="float" office:value="0.308073012938785" calcext:value-type="float">
            <text:p>0,308073</text:p>
          </table:table-cell>
          <table:table-cell office:value-type="float" office:value="0.566693780054984" calcext:value-type="float">
            <text:p>0,566694</text:p>
          </table:table-cell>
        </table:table-row>
        <table:table-row table:style-name="ro1" table:visibility="filter">
          <table:table-cell office:value-type="string" calcext:value-type="string">
            <text:p>BARAO COCAIS3</text:p>
          </table:table-cell>
          <table:table-cell office:value-type="string" calcext:value-type="string">
            <text:p>TAQUARIL</text:p>
          </table:table-cell>
          <table:table-cell office:value-type="float" office:value="0.344460117783389" calcext:value-type="float">
            <text:p>0,344460</text:p>
          </table:table-cell>
          <table:table-cell office:value-type="float" office:value="0.586234968638164" calcext:value-type="float">
            <text:p>0,586235</text:p>
          </table:table-cell>
        </table:table-row>
        <table:table-row table:style-name="ro1" table:visibility="filter">
          <table:table-cell office:value-type="string" calcext:value-type="string">
            <text:p>BARBACENA 2</text:p>
          </table:table-cell>
          <table:table-cell office:value-type="string" calcext:value-type="string">
            <text:p>LAFAIETE 1</text:p>
          </table:table-cell>
          <table:table-cell office:value-type="float" office:value="0.545419783196678" calcext:value-type="float">
            <text:p>0,545420</text:p>
          </table:table-cell>
          <table:table-cell office:value-type="float" office:value="0.858819003338099" calcext:value-type="float">
            <text:p>0,858819</text:p>
          </table:table-cell>
        </table:table-row>
        <table:table-row table:style-name="ro1" table:visibility="filter">
          <table:table-cell office:value-type="string" calcext:value-type="string">
            <text:p>BARBACENA 2</text:p>
          </table:table-cell>
          <table:table-cell office:value-type="string" calcext:value-type="string">
            <text:p>SANT.DUMONT 2</text:p>
          </table:table-cell>
          <table:table-cell office:value-type="float" office:value="0.722970420432675" calcext:value-type="float">
            <text:p>0,722970</text:p>
          </table:table-cell>
          <table:table-cell office:value-type="float" office:value="1.13839056639979" calcext:value-type="float">
            <text:p>1,138391</text:p>
          </table:table-cell>
        </table:table-row>
        <table:table-row table:style-name="ro1" table:visibility="filter">
          <table:table-cell office:value-type="string" calcext:value-type="string">
            <text:p>BARRA GRANDE</text:p>
          </table:table-cell>
          <table:table-cell office:value-type="string" calcext:value-type="string">
            <text:p>C.NOVOS</text:p>
          </table:table-cell>
          <table:table-cell office:value-type="float" office:value="0.610967958249522" calcext:value-type="float">
            <text:p>0,610968</text:p>
          </table:table-cell>
          <table:table-cell office:value-type="float" office:value="0.962872178212909" calcext:value-type="float">
            <text:p>0,962872</text:p>
          </table:table-cell>
        </table:table-row>
        <table:table-row table:style-name="ro1" table:visibility="filter">
          <table:table-cell office:value-type="string" calcext:value-type="string">
            <text:p>BARREIRAS</text:p>
          </table:table-cell>
          <table:table-cell office:value-type="string" calcext:value-type="string">
            <text:p>BARREIRAS II</text:p>
          </table:table-cell>
          <table:table-cell office:value-type="float" office:value="0.578411515384327" calcext:value-type="float">
            <text:p>0,578412</text:p>
          </table:table-cell>
          <table:table-cell office:value-type="float" office:value="0.829126585003787" calcext:value-type="float">
            <text:p>0,829127</text:p>
          </table:table-cell>
        </table:table-row>
        <table:table-row table:style-name="ro1" table:visibility="filter">
          <table:table-cell office:value-type="string" calcext:value-type="string">
            <text:p>BARREIRAS II</text:p>
          </table:table-cell>
          <table:table-cell office:value-type="string" calcext:value-type="string">
            <text:p>GILBUES II</text:p>
          </table:table-cell>
          <table:table-cell office:value-type="float" office:value="1.57872599436912" calcext:value-type="float">
            <text:p>1,578726</text:p>
          </table:table-cell>
          <table:table-cell office:value-type="float" office:value="1.90643077384416" calcext:value-type="float">
            <text:p>1,906431</text:p>
          </table:table-cell>
        </table:table-row>
        <table:table-row table:style-name="ro1" table:visibility="filter">
          <table:table-cell office:value-type="string" calcext:value-type="string">
            <text:p>BARREIRAS II</text:p>
          </table:table-cell>
          <table:table-cell office:value-type="string" calcext:value-type="string">
            <text:p>RIO DAS EGUAS</text:p>
          </table:table-cell>
          <table:table-cell office:value-type="float" office:value="2.02832875354292" calcext:value-type="float">
            <text:p>2,028329</text:p>
          </table:table-cell>
          <table:table-cell office:value-type="float" office:value="2.45054974275673" calcext:value-type="float">
            <text:p>2,450550</text:p>
          </table:table-cell>
        </table:table-row>
        <table:table-row table:style-name="ro1" table:visibility="filter">
          <table:table-cell office:value-type="string" calcext:value-type="string">
            <text:p>BARREIRO 1</text:p>
          </table:table-cell>
          <table:table-cell office:value-type="string" calcext:value-type="string">
            <text:p>SARZEDO</text:p>
          </table:table-cell>
          <table:table-cell office:value-type="float" office:value="0.575452133907693" calcext:value-type="float">
            <text:p>0,575452</text:p>
          </table:table-cell>
          <table:table-cell office:value-type="float" office:value="0.906107998530694" calcext:value-type="float">
            <text:p>0,906108</text:p>
          </table:table-cell>
        </table:table-row>
        <table:table-row table:style-name="ro1" table:visibility="filter">
          <table:table-cell office:value-type="string" calcext:value-type="string">
            <text:p>BARRO ALTO</text:p>
          </table:table-cell>
          <table:table-cell office:value-type="string" calcext:value-type="string">
            <text:p>AGUAS LINDAS</text:p>
          </table:table-cell>
          <table:table-cell office:value-type="float" office:value="0.332196199251584" calcext:value-type="float">
            <text:p>0,332196</text:p>
          </table:table-cell>
          <table:table-cell office:value-type="float" office:value="0.590400678471503" calcext:value-type="float">
            <text:p>0,590401</text:p>
          </table:table-cell>
        </table:table-row>
        <table:table-row table:style-name="ro1" table:visibility="filter">
          <table:table-cell office:value-type="string" calcext:value-type="string">
            <text:p>BARRO ALTO</text:p>
          </table:table-cell>
          <table:table-cell office:value-type="string" calcext:value-type="string">
            <text:p>ITAPACI</text:p>
          </table:table-cell>
          <table:table-cell office:value-type="float" office:value="0.294954536698794" calcext:value-type="float">
            <text:p>0,294955</text:p>
          </table:table-cell>
          <table:table-cell office:value-type="float" office:value="0.524212375028808" calcext:value-type="float">
            <text:p>0,524212</text:p>
          </table:table-cell>
        </table:table-row>
        <table:table-row table:style-name="ro1" table:visibility="filter">
          <table:table-cell office:value-type="string" calcext:value-type="string">
            <text:p>BARRO ALTO</text:p>
          </table:table-cell>
          <table:table-cell office:value-type="string" calcext:value-type="string">
            <text:p>NIQUELANDIA</text:p>
          </table:table-cell>
          <table:table-cell office:value-type="float" office:value="0.340504820809852" calcext:value-type="float">
            <text:p>0,340505</text:p>
          </table:table-cell>
          <table:table-cell office:value-type="float" office:value="0.60516730077548" calcext:value-type="float">
            <text:p>0,605167</text:p>
          </table:table-cell>
        </table:table-row>
        <table:table-row table:style-name="ro1" table:visibility="filter">
          <table:table-cell office:value-type="string" calcext:value-type="string">
            <text:p>BARRO BRANCO</text:p>
          </table:table-cell>
          <table:table-cell office:value-type="string" calcext:value-type="string">
            <text:p>GERDAU O.BRANCO</text:p>
          </table:table-cell>
          <table:table-cell office:value-type="float" office:value="0.70787371389826" calcext:value-type="float">
            <text:p>0,707874</text:p>
          </table:table-cell>
          <table:table-cell office:value-type="float" office:value="1.11461926425965" calcext:value-type="float">
            <text:p>1,114619</text:p>
          </table:table-cell>
        </table:table-row>
        <table:table-row table:style-name="ro1" table:visibility="filter">
          <table:table-cell office:value-type="string" calcext:value-type="string">
            <text:p>BATEIAS</text:p>
          </table:table-cell>
          <table:table-cell office:value-type="string" calcext:value-type="string">
            <text:p>CURIT.LESTE</text:p>
          </table:table-cell>
          <table:table-cell office:value-type="float" office:value="1.64693488564932" calcext:value-type="float">
            <text:p>1,646935</text:p>
          </table:table-cell>
          <table:table-cell office:value-type="float" office:value="2.1420119227537" calcext:value-type="float">
            <text:p>2,142012</text:p>
          </table:table-cell>
        </table:table-row>
        <table:table-row table:style-name="ro1" table:visibility="filter">
          <table:table-cell office:value-type="string" calcext:value-type="string">
            <text:p>BATEIAS</text:p>
          </table:table-cell>
          <table:table-cell office:value-type="string" calcext:value-type="string">
            <text:p>CURITIBA NORT</text:p>
          </table:table-cell>
          <table:table-cell office:value-type="float" office:value="0.381692363501561" calcext:value-type="float">
            <text:p>0,381692</text:p>
          </table:table-cell>
          <table:table-cell office:value-type="float" office:value="0.589026416981985" calcext:value-type="float">
            <text:p>0,589026</text:p>
          </table:table-cell>
        </table:table-row>
        <table:table-row table:style-name="ro1" table:visibility="filter">
          <table:table-cell office:value-type="string" calcext:value-type="string">
            <text:p>BATEIAS</text:p>
          </table:table-cell>
          <table:table-cell office:value-type="string" calcext:value-type="string">
            <text:p>ITATIBA</text:p>
          </table:table-cell>
          <table:table-cell office:value-type="float" office:value="1.66141996763698" calcext:value-type="float">
            <text:p>1,661420</text:p>
          </table:table-cell>
          <table:table-cell office:value-type="float" office:value="2.19750238390479" calcext:value-type="float">
            <text:p>2,197502</text:p>
          </table:table-cell>
        </table:table-row>
        <table:table-row table:style-name="ro1" table:visibility="filter">
          <table:table-cell office:value-type="string" calcext:value-type="string">
            <text:p>BATEIAS</text:p>
          </table:table-cell>
          <table:table-cell office:value-type="string" calcext:value-type="string">
            <text:p>JAGUARIAIVA</text:p>
          </table:table-cell>
          <table:table-cell office:value-type="float" office:value="0.464038919846681" calcext:value-type="float">
            <text:p>0,464039</text:p>
          </table:table-cell>
          <table:table-cell office:value-type="float" office:value="0.716103355566249" calcext:value-type="float">
            <text:p>0,716103</text:p>
          </table:table-cell>
        </table:table-row>
        <table:table-row table:style-name="ro1" table:visibility="filter">
          <table:table-cell office:value-type="string" calcext:value-type="string">
            <text:p>BATEIAS</text:p>
          </table:table-cell>
          <table:table-cell office:value-type="string" calcext:value-type="string">
            <text:p>PONTA GROSSA</text:p>
          </table:table-cell>
          <table:table-cell office:value-type="float" office:value="1.5712168480791" calcext:value-type="float">
            <text:p>1,571217</text:p>
          </table:table-cell>
          <table:table-cell office:value-type="float" office:value="2.04353265641709" calcext:value-type="float">
            <text:p>2,043533</text:p>
          </table:table-cell>
        </table:table-row>
        <table:table-row table:style-name="ro1" table:visibility="filter">
          <table:table-cell office:value-type="string" calcext:value-type="string">
            <text:p>BAURU</text:p>
          </table:table-cell>
          <table:table-cell office:value-type="string" calcext:value-type="string">
            <text:p>GETULINA</text:p>
          </table:table-cell>
          <table:table-cell office:value-type="float" office:value="1.14553036997634" calcext:value-type="float">
            <text:p>1,145530</text:p>
          </table:table-cell>
          <table:table-cell office:value-type="float" office:value="1.65161632779429" calcext:value-type="float">
            <text:p>1,651616</text:p>
          </table:table-cell>
        </table:table-row>
        <table:table-row table:style-name="ro1" table:visibility="filter">
          <table:table-cell office:value-type="string" calcext:value-type="string">
            <text:p>BAURU</text:p>
          </table:table-cell>
          <table:table-cell office:value-type="string" calcext:value-type="string">
            <text:p>OESTE</text:p>
          </table:table-cell>
          <table:table-cell office:value-type="float" office:value="1.07783835188027" calcext:value-type="float">
            <text:p>1,077838</text:p>
          </table:table-cell>
          <table:table-cell office:value-type="float" office:value="1.55401852918584" calcext:value-type="float">
            <text:p>1,554019</text:p>
          </table:table-cell>
        </table:table-row>
        <table:table-row table:style-name="ro1" table:visibility="filter">
          <table:table-cell office:value-type="string" calcext:value-type="string">
            <text:p>BAURU</text:p>
          </table:table-cell>
          <table:table-cell office:value-type="string" calcext:value-type="string">
            <text:p>SALTO</text:p>
          </table:table-cell>
          <table:table-cell office:value-type="float" office:value="1.07532892399908" calcext:value-type="float">
            <text:p>1,075329</text:p>
          </table:table-cell>
          <table:table-cell office:value-type="float" office:value="1.55040045657021" calcext:value-type="float">
            <text:p>1,550400</text:p>
          </table:table-cell>
        </table:table-row>
        <table:table-row table:style-name="ro1" table:visibility="filter">
          <table:table-cell office:value-type="string" calcext:value-type="string">
            <text:p>BETIM 6</text:p>
          </table:table-cell>
          <table:table-cell office:value-type="string" calcext:value-type="string">
            <text:p>SARZEDO</text:p>
          </table:table-cell>
          <table:table-cell office:value-type="float" office:value="0.912161525662546" calcext:value-type="float">
            <text:p>0,912162</text:p>
          </table:table-cell>
          <table:table-cell office:value-type="float" office:value="1.43629123197825" calcext:value-type="float">
            <text:p>1,436291</text:p>
          </table:table-cell>
        </table:table-row>
        <table:table-row table:style-name="ro1" table:visibility="filter">
          <table:table-cell office:value-type="string" calcext:value-type="string">
            <text:p>BETIM 6</text:p>
          </table:table-cell>
          <table:table-cell office:value-type="string" calcext:value-type="string">
            <text:p>SETE LAGOAS 4</text:p>
          </table:table-cell>
          <table:table-cell office:value-type="float" office:value="0.705834138818534" calcext:value-type="float">
            <text:p>0,705834</text:p>
          </table:table-cell>
          <table:table-cell office:value-type="float" office:value="1.11140774555211" calcext:value-type="float">
            <text:p>1,111408</text:p>
          </table:table-cell>
        </table:table-row>
        <table:table-row table:style-name="ro1" table:visibility="filter">
          <table:table-cell office:value-type="string" calcext:value-type="string">
            <text:p>BIGUACU</text:p>
          </table:table-cell>
          <table:table-cell office:value-type="string" calcext:value-type="string">
            <text:p>DESTERRO</text:p>
          </table:table-cell>
          <table:table-cell office:value-type="float" office:value="0.384376155084768" calcext:value-type="float">
            <text:p>0,384376</text:p>
          </table:table-cell>
          <table:table-cell office:value-type="float" office:value="0.605768437938967" calcext:value-type="float">
            <text:p>0,605768</text:p>
          </table:table-cell>
        </table:table-row>
        <table:table-row table:style-name="ro1" table:visibility="filter">
          <table:table-cell office:value-type="string" calcext:value-type="string">
            <text:p>BIGUACU</text:p>
          </table:table-cell>
          <table:table-cell office:value-type="string" calcext:value-type="string">
            <text:p>GASPAR 2</text:p>
          </table:table-cell>
          <table:table-cell office:value-type="float" office:value="1.44822292193319" calcext:value-type="float">
            <text:p>1,448223</text:p>
          </table:table-cell>
          <table:table-cell office:value-type="float" office:value="1.92355366450764" calcext:value-type="float">
            <text:p>1,923554</text:p>
          </table:table-cell>
        </table:table-row>
        <table:table-row table:style-name="ro1" table:visibility="filter">
          <table:table-cell office:value-type="string" calcext:value-type="string">
            <text:p>BIGUACU</text:p>
          </table:table-cell>
          <table:table-cell office:value-type="string" calcext:value-type="string">
            <text:p>ITAJAI 2</text:p>
          </table:table-cell>
          <table:table-cell office:value-type="float" office:value="1.49731408612046" calcext:value-type="float">
            <text:p>1,497314</text:p>
          </table:table-cell>
          <table:table-cell office:value-type="float" office:value="1.98875736163" calcext:value-type="float">
            <text:p>1,988757</text:p>
          </table:table-cell>
        </table:table-row>
        <table:table-row table:style-name="ro1" table:visibility="filter">
          <table:table-cell office:value-type="string" calcext:value-type="string">
            <text:p>BIGUACU</text:p>
          </table:table-cell>
          <table:table-cell office:value-type="string" calcext:value-type="string">
            <text:p>J.LACERDA-B</text:p>
          </table:table-cell>
          <table:table-cell office:value-type="float" office:value="0.409386660601364" calcext:value-type="float">
            <text:p>0,409387</text:p>
          </table:table-cell>
          <table:table-cell office:value-type="float" office:value="0.645184449204055" calcext:value-type="float">
            <text:p>0,645184</text:p>
          </table:table-cell>
        </table:table-row>
        <table:table-row table:style-name="ro1" table:visibility="filter">
          <table:table-cell office:value-type="string" calcext:value-type="string">
            <text:p>BIGUACU</text:p>
          </table:table-cell>
          <table:table-cell office:value-type="string" calcext:value-type="string">
            <text:p>RATONES</text:p>
          </table:table-cell>
          <table:table-cell office:value-type="float" office:value="0.426117123320293" calcext:value-type="float">
            <text:p>0,426117</text:p>
          </table:table-cell>
          <table:table-cell office:value-type="float" office:value="0.671551293591181" calcext:value-type="float">
            <text:p>0,671551</text:p>
          </table:table-cell>
        </table:table-row>
        <table:table-row table:style-name="ro1" table:visibility="filter">
          <table:table-cell office:value-type="string" calcext:value-type="string">
            <text:p>BIGUACU</text:p>
          </table:table-cell>
          <table:table-cell office:value-type="string" calcext:value-type="string">
            <text:p>SIDEROPOLIS 2</text:p>
          </table:table-cell>
          <table:table-cell office:value-type="float" office:value="1.57028817861402" calcext:value-type="float">
            <text:p>1,570288</text:p>
          </table:table-cell>
          <table:table-cell office:value-type="float" office:value="2.08568275958098" calcext:value-type="float">
            <text:p>2,085683</text:p>
          </table:table-cell>
        </table:table-row>
        <table:table-row table:style-name="ro1" table:visibility="filter">
          <table:table-cell office:value-type="string" calcext:value-type="string">
            <text:p>BLUMENAU</text:p>
          </table:table-cell>
          <table:table-cell office:value-type="string" calcext:value-type="string">
            <text:p>GASPAR 2</text:p>
          </table:table-cell>
          <table:table-cell office:value-type="float" office:value="1.42771134383488" calcext:value-type="float">
            <text:p>1,427711</text:p>
          </table:table-cell>
          <table:table-cell office:value-type="float" office:value="1.89630984684789" calcext:value-type="float">
            <text:p>1,896310</text:p>
          </table:table-cell>
        </table:table-row>
        <table:table-row table:style-name="ro1" table:visibility="filter">
          <table:table-cell office:value-type="string" calcext:value-type="string">
            <text:p>BLUMENAU</text:p>
          </table:table-cell>
          <table:table-cell office:value-type="string" calcext:value-type="string">
            <text:p>JARAGUA DO SUL</text:p>
          </table:table-cell>
          <table:table-cell office:value-type="float" office:value="0.64527532089074" calcext:value-type="float">
            <text:p>0,645275</text:p>
          </table:table-cell>
          <table:table-cell office:value-type="float" office:value="1.01693983356055" calcext:value-type="float">
            <text:p>1,016940</text:p>
          </table:table-cell>
        </table:table-row>
        <table:table-row table:style-name="ro1" table:visibility="filter">
          <table:table-cell office:value-type="string" calcext:value-type="string">
            <text:p>BOA VISTA</text:p>
          </table:table-cell>
          <table:table-cell office:value-type="string" calcext:value-type="string">
            <text:p>EQUADOR</text:p>
          </table:table-cell>
          <table:table-cell office:value-type="float" office:value="1.30047612071923" calcext:value-type="float">
            <text:p>1,300476</text:p>
          </table:table-cell>
          <table:table-cell office:value-type="float" office:value="1.58340246733817" calcext:value-type="float">
            <text:p>1,583402</text:p>
          </table:table-cell>
        </table:table-row>
        <table:table-row table:style-name="ro1" table:visibility="filter">
          <table:table-cell office:value-type="string" calcext:value-type="string">
            <text:p>BOM JARDIM</text:p>
          </table:table-cell>
          <table:table-cell office:value-type="string" calcext:value-type="string">
            <text:p>FERNAO DIAS</text:p>
          </table:table-cell>
          <table:table-cell office:value-type="float" office:value="1.06375748531667" calcext:value-type="float">
            <text:p>1,063757</text:p>
          </table:table-cell>
          <table:table-cell office:value-type="float" office:value="1.48139580627292" calcext:value-type="float">
            <text:p>1,481396</text:p>
          </table:table-cell>
        </table:table-row>
        <table:table-row table:style-name="ro1" table:visibility="filter">
          <table:table-cell office:value-type="string" calcext:value-type="string">
            <text:p>BOM JESUS II</text:p>
          </table:table-cell>
          <table:table-cell office:value-type="string" calcext:value-type="string">
            <text:p>GILBUES II</text:p>
          </table:table-cell>
          <table:table-cell office:value-type="float" office:value="0.447664958834458" calcext:value-type="float">
            <text:p>0,447665</text:p>
          </table:table-cell>
          <table:table-cell office:value-type="float" office:value="0.641084115931224" calcext:value-type="float">
            <text:p>0,641084</text:p>
          </table:table-cell>
        </table:table-row>
        <table:table-row table:style-name="ro1" table:visibility="filter">
          <table:table-cell office:value-type="string" calcext:value-type="string">
            <text:p>BOM NOME</text:p>
          </table:table-cell>
          <table:table-cell office:value-type="string" calcext:value-type="string">
            <text:p>FLORESTA II</text:p>
          </table:table-cell>
          <table:table-cell office:value-type="float" office:value="0.358999730126712" calcext:value-type="float">
            <text:p>0,359000</text:p>
          </table:table-cell>
          <table:table-cell office:value-type="float" office:value="0.627249695763156" calcext:value-type="float">
            <text:p>0,627250</text:p>
          </table:table-cell>
        </table:table-row>
        <table:table-row table:style-name="ro1" table:visibility="filter">
          <table:table-cell office:value-type="string" calcext:value-type="string">
            <text:p>BOM NOME</text:p>
          </table:table-cell>
          <table:table-cell office:value-type="string" calcext:value-type="string">
            <text:p>TACARATU</text:p>
          </table:table-cell>
          <table:table-cell office:value-type="float" office:value="0.33014632261785" calcext:value-type="float">
            <text:p>0,330146</text:p>
          </table:table-cell>
          <table:table-cell office:value-type="float" office:value="0.576836590785957" calcext:value-type="float">
            <text:p>0,576837</text:p>
          </table:table-cell>
        </table:table-row>
        <table:table-row table:style-name="ro1" table:visibility="filter">
          <table:table-cell office:value-type="string" calcext:value-type="string">
            <text:p>BOM.JES.LAPA II</text:p>
          </table:table-cell>
          <table:table-cell office:value-type="string" calcext:value-type="string">
            <text:p>GENTIO OURO II</text:p>
          </table:table-cell>
          <table:table-cell office:value-type="float" office:value="1.6756982275923" calcext:value-type="float">
            <text:p>1,675698</text:p>
          </table:table-cell>
          <table:table-cell office:value-type="float" office:value="2.02451493792193" calcext:value-type="float">
            <text:p>2,024515</text:p>
          </table:table-cell>
        </table:table-row>
        <table:table-row table:style-name="ro1" table:visibility="filter">
          <table:table-cell office:value-type="string" calcext:value-type="string">
            <text:p>BOM.JES.LAPA II</text:p>
          </table:table-cell>
          <table:table-cell office:value-type="string" calcext:value-type="string">
            <text:p>IGAPORA II</text:p>
          </table:table-cell>
          <table:table-cell office:value-type="float" office:value="0.618612856132995" calcext:value-type="float">
            <text:p>0,618613</text:p>
          </table:table-cell>
          <table:table-cell office:value-type="float" office:value="0.886753377487974" calcext:value-type="float">
            <text:p>0,886753</text:p>
          </table:table-cell>
        </table:table-row>
        <table:table-row table:style-name="ro1" table:visibility="filter">
          <table:table-cell office:value-type="string" calcext:value-type="string">
            <text:p>BOM.JES.LAPA II</text:p>
          </table:table-cell>
          <table:table-cell office:value-type="string" calcext:value-type="string">
            <text:p>SOL DO SERTAO</text:p>
          </table:table-cell>
          <table:table-cell office:value-type="float" office:value="1.42465502646666" calcext:value-type="float">
            <text:p>1,424655</text:p>
          </table:table-cell>
          <table:table-cell office:value-type="float" office:value="1.72121407958489" calcext:value-type="float">
            <text:p>1,721214</text:p>
          </table:table-cell>
        </table:table-row>
        <table:table-row table:style-name="ro1" table:visibility="filter">
          <table:table-cell office:value-type="string" calcext:value-type="string">
            <text:p>BONGI</text:p>
          </table:table-cell>
          <table:table-cell office:value-type="string" calcext:value-type="string">
            <text:p>JOAIRAM</text:p>
          </table:table-cell>
          <table:table-cell office:value-type="float" office:value="0.258734871723851" calcext:value-type="float">
            <text:p>0,258735</text:p>
          </table:table-cell>
          <table:table-cell office:value-type="float" office:value="0.45206543613507" calcext:value-type="float">
            <text:p>0,452065</text:p>
          </table:table-cell>
        </table:table-row>
        <table:table-row table:style-name="ro1" table:visibility="filter">
          <table:table-cell office:value-type="string" calcext:value-type="string">
            <text:p>BOTUCATU</text:p>
          </table:table-cell>
          <table:table-cell office:value-type="string" calcext:value-type="string">
            <text:p>CAPAO BONITO</text:p>
          </table:table-cell>
          <table:table-cell office:value-type="float" office:value="0.307146603943288" calcext:value-type="float">
            <text:p>0,307147</text:p>
          </table:table-cell>
          <table:table-cell office:value-type="float" office:value="0.581660504673998" calcext:value-type="float">
            <text:p>0,581661</text:p>
          </table:table-cell>
        </table:table-row>
        <table:table-row table:style-name="ro1" table:visibility="filter">
          <table:table-cell office:value-type="string" calcext:value-type="string">
            <text:p>BOTUCATU</text:p>
          </table:table-cell>
          <table:table-cell office:value-type="string" calcext:value-type="string">
            <text:p>CERQUILHO III</text:p>
          </table:table-cell>
          <table:table-cell office:value-type="float" office:value="0.332538512518987" calcext:value-type="float">
            <text:p>0,332539</text:p>
          </table:table-cell>
          <table:table-cell office:value-type="float" office:value="0.629746565750889" calcext:value-type="float">
            <text:p>0,629747</text:p>
          </table:table-cell>
        </table:table-row>
        <table:table-row table:style-name="ro1" table:visibility="filter">
          <table:table-cell office:value-type="string" calcext:value-type="string">
            <text:p>BOTUCATU</text:p>
          </table:table-cell>
          <table:table-cell office:value-type="string" calcext:value-type="string">
            <text:p>CHAVANTES</text:p>
          </table:table-cell>
          <table:table-cell office:value-type="float" office:value="0.495533539316684" calcext:value-type="float">
            <text:p>0,495534</text:p>
          </table:table-cell>
          <table:table-cell office:value-type="float" office:value="0.938419259276766" calcext:value-type="float">
            <text:p>0,938419</text:p>
          </table:table-cell>
        </table:table-row>
        <table:table-row table:style-name="ro1" table:visibility="filter">
          <table:table-cell office:value-type="string" calcext:value-type="string">
            <text:p>BRACELL</text:p>
          </table:table-cell>
          <table:table-cell office:value-type="string" calcext:value-type="string">
            <text:p>OESTE</text:p>
          </table:table-cell>
          <table:table-cell office:value-type="float" office:value="1.09784061520332" calcext:value-type="float">
            <text:p>1,097841</text:p>
          </table:table-cell>
          <table:table-cell office:value-type="float" office:value="1.5828576290151" calcext:value-type="float">
            <text:p>1,582858</text:p>
          </table:table-cell>
        </table:table-row>
        <table:table-row table:style-name="ro1" table:visibility="filter">
          <table:table-cell office:value-type="string" calcext:value-type="string">
            <text:p>BRAS. GERAL</text:p>
          </table:table-cell>
          <table:table-cell office:value-type="string" calcext:value-type="string">
            <text:p>BRAS. SUL</text:p>
          </table:table-cell>
          <table:table-cell office:value-type="float" office:value="0.315979213968718" calcext:value-type="float">
            <text:p>0,315979</text:p>
          </table:table-cell>
          <table:table-cell office:value-type="float" office:value="0.557610452612286" calcext:value-type="float">
            <text:p>0,557610</text:p>
          </table:table-cell>
        </table:table-row>
        <table:table-row table:style-name="ro1" table:visibility="filter">
          <table:table-cell office:value-type="string" calcext:value-type="string">
            <text:p>BRAS. SUL</text:p>
          </table:table-cell>
          <table:table-cell office:value-type="string" calcext:value-type="string">
            <text:p>SAMAMBAIA</text:p>
          </table:table-cell>
          <table:table-cell office:value-type="float" office:value="0.684554840478123" calcext:value-type="float">
            <text:p>0,684555</text:p>
          </table:table-cell>
          <table:table-cell office:value-type="float" office:value="1.01810819041772" calcext:value-type="float">
            <text:p>1,018108</text:p>
          </table:table-cell>
        </table:table-row>
        <table:table-row table:style-name="ro1" table:visibility="filter">
          <table:table-cell office:value-type="string" calcext:value-type="string">
            <text:p>BRAS.LESTE</text:p>
          </table:table-cell>
          <table:table-cell office:value-type="string" calcext:value-type="string">
            <text:p>LUZIANIA</text:p>
          </table:table-cell>
          <table:table-cell office:value-type="float" office:value="1.29981039441048" calcext:value-type="float">
            <text:p>1,299810</text:p>
          </table:table-cell>
          <table:table-cell office:value-type="float" office:value="1.69988956503026" calcext:value-type="float">
            <text:p>1,699890</text:p>
          </table:table-cell>
        </table:table-row>
        <table:table-row table:style-name="ro1" table:visibility="filter">
          <table:table-cell office:value-type="string" calcext:value-type="string">
            <text:p>BRASNORTE</text:p>
          </table:table-cell>
          <table:table-cell office:value-type="string" calcext:value-type="string">
            <text:p>JUBA</text:p>
          </table:table-cell>
          <table:table-cell office:value-type="float" office:value="0.516855970303427" calcext:value-type="float">
            <text:p>0,516856</text:p>
          </table:table-cell>
          <table:table-cell office:value-type="float" office:value="0.91772522343576" calcext:value-type="float">
            <text:p>0,917725</text:p>
          </table:table-cell>
        </table:table-row>
        <table:table-row table:style-name="ro1" table:visibility="filter">
          <table:table-cell office:value-type="string" calcext:value-type="string">
            <text:p>BRASNORTE</text:p>
          </table:table-cell>
          <table:table-cell office:value-type="string" calcext:value-type="string">
            <text:p>JUINA</text:p>
          </table:table-cell>
          <table:table-cell office:value-type="float" office:value="0.506490520463987" calcext:value-type="float">
            <text:p>0,506491</text:p>
          </table:table-cell>
          <table:table-cell office:value-type="float" office:value="0.899320415681817" calcext:value-type="float">
            <text:p>0,899320</text:p>
          </table:table-cell>
        </table:table-row>
        <table:table-row table:style-name="ro1" table:visibility="filter">
          <table:table-cell office:value-type="string" calcext:value-type="string">
            <text:p>BRASNORTE</text:p>
          </table:table-cell>
          <table:table-cell office:value-type="string" calcext:value-type="string">
            <text:p>NOVA MUTUM</text:p>
          </table:table-cell>
          <table:table-cell office:value-type="float" office:value="0.499622372172536" calcext:value-type="float">
            <text:p>0,499622</text:p>
          </table:table-cell>
          <table:table-cell office:value-type="float" office:value="0.887125387883916" calcext:value-type="float">
            <text:p>0,887125</text:p>
          </table:table-cell>
        </table:table-row>
        <table:table-row table:style-name="ro1" table:visibility="filter">
          <table:table-cell office:value-type="string" calcext:value-type="string">
            <text:p>BRASNORTE</text:p>
          </table:table-cell>
          <table:table-cell office:value-type="string" calcext:value-type="string">
            <text:p>PARECIS</text:p>
          </table:table-cell>
          <table:table-cell office:value-type="float" office:value="0.333710977400355" calcext:value-type="float">
            <text:p>0,333711</text:p>
          </table:table-cell>
          <table:table-cell office:value-type="float" office:value="0.592534475548218" calcext:value-type="float">
            <text:p>0,592534</text:p>
          </table:table-cell>
        </table:table-row>
        <table:table-row table:style-name="ro1" table:visibility="filter">
          <table:table-cell office:value-type="string" calcext:value-type="string">
            <text:p>BRAUNAS</text:p>
          </table:table-cell>
          <table:table-cell office:value-type="string" calcext:value-type="string">
            <text:p>ITABIRA 2</text:p>
          </table:table-cell>
          <table:table-cell office:value-type="float" office:value="0.328807665118531" calcext:value-type="float">
            <text:p>0,328808</text:p>
          </table:table-cell>
          <table:table-cell office:value-type="float" office:value="0.60483473342762" calcext:value-type="float">
            <text:p>0,604835</text:p>
          </table:table-cell>
        </table:table-row>
        <table:table-row table:style-name="ro1" table:visibility="filter">
          <table:table-cell office:value-type="string" calcext:value-type="string">
            <text:p>BRUMADO II</text:p>
          </table:table-cell>
          <table:table-cell office:value-type="string" calcext:value-type="string">
            <text:p>IBICOARA</text:p>
          </table:table-cell>
          <table:table-cell office:value-type="float" office:value="0.410061358245477" calcext:value-type="float">
            <text:p>0,410061</text:p>
          </table:table-cell>
          <table:table-cell office:value-type="float" office:value="0.587804296009179" calcext:value-type="float">
            <text:p>0,587804</text:p>
          </table:table-cell>
        </table:table-row>
        <table:table-row table:style-name="ro1" table:visibility="filter">
          <table:table-cell office:value-type="string" calcext:value-type="string">
            <text:p>BURITIRAMA</text:p>
          </table:table-cell>
          <table:table-cell office:value-type="string" calcext:value-type="string">
            <text:p>GILBUES II</text:p>
          </table:table-cell>
          <table:table-cell office:value-type="float" office:value="1.55870076812754" calcext:value-type="float">
            <text:p>1,558701</text:p>
          </table:table-cell>
          <table:table-cell office:value-type="float" office:value="1.88224880199071" calcext:value-type="float">
            <text:p>1,882249</text:p>
          </table:table-cell>
        </table:table-row>
        <table:table-row table:style-name="ro1" table:visibility="filter">
          <table:table-cell office:value-type="string" calcext:value-type="string">
            <text:p>BURITIRAMA</text:p>
          </table:table-cell>
          <table:table-cell office:value-type="string" calcext:value-type="string">
            <text:p>QUEIMADA NOVA 2</text:p>
          </table:table-cell>
          <table:table-cell office:value-type="float" office:value="1.51290291290078" calcext:value-type="float">
            <text:p>1,512903</text:p>
          </table:table-cell>
          <table:table-cell office:value-type="float" office:value="1.82694443575377" calcext:value-type="float">
            <text:p>1,826944</text:p>
          </table:table-cell>
        </table:table-row>
        <table:table-row table:style-name="ro1" table:visibility="filter">
          <table:table-cell office:value-type="string" calcext:value-type="string">
            <text:p>C.COMPRIDO</text:p>
          </table:table-cell>
          <table:table-cell office:value-type="string" calcext:value-type="string">
            <text:p>C.I.CURITIBA</text:p>
          </table:table-cell>
          <table:table-cell office:value-type="float" office:value="0.333325864259367" calcext:value-type="float">
            <text:p>0,333326</text:p>
          </table:table-cell>
          <table:table-cell office:value-type="float" office:value="0.610332029872348" calcext:value-type="float">
            <text:p>0,610332</text:p>
          </table:table-cell>
        </table:table-row>
        <table:table-row table:style-name="ro1" table:visibility="filter">
          <table:table-cell office:value-type="string" calcext:value-type="string">
            <text:p>C.COMPRIDO</text:p>
          </table:table-cell>
          <table:table-cell office:value-type="string" calcext:value-type="string">
            <text:p>SANTAQUITERIA</text:p>
          </table:table-cell>
          <table:table-cell office:value-type="float" office:value="0.332930135856264" calcext:value-type="float">
            <text:p>0,332930</text:p>
          </table:table-cell>
          <table:table-cell office:value-type="float" office:value="0.609607436477593" calcext:value-type="float">
            <text:p>0,609607</text:p>
          </table:table-cell>
        </table:table-row>
        <table:table-row table:style-name="ro1" table:visibility="filter">
          <table:table-cell office:value-type="string" calcext:value-type="string">
            <text:p>C.GRANDE II</text:p>
          </table:table-cell>
          <table:table-cell office:value-type="string" calcext:value-type="string">
            <text:p>PAU FERRO</text:p>
          </table:table-cell>
          <table:table-cell office:value-type="float" office:value="0.522567665519091" calcext:value-type="float">
            <text:p>0,522568</text:p>
          </table:table-cell>
          <table:table-cell office:value-type="float" office:value="0.761808845626031" calcext:value-type="float">
            <text:p>0,761809</text:p>
          </table:table-cell>
        </table:table-row>
        <table:table-row table:style-name="ro1" table:visibility="filter">
          <table:table-cell office:value-type="string" calcext:value-type="string">
            <text:p>C.GRANDE II</text:p>
          </table:table-cell>
          <table:table-cell office:value-type="string" calcext:value-type="string">
            <text:p>TACAIMBO</text:p>
          </table:table-cell>
          <table:table-cell office:value-type="float" office:value="0.322658285367184" calcext:value-type="float">
            <text:p>0,322658</text:p>
          </table:table-cell>
          <table:table-cell office:value-type="float" office:value="0.55809856836923" calcext:value-type="float">
            <text:p>0,558099</text:p>
          </table:table-cell>
        </table:table-row>
        <table:table-row table:style-name="ro1" table:visibility="filter">
          <table:table-cell office:value-type="string" calcext:value-type="string">
            <text:p>C.GRANDE III</text:p>
          </table:table-cell>
          <table:table-cell office:value-type="string" calcext:value-type="string">
            <text:p>CEARA MIRIM 2</text:p>
          </table:table-cell>
          <table:table-cell office:value-type="float" office:value="1.47517994216912" calcext:value-type="float">
            <text:p>1,475180</text:p>
          </table:table-cell>
          <table:table-cell office:value-type="float" office:value="1.82030220779836" calcext:value-type="float">
            <text:p>1,820302</text:p>
          </table:table-cell>
        </table:table-row>
        <table:table-row table:style-name="ro1" table:visibility="filter">
          <table:table-cell office:value-type="string" calcext:value-type="string">
            <text:p>C.GRANDE III</text:p>
          </table:table-cell>
          <table:table-cell office:value-type="string" calcext:value-type="string">
            <text:p>EXTREMOZ II</text:p>
          </table:table-cell>
          <table:table-cell office:value-type="float" office:value="0.577938255176993" calcext:value-type="float">
            <text:p>0,577938</text:p>
          </table:table-cell>
          <table:table-cell office:value-type="float" office:value="0.846148332927756" calcext:value-type="float">
            <text:p>0,846148</text:p>
          </table:table-cell>
        </table:table-row>
        <table:table-row table:style-name="ro1" table:visibility="filter">
          <table:table-cell office:value-type="string" calcext:value-type="string">
            <text:p>C.GRANDE III</text:p>
          </table:table-cell>
          <table:table-cell office:value-type="string" calcext:value-type="string">
            <text:p>GARANHUNS II</text:p>
          </table:table-cell>
          <table:table-cell office:value-type="float" office:value="1.4715530672349" calcext:value-type="float">
            <text:p>1,471553</text:p>
          </table:table-cell>
          <table:table-cell office:value-type="float" office:value="1.8080866179723" calcext:value-type="float">
            <text:p>1,808087</text:p>
          </table:table-cell>
        </table:table-row>
        <table:table-row table:style-name="ro1" table:visibility="filter">
          <table:table-cell office:value-type="string" calcext:value-type="string">
            <text:p>C.GRANDE III</text:p>
          </table:table-cell>
          <table:table-cell office:value-type="string" calcext:value-type="string">
            <text:p>JOAO PESSOA II</text:p>
          </table:table-cell>
          <table:table-cell office:value-type="float" office:value="1.44221710832828" calcext:value-type="float">
            <text:p>1,442217</text:p>
          </table:table-cell>
          <table:table-cell office:value-type="float" office:value="1.75428492798246" calcext:value-type="float">
            <text:p>1,754285</text:p>
          </table:table-cell>
        </table:table-row>
        <table:table-row table:style-name="ro1" table:visibility="filter">
          <table:table-cell office:value-type="string" calcext:value-type="string">
            <text:p>C.GRANDE III</text:p>
          </table:table-cell>
          <table:table-cell office:value-type="string" calcext:value-type="string">
            <text:p>RIACHAO II</text:p>
          </table:table-cell>
          <table:table-cell office:value-type="float" office:value="0.530258438364688" calcext:value-type="float">
            <text:p>0,530258</text:p>
          </table:table-cell>
          <table:table-cell office:value-type="float" office:value="0.765274515796541" calcext:value-type="float">
            <text:p>0,765275</text:p>
          </table:table-cell>
        </table:table-row>
        <table:table-row table:style-name="ro1" table:visibility="filter">
          <table:table-cell office:value-type="string" calcext:value-type="string">
            <text:p>C.INDUSTRIAL</text:p>
          </table:table-cell>
          <table:table-cell office:value-type="string" calcext:value-type="string">
            <text:p>CACHOEIRINHA3</text:p>
          </table:table-cell>
          <table:table-cell office:value-type="float" office:value="0.290056548626153" calcext:value-type="float">
            <text:p>0,290057</text:p>
          </table:table-cell>
          <table:table-cell office:value-type="float" office:value="0.532083363689718" calcext:value-type="float">
            <text:p>0,532083</text:p>
          </table:table-cell>
        </table:table-row>
        <table:table-row table:style-name="ro1" table:visibility="filter">
          <table:table-cell office:value-type="string" calcext:value-type="string">
            <text:p>C.INDUSTRIAL</text:p>
          </table:table-cell>
          <table:table-cell office:value-type="string" calcext:value-type="string">
            <text:p>CANOAS 1</text:p>
          </table:table-cell>
          <table:table-cell office:value-type="float" office:value="0.282300732776597" calcext:value-type="float">
            <text:p>0,282301</text:p>
          </table:table-cell>
          <table:table-cell office:value-type="float" office:value="0.517855998009005" calcext:value-type="float">
            <text:p>0,517856</text:p>
          </table:table-cell>
        </table:table-row>
        <table:table-row table:style-name="ro1" table:visibility="filter">
          <table:table-cell office:value-type="string" calcext:value-type="string">
            <text:p>C.INDUSTRIAL</text:p>
          </table:table-cell>
          <table:table-cell office:value-type="string" calcext:value-type="string">
            <text:p>CANOAS 2</text:p>
          </table:table-cell>
          <table:table-cell office:value-type="float" office:value="0.289939646118664" calcext:value-type="float">
            <text:p>0,289940</text:p>
          </table:table-cell>
          <table:table-cell office:value-type="float" office:value="0.531868916266611" calcext:value-type="float">
            <text:p>0,531869</text:p>
          </table:table-cell>
        </table:table-row>
        <table:table-row table:style-name="ro1" table:visibility="filter">
          <table:table-cell office:value-type="string" calcext:value-type="string">
            <text:p>C.INDUSTRIAL</text:p>
          </table:table-cell>
          <table:table-cell office:value-type="string" calcext:value-type="string">
            <text:p>NOVA STA RITA</text:p>
          </table:table-cell>
          <table:table-cell office:value-type="float" office:value="0.364728186683723" calcext:value-type="float">
            <text:p>0,364728</text:p>
          </table:table-cell>
          <table:table-cell office:value-type="float" office:value="0.563884319514447" calcext:value-type="float">
            <text:p>0,563884</text:p>
          </table:table-cell>
        </table:table-row>
        <table:table-row table:style-name="ro1" table:visibility="filter">
          <table:table-cell office:value-type="string" calcext:value-type="string">
            <text:p>C.MOURAO</text:p>
          </table:table-cell>
          <table:table-cell office:value-type="string" calcext:value-type="string">
            <text:p>S. OSORIO</text:p>
          </table:table-cell>
          <table:table-cell office:value-type="float" office:value="0.409360699272579" calcext:value-type="float">
            <text:p>0,409361</text:p>
          </table:table-cell>
          <table:table-cell office:value-type="float" office:value="0.749554635048025" calcext:value-type="float">
            <text:p>0,749555</text:p>
          </table:table-cell>
        </table:table-row>
        <table:table-row table:style-name="ro1" table:visibility="filter">
          <table:table-cell office:value-type="string" calcext:value-type="string">
            <text:p>C.PORTO VELHO</text:p>
          </table:table-cell>
          <table:table-cell office:value-type="string" calcext:value-type="string">
            <text:p>PORTO VELHO</text:p>
          </table:table-cell>
          <table:table-cell office:value-type="float" office:value="0.53752492687219" calcext:value-type="float">
            <text:p>0,537525</text:p>
          </table:table-cell>
          <table:table-cell office:value-type="float" office:value="0.736151388153815" calcext:value-type="float">
            <text:p>0,736151</text:p>
          </table:table-cell>
        </table:table-row>
        <table:table-row table:style-name="ro1" table:visibility="filter">
          <table:table-cell office:value-type="string" calcext:value-type="string">
            <text:p>CABREUVA</text:p>
          </table:table-cell>
          <table:table-cell office:value-type="string" calcext:value-type="string">
            <text:p>BAURU</text:p>
          </table:table-cell>
          <table:table-cell office:value-type="float" office:value="1.08047721237866" calcext:value-type="float">
            <text:p>1,080477</text:p>
          </table:table-cell>
          <table:table-cell office:value-type="float" office:value="1.55782321669143" calcext:value-type="float">
            <text:p>1,557823</text:p>
          </table:table-cell>
        </table:table-row>
        <table:table-row table:style-name="ro1" table:visibility="filter">
          <table:table-cell office:value-type="string" calcext:value-type="string">
            <text:p>CABREUVA</text:p>
          </table:table-cell>
          <table:table-cell office:value-type="string" calcext:value-type="string">
            <text:p>EDGARD SOUZA</text:p>
          </table:table-cell>
          <table:table-cell office:value-type="float" office:value="0.424146425656393" calcext:value-type="float">
            <text:p>0,424146</text:p>
          </table:table-cell>
          <table:table-cell office:value-type="float" office:value="0.700856362860004" calcext:value-type="float">
            <text:p>0,700856</text:p>
          </table:table-cell>
        </table:table-row>
        <table:table-row table:style-name="ro1" table:visibility="filter">
          <table:table-cell office:value-type="string" calcext:value-type="string">
            <text:p>CABREUVA</text:p>
          </table:table-cell>
          <table:table-cell office:value-type="string" calcext:value-type="string">
            <text:p>GERDAU SP</text:p>
          </table:table-cell>
          <table:table-cell office:value-type="float" office:value="1.03051791428887" calcext:value-type="float">
            <text:p>1,030518</text:p>
          </table:table-cell>
          <table:table-cell office:value-type="float" office:value="1.48579230890158" calcext:value-type="float">
            <text:p>1,485792</text:p>
          </table:table-cell>
        </table:table-row>
        <table:table-row table:style-name="ro1" table:visibility="filter">
          <table:table-cell office:value-type="string" calcext:value-type="string">
            <text:p>CAMACARI II</text:p>
          </table:table-cell>
          <table:table-cell office:value-type="string" calcext:value-type="string">
            <text:p>COTEGIPE</text:p>
          </table:table-cell>
          <table:table-cell office:value-type="float" office:value="0.494586433940975" calcext:value-type="float">
            <text:p>0,494586</text:p>
          </table:table-cell>
          <table:table-cell office:value-type="float" office:value="0.70896714545907" calcext:value-type="float">
            <text:p>0,708967</text:p>
          </table:table-cell>
        </table:table-row>
        <table:table-row table:style-name="ro1" table:visibility="filter">
          <table:table-cell office:value-type="string" calcext:value-type="string">
            <text:p>CAMACARI II</text:p>
          </table:table-cell>
          <table:table-cell office:value-type="string" calcext:value-type="string">
            <text:p>F. SANTANA III</text:p>
          </table:table-cell>
          <table:table-cell office:value-type="float" office:value="0.380317138930818" calcext:value-type="float">
            <text:p>0,380317</text:p>
          </table:table-cell>
          <table:table-cell office:value-type="float" office:value="0.545167311218895" calcext:value-type="float">
            <text:p>0,545167</text:p>
          </table:table-cell>
        </table:table-row>
        <table:table-row table:style-name="ro1" table:visibility="filter">
          <table:table-cell office:value-type="string" calcext:value-type="string">
            <text:p>CAMACARI II</text:p>
          </table:table-cell>
          <table:table-cell office:value-type="string" calcext:value-type="string">
            <text:p>G.MANGABEIRA</text:p>
          </table:table-cell>
          <table:table-cell office:value-type="float" office:value="0.373199706263554" calcext:value-type="float">
            <text:p>0,373200</text:p>
          </table:table-cell>
          <table:table-cell office:value-type="float" office:value="0.534964795389863" calcext:value-type="float">
            <text:p>0,534965</text:p>
          </table:table-cell>
        </table:table-row>
        <table:table-row table:style-name="ro1" table:visibility="filter">
          <table:table-cell office:value-type="string" calcext:value-type="string">
            <text:p>CAMACARI II</text:p>
          </table:table-cell>
          <table:table-cell office:value-type="string" calcext:value-type="string">
            <text:p>OLINDINA</text:p>
          </table:table-cell>
          <table:table-cell office:value-type="float" office:value="1.22492064255575" calcext:value-type="float">
            <text:p>1,224921</text:p>
          </table:table-cell>
          <table:table-cell office:value-type="float" office:value="1.4799025849578" calcext:value-type="float">
            <text:p>1,479903</text:p>
          </table:table-cell>
        </table:table-row>
        <table:table-row table:style-name="ro1" table:visibility="filter">
          <table:table-cell office:value-type="string" calcext:value-type="string">
            <text:p>CAMACARI IV</text:p>
          </table:table-cell>
          <table:table-cell office:value-type="string" calcext:value-type="string">
            <text:p>JARDIM</text:p>
          </table:table-cell>
          <table:table-cell office:value-type="float" office:value="1.30469445971026" calcext:value-type="float">
            <text:p>1,304694</text:p>
          </table:table-cell>
          <table:table-cell office:value-type="float" office:value="1.58468945880137" calcext:value-type="float">
            <text:p>1,584689</text:p>
          </table:table-cell>
        </table:table-row>
        <table:table-row table:style-name="ro1" table:visibility="filter">
          <table:table-cell office:value-type="string" calcext:value-type="string">
            <text:p>CAMACARI IV</text:p>
          </table:table-cell>
          <table:table-cell office:value-type="string" calcext:value-type="string">
            <text:p>PIRAJA</text:p>
          </table:table-cell>
          <table:table-cell office:value-type="float" office:value="0.479478852977679" calcext:value-type="float">
            <text:p>0,479479</text:p>
          </table:table-cell>
          <table:table-cell office:value-type="float" office:value="0.687311115662632" calcext:value-type="float">
            <text:p>0,687311</text:p>
          </table:table-cell>
        </table:table-row>
        <table:table-row table:style-name="ro1" table:visibility="filter">
          <table:table-cell office:value-type="string" calcext:value-type="string">
            <text:p>CAMACARI IV</text:p>
          </table:table-cell>
          <table:table-cell office:value-type="string" calcext:value-type="string">
            <text:p>PITUACU</text:p>
          </table:table-cell>
          <table:table-cell office:value-type="float" office:value="0.479268732049117" calcext:value-type="float">
            <text:p>0,479269</text:p>
          </table:table-cell>
          <table:table-cell office:value-type="float" office:value="0.687009916873704" calcext:value-type="float">
            <text:p>0,687010</text:p>
          </table:table-cell>
        </table:table-row>
        <table:table-row table:style-name="ro1" table:visibility="filter">
          <table:table-cell office:value-type="string" calcext:value-type="string">
            <text:p>CAMACARI IV</text:p>
          </table:table-cell>
          <table:table-cell office:value-type="string" calcext:value-type="string">
            <text:p>POLO</text:p>
          </table:table-cell>
          <table:table-cell office:value-type="float" office:value="0.324872091449627" calcext:value-type="float">
            <text:p>0,324872</text:p>
          </table:table-cell>
          <table:table-cell office:value-type="float" office:value="0.465689358842882" calcext:value-type="float">
            <text:p>0,465689</text:p>
          </table:table-cell>
        </table:table-row>
        <table:table-row table:style-name="ro1" table:visibility="filter">
          <table:table-cell office:value-type="string" calcext:value-type="string">
            <text:p>CAMACARI IV</text:p>
          </table:table-cell>
          <table:table-cell office:value-type="string" calcext:value-type="string">
            <text:p>SAPEACU</text:p>
          </table:table-cell>
          <table:table-cell office:value-type="float" office:value="1.35897944897637" calcext:value-type="float">
            <text:p>1,358979</text:p>
          </table:table-cell>
          <table:table-cell office:value-type="float" office:value="1.64186734191078" calcext:value-type="float">
            <text:p>1,641867</text:p>
          </table:table-cell>
        </table:table-row>
        <table:table-row table:style-name="ro1" table:visibility="filter">
          <table:table-cell office:value-type="string" calcext:value-type="string">
            <text:p>CAMAQUA</text:p>
          </table:table-cell>
          <table:table-cell office:value-type="string" calcext:value-type="string">
            <text:p>PRE.MEDICI</text:p>
          </table:table-cell>
          <table:table-cell office:value-type="float" office:value="0.384146509567123" calcext:value-type="float">
            <text:p>0,384147</text:p>
          </table:table-cell>
          <table:table-cell office:value-type="float" office:value="0.704683165845649" calcext:value-type="float">
            <text:p>0,704683</text:p>
          </table:table-cell>
        </table:table-row>
        <table:table-row table:style-name="ro1" table:visibility="filter">
          <table:table-cell office:value-type="string" calcext:value-type="string">
            <text:p>CAMAQUA 3</text:p>
          </table:table-cell>
          <table:table-cell office:value-type="string" calcext:value-type="string">
            <text:p>POVO NOVO</text:p>
          </table:table-cell>
          <table:table-cell office:value-type="float" office:value="0.597005415669681" calcext:value-type="float">
            <text:p>0,597005</text:p>
          </table:table-cell>
          <table:table-cell office:value-type="float" office:value="0.922994177176824" calcext:value-type="float">
            <text:p>0,922994</text:p>
          </table:table-cell>
        </table:table-row>
        <table:table-row table:style-name="ro1" table:visibility="filter">
          <table:table-cell office:value-type="string" calcext:value-type="string">
            <text:p>CAMPINAS</text:p>
          </table:table-cell>
          <table:table-cell office:value-type="string" calcext:value-type="string">
            <text:p>ITATIBA</text:p>
          </table:table-cell>
          <table:table-cell office:value-type="float" office:value="1.40925687873135" calcext:value-type="float">
            <text:p>1,409257</text:p>
          </table:table-cell>
          <table:table-cell office:value-type="float" office:value="1.89559068896527" calcext:value-type="float">
            <text:p>1,895591</text:p>
          </table:table-cell>
        </table:table-row>
        <table:table-row table:style-name="ro1" table:visibility="filter">
          <table:table-cell office:value-type="string" calcext:value-type="string">
            <text:p>CAMPO ASSOBIO</text:p>
          </table:table-cell>
          <table:table-cell office:value-type="string" calcext:value-type="string">
            <text:p>UMBARA</text:p>
          </table:table-cell>
          <table:table-cell office:value-type="float" office:value="0.287016373723674" calcext:value-type="float">
            <text:p>0,287016</text:p>
          </table:table-cell>
          <table:table-cell office:value-type="float" office:value="0.525537633782488" calcext:value-type="float">
            <text:p>0,525538</text:p>
          </table:table-cell>
        </table:table-row>
        <table:table-row table:style-name="ro1" table:visibility="filter">
          <table:table-cell office:value-type="string" calcext:value-type="string">
            <text:p>CAMPO BOM</text:p>
          </table:table-cell>
          <table:table-cell office:value-type="string" calcext:value-type="string">
            <text:p>CAXIAS</text:p>
          </table:table-cell>
          <table:table-cell office:value-type="float" office:value="0.411448956699753" calcext:value-type="float">
            <text:p>0,411449</text:p>
          </table:table-cell>
          <table:table-cell office:value-type="float" office:value="0.636116492868589" calcext:value-type="float">
            <text:p>0,636116</text:p>
          </table:table-cell>
        </table:table-row>
        <table:table-row table:style-name="ro1" table:visibility="filter">
          <table:table-cell office:value-type="string" calcext:value-type="string">
            <text:p>CAMPO FORMOSO</text:p>
          </table:table-cell>
          <table:table-cell office:value-type="string" calcext:value-type="string">
            <text:p>OUROLANDIA II</text:p>
          </table:table-cell>
          <table:table-cell office:value-type="float" office:value="0.388812797192542" calcext:value-type="float">
            <text:p>0,388813</text:p>
          </table:table-cell>
          <table:table-cell office:value-type="float" office:value="0.557345450717418" calcext:value-type="float">
            <text:p>0,557345</text:p>
          </table:table-cell>
        </table:table-row>
        <table:table-row table:style-name="ro1" table:visibility="filter">
          <table:table-cell office:value-type="string" calcext:value-type="string">
            <text:p>CAMPO GRANDE2</text:p>
          </table:table-cell>
          <table:table-cell office:value-type="string" calcext:value-type="string">
            <text:p>PARAISO 2</text:p>
          </table:table-cell>
          <table:table-cell office:value-type="float" office:value="0.578378327866851" calcext:value-type="float">
            <text:p>0,578378</text:p>
          </table:table-cell>
          <table:table-cell office:value-type="float" office:value="1.03277407629021" calcext:value-type="float">
            <text:p>1,032774</text:p>
          </table:table-cell>
        </table:table-row>
        <table:table-row table:style-name="ro1" table:visibility="filter">
          <table:table-cell office:value-type="string" calcext:value-type="string">
            <text:p>CAMPO GRANDE2</text:p>
          </table:table-cell>
          <table:table-cell office:value-type="string" calcext:value-type="string">
            <text:p>RIO BRILHANTE</text:p>
          </table:table-cell>
          <table:table-cell office:value-type="float" office:value="0.542355425825939" calcext:value-type="float">
            <text:p>0,542355</text:p>
          </table:table-cell>
          <table:table-cell office:value-type="float" office:value="0.968450228752896" calcext:value-type="float">
            <text:p>0,968450</text:p>
          </table:table-cell>
        </table:table-row>
        <table:table-row table:style-name="ro1" table:visibility="filter">
          <table:table-cell office:value-type="string" calcext:value-type="string">
            <text:p>CAMPOS</text:p>
          </table:table-cell>
          <table:table-cell office:value-type="string" calcext:value-type="string">
            <text:p>MACAE MERCHAN</text:p>
          </table:table-cell>
          <table:table-cell office:value-type="float" office:value="0.706473774729885" calcext:value-type="float">
            <text:p>0,706474</text:p>
          </table:table-cell>
          <table:table-cell office:value-type="float" office:value="1.10018146177414" calcext:value-type="float">
            <text:p>1,100181</text:p>
          </table:table-cell>
        </table:table-row>
        <table:table-row table:style-name="ro1" table:visibility="filter">
          <table:table-cell office:value-type="string" calcext:value-type="string">
            <text:p>CANARANA</text:p>
          </table:table-cell>
          <table:table-cell office:value-type="string" calcext:value-type="string">
            <text:p>PARANATINGA</text:p>
          </table:table-cell>
          <table:table-cell office:value-type="float" office:value="0.49288311647467" calcext:value-type="float">
            <text:p>0,492883</text:p>
          </table:table-cell>
          <table:table-cell office:value-type="float" office:value="0.737596328847877" calcext:value-type="float">
            <text:p>0,737596</text:p>
          </table:table-cell>
        </table:table-row>
        <table:table-row table:style-name="ro1" table:visibility="filter">
          <table:table-cell office:value-type="string" calcext:value-type="string">
            <text:p>CANDELARIA 2</text:p>
          </table:table-cell>
          <table:table-cell office:value-type="string" calcext:value-type="string">
            <text:p>NOVA STA RITA</text:p>
          </table:table-cell>
          <table:table-cell office:value-type="float" office:value="0.494623524985456" calcext:value-type="float">
            <text:p>0,494624</text:p>
          </table:table-cell>
          <table:table-cell office:value-type="float" office:value="0.764707691879379" calcext:value-type="float">
            <text:p>0,764708</text:p>
          </table:table-cell>
        </table:table-row>
        <table:table-row table:style-name="ro1" table:visibility="filter">
          <table:table-cell office:value-type="string" calcext:value-type="string">
            <text:p>CANDIOTA 2</text:p>
          </table:table-cell>
          <table:table-cell office:value-type="string" calcext:value-type="string">
            <text:p>GUAIBA 3</text:p>
          </table:table-cell>
          <table:table-cell office:value-type="float" office:value="1.69185623281381" calcext:value-type="float">
            <text:p>1,691856</text:p>
          </table:table-cell>
          <table:table-cell office:value-type="float" office:value="2.20448846745972" calcext:value-type="float">
            <text:p>2,204488</text:p>
          </table:table-cell>
        </table:table-row>
        <table:table-row table:style-name="ro1" table:visibility="filter">
          <table:table-cell office:value-type="string" calcext:value-type="string">
            <text:p>CAPELINHA 3</text:p>
          </table:table-cell>
          <table:table-cell office:value-type="string" calcext:value-type="string">
            <text:p>JANAUBA 6</text:p>
          </table:table-cell>
          <table:table-cell office:value-type="float" office:value="1.49898415367982" calcext:value-type="float">
            <text:p>1,498984</text:p>
          </table:table-cell>
          <table:table-cell office:value-type="float" office:value="1.95856411069638" calcext:value-type="float">
            <text:p>1,958564</text:p>
          </table:table-cell>
        </table:table-row>
        <table:table-row table:style-name="ro1" table:visibility="filter">
          <table:table-cell office:value-type="string" calcext:value-type="string">
            <text:p>CAPIVARI SUL</text:p>
          </table:table-cell>
          <table:table-cell office:value-type="string" calcext:value-type="string">
            <text:p>GRAVATAI</text:p>
          </table:table-cell>
          <table:table-cell office:value-type="float" office:value="1.28693037360489" calcext:value-type="float">
            <text:p>1,286930</text:p>
          </table:table-cell>
          <table:table-cell office:value-type="float" office:value="1.67687012171077" calcext:value-type="float">
            <text:p>1,676870</text:p>
          </table:table-cell>
        </table:table-row>
        <table:table-row table:style-name="ro1" table:visibility="filter">
          <table:table-cell office:value-type="string" calcext:value-type="string">
            <text:p>CAPIVARI SUL</text:p>
          </table:table-cell>
          <table:table-cell office:value-type="string" calcext:value-type="string">
            <text:p>VIAMAO 3</text:p>
          </table:table-cell>
          <table:table-cell office:value-type="float" office:value="0.568415466630003" calcext:value-type="float">
            <text:p>0,568415</text:p>
          </table:table-cell>
          <table:table-cell office:value-type="float" office:value="0.878792975987043" calcext:value-type="float">
            <text:p>0,878793</text:p>
          </table:table-cell>
        </table:table-row>
        <table:table-row table:style-name="ro1" table:visibility="filter">
          <table:table-cell office:value-type="string" calcext:value-type="string">
            <text:p>CARAJAS</text:p>
          </table:table-cell>
          <table:table-cell office:value-type="string" calcext:value-type="string">
            <text:p>ITACAIUNAS</text:p>
          </table:table-cell>
          <table:table-cell office:value-type="float" office:value="0.668427813017047" calcext:value-type="float">
            <text:p>0,668428</text:p>
          </table:table-cell>
          <table:table-cell office:value-type="float" office:value="0.957230279286472" calcext:value-type="float">
            <text:p>0,957230</text:p>
          </table:table-cell>
        </table:table-row>
        <table:table-row table:style-name="ro1" table:visibility="filter">
          <table:table-cell office:value-type="string" calcext:value-type="string">
            <text:p>CARAJAS</text:p>
          </table:table-cell>
          <table:table-cell office:value-type="string" calcext:value-type="string">
            <text:p>PALMEIRAS</text:p>
          </table:table-cell>
          <table:table-cell office:value-type="float" office:value="0.287052936249133" calcext:value-type="float">
            <text:p>0,287053</text:p>
          </table:table-cell>
          <table:table-cell office:value-type="float" office:value="0.49882511460612" calcext:value-type="float">
            <text:p>0,498825</text:p>
          </table:table-cell>
        </table:table-row>
        <table:table-row table:style-name="ro1" table:visibility="filter">
          <table:table-cell office:value-type="string" calcext:value-type="string">
            <text:p>CARBOCLORO</text:p>
          </table:table-cell>
          <table:table-cell office:value-type="string" calcext:value-type="string">
            <text:p>H.BORDEN SUB</text:p>
          </table:table-cell>
          <table:table-cell office:value-type="float" office:value="0.448633891381021" calcext:value-type="float">
            <text:p>0,448634</text:p>
          </table:table-cell>
          <table:table-cell office:value-type="float" office:value="0.849602803105472" calcext:value-type="float">
            <text:p>0,849603</text:p>
          </table:table-cell>
        </table:table-row>
        <table:table-row table:style-name="ro1" table:visibility="filter">
          <table:table-cell office:value-type="string" calcext:value-type="string">
            <text:p>CASCAVEL</text:p>
          </table:table-cell>
          <table:table-cell office:value-type="string" calcext:value-type="string">
            <text:p>CASCAVEL OEST</text:p>
          </table:table-cell>
          <table:table-cell office:value-type="float" office:value="0.391958570955829" calcext:value-type="float">
            <text:p>0,391959</text:p>
          </table:table-cell>
          <table:table-cell office:value-type="float" office:value="0.604869195017433" calcext:value-type="float">
            <text:p>0,604869</text:p>
          </table:table-cell>
        </table:table-row>
        <table:table-row table:style-name="ro1" table:visibility="filter">
          <table:table-cell office:value-type="string" calcext:value-type="string">
            <text:p>CASCAVEL</text:p>
          </table:table-cell>
          <table:table-cell office:value-type="string" calcext:value-type="string">
            <text:p>FOZ DO CHOPIM</text:p>
          </table:table-cell>
          <table:table-cell office:value-type="float" office:value="0.336920543423398" calcext:value-type="float">
            <text:p>0,336921</text:p>
          </table:table-cell>
          <table:table-cell office:value-type="float" office:value="0.61691402084925" calcext:value-type="float">
            <text:p>0,616914</text:p>
          </table:table-cell>
        </table:table-row>
        <table:table-row table:style-name="ro1" table:visibility="filter">
          <table:table-cell office:value-type="string" calcext:value-type="string">
            <text:p>CASCAVEL OEST</text:p>
          </table:table-cell>
          <table:table-cell office:value-type="string" calcext:value-type="string">
            <text:p>F.IGUACU 60HZ</text:p>
          </table:table-cell>
          <table:table-cell office:value-type="float" office:value="1.9841986254596" calcext:value-type="float">
            <text:p>1,984199</text:p>
          </table:table-cell>
          <table:table-cell office:value-type="float" office:value="2.2531393721763" calcext:value-type="float">
            <text:p>2,253139</text:p>
          </table:table-cell>
        </table:table-row>
        <table:table-row table:style-name="ro1" table:visibility="filter">
          <table:table-cell office:value-type="string" calcext:value-type="string">
            <text:p>CASCAVEL OEST</text:p>
          </table:table-cell>
          <table:table-cell office:value-type="string" calcext:value-type="string">
            <text:p>MEDIANEIRA NT</text:p>
          </table:table-cell>
          <table:table-cell office:value-type="float" office:value="0.391706734665059" calcext:value-type="float">
            <text:p>0,391707</text:p>
          </table:table-cell>
          <table:table-cell office:value-type="float" office:value="0.604480562070582" calcext:value-type="float">
            <text:p>0,604481</text:p>
          </table:table-cell>
        </table:table-row>
        <table:table-row table:style-name="ro1" table:visibility="filter">
          <table:table-cell office:value-type="string" calcext:value-type="string">
            <text:p>CASTANHAL</text:p>
          </table:table-cell>
          <table:table-cell office:value-type="string" calcext:value-type="string">
            <text:p>MARITUBA</text:p>
          </table:table-cell>
          <table:table-cell office:value-type="float" office:value="0.619481672476555" calcext:value-type="float">
            <text:p>0,619482</text:p>
          </table:table-cell>
          <table:table-cell office:value-type="float" office:value="0.887136356102615" calcext:value-type="float">
            <text:p>0,887136</text:p>
          </table:table-cell>
        </table:table-row>
        <table:table-row table:style-name="ro1" table:visibility="filter">
          <table:table-cell office:value-type="string" calcext:value-type="string">
            <text:p>CASTANHAL</text:p>
          </table:table-cell>
          <table:table-cell office:value-type="string" calcext:value-type="string">
            <text:p>SANTA MARIA</text:p>
          </table:table-cell>
          <table:table-cell office:value-type="float" office:value="0.286213728903339" calcext:value-type="float">
            <text:p>0,286214</text:p>
          </table:table-cell>
          <table:table-cell office:value-type="float" office:value="0.486307433464683" calcext:value-type="float">
            <text:p>0,486307</text:p>
          </table:table-cell>
        </table:table-row>
        <table:table-row table:style-name="ro1" table:visibility="filter">
          <table:table-cell office:value-type="string" calcext:value-type="string">
            <text:p>CASTERTECH</text:p>
          </table:table-cell>
          <table:table-cell office:value-type="string" calcext:value-type="string">
            <text:p>CAXIAS 6</text:p>
          </table:table-cell>
          <table:table-cell office:value-type="float" office:value="0.322844199611247" calcext:value-type="float">
            <text:p>0,322844</text:p>
          </table:table-cell>
          <table:table-cell office:value-type="float" office:value="0.592229441088298" calcext:value-type="float">
            <text:p>0,592229</text:p>
          </table:table-cell>
        </table:table-row>
        <table:table-row table:style-name="ro1" table:visibility="filter">
          <table:table-cell office:value-type="string" calcext:value-type="string">
            <text:p>CASTRO NORTE</text:p>
          </table:table-cell>
          <table:table-cell office:value-type="string" calcext:value-type="string">
            <text:p>KLABIN CELULOSE</text:p>
          </table:table-cell>
          <table:table-cell office:value-type="float" office:value="0.364651750813217" calcext:value-type="float">
            <text:p>0,364652</text:p>
          </table:table-cell>
          <table:table-cell office:value-type="float" office:value="0.667690890908963" calcext:value-type="float">
            <text:p>0,667691</text:p>
          </table:table-cell>
        </table:table-row>
        <table:table-row table:style-name="ro1" table:visibility="filter">
          <table:table-cell office:value-type="string" calcext:value-type="string">
            <text:p>CASTRO NORTE</text:p>
          </table:table-cell>
          <table:table-cell office:value-type="string" calcext:value-type="string">
            <text:p>PONTA GROSSA</text:p>
          </table:table-cell>
          <table:table-cell office:value-type="float" office:value="0.410817135328785" calcext:value-type="float">
            <text:p>0,410817</text:p>
          </table:table-cell>
          <table:table-cell office:value-type="float" office:value="0.633971670372513" calcext:value-type="float">
            <text:p>0,633972</text:p>
          </table:table-cell>
        </table:table-row>
        <table:table-row table:style-name="ro1" table:visibility="filter">
          <table:table-cell office:value-type="string" calcext:value-type="string">
            <text:p>CATU</text:p>
          </table:table-cell>
          <table:table-cell office:value-type="string" calcext:value-type="string">
            <text:p>ITABAIANINHA</text:p>
          </table:table-cell>
          <table:table-cell office:value-type="float" office:value="0.295724168688016" calcext:value-type="float">
            <text:p>0,295724</text:p>
          </table:table-cell>
          <table:table-cell office:value-type="float" office:value="0.505640567629256" calcext:value-type="float">
            <text:p>0,505641</text:p>
          </table:table-cell>
        </table:table-row>
        <table:table-row table:style-name="ro1" table:visibility="filter">
          <table:table-cell office:value-type="string" calcext:value-type="string">
            <text:p>CAUIPE</text:p>
          </table:table-cell>
          <table:table-cell office:value-type="string" calcext:value-type="string">
            <text:p>FORTALEZA II</text:p>
          </table:table-cell>
          <table:table-cell office:value-type="float" office:value="0.49772537833419" calcext:value-type="float">
            <text:p>0,497725</text:p>
          </table:table-cell>
          <table:table-cell office:value-type="float" office:value="0.743440272591764" calcext:value-type="float">
            <text:p>0,743440</text:p>
          </table:table-cell>
        </table:table-row>
        <table:table-row table:style-name="ro1" table:visibility="filter">
          <table:table-cell office:value-type="string" calcext:value-type="string">
            <text:p>CAXIAS</text:p>
          </table:table-cell>
          <table:table-cell office:value-type="string" calcext:value-type="string">
            <text:p>CAXIAS SUL 5</text:p>
          </table:table-cell>
          <table:table-cell office:value-type="float" office:value="0.353442570983913" calcext:value-type="float">
            <text:p>0,353443</text:p>
          </table:table-cell>
          <table:table-cell office:value-type="float" office:value="0.546436307648266" calcext:value-type="float">
            <text:p>0,546436</text:p>
          </table:table-cell>
        </table:table-row>
        <table:table-row table:style-name="ro1" table:visibility="filter">
          <table:table-cell office:value-type="string" calcext:value-type="string">
            <text:p>CAXIAS</text:p>
          </table:table-cell>
          <table:table-cell office:value-type="string" calcext:value-type="string">
            <text:p>GRAVATAI</text:p>
          </table:table-cell>
          <table:table-cell office:value-type="float" office:value="1.19608237388162" calcext:value-type="float">
            <text:p>1,196082</text:p>
          </table:table-cell>
          <table:table-cell office:value-type="float" office:value="1.55849518902003" calcext:value-type="float">
            <text:p>1,558495</text:p>
          </table:table-cell>
        </table:table-row>
        <table:table-row table:style-name="ro1" table:visibility="filter">
          <table:table-cell office:value-type="string" calcext:value-type="string">
            <text:p>CAXIAS</text:p>
          </table:table-cell>
          <table:table-cell office:value-type="string" calcext:value-type="string">
            <text:p>N.PETROPOLIS2</text:p>
          </table:table-cell>
          <table:table-cell office:value-type="float" office:value="0.408388561630767" calcext:value-type="float">
            <text:p>0,408389</text:p>
          </table:table-cell>
          <table:table-cell office:value-type="float" office:value="0.63138500006401" calcext:value-type="float">
            <text:p>0,631385</text:p>
          </table:table-cell>
        </table:table-row>
        <table:table-row table:style-name="ro1" table:visibility="filter">
          <table:table-cell office:value-type="string" calcext:value-type="string">
            <text:p>CAXIAS II</text:p>
          </table:table-cell>
          <table:table-cell office:value-type="string" calcext:value-type="string">
            <text:p>PERITORO</text:p>
          </table:table-cell>
          <table:table-cell office:value-type="float" office:value="0.315078578409083" calcext:value-type="float">
            <text:p>0,315079</text:p>
          </table:table-cell>
          <table:table-cell office:value-type="float" office:value="0.528077337742075" calcext:value-type="float">
            <text:p>0,528077</text:p>
          </table:table-cell>
        </table:table-row>
        <table:table-row table:style-name="ro1" table:visibility="filter">
          <table:table-cell office:value-type="string" calcext:value-type="string">
            <text:p>CAXIAS NORTE</text:p>
          </table:table-cell>
          <table:table-cell office:value-type="string" calcext:value-type="string">
            <text:p>CAXIAS 6</text:p>
          </table:table-cell>
          <table:table-cell office:value-type="float" office:value="0.46807220875739" calcext:value-type="float">
            <text:p>0,468072</text:p>
          </table:table-cell>
          <table:table-cell office:value-type="float" office:value="0.723658298303284" calcext:value-type="float">
            <text:p>0,723658</text:p>
          </table:table-cell>
        </table:table-row>
        <table:table-row table:style-name="ro1" table:visibility="filter">
          <table:table-cell office:value-type="string" calcext:value-type="string">
            <text:p>CAXIAS NORTE</text:p>
          </table:table-cell>
          <table:table-cell office:value-type="string" calcext:value-type="string">
            <text:p>ITA</text:p>
          </table:table-cell>
          <table:table-cell office:value-type="float" office:value="0.525368165104311" calcext:value-type="float">
            <text:p>0,525368</text:p>
          </table:table-cell>
          <table:table-cell office:value-type="float" office:value="0.691146933961914" calcext:value-type="float">
            <text:p>0,691147</text:p>
          </table:table-cell>
        </table:table-row>
        <table:table-row table:style-name="ro1" table:visibility="filter">
          <table:table-cell office:value-type="string" calcext:value-type="string">
            <text:p>CAXIAS NORTE</text:p>
          </table:table-cell>
          <table:table-cell office:value-type="string" calcext:value-type="string">
            <text:p>MONTE CLARO</text:p>
          </table:table-cell>
          <table:table-cell office:value-type="float" office:value="0.471658689917088" calcext:value-type="float">
            <text:p>0,471659</text:p>
          </table:table-cell>
          <table:table-cell office:value-type="float" office:value="0.729203141180868" calcext:value-type="float">
            <text:p>0,729203</text:p>
          </table:table-cell>
        </table:table-row>
        <table:table-row table:style-name="ro1" table:visibility="filter">
          <table:table-cell office:value-type="string" calcext:value-type="string">
            <text:p>CAXIAS NORTE</text:p>
          </table:table-cell>
          <table:table-cell office:value-type="string" calcext:value-type="string">
            <text:p>VINHEDOS</text:p>
          </table:table-cell>
          <table:table-cell office:value-type="float" office:value="0.46867748763378" calcext:value-type="float">
            <text:p>0,468677</text:p>
          </table:table-cell>
          <table:table-cell office:value-type="float" office:value="0.724594083580625" calcext:value-type="float">
            <text:p>0,724594</text:p>
          </table:table-cell>
        </table:table-row>
        <table:table-row table:style-name="ro1" table:visibility="filter">
          <table:table-cell office:value-type="string" calcext:value-type="string">
            <text:p>CEARA MIRIM 2</text:p>
          </table:table-cell>
          <table:table-cell office:value-type="string" calcext:value-type="string">
            <text:p>TOUROS</text:p>
          </table:table-cell>
          <table:table-cell office:value-type="float" office:value="0.59310965556198" calcext:value-type="float">
            <text:p>0,593110</text:p>
          </table:table-cell>
          <table:table-cell office:value-type="float" office:value="0.880904975530932" calcext:value-type="float">
            <text:p>0,880905</text:p>
          </table:table-cell>
        </table:table-row>
        <table:table-row table:style-name="ro1" table:visibility="filter">
          <table:table-cell office:value-type="string" calcext:value-type="string">
            <text:p>CENTRO-CTT</text:p>
          </table:table-cell>
          <table:table-cell office:value-type="string" calcext:value-type="string">
            <text:p>CENTRO-CTR</text:p>
          </table:table-cell>
          <table:table-cell office:value-type="float" office:value="0.369161338870813" calcext:value-type="float">
            <text:p>0,369161</text:p>
          </table:table-cell>
          <table:table-cell office:value-type="float" office:value="0.699101236728546" calcext:value-type="float">
            <text:p>0,699101</text:p>
          </table:table-cell>
        </table:table-row>
        <table:table-row table:style-name="ro1" table:visibility="filter">
          <table:table-cell office:value-type="string" calcext:value-type="string">
            <text:p>CERQUILHO III</text:p>
          </table:table-cell>
          <table:table-cell office:value-type="string" calcext:value-type="string">
            <text:p>TOYOTA</text:p>
          </table:table-cell>
          <table:table-cell office:value-type="float" office:value="0.347069431563554" calcext:value-type="float">
            <text:p>0,347069</text:p>
          </table:table-cell>
          <table:table-cell office:value-type="float" office:value="0.657264570496274" calcext:value-type="float">
            <text:p>0,657265</text:p>
          </table:table-cell>
        </table:table-row>
        <table:table-row table:style-name="ro1" table:visibility="filter">
          <table:table-cell office:value-type="string" calcext:value-type="string">
            <text:p>CERRO CHATO</text:p>
          </table:table-cell>
          <table:table-cell office:value-type="string" calcext:value-type="string">
            <text:p>LIVRAMENTO 3</text:p>
          </table:table-cell>
          <table:table-cell office:value-type="float" office:value="0.426752869833064" calcext:value-type="float">
            <text:p>0,426753</text:p>
          </table:table-cell>
          <table:table-cell office:value-type="float" office:value="0.782840806458331" calcext:value-type="float">
            <text:p>0,782841</text:p>
          </table:table-cell>
        </table:table-row>
        <table:table-row table:style-name="ro1" table:visibility="filter">
          <table:table-cell office:value-type="string" calcext:value-type="string">
            <text:p>CHAPADA I</text:p>
          </table:table-cell>
          <table:table-cell office:value-type="string" calcext:value-type="string">
            <text:p>CURRAL PIAUI II</text:p>
          </table:table-cell>
          <table:table-cell office:value-type="float" office:value="0.374356862561298" calcext:value-type="float">
            <text:p>0,374357</text:p>
          </table:table-cell>
          <table:table-cell office:value-type="float" office:value="0.536102354097016" calcext:value-type="float">
            <text:p>0,536102</text:p>
          </table:table-cell>
        </table:table-row>
        <table:table-row table:style-name="ro1" table:visibility="filter">
          <table:table-cell office:value-type="string" calcext:value-type="string">
            <text:p>CHAPADA II</text:p>
          </table:table-cell>
          <table:table-cell office:value-type="string" calcext:value-type="string">
            <text:p>PICOS</text:p>
          </table:table-cell>
          <table:table-cell office:value-type="float" office:value="0.320217541013636" calcext:value-type="float">
            <text:p>0,320218</text:p>
          </table:table-cell>
          <table:table-cell office:value-type="float" office:value="0.544083511009021" calcext:value-type="float">
            <text:p>0,544084</text:p>
          </table:table-cell>
        </table:table-row>
        <table:table-row table:style-name="ro1" table:visibility="filter">
          <table:table-cell office:value-type="string" calcext:value-type="string">
            <text:p>CHAPADA III</text:p>
          </table:table-cell>
          <table:table-cell office:value-type="string" calcext:value-type="string">
            <text:p>CURRAL PIAUI II</text:p>
          </table:table-cell>
          <table:table-cell office:value-type="float" office:value="0.378961534387871" calcext:value-type="float">
            <text:p>0,378962</text:p>
          </table:table-cell>
          <table:table-cell office:value-type="float" office:value="0.542696531078787" calcext:value-type="float">
            <text:p>0,542697</text:p>
          </table:table-cell>
        </table:table-row>
        <table:table-row table:style-name="ro1" table:visibility="filter">
          <table:table-cell office:value-type="string" calcext:value-type="string">
            <text:p>CHAPADAO</text:p>
          </table:table-cell>
          <table:table-cell office:value-type="string" calcext:value-type="string">
            <text:p>INOCENCIA</text:p>
          </table:table-cell>
          <table:table-cell office:value-type="float" office:value="0.553950199168029" calcext:value-type="float">
            <text:p>0,553950</text:p>
          </table:table-cell>
          <table:table-cell office:value-type="float" office:value="0.98915429173592" calcext:value-type="float">
            <text:p>0,989154</text:p>
          </table:table-cell>
        </table:table-row>
        <table:table-row table:style-name="ro1" table:visibility="filter">
          <table:table-cell office:value-type="string" calcext:value-type="string">
            <text:p>CHAPADINHA II</text:p>
          </table:table-cell>
          <table:table-cell office:value-type="string" calcext:value-type="string">
            <text:p>COELHO NETO</text:p>
          </table:table-cell>
          <table:table-cell office:value-type="float" office:value="0.335839308705905" calcext:value-type="float">
            <text:p>0,335839</text:p>
          </table:table-cell>
          <table:table-cell office:value-type="float" office:value="0.562872693364421" calcext:value-type="float">
            <text:p>0,562873</text:p>
          </table:table-cell>
        </table:table-row>
        <table:table-row table:style-name="ro1" table:visibility="filter">
          <table:table-cell office:value-type="string" calcext:value-type="string">
            <text:p>CHAPADINHA II</text:p>
          </table:table-cell>
          <table:table-cell office:value-type="string" calcext:value-type="string">
            <text:p>MIRANDA II</text:p>
          </table:table-cell>
          <table:table-cell office:value-type="float" office:value="0.442525687940972" calcext:value-type="float">
            <text:p>0,442526</text:p>
          </table:table-cell>
          <table:table-cell office:value-type="float" office:value="0.625117157464976" calcext:value-type="float">
            <text:p>0,625117</text:p>
          </table:table-cell>
        </table:table-row>
        <table:table-row table:style-name="ro1" table:visibility="filter">
          <table:table-cell office:value-type="string" calcext:value-type="string">
            <text:p>CHARQUEADAS3</text:p>
          </table:table-cell>
          <table:table-cell office:value-type="string" calcext:value-type="string">
            <text:p>CHARQUEADAS</text:p>
          </table:table-cell>
          <table:table-cell office:value-type="float" office:value="0.30110375007666" calcext:value-type="float">
            <text:p>0,301104</text:p>
          </table:table-cell>
          <table:table-cell office:value-type="float" office:value="0.552348488317951" calcext:value-type="float">
            <text:p>0,552348</text:p>
          </table:table-cell>
        </table:table-row>
        <table:table-row table:style-name="ro1" table:visibility="filter">
          <table:table-cell office:value-type="string" calcext:value-type="string">
            <text:p>CHARQUEADAS3</text:p>
          </table:table-cell>
          <table:table-cell office:value-type="string" calcext:value-type="string">
            <text:p>GUAIBA 3</text:p>
          </table:table-cell>
          <table:table-cell office:value-type="float" office:value="0.600363450168732" calcext:value-type="float">
            <text:p>0,600363</text:p>
          </table:table-cell>
          <table:table-cell office:value-type="float" office:value="0.928185832408135" calcext:value-type="float">
            <text:p>0,928186</text:p>
          </table:table-cell>
        </table:table-row>
        <table:table-row table:style-name="ro1" table:visibility="filter">
          <table:table-cell office:value-type="string" calcext:value-type="string">
            <text:p>CHAVANTES</text:p>
          </table:table-cell>
          <table:table-cell office:value-type="string" calcext:value-type="string">
            <text:p>PIRAJU</text:p>
          </table:table-cell>
          <table:table-cell office:value-type="float" office:value="0.331045089390963" calcext:value-type="float">
            <text:p>0,331045</text:p>
          </table:table-cell>
          <table:table-cell office:value-type="float" office:value="0.626918387808545" calcext:value-type="float">
            <text:p>0,626918</text:p>
          </table:table-cell>
        </table:table-row>
        <table:table-row table:style-name="ro1" table:visibility="filter">
          <table:table-cell office:value-type="string" calcext:value-type="string">
            <text:p>CHAVANTES</text:p>
          </table:table-cell>
          <table:table-cell office:value-type="string" calcext:value-type="string">
            <text:p>SALTO GRANDE SP</text:p>
          </table:table-cell>
          <table:table-cell office:value-type="float" office:value="0.329561185298949" calcext:value-type="float">
            <text:p>0,329561</text:p>
          </table:table-cell>
          <table:table-cell office:value-type="float" office:value="0.62410823659096" calcext:value-type="float">
            <text:p>0,624108</text:p>
          </table:table-cell>
        </table:table-row>
        <table:table-row table:style-name="ro1" table:visibility="filter">
          <table:table-cell office:value-type="string" calcext:value-type="string">
            <text:p>CICERO DANTAS</text:p>
          </table:table-cell>
          <table:table-cell office:value-type="string" calcext:value-type="string">
            <text:p>P.AFONSO III</text:p>
          </table:table-cell>
          <table:table-cell office:value-type="float" office:value="0.326632719803857" calcext:value-type="float">
            <text:p>0,326633</text:p>
          </table:table-cell>
          <table:table-cell office:value-type="float" office:value="0.55552336752791" calcext:value-type="float">
            <text:p>0,555523</text:p>
          </table:table-cell>
        </table:table-row>
        <table:table-row table:style-name="ro1" table:visibility="filter">
          <table:table-cell office:value-type="string" calcext:value-type="string">
            <text:p>CLAUDIA</text:p>
          </table:table-cell>
          <table:table-cell office:value-type="string" calcext:value-type="string">
            <text:p>PARANAITA</text:p>
          </table:table-cell>
          <table:table-cell office:value-type="float" office:value="1.48859632731712" calcext:value-type="float">
            <text:p>1,488596</text:p>
          </table:table-cell>
          <table:table-cell office:value-type="float" office:value="1.87751502608183" calcext:value-type="float">
            <text:p>1,877515</text:p>
          </table:table-cell>
        </table:table-row>
        <table:table-row table:style-name="ro1" table:visibility="filter">
          <table:table-cell office:value-type="string" calcext:value-type="string">
            <text:p>CLAUDIA</text:p>
          </table:table-cell>
          <table:table-cell office:value-type="string" calcext:value-type="string">
            <text:p>PARANATINGA</text:p>
          </table:table-cell>
          <table:table-cell office:value-type="float" office:value="1.5077226339581" calcext:value-type="float">
            <text:p>1,507723</text:p>
          </table:table-cell>
          <table:table-cell office:value-type="float" office:value="1.90163837467064" calcext:value-type="float">
            <text:p>1,901638</text:p>
          </table:table-cell>
        </table:table-row>
        <table:table-row table:style-name="ro1" table:visibility="filter">
          <table:table-cell office:value-type="string" calcext:value-type="string">
            <text:p>COLINAS</text:p>
          </table:table-cell>
          <table:table-cell office:value-type="string" calcext:value-type="string">
            <text:p>MIRACEMA</text:p>
          </table:table-cell>
          <table:table-cell office:value-type="float" office:value="1.40394348319854" calcext:value-type="float">
            <text:p>1,403943</text:p>
          </table:table-cell>
          <table:table-cell office:value-type="float" office:value="1.76241770629519" calcext:value-type="float">
            <text:p>1,762418</text:p>
          </table:table-cell>
        </table:table-row>
        <table:table-row table:style-name="ro1" table:visibility="filter">
          <table:table-cell office:value-type="string" calcext:value-type="string">
            <text:p>COMPERJ</text:p>
          </table:table-cell>
          <table:table-cell office:value-type="string" calcext:value-type="string">
            <text:p>LAGOS</text:p>
          </table:table-cell>
          <table:table-cell office:value-type="float" office:value="0.709441065838659" calcext:value-type="float">
            <text:p>0,709441</text:p>
          </table:table-cell>
          <table:table-cell office:value-type="float" office:value="1.00640050613993" calcext:value-type="float">
            <text:p>1,006401</text:p>
          </table:table-cell>
        </table:table-row>
        <table:table-row table:style-name="ro1" table:visibility="filter">
          <table:table-cell office:value-type="string" calcext:value-type="string">
            <text:p>CRATO II</text:p>
          </table:table-cell>
          <table:table-cell office:value-type="string" calcext:value-type="string">
            <text:p>TAUA II</text:p>
          </table:table-cell>
          <table:table-cell office:value-type="float" office:value="0.379487766916123" calcext:value-type="float">
            <text:p>0,379488</text:p>
          </table:table-cell>
          <table:table-cell office:value-type="float" office:value="0.672545950467585" calcext:value-type="float">
            <text:p>0,672546</text:p>
          </table:table-cell>
        </table:table-row>
        <table:table-row table:style-name="ro1" table:visibility="filter">
          <table:table-cell office:value-type="string" calcext:value-type="string">
            <text:p>CRISTIANO ROCHA</text:p>
          </table:table-cell>
          <table:table-cell office:value-type="string" calcext:value-type="string">
            <text:p>LECHUGA</text:p>
          </table:table-cell>
          <table:table-cell office:value-type="float" office:value="0.558131492300613" calcext:value-type="float">
            <text:p>0,558131</text:p>
          </table:table-cell>
          <table:table-cell office:value-type="float" office:value="0.807058854379863" calcext:value-type="float">
            <text:p>0,807059</text:p>
          </table:table-cell>
        </table:table-row>
        <table:table-row table:style-name="ro1" table:visibility="filter">
          <table:table-cell office:value-type="string" calcext:value-type="string">
            <text:p>CRISTIANO ROCHA</text:p>
          </table:table-cell>
          <table:table-cell office:value-type="string" calcext:value-type="string">
            <text:p>PR.FIGUEIREDO</text:p>
          </table:table-cell>
          <table:table-cell office:value-type="float" office:value="0.428730729995359" calcext:value-type="float">
            <text:p>0,428731</text:p>
          </table:table-cell>
          <table:table-cell office:value-type="float" office:value="0.73555284653543" calcext:value-type="float">
            <text:p>0,735553</text:p>
          </table:table-cell>
        </table:table-row>
        <table:table-row table:style-name="ro1" table:visibility="filter">
          <table:table-cell office:value-type="string" calcext:value-type="string">
            <text:p>CRUZ ALTA 2</text:p>
          </table:table-cell>
          <table:table-cell office:value-type="string" calcext:value-type="string">
            <text:p>IJUI 2</text:p>
          </table:table-cell>
          <table:table-cell office:value-type="float" office:value="0.326467438198649" calcext:value-type="float">
            <text:p>0,326467</text:p>
          </table:table-cell>
          <table:table-cell office:value-type="float" office:value="0.598875955308254" calcext:value-type="float">
            <text:p>0,598876</text:p>
          </table:table-cell>
        </table:table-row>
        <table:table-row table:style-name="ro1" table:visibility="filter">
          <table:table-cell office:value-type="string" calcext:value-type="string">
            <text:p>CRUZ ALTA 2</text:p>
          </table:table-cell>
          <table:table-cell office:value-type="string" calcext:value-type="string">
            <text:p>PASSO REAL</text:p>
          </table:table-cell>
          <table:table-cell office:value-type="float" office:value="0.334677723281687" calcext:value-type="float">
            <text:p>0,334678</text:p>
          </table:table-cell>
          <table:table-cell office:value-type="float" office:value="0.613937005039853" calcext:value-type="float">
            <text:p>0,613937</text:p>
          </table:table-cell>
        </table:table-row>
        <table:table-row table:style-name="ro1" table:visibility="filter">
          <table:table-cell office:value-type="string" calcext:value-type="string">
            <text:p>CRUZEIRO SUL</text:p>
          </table:table-cell>
          <table:table-cell office:value-type="string" calcext:value-type="string">
            <text:p>FEIJO</text:p>
          </table:table-cell>
          <table:table-cell office:value-type="float" office:value="0.432426226227589" calcext:value-type="float">
            <text:p>0,432426</text:p>
          </table:table-cell>
          <table:table-cell office:value-type="float" office:value="0.749067723105134" calcext:value-type="float">
            <text:p>0,749068</text:p>
          </table:table-cell>
        </table:table-row>
        <table:table-row table:style-name="ro1" table:visibility="filter">
          <table:table-cell office:value-type="string" calcext:value-type="string">
            <text:p>CURIT. CENTRO</text:p>
          </table:table-cell>
          <table:table-cell office:value-type="string" calcext:value-type="string">
            <text:p>UBERABA</text:p>
          </table:table-cell>
          <table:table-cell office:value-type="float" office:value="0.333417251796366" calcext:value-type="float">
            <text:p>0,333417</text:p>
          </table:table-cell>
          <table:table-cell office:value-type="float" office:value="0.610499363844723" calcext:value-type="float">
            <text:p>0,610499</text:p>
          </table:table-cell>
        </table:table-row>
        <table:table-row table:style-name="ro1" table:visibility="filter">
          <table:table-cell office:value-type="string" calcext:value-type="string">
            <text:p>CURIT.LESTE</text:p>
          </table:table-cell>
          <table:table-cell office:value-type="string" calcext:value-type="string">
            <text:p>D.S.J.PINHAIS</text:p>
          </table:table-cell>
          <table:table-cell office:value-type="float" office:value="0.381586041470854" calcext:value-type="float">
            <text:p>0,381586</text:p>
          </table:table-cell>
          <table:table-cell office:value-type="float" office:value="0.588862341169151" calcext:value-type="float">
            <text:p>0,588862</text:p>
          </table:table-cell>
        </table:table-row>
        <table:table-row table:style-name="ro1" table:visibility="filter">
          <table:table-cell office:value-type="string" calcext:value-type="string">
            <text:p>CURIT.LESTE</text:p>
          </table:table-cell>
          <table:table-cell office:value-type="string" calcext:value-type="string">
            <text:p>POSTO FISCAL</text:p>
          </table:table-cell>
          <table:table-cell office:value-type="float" office:value="0.31008140276968" calcext:value-type="float">
            <text:p>0,310081</text:p>
          </table:table-cell>
          <table:table-cell office:value-type="float" office:value="0.478516614717194" calcext:value-type="float">
            <text:p>0,478517</text:p>
          </table:table-cell>
        </table:table-row>
        <table:table-row table:style-name="ro1" table:visibility="filter">
          <table:table-cell office:value-type="string" calcext:value-type="string">
            <text:p>CURIT.LESTE</text:p>
          </table:table-cell>
          <table:table-cell office:value-type="string" calcext:value-type="string">
            <text:p>SANTA MONICA</text:p>
          </table:table-cell>
          <table:table-cell office:value-type="float" office:value="0.392333345952418" calcext:value-type="float">
            <text:p>0,392333</text:p>
          </table:table-cell>
          <table:table-cell office:value-type="float" office:value="0.605447546576239" calcext:value-type="float">
            <text:p>0,605448</text:p>
          </table:table-cell>
        </table:table-row>
        <table:table-row table:style-name="ro1" table:visibility="filter">
          <table:table-cell office:value-type="string" calcext:value-type="string">
            <text:p>CURIT.LESTE</text:p>
          </table:table-cell>
          <table:table-cell office:value-type="string" calcext:value-type="string">
            <text:p>UBERABA</text:p>
          </table:table-cell>
          <table:table-cell office:value-type="float" office:value="0.36966386907896" calcext:value-type="float">
            <text:p>0,369664</text:p>
          </table:table-cell>
          <table:table-cell office:value-type="float" office:value="0.570464083414618" calcext:value-type="float">
            <text:p>0,570464</text:p>
          </table:table-cell>
        </table:table-row>
        <table:table-row table:style-name="ro1" table:visibility="filter">
          <table:table-cell office:value-type="string" calcext:value-type="string">
            <text:p>CURITIBA</text:p>
          </table:table-cell>
          <table:table-cell office:value-type="string" calcext:value-type="string">
            <text:p>UMBARA</text:p>
          </table:table-cell>
          <table:table-cell office:value-type="float" office:value="0.784930745250458" calcext:value-type="float">
            <text:p>0,784931</text:p>
          </table:table-cell>
          <table:table-cell office:value-type="float" office:value="1.21130257941874" calcext:value-type="float">
            <text:p>1,211303</text:p>
          </table:table-cell>
        </table:table-row>
        <table:table-row table:style-name="ro1" table:visibility="filter">
          <table:table-cell office:value-type="string" calcext:value-type="string">
            <text:p>CURR NOVOS II</text:p>
          </table:table-cell>
          <table:table-cell office:value-type="string" calcext:value-type="string">
            <text:p>LAGOA NOVA II</text:p>
          </table:table-cell>
          <table:table-cell office:value-type="float" office:value="0.297184871453582" calcext:value-type="float">
            <text:p>0,297185</text:p>
          </table:table-cell>
          <table:table-cell office:value-type="float" office:value="0.523705734874988" calcext:value-type="float">
            <text:p>0,523706</text:p>
          </table:table-cell>
        </table:table-row>
        <table:table-row table:style-name="ro1" table:visibility="filter">
          <table:table-cell office:value-type="string" calcext:value-type="string">
            <text:p>CURRAL PIAUI II</text:p>
          </table:table-cell>
          <table:table-cell office:value-type="string" calcext:value-type="string">
            <text:p>QUEIMADA NOVA 2</text:p>
          </table:table-cell>
          <table:table-cell office:value-type="float" office:value="1.41171032493276" calcext:value-type="float">
            <text:p>1,411710</text:p>
          </table:table-cell>
          <table:table-cell office:value-type="float" office:value="1.70391911797244" calcext:value-type="float">
            <text:p>1,703919</text:p>
          </table:table-cell>
        </table:table-row>
        <table:table-row table:style-name="ro1" table:visibility="filter">
          <table:table-cell office:value-type="string" calcext:value-type="string">
            <text:p>D.S.J.PINHAIS</text:p>
          </table:table-cell>
          <table:table-cell office:value-type="string" calcext:value-type="string">
            <text:p>REPAR</text:p>
          </table:table-cell>
          <table:table-cell office:value-type="float" office:value="0.310307913085953" calcext:value-type="float">
            <text:p>0,310308</text:p>
          </table:table-cell>
          <table:table-cell office:value-type="float" office:value="0.568185306891857" calcext:value-type="float">
            <text:p>0,568185</text:p>
          </table:table-cell>
        </table:table-row>
        <table:table-row table:style-name="ro1" table:visibility="filter">
          <table:table-cell office:value-type="string" calcext:value-type="string">
            <text:p>DARDANELOS</text:p>
          </table:table-cell>
          <table:table-cell office:value-type="string" calcext:value-type="string">
            <text:p>JUINA</text:p>
          </table:table-cell>
          <table:table-cell office:value-type="float" office:value="0.196176762862944" calcext:value-type="float">
            <text:p>0,196177</text:p>
          </table:table-cell>
          <table:table-cell office:value-type="float" office:value="0.348329851787543" calcext:value-type="float">
            <text:p>0,348330</text:p>
          </table:table-cell>
        </table:table-row>
        <table:table-row table:style-name="ro1" table:visibility="filter">
          <table:table-cell office:value-type="string" calcext:value-type="string">
            <text:p>DELM. GOUVEIA</text:p>
          </table:table-cell>
          <table:table-cell office:value-type="string" calcext:value-type="string">
            <text:p>FORTALEZA II</text:p>
          </table:table-cell>
          <table:table-cell office:value-type="float" office:value="0.305290663445901" calcext:value-type="float">
            <text:p>0,305291</text:p>
          </table:table-cell>
          <table:table-cell office:value-type="float" office:value="0.456005226841273" calcext:value-type="float">
            <text:p>0,456005</text:p>
          </table:table-cell>
        </table:table-row>
        <table:table-row table:style-name="ro1" table:visibility="filter">
          <table:table-cell office:value-type="string" calcext:value-type="string">
            <text:p>DIANOPOLIS II</text:p>
          </table:table-cell>
          <table:table-cell office:value-type="string" calcext:value-type="string">
            <text:p>GURUPI</text:p>
          </table:table-cell>
          <table:table-cell office:value-type="float" office:value="0.640941542297227" calcext:value-type="float">
            <text:p>0,640942</text:p>
          </table:table-cell>
          <table:table-cell office:value-type="float" office:value="0.954651512377739" calcext:value-type="float">
            <text:p>0,954652</text:p>
          </table:table-cell>
        </table:table-row>
        <table:table-row table:style-name="ro1" table:visibility="filter">
          <table:table-cell office:value-type="string" calcext:value-type="string">
            <text:p>DIANOPOLIS II</text:p>
          </table:table-cell>
          <table:table-cell office:value-type="string" calcext:value-type="string">
            <text:p>PALMAS</text:p>
          </table:table-cell>
          <table:table-cell office:value-type="float" office:value="0.519517377523753" calcext:value-type="float">
            <text:p>0,519517</text:p>
          </table:table-cell>
          <table:table-cell office:value-type="float" office:value="0.918107942871236" calcext:value-type="float">
            <text:p>0,918108</text:p>
          </table:table-cell>
        </table:table-row>
        <table:table-row table:style-name="ro1" table:visibility="filter">
          <table:table-cell office:value-type="string" calcext:value-type="string">
            <text:p>DOME.RANGONI</text:p>
          </table:table-cell>
          <table:table-cell office:value-type="string" calcext:value-type="string">
            <text:p>TIJUCO PRETO</text:p>
          </table:table-cell>
          <table:table-cell office:value-type="float" office:value="0.840125286745049" calcext:value-type="float">
            <text:p>0,840125</text:p>
          </table:table-cell>
          <table:table-cell office:value-type="float" office:value="1.08310898774512" calcext:value-type="float">
            <text:p>1,083109</text:p>
          </table:table-cell>
        </table:table-row>
        <table:table-row table:style-name="ro1" table:visibility="filter">
          <table:table-cell office:value-type="string" calcext:value-type="string">
            <text:p>DOURADOS</text:p>
          </table:table-cell>
          <table:table-cell office:value-type="string" calcext:value-type="string">
            <text:p>DOURADOS 2</text:p>
          </table:table-cell>
          <table:table-cell office:value-type="float" office:value="0.504126068595943" calcext:value-type="float">
            <text:p>0,504126</text:p>
          </table:table-cell>
          <table:table-cell office:value-type="float" office:value="0.90018645191673" calcext:value-type="float">
            <text:p>0,900186</text:p>
          </table:table-cell>
        </table:table-row>
        <table:table-row table:style-name="ro1" table:visibility="filter">
          <table:table-cell office:value-type="string" calcext:value-type="string">
            <text:p>DOURADOS 2</text:p>
          </table:table-cell>
          <table:table-cell office:value-type="string" calcext:value-type="string">
            <text:p>RIO BRILHANTE</text:p>
          </table:table-cell>
          <table:table-cell office:value-type="float" office:value="0.532157907176362" calcext:value-type="float">
            <text:p>0,532158</text:p>
          </table:table-cell>
          <table:table-cell office:value-type="float" office:value="0.950241156254256" calcext:value-type="float">
            <text:p>0,950241</text:p>
          </table:table-cell>
        </table:table-row>
        <table:table-row table:style-name="ro1" table:visibility="filter">
          <table:table-cell office:value-type="string" calcext:value-type="string">
            <text:p>EDEIA</text:p>
          </table:table-cell>
          <table:table-cell office:value-type="string" calcext:value-type="string">
            <text:p>PALMEIRAS</text:p>
          </table:table-cell>
          <table:table-cell office:value-type="float" office:value="0.329894290956682" calcext:value-type="float">
            <text:p>0,329894</text:p>
          </table:table-cell>
          <table:table-cell office:value-type="float" office:value="0.586309577422932" calcext:value-type="float">
            <text:p>0,586310</text:p>
          </table:table-cell>
        </table:table-row>
        <table:table-row table:style-name="ro1" table:visibility="filter">
          <table:table-cell office:value-type="string" calcext:value-type="string">
            <text:p>EDGARD SOUZA</text:p>
          </table:table-cell>
          <table:table-cell office:value-type="string" calcext:value-type="string">
            <text:p>PIRITUBA</text:p>
          </table:table-cell>
          <table:table-cell office:value-type="float" office:value="0.4356303803424" calcext:value-type="float">
            <text:p>0,435630</text:p>
          </table:table-cell>
          <table:table-cell office:value-type="float" office:value="0.824977335344627" calcext:value-type="float">
            <text:p>0,824977</text:p>
          </table:table-cell>
        </table:table-row>
        <table:table-row table:style-name="ro1" table:visibility="filter">
          <table:table-cell office:value-type="string" calcext:value-type="string">
            <text:p>EDGARD SOUZA</text:p>
          </table:table-cell>
          <table:table-cell office:value-type="string" calcext:value-type="string">
            <text:p>TOYOTA</text:p>
          </table:table-cell>
          <table:table-cell office:value-type="float" office:value="0.343595736756232" calcext:value-type="float">
            <text:p>0,343596</text:p>
          </table:table-cell>
          <table:table-cell office:value-type="float" office:value="0.65068624259432" calcext:value-type="float">
            <text:p>0,650686</text:p>
          </table:table-cell>
        </table:table-row>
        <table:table-row table:style-name="ro1" table:visibility="filter">
          <table:table-cell office:value-type="string" calcext:value-type="string">
            <text:p>ELDORADO SUL</text:p>
          </table:table-cell>
          <table:table-cell office:value-type="string" calcext:value-type="string">
            <text:p>PORTO ALEGRE9</text:p>
          </table:table-cell>
          <table:table-cell office:value-type="float" office:value="0.290284359830485" calcext:value-type="float">
            <text:p>0,290284</text:p>
          </table:table-cell>
          <table:table-cell office:value-type="float" office:value="0.532501263414657" calcext:value-type="float">
            <text:p>0,532501</text:p>
          </table:table-cell>
        </table:table-row>
        <table:table-row table:style-name="ro1" table:visibility="filter">
          <table:table-cell office:value-type="string" calcext:value-type="string">
            <text:p>EMBORCACAO</text:p>
          </table:table-cell>
          <table:table-cell office:value-type="string" calcext:value-type="string">
            <text:p>PARACATU 4</text:p>
          </table:table-cell>
          <table:table-cell office:value-type="float" office:value="1.37213260846559" calcext:value-type="float">
            <text:p>1,372133</text:p>
          </table:table-cell>
          <table:table-cell office:value-type="float" office:value="1.79282060818299" calcext:value-type="float">
            <text:p>1,792821</text:p>
          </table:table-cell>
        </table:table-row>
        <table:table-row table:style-name="ro1" table:visibility="filter">
          <table:table-cell office:value-type="string" calcext:value-type="string">
            <text:p>EMBU-GUACU</text:p>
          </table:table-cell>
          <table:table-cell office:value-type="string" calcext:value-type="string">
            <text:p>CBA2 CIA.B.ALUM</text:p>
          </table:table-cell>
          <table:table-cell office:value-type="float" office:value="1.02303243543851" calcext:value-type="float">
            <text:p>1,023032</text:p>
          </table:table-cell>
          <table:table-cell office:value-type="float" office:value="1.47499980665577" calcext:value-type="float">
            <text:p>1,475000</text:p>
          </table:table-cell>
        </table:table-row>
        <table:table-row table:style-name="ro1" table:visibility="filter">
          <table:table-cell office:value-type="string" calcext:value-type="string">
            <text:p>EMBU-GUACU</text:p>
          </table:table-cell>
          <table:table-cell office:value-type="string" calcext:value-type="string">
            <text:p>OESTE</text:p>
          </table:table-cell>
          <table:table-cell office:value-type="float" office:value="1.02889722734105" calcext:value-type="float">
            <text:p>1,028897</text:p>
          </table:table-cell>
          <table:table-cell office:value-type="float" office:value="1.48345561570215" calcext:value-type="float">
            <text:p>1,483456</text:p>
          </table:table-cell>
        </table:table-row>
        <table:table-row table:style-name="ro1" table:visibility="filter">
          <table:table-cell office:value-type="string" calcext:value-type="string">
            <text:p>ENCRUZO NOVO</text:p>
          </table:table-cell>
          <table:table-cell office:value-type="string" calcext:value-type="string">
            <text:p>MIRANDA II</text:p>
          </table:table-cell>
          <table:table-cell office:value-type="float" office:value="0.459829799666449" calcext:value-type="float">
            <text:p>0,459830</text:p>
          </table:table-cell>
          <table:table-cell office:value-type="float" office:value="0.649561155698429" calcext:value-type="float">
            <text:p>0,649561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C. PAULISTA</text:p>
          </table:table-cell>
          <table:table-cell office:value-type="float" office:value="1.83780661830519" calcext:value-type="float">
            <text:p>1,837807</text:p>
          </table:table-cell>
          <table:table-cell office:value-type="float" office:value="2.09322893329873" calcext:value-type="float">
            <text:p>2,093229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FERNAO DIAS</text:p>
          </table:table-cell>
          <table:table-cell office:value-type="float" office:value="1.98501476173632" calcext:value-type="float">
            <text:p>1,985015</text:p>
          </table:table-cell>
          <table:table-cell office:value-type="float" office:value="2.2608963809932" calcext:value-type="float">
            <text:p>2,260896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M. MORAES</text:p>
          </table:table-cell>
          <table:table-cell office:value-type="float" office:value="0.815162822297762" calcext:value-type="float">
            <text:p>0,815163</text:p>
          </table:table-cell>
          <table:table-cell office:value-type="float" office:value="1.00454514734831" calcext:value-type="float">
            <text:p>1,004545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NOVA PONTE</text:p>
          </table:table-cell>
          <table:table-cell office:value-type="float" office:value="1.6033037542632" calcext:value-type="float">
            <text:p>1,603304</text:p>
          </table:table-cell>
          <table:table-cell office:value-type="float" office:value="1.79980685180629" calcext:value-type="float">
            <text:p>1,799807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RIBEIRAOPRETO</text:p>
          </table:table-cell>
          <table:table-cell office:value-type="float" office:value="1.43661455761293" calcext:value-type="float">
            <text:p>1,436615</text:p>
          </table:table-cell>
          <table:table-cell office:value-type="float" office:value="1.63627833747096" calcext:value-type="float">
            <text:p>1,636278</text:p>
          </table:table-cell>
        </table:table-row>
        <table:table-row table:style-name="ro1" table:visibility="filter">
          <table:table-cell office:value-type="string" calcext:value-type="string">
            <text:p>EUNAPOLIS</text:p>
          </table:table-cell>
          <table:table-cell office:value-type="string" calcext:value-type="string">
            <text:p>TEIX FREITAS II</text:p>
          </table:table-cell>
          <table:table-cell office:value-type="float" office:value="0.360371343003666" calcext:value-type="float">
            <text:p>0,360371</text:p>
          </table:table-cell>
          <table:table-cell office:value-type="float" office:value="0.612904616984389" calcext:value-type="float">
            <text:p>0,612905</text:p>
          </table:table-cell>
        </table:table-row>
        <table:table-row table:style-name="ro1" table:visibility="filter">
          <table:table-cell office:value-type="string" calcext:value-type="string">
            <text:p>EXTREMOZ II</text:p>
          </table:table-cell>
          <table:table-cell office:value-type="string" calcext:value-type="string">
            <text:p>NATAL III</text:p>
          </table:table-cell>
          <table:table-cell office:value-type="float" office:value="0.404868842942526" calcext:value-type="float">
            <text:p>0,404869</text:p>
          </table:table-cell>
          <table:table-cell office:value-type="float" office:value="0.713468804398137" calcext:value-type="float">
            <text:p>0,713469</text:p>
          </table:table-cell>
        </table:table-row>
        <table:table-row table:style-name="ro1" table:visibility="filter">
          <table:table-cell office:value-type="string" calcext:value-type="string">
            <text:p>F.IGUACUNORTE</text:p>
          </table:table-cell>
          <table:table-cell office:value-type="string" calcext:value-type="string">
            <text:p>MEDIANEIRA NT</text:p>
          </table:table-cell>
          <table:table-cell office:value-type="float" office:value="0.315160316657002" calcext:value-type="float">
            <text:p>0,315160</text:p>
          </table:table-cell>
          <table:table-cell office:value-type="float" office:value="0.577070237942314" calcext:value-type="float">
            <text:p>0,577070</text:p>
          </table:table-cell>
        </table:table-row>
        <table:table-row table:style-name="ro1" table:visibility="filter">
          <table:table-cell office:value-type="string" calcext:value-type="string">
            <text:p>FEIJO</text:p>
          </table:table-cell>
          <table:table-cell office:value-type="string" calcext:value-type="string">
            <text:p>RIO BRANCO I</text:p>
          </table:table-cell>
          <table:table-cell office:value-type="float" office:value="0.491764665101568" calcext:value-type="float">
            <text:p>0,491765</text:p>
          </table:table-cell>
          <table:table-cell office:value-type="float" office:value="0.851856376068452" calcext:value-type="float">
            <text:p>0,851856</text:p>
          </table:table-cell>
        </table:table-row>
        <table:table-row table:style-name="ro1" table:visibility="filter">
          <table:table-cell office:value-type="string" calcext:value-type="string">
            <text:p>FERNAO DIAS</text:p>
          </table:table-cell>
          <table:table-cell office:value-type="string" calcext:value-type="string">
            <text:p>TERMINAL RIO</text:p>
          </table:table-cell>
          <table:table-cell office:value-type="float" office:value="1.84134075852179" calcext:value-type="float">
            <text:p>1,841341</text:p>
          </table:table-cell>
          <table:table-cell office:value-type="float" office:value="2.08569941995616" calcext:value-type="float">
            <text:p>2,085699</text:p>
          </table:table-cell>
        </table:table-row>
        <table:table-row table:style-name="ro1" table:visibility="filter">
          <table:table-cell office:value-type="string" calcext:value-type="string">
            <text:p>FIBRAPLAC</text:p>
          </table:table-cell>
          <table:table-cell office:value-type="string" calcext:value-type="string">
            <text:p>OSORIO 2</text:p>
          </table:table-cell>
          <table:table-cell office:value-type="float" office:value="0.299825269397689" calcext:value-type="float">
            <text:p>0,299825</text:p>
          </table:table-cell>
          <table:table-cell office:value-type="float" office:value="0.550003227356592" calcext:value-type="float">
            <text:p>0,550003</text:p>
          </table:table-cell>
        </table:table-row>
        <table:table-row table:style-name="ro1" table:visibility="filter">
          <table:table-cell office:value-type="string" calcext:value-type="string">
            <text:p>FIGUEIRA</text:p>
          </table:table-cell>
          <table:table-cell office:value-type="string" calcext:value-type="string">
            <text:p>LONDRINA ESU</text:p>
          </table:table-cell>
          <table:table-cell office:value-type="float" office:value="0.411078836319566" calcext:value-type="float">
            <text:p>0,411079</text:p>
          </table:table-cell>
          <table:table-cell office:value-type="float" office:value="0.634375526492417" calcext:value-type="float">
            <text:p>0,634376</text:p>
          </table:table-cell>
        </table:table-row>
        <table:table-row table:style-name="ro1" table:visibility="filter">
          <table:table-cell office:value-type="string" calcext:value-type="string">
            <text:p>FIRMINOPOLIS</text:p>
          </table:table-cell>
          <table:table-cell office:value-type="string" calcext:value-type="string">
            <text:p>TRINDADE</text:p>
          </table:table-cell>
          <table:table-cell office:value-type="float" office:value="0.435949870274917" calcext:value-type="float">
            <text:p>0,435950</text:p>
          </table:table-cell>
          <table:table-cell office:value-type="float" office:value="0.653010542745947" calcext:value-type="float">
            <text:p>0,653011</text:p>
          </table:table-cell>
        </table:table-row>
        <table:table-row table:style-name="ro1" table:visibility="filter">
          <table:table-cell office:value-type="string" calcext:value-type="string">
            <text:p>FORD</text:p>
          </table:table-cell>
          <table:table-cell office:value-type="string" calcext:value-type="string">
            <text:p>POLO</text:p>
          </table:table-cell>
          <table:table-cell office:value-type="float" office:value="0.260257398657822" calcext:value-type="float">
            <text:p>0,260257</text:p>
          </table:table-cell>
          <table:table-cell office:value-type="float" office:value="0.442634977332543" calcext:value-type="float">
            <text:p>0,442635</text:p>
          </table:table-cell>
        </table:table-row>
        <table:table-row table:style-name="ro1" table:visibility="filter">
          <table:table-cell office:value-type="string" calcext:value-type="string">
            <text:p>FORQUILHINHA</text:p>
          </table:table-cell>
          <table:table-cell office:value-type="string" calcext:value-type="string">
            <text:p>SIDEROPOLIS 2</text:p>
          </table:table-cell>
          <table:table-cell office:value-type="float" office:value="0.40391502319606" calcext:value-type="float">
            <text:p>0,403915</text:p>
          </table:table-cell>
          <table:table-cell office:value-type="float" office:value="0.636561267978756" calcext:value-type="float">
            <text:p>0,636561</text:p>
          </table:table-cell>
        </table:table-row>
        <table:table-row table:style-name="ro1" table:visibility="filter">
          <table:table-cell office:value-type="string" calcext:value-type="string">
            <text:p>FORQUILHINHA</text:p>
          </table:table-cell>
          <table:table-cell office:value-type="string" calcext:value-type="string">
            <text:p>TORRES 2</text:p>
          </table:table-cell>
          <table:table-cell office:value-type="float" office:value="0.347313618805379" calcext:value-type="float">
            <text:p>0,347314</text:p>
          </table:table-cell>
          <table:table-cell office:value-type="float" office:value="0.643259300799653" calcext:value-type="float">
            <text:p>0,643259</text:p>
          </table:table-cell>
        </table:table-row>
        <table:table-row table:style-name="ro1" table:visibility="filter">
          <table:table-cell office:value-type="string" calcext:value-type="string">
            <text:p>FORTALEZA</text:p>
          </table:table-cell>
          <table:table-cell office:value-type="string" calcext:value-type="string">
            <text:p>FORTALEZA II</text:p>
          </table:table-cell>
          <table:table-cell office:value-type="float" office:value="0.502181887109632" calcext:value-type="float">
            <text:p>0,502182</text:p>
          </table:table-cell>
          <table:table-cell office:value-type="float" office:value="0.750096851185185" calcext:value-type="float">
            <text:p>0,750097</text:p>
          </table:table-cell>
        </table:table-row>
        <table:table-row table:style-name="ro1" table:visibility="filter">
          <table:table-cell office:value-type="string" calcext:value-type="string">
            <text:p>FORTALEZA II</text:p>
          </table:table-cell>
          <table:table-cell office:value-type="string" calcext:value-type="string">
            <text:p>MARACANAU II</text:p>
          </table:table-cell>
          <table:table-cell office:value-type="float" office:value="0.480481781861823" calcext:value-type="float">
            <text:p>0,480482</text:p>
          </table:table-cell>
          <table:table-cell office:value-type="float" office:value="0.717683932610097" calcext:value-type="float">
            <text:p>0,717684</text:p>
          </table:table-cell>
        </table:table-row>
        <table:table-row table:style-name="ro1" table:visibility="filter">
          <table:table-cell office:value-type="string" calcext:value-type="string">
            <text:p>FORTALEZA II</text:p>
          </table:table-cell>
          <table:table-cell office:value-type="string" calcext:value-type="string">
            <text:p>PACATUBA</text:p>
          </table:table-cell>
          <table:table-cell office:value-type="float" office:value="1.36860080020487" calcext:value-type="float">
            <text:p>1,368601</text:p>
          </table:table-cell>
          <table:table-cell office:value-type="float" office:value="1.7229203639514" calcext:value-type="float">
            <text:p>1,722920</text:p>
          </table:table-cell>
        </table:table-row>
        <table:table-row table:style-name="ro1" table:visibility="filter">
          <table:table-cell office:value-type="string" calcext:value-type="string">
            <text:p>FORTALEZA II</text:p>
          </table:table-cell>
          <table:table-cell office:value-type="string" calcext:value-type="string">
            <text:p>PICI II</text:p>
          </table:table-cell>
          <table:table-cell office:value-type="float" office:value="0.409899630247014" calcext:value-type="float">
            <text:p>0,409900</text:p>
          </table:table-cell>
          <table:table-cell office:value-type="float" office:value="0.612257092186071" calcext:value-type="float">
            <text:p>0,612257</text:p>
          </table:table-cell>
        </table:table-row>
        <table:table-row table:style-name="ro1" table:visibility="filter">
          <table:table-cell office:value-type="string" calcext:value-type="string">
            <text:p>FOZ CHAPECO</text:p>
          </table:table-cell>
          <table:table-cell office:value-type="string" calcext:value-type="string">
            <text:p>GUARITA</text:p>
          </table:table-cell>
          <table:table-cell office:value-type="float" office:value="0.336470650256212" calcext:value-type="float">
            <text:p>0,336471</text:p>
          </table:table-cell>
          <table:table-cell office:value-type="float" office:value="0.617225972725547" calcext:value-type="float">
            <text:p>0,617226</text:p>
          </table:table-cell>
        </table:table-row>
        <table:table-row table:style-name="ro1" table:visibility="filter">
          <table:table-cell office:value-type="string" calcext:value-type="string">
            <text:p>FOZ CHAPECO</text:p>
          </table:table-cell>
          <table:table-cell office:value-type="string" calcext:value-type="string">
            <text:p>XANXERE ESU</text:p>
          </table:table-cell>
          <table:table-cell office:value-type="float" office:value="0.438295300042756" calcext:value-type="float">
            <text:p>0,438295</text:p>
          </table:table-cell>
          <table:table-cell office:value-type="float" office:value="0.81176640645141" calcext:value-type="float">
            <text:p>0,811766</text:p>
          </table:table-cell>
        </table:table-row>
        <table:table-row table:style-name="ro1" table:visibility="filter">
          <table:table-cell office:value-type="string" calcext:value-type="string">
            <text:p>FUNIL</text:p>
          </table:table-cell>
          <table:table-cell office:value-type="string" calcext:value-type="string">
            <text:p>ITAPEBI SE</text:p>
          </table:table-cell>
          <table:table-cell office:value-type="float" office:value="0.365818604214846" calcext:value-type="float">
            <text:p>0,365819</text:p>
          </table:table-cell>
          <table:table-cell office:value-type="float" office:value="0.62216909267334" calcext:value-type="float">
            <text:p>0,622169</text:p>
          </table:table-cell>
        </table:table-row>
        <table:table-row table:style-name="ro1" table:visibility="filter">
          <table:table-cell office:value-type="string" calcext:value-type="string">
            <text:p>FUNIL</text:p>
          </table:table-cell>
          <table:table-cell office:value-type="string" calcext:value-type="string">
            <text:p>SAPEACU</text:p>
          </table:table-cell>
          <table:table-cell office:value-type="float" office:value="0.439800012743172" calcext:value-type="float">
            <text:p>0,439800</text:p>
          </table:table-cell>
          <table:table-cell office:value-type="float" office:value="0.630433303887589" calcext:value-type="float">
            <text:p>0,630433</text:p>
          </table:table-cell>
        </table:table-row>
        <table:table-row table:style-name="ro1" table:visibility="filter">
          <table:table-cell office:value-type="string" calcext:value-type="string">
            <text:p>FURNAS</text:p>
          </table:table-cell>
          <table:table-cell office:value-type="string" calcext:value-type="string">
            <text:p>PIMENTA</text:p>
          </table:table-cell>
          <table:table-cell office:value-type="float" office:value="0.698748992715312" calcext:value-type="float">
            <text:p>0,698749</text:p>
          </table:table-cell>
          <table:table-cell office:value-type="float" office:value="1.10025146134252" calcext:value-type="float">
            <text:p>1,100251</text:p>
          </table:table-cell>
        </table:table-row>
        <table:table-row table:style-name="ro1" table:visibility="filter">
          <table:table-cell office:value-type="string" calcext:value-type="string">
            <text:p>FURNAS</text:p>
          </table:table-cell>
          <table:table-cell office:value-type="string" calcext:value-type="string">
            <text:p>VARGINHA 4</text:p>
          </table:table-cell>
          <table:table-cell office:value-type="float" office:value="0.65319076833621" calcext:value-type="float">
            <text:p>0,653191</text:p>
          </table:table-cell>
          <table:table-cell office:value-type="float" office:value="1.02851539664425" calcext:value-type="float">
            <text:p>1,028515</text:p>
          </table:table-cell>
        </table:table-row>
        <table:table-row table:style-name="ro1" table:visibility="filter">
          <table:table-cell office:value-type="string" calcext:value-type="string">
            <text:p>FUTURA</text:p>
          </table:table-cell>
          <table:table-cell office:value-type="string" calcext:value-type="string">
            <text:p>JUAZEIRO III</text:p>
          </table:table-cell>
          <table:table-cell office:value-type="float" office:value="1.22657397113672" calcext:value-type="float">
            <text:p>1,226574</text:p>
          </table:table-cell>
          <table:table-cell office:value-type="float" office:value="1.4819000737385" calcext:value-type="float">
            <text:p>1,481900</text:p>
          </table:table-cell>
        </table:table-row>
        <table:table-row table:style-name="ro1" table:visibility="filter">
          <table:table-cell office:value-type="string" calcext:value-type="string">
            <text:p>G.MANGABEIRA</text:p>
          </table:table-cell>
          <table:table-cell office:value-type="string" calcext:value-type="string">
            <text:p>TOMBA</text:p>
          </table:table-cell>
          <table:table-cell office:value-type="float" office:value="0.281510340715728" calcext:value-type="float">
            <text:p>0,281510</text:p>
          </table:table-cell>
          <table:table-cell office:value-type="float" office:value="0.478781098728383" calcext:value-type="float">
            <text:p>0,478781</text:p>
          </table:table-cell>
        </table:table-row>
        <table:table-row table:style-name="ro1" table:visibility="filter">
          <table:table-cell office:value-type="string" calcext:value-type="string">
            <text:p>G.VALADARES 6</text:p>
          </table:table-cell>
          <table:table-cell office:value-type="string" calcext:value-type="string">
            <text:p>CONSE. PENA</text:p>
          </table:table-cell>
          <table:table-cell office:value-type="float" office:value="0.420719412262371" calcext:value-type="float">
            <text:p>0,420719</text:p>
          </table:table-cell>
          <table:table-cell office:value-type="float" office:value="0.652244343207615" calcext:value-type="float">
            <text:p>0,652244</text:p>
          </table:table-cell>
        </table:table-row>
        <table:table-row table:style-name="ro1" table:visibility="filter">
          <table:table-cell office:value-type="string" calcext:value-type="string">
            <text:p>G.VALADARES 6</text:p>
          </table:table-cell>
          <table:table-cell office:value-type="string" calcext:value-type="string">
            <text:p>G.VALADARES 2</text:p>
          </table:table-cell>
          <table:table-cell office:value-type="float" office:value="0.419973237064441" calcext:value-type="float">
            <text:p>0,419973</text:p>
          </table:table-cell>
          <table:table-cell office:value-type="float" office:value="0.651087542409491" calcext:value-type="float">
            <text:p>0,651088</text:p>
          </table:table-cell>
        </table:table-row>
        <table:table-row table:style-name="ro1" table:visibility="filter">
          <table:table-cell office:value-type="string" calcext:value-type="string">
            <text:p>G.VALADARES 6</text:p>
          </table:table-cell>
          <table:table-cell office:value-type="string" calcext:value-type="string">
            <text:p>PE. PARAISO 2</text:p>
          </table:table-cell>
          <table:table-cell office:value-type="float" office:value="1.48025946545418" calcext:value-type="float">
            <text:p>1,480259</text:p>
          </table:table-cell>
          <table:table-cell office:value-type="float" office:value="1.93409854029479" calcext:value-type="float">
            <text:p>1,934099</text:p>
          </table:table-cell>
        </table:table-row>
        <table:table-row table:style-name="ro1" table:visibility="filter">
          <table:table-cell office:value-type="string" calcext:value-type="string">
            <text:p>GARANHUNS II</text:p>
          </table:table-cell>
          <table:table-cell office:value-type="string" calcext:value-type="string">
            <text:p>PAU FERRO</text:p>
          </table:table-cell>
          <table:table-cell office:value-type="float" office:value="1.48034284579164" calcext:value-type="float">
            <text:p>1,480343</text:p>
          </table:table-cell>
          <table:table-cell office:value-type="float" office:value="1.83729726002716" calcext:value-type="float">
            <text:p>1,837297</text:p>
          </table:table-cell>
        </table:table-row>
        <table:table-row table:style-name="ro1" table:visibility="filter">
          <table:table-cell office:value-type="string" calcext:value-type="string">
            <text:p>GARANHUNS II</text:p>
          </table:table-cell>
          <table:table-cell office:value-type="string" calcext:value-type="string">
            <text:p>US. L.GONZAGA</text:p>
          </table:table-cell>
          <table:table-cell office:value-type="float" office:value="1.48344579606523" calcext:value-type="float">
            <text:p>1,483446</text:p>
          </table:table-cell>
          <table:table-cell office:value-type="float" office:value="1.84114842332483" calcext:value-type="float">
            <text:p>1,841148</text:p>
          </table:table-cell>
        </table:table-row>
        <table:table-row table:style-name="ro1" table:visibility="filter">
          <table:table-cell office:value-type="string" calcext:value-type="string">
            <text:p>GARIBALDI 1</text:p>
          </table:table-cell>
          <table:table-cell office:value-type="string" calcext:value-type="string">
            <text:p>LAJEADO III</text:p>
          </table:table-cell>
          <table:table-cell office:value-type="float" office:value="0.319489702658108" calcext:value-type="float">
            <text:p>0,319490</text:p>
          </table:table-cell>
          <table:table-cell office:value-type="float" office:value="0.586075909886307" calcext:value-type="float">
            <text:p>0,586076</text:p>
          </table:table-cell>
        </table:table-row>
        <table:table-row table:style-name="ro1" table:visibility="filter">
          <table:table-cell office:value-type="string" calcext:value-type="string">
            <text:p>GARIBALDI 1</text:p>
          </table:table-cell>
          <table:table-cell office:value-type="string" calcext:value-type="string">
            <text:p>VINHEDOS</text:p>
          </table:table-cell>
          <table:table-cell office:value-type="float" office:value="0.320013703205516" calcext:value-type="float">
            <text:p>0,320014</text:p>
          </table:table-cell>
          <table:table-cell office:value-type="float" office:value="0.587037143049842" calcext:value-type="float">
            <text:p>0,587037</text:p>
          </table:table-cell>
        </table:table-row>
        <table:table-row table:style-name="ro1" table:visibility="filter">
          <table:table-cell office:value-type="string" calcext:value-type="string">
            <text:p>GASPAR 2</text:p>
          </table:table-cell>
          <table:table-cell office:value-type="string" calcext:value-type="string">
            <text:p>INDAIAL</text:p>
          </table:table-cell>
          <table:table-cell office:value-type="float" office:value="0.433471960708961" calcext:value-type="float">
            <text:p>0,433472</text:p>
          </table:table-cell>
          <table:table-cell office:value-type="float" office:value="0.683142356921439" calcext:value-type="float">
            <text:p>0,683142</text:p>
          </table:table-cell>
        </table:table-row>
        <table:table-row table:style-name="ro1" table:visibility="filter">
          <table:table-cell office:value-type="string" calcext:value-type="string">
            <text:p>GASPAR 2</text:p>
          </table:table-cell>
          <table:table-cell office:value-type="string" calcext:value-type="string">
            <text:p>PALHOCA <text:s/>ESU</text:p>
          </table:table-cell>
          <table:table-cell office:value-type="float" office:value="0.404326203522899" calcext:value-type="float">
            <text:p>0,404326</text:p>
          </table:table-cell>
          <table:table-cell office:value-type="float" office:value="0.637209279206835" calcext:value-type="float">
            <text:p>0,637209</text:p>
          </table:table-cell>
        </table:table-row>
        <table:table-row table:style-name="ro1" table:visibility="filter">
          <table:table-cell office:value-type="string" calcext:value-type="string">
            <text:p>GERDAU O.BRANCO</text:p>
          </table:table-cell>
          <table:table-cell office:value-type="string" calcext:value-type="string">
            <text:p>ITABIRITO 2</text:p>
          </table:table-cell>
          <table:table-cell office:value-type="float" office:value="0.783018815465561" calcext:value-type="float">
            <text:p>0,783019</text:p>
          </table:table-cell>
          <table:table-cell office:value-type="float" office:value="1.12312463364069" calcext:value-type="float">
            <text:p>1,123125</text:p>
          </table:table-cell>
        </table:table-row>
        <table:table-row table:style-name="ro1" table:visibility="filter">
          <table:table-cell office:value-type="string" calcext:value-type="string">
            <text:p>GERDAU SP</text:p>
          </table:table-cell>
          <table:table-cell office:value-type="string" calcext:value-type="string">
            <text:p>JANDIRA</text:p>
          </table:table-cell>
          <table:table-cell office:value-type="float" office:value="1.12510588796018" calcext:value-type="float">
            <text:p>1,125106</text:p>
          </table:table-cell>
          <table:table-cell office:value-type="float" office:value="1.62216847650308" calcext:value-type="float">
            <text:p>1,622168</text:p>
          </table:table-cell>
        </table:table-row>
        <table:table-row table:style-name="ro1" table:visibility="filter">
          <table:table-cell office:value-type="string" calcext:value-type="string">
            <text:p>GETULINA</text:p>
          </table:table-cell>
          <table:table-cell office:value-type="string" calcext:value-type="string">
            <text:p>MARECH.RONDON</text:p>
          </table:table-cell>
          <table:table-cell office:value-type="float" office:value="1.18978300518831" calcext:value-type="float">
            <text:p>1,189783</text:p>
          </table:table-cell>
          <table:table-cell office:value-type="float" office:value="1.66578144128563" calcext:value-type="float">
            <text:p>1,665781</text:p>
          </table:table-cell>
        </table:table-row>
        <table:table-row table:style-name="ro1" table:visibility="filter">
          <table:table-cell office:value-type="string" calcext:value-type="string">
            <text:p>GILBUES II</text:p>
          </table:table-cell>
          <table:table-cell office:value-type="string" calcext:value-type="string">
            <text:p>MIRACEMA</text:p>
          </table:table-cell>
          <table:table-cell office:value-type="float" office:value="1.62578957941014" calcext:value-type="float">
            <text:p>1,625790</text:p>
          </table:table-cell>
          <table:table-cell office:value-type="float" office:value="2.00122370676179" calcext:value-type="float">
            <text:p>2,001224</text:p>
          </table:table-cell>
        </table:table-row>
        <table:table-row table:style-name="ro1" table:visibility="filter">
          <table:table-cell office:value-type="string" calcext:value-type="string">
            <text:p>GOIANIA LESTE</text:p>
          </table:table-cell>
          <table:table-cell office:value-type="string" calcext:value-type="string">
            <text:p>XAVANTES</text:p>
          </table:table-cell>
          <table:table-cell office:value-type="float" office:value="0.276117478350741" calcext:value-type="float">
            <text:p>0,276117</text:p>
          </table:table-cell>
          <table:table-cell office:value-type="float" office:value="0.468668396878097" calcext:value-type="float">
            <text:p>0,468668</text:p>
          </table:table-cell>
        </table:table-row>
        <table:table-row table:style-name="ro1" table:visibility="filter">
          <table:table-cell office:value-type="string" calcext:value-type="string">
            <text:p>GOIANINHA</text:p>
          </table:table-cell>
          <table:table-cell office:value-type="string" calcext:value-type="string">
            <text:p>NORFIL</text:p>
          </table:table-cell>
          <table:table-cell office:value-type="float" office:value="0.259685877925658" calcext:value-type="float">
            <text:p>0,259686</text:p>
          </table:table-cell>
          <table:table-cell office:value-type="float" office:value="0.449175872025374" calcext:value-type="float">
            <text:p>0,449176</text:p>
          </table:table-cell>
        </table:table-row>
        <table:table-row table:style-name="ro1" table:visibility="filter">
          <table:table-cell office:value-type="string" calcext:value-type="string">
            <text:p>GOIANINHA</text:p>
          </table:table-cell>
          <table:table-cell office:value-type="string" calcext:value-type="string">
            <text:p>RECIFE II</text:p>
          </table:table-cell>
          <table:table-cell office:value-type="float" office:value="0.367518756254576" calcext:value-type="float">
            <text:p>0,367519</text:p>
          </table:table-cell>
          <table:table-cell office:value-type="float" office:value="0.541204296672101" calcext:value-type="float">
            <text:p>0,541204</text:p>
          </table:table-cell>
        </table:table-row>
        <table:table-row table:style-name="ro1" table:visibility="filter">
          <table:table-cell office:value-type="string" calcext:value-type="string">
            <text:p>GRALHA AZUL</text:p>
          </table:table-cell>
          <table:table-cell office:value-type="string" calcext:value-type="string">
            <text:p>UMBARA</text:p>
          </table:table-cell>
          <table:table-cell office:value-type="float" office:value="0.35300749513277" calcext:value-type="float">
            <text:p>0,353007</text:p>
          </table:table-cell>
          <table:table-cell office:value-type="float" office:value="0.646369826545742" calcext:value-type="float">
            <text:p>0,646370</text:p>
          </table:table-cell>
        </table:table-row>
        <table:table-row table:style-name="ro1" table:visibility="filter">
          <table:table-cell office:value-type="string" calcext:value-type="string">
            <text:p>GRAVATAI</text:p>
          </table:table-cell>
          <table:table-cell office:value-type="string" calcext:value-type="string">
            <text:p>GUAIBA 3</text:p>
          </table:table-cell>
          <table:table-cell office:value-type="float" office:value="1.28881779701348" calcext:value-type="float">
            <text:p>1,288818</text:p>
          </table:table-cell>
          <table:table-cell office:value-type="float" office:value="1.67932943418469" calcext:value-type="float">
            <text:p>1,679329</text:p>
          </table:table-cell>
        </table:table-row>
        <table:table-row table:style-name="ro1" table:visibility="filter">
          <table:table-cell office:value-type="string" calcext:value-type="string">
            <text:p>GRAVATAI2</text:p>
          </table:table-cell>
          <table:table-cell office:value-type="string" calcext:value-type="string">
            <text:p>JBO LT GRA2</text:p>
          </table:table-cell>
          <table:table-cell office:value-type="float" office:value="0.324275378822812" calcext:value-type="float">
            <text:p>0,324275</text:p>
          </table:table-cell>
          <table:table-cell office:value-type="float" office:value="0.594854814149308" calcext:value-type="float">
            <text:p>0,594855</text:p>
          </table:table-cell>
        </table:table-row>
        <table:table-row table:style-name="ro1" table:visibility="filter">
          <table:table-cell office:value-type="string" calcext:value-type="string">
            <text:p>GRAVATAI2</text:p>
          </table:table-cell>
          <table:table-cell office:value-type="string" calcext:value-type="string">
            <text:p>PORTOALEGRE6</text:p>
          </table:table-cell>
          <table:table-cell office:value-type="float" office:value="0.320819480303966" calcext:value-type="float">
            <text:p>0,320819</text:p>
          </table:table-cell>
          <table:table-cell office:value-type="float" office:value="0.58851527064585" calcext:value-type="float">
            <text:p>0,588515</text:p>
          </table:table-cell>
        </table:table-row>
        <table:table-row table:style-name="ro1" table:visibility="filter">
          <table:table-cell office:value-type="string" calcext:value-type="string">
            <text:p>GRAVATAI3</text:p>
          </table:table-cell>
          <table:table-cell office:value-type="string" calcext:value-type="string">
            <text:p>OSORIO 3</text:p>
          </table:table-cell>
          <table:table-cell office:value-type="float" office:value="0.463826713549466" calcext:value-type="float">
            <text:p>0,463827</text:p>
          </table:table-cell>
          <table:table-cell office:value-type="float" office:value="0.85084952945722" calcext:value-type="float">
            <text:p>0,850850</text:p>
          </table:table-cell>
        </table:table-row>
        <table:table-row table:style-name="ro1" table:visibility="filter">
          <table:table-cell office:value-type="string" calcext:value-type="string">
            <text:p>GUAIBA 2</text:p>
          </table:table-cell>
          <table:table-cell office:value-type="string" calcext:value-type="string">
            <text:p>GUAIBA 3</text:p>
          </table:table-cell>
          <table:table-cell office:value-type="float" office:value="0.611827031922118" calcext:value-type="float">
            <text:p>0,611827</text:p>
          </table:table-cell>
          <table:table-cell office:value-type="float" office:value="0.945908986889234" calcext:value-type="float">
            <text:p>0,945909</text:p>
          </table:table-cell>
        </table:table-row>
        <table:table-row table:style-name="ro1" table:visibility="filter">
          <table:table-cell office:value-type="string" calcext:value-type="string">
            <text:p>GUAIRA</text:p>
          </table:table-cell>
          <table:table-cell office:value-type="string" calcext:value-type="string">
            <text:p>F.IGUACU 60HZ</text:p>
          </table:table-cell>
          <table:table-cell office:value-type="float" office:value="1.80735019866048" calcext:value-type="float">
            <text:p>1,807350</text:p>
          </table:table-cell>
          <table:table-cell office:value-type="float" office:value="2.0523206899054" calcext:value-type="float">
            <text:p>2,052321</text:p>
          </table:table-cell>
        </table:table-row>
        <table:table-row table:style-name="ro1" table:visibility="filter">
          <table:table-cell office:value-type="string" calcext:value-type="string">
            <text:p>GUAIRA</text:p>
          </table:table-cell>
          <table:table-cell office:value-type="string" calcext:value-type="string">
            <text:p>SARANDI</text:p>
          </table:table-cell>
          <table:table-cell office:value-type="float" office:value="1.56748178875872" calcext:value-type="float">
            <text:p>1,567482</text:p>
          </table:table-cell>
          <table:table-cell office:value-type="float" office:value="2.038674819191" calcext:value-type="float">
            <text:p>2,038675</text:p>
          </table:table-cell>
        </table:table-row>
        <table:table-row table:style-name="ro1" table:visibility="filter">
          <table:table-cell office:value-type="string" calcext:value-type="string">
            <text:p>GUAIRA</text:p>
          </table:table-cell>
          <table:table-cell office:value-type="string" calcext:value-type="string">
            <text:p>UMUARAMA SUL</text:p>
          </table:table-cell>
          <table:table-cell office:value-type="float" office:value="0.434267501130878" calcext:value-type="float">
            <text:p>0,434268</text:p>
          </table:table-cell>
          <table:table-cell office:value-type="float" office:value="0.670160198795265" calcext:value-type="float">
            <text:p>0,670160</text:p>
          </table:table-cell>
        </table:table-row>
        <table:table-row table:style-name="ro1" table:visibility="filter">
          <table:table-cell office:value-type="string" calcext:value-type="string">
            <text:p>GUAMA</text:p>
          </table:table-cell>
          <table:table-cell office:value-type="string" calcext:value-type="string">
            <text:p>VILA DO CONDE</text:p>
          </table:table-cell>
          <table:table-cell office:value-type="float" office:value="0.562927244982902" calcext:value-type="float">
            <text:p>0,562927</text:p>
          </table:table-cell>
          <table:table-cell office:value-type="float" office:value="0.806146891914573" calcext:value-type="float">
            <text:p>0,806147</text:p>
          </table:table-cell>
        </table:table-row>
        <table:table-row table:style-name="ro1" table:visibility="filter">
          <table:table-cell office:value-type="string" calcext:value-type="string">
            <text:p>GUARULHOS</text:p>
          </table:table-cell>
          <table:table-cell office:value-type="string" calcext:value-type="string">
            <text:p>IBIUNA</text:p>
          </table:table-cell>
          <table:table-cell office:value-type="float" office:value="1.19679884408434" calcext:value-type="float">
            <text:p>1,196799</text:p>
          </table:table-cell>
          <table:table-cell office:value-type="float" office:value="1.67374917034909" calcext:value-type="float">
            <text:p>1,673749</text:p>
          </table:table-cell>
        </table:table-row>
        <table:table-row table:style-name="ro1" table:visibility="filter">
          <table:table-cell office:value-type="string" calcext:value-type="string">
            <text:p>GUARULHOS</text:p>
          </table:table-cell>
          <table:table-cell office:value-type="string" calcext:value-type="string">
            <text:p>NORTE</text:p>
          </table:table-cell>
          <table:table-cell office:value-type="float" office:value="1.24893401695267" calcext:value-type="float">
            <text:p>1,248934</text:p>
          </table:table-cell>
          <table:table-cell office:value-type="float" office:value="2.02456091062903" calcext:value-type="float">
            <text:p>2,024561</text:p>
          </table:table-cell>
        </table:table-row>
        <table:table-row table:style-name="ro1" table:visibility="filter">
          <table:table-cell office:value-type="string" calcext:value-type="string">
            <text:p>GUIL AMORIM-SE</text:p>
          </table:table-cell>
          <table:table-cell office:value-type="string" calcext:value-type="string">
            <text:p>IPATINGA 1</text:p>
          </table:table-cell>
          <table:table-cell office:value-type="float" office:value="0.315793716654768" calcext:value-type="float">
            <text:p>0,315794</text:p>
          </table:table-cell>
          <table:table-cell office:value-type="float" office:value="0.580895850959404" calcext:value-type="float">
            <text:p>0,580896</text:p>
          </table:table-cell>
        </table:table-row>
        <table:table-row table:style-name="ro1" table:visibility="filter">
          <table:table-cell office:value-type="string" calcext:value-type="string">
            <text:p>GURUPI</text:p>
          </table:table-cell>
          <table:table-cell office:value-type="string" calcext:value-type="string">
            <text:p>MIRACEMA</text:p>
          </table:table-cell>
          <table:table-cell office:value-type="float" office:value="1.42905181957592" calcext:value-type="float">
            <text:p>1,429052</text:p>
          </table:table-cell>
          <table:table-cell office:value-type="float" office:value="1.79393704958549" calcext:value-type="float">
            <text:p>1,793937</text:p>
          </table:table-cell>
        </table:table-row>
        <table:table-row table:style-name="ro1" table:visibility="filter">
          <table:table-cell office:value-type="string" calcext:value-type="string">
            <text:p>GURUPI</text:p>
          </table:table-cell>
          <table:table-cell office:value-type="string" calcext:value-type="string">
            <text:p>PEIXE 2</text:p>
          </table:table-cell>
          <table:table-cell office:value-type="float" office:value="1.4034965614344" calcext:value-type="float">
            <text:p>1,403497</text:p>
          </table:table-cell>
          <table:table-cell office:value-type="float" office:value="1.76185667029918" calcext:value-type="float">
            <text:p>1,761857</text:p>
          </table:table-cell>
        </table:table-row>
        <table:table-row table:style-name="ro1" table:visibility="filter">
          <table:table-cell office:value-type="string" calcext:value-type="string">
            <text:p>GV DO BRASIL</text:p>
          </table:table-cell>
          <table:table-cell office:value-type="string" calcext:value-type="string">
            <text:p>TAUBATE</text:p>
          </table:table-cell>
          <table:table-cell office:value-type="float" office:value="0.616514626477513" calcext:value-type="float">
            <text:p>0,616515</text:p>
          </table:table-cell>
          <table:table-cell office:value-type="float" office:value="0.983971490009062" calcext:value-type="float">
            <text:p>0,983971</text:p>
          </table:table-cell>
        </table:table-row>
        <table:table-row table:style-name="ro1" table:visibility="filter">
          <table:table-cell office:value-type="string" calcext:value-type="string">
            <text:p>H.BORDEN SUB</text:p>
          </table:table-cell>
          <table:table-cell office:value-type="string" calcext:value-type="string">
            <text:p>MANOE.NOBREGA</text:p>
          </table:table-cell>
          <table:table-cell office:value-type="float" office:value="0.501072825418255" calcext:value-type="float">
            <text:p>0,501073</text:p>
          </table:table-cell>
          <table:table-cell office:value-type="float" office:value="0.948909311610107" calcext:value-type="float">
            <text:p>0,948909</text:p>
          </table:table-cell>
        </table:table-row>
        <table:table-row table:style-name="ro1" table:visibility="filter">
          <table:table-cell office:value-type="string" calcext:value-type="string">
            <text:p>IBIAPINA II</text:p>
          </table:table-cell>
          <table:table-cell office:value-type="string" calcext:value-type="string">
            <text:p>MARANGATU</text:p>
          </table:table-cell>
          <table:table-cell office:value-type="float" office:value="0.479672779687851" calcext:value-type="float">
            <text:p>0,479673</text:p>
          </table:table-cell>
          <table:table-cell office:value-type="float" office:value="0.832371856500976" calcext:value-type="float">
            <text:p>0,832372</text:p>
          </table:table-cell>
        </table:table-row>
        <table:table-row table:style-name="ro1" table:visibility="filter">
          <table:table-cell office:value-type="string" calcext:value-type="string">
            <text:p>IBIAPINA II</text:p>
          </table:table-cell>
          <table:table-cell office:value-type="string" calcext:value-type="string">
            <text:p>TIANGUA II</text:p>
          </table:table-cell>
          <table:table-cell office:value-type="float" office:value="0.58049857062601" calcext:value-type="float">
            <text:p>0,580499</text:p>
          </table:table-cell>
          <table:table-cell office:value-type="float" office:value="0.867076573490615" calcext:value-type="float">
            <text:p>0,867077</text:p>
          </table:table-cell>
        </table:table-row>
        <table:table-row table:style-name="ro1" table:visibility="filter">
          <table:table-cell office:value-type="string" calcext:value-type="string">
            <text:p>IBICOARA</text:p>
          </table:table-cell>
          <table:table-cell office:value-type="string" calcext:value-type="string">
            <text:p>POCOES III</text:p>
          </table:table-cell>
          <table:table-cell office:value-type="float" office:value="1.37530971650188" calcext:value-type="float">
            <text:p>1,375310</text:p>
          </table:table-cell>
          <table:table-cell office:value-type="float" office:value="1.66159695073967" calcext:value-type="float">
            <text:p>1,661597</text:p>
          </table:table-cell>
        </table:table-row>
        <table:table-row table:style-name="ro1" table:visibility="filter">
          <table:table-cell office:value-type="string" calcext:value-type="string">
            <text:p>IBIPORA</text:p>
          </table:table-cell>
          <table:table-cell office:value-type="string" calcext:value-type="string">
            <text:p>LONDRINA ESU</text:p>
          </table:table-cell>
          <table:table-cell office:value-type="float" office:value="0.39038085816778" calcext:value-type="float">
            <text:p>0,390381</text:p>
          </table:table-cell>
          <table:table-cell office:value-type="float" office:value="0.602434473761692" calcext:value-type="float">
            <text:p>0,602434</text:p>
          </table:table-cell>
        </table:table-row>
        <table:table-row table:style-name="ro1" table:visibility="filter">
          <table:table-cell office:value-type="string" calcext:value-type="string">
            <text:p>IBIUNA</text:p>
          </table:table-cell>
          <table:table-cell office:value-type="string" calcext:value-type="string">
            <text:p>INTERLAGOS</text:p>
          </table:table-cell>
          <table:table-cell office:value-type="float" office:value="1.34827442338241" calcext:value-type="float">
            <text:p>1,348274</text:p>
          </table:table-cell>
          <table:table-cell office:value-type="float" office:value="1.88559105708843" calcext:value-type="float">
            <text:p>1,885591</text:p>
          </table:table-cell>
        </table:table-row>
        <table:table-row table:style-name="ro1" table:visibility="filter">
          <table:table-cell office:value-type="string" calcext:value-type="string">
            <text:p>ICO</text:p>
          </table:table-cell>
          <table:table-cell office:value-type="string" calcext:value-type="string">
            <text:p>MILAGRES</text:p>
          </table:table-cell>
          <table:table-cell office:value-type="float" office:value="0.408717989503125" calcext:value-type="float">
            <text:p>0,408718</text:p>
          </table:table-cell>
          <table:table-cell office:value-type="float" office:value="0.610492104192727" calcext:value-type="float">
            <text:p>0,610492</text:p>
          </table:table-cell>
        </table:table-row>
        <table:table-row table:style-name="ro1" table:visibility="filter">
          <table:table-cell office:value-type="string" calcext:value-type="string">
            <text:p>IGAPORA III</text:p>
          </table:table-cell>
          <table:table-cell office:value-type="string" calcext:value-type="string">
            <text:p>PINDAI II</text:p>
          </table:table-cell>
          <table:table-cell office:value-type="float" office:value="0.5838623206063" calcext:value-type="float">
            <text:p>0,583862</text:p>
          </table:table-cell>
          <table:table-cell office:value-type="float" office:value="0.836940066234727" calcext:value-type="float">
            <text:p>0,836940</text:p>
          </table:table-cell>
        </table:table-row>
        <table:table-row table:style-name="ro1" table:visibility="filter">
          <table:table-cell office:value-type="string" calcext:value-type="string">
            <text:p>IGAPORA III</text:p>
          </table:table-cell>
          <table:table-cell office:value-type="string" calcext:value-type="string">
            <text:p>S. DAS ALMAS II</text:p>
          </table:table-cell>
          <table:table-cell office:value-type="float" office:value="1.50941509397797" calcext:value-type="float">
            <text:p>1,509415</text:p>
          </table:table-cell>
          <table:table-cell office:value-type="float" office:value="1.89645111076983" calcext:value-type="float">
            <text:p>1,896451</text:p>
          </table:table-cell>
        </table:table-row>
        <table:table-row table:style-name="ro1" table:visibility="filter">
          <table:table-cell office:value-type="string" calcext:value-type="string">
            <text:p>IL.SOLTEIRA 2</text:p>
          </table:table-cell>
          <table:table-cell office:value-type="string" calcext:value-type="string">
            <text:p>ILHA SOLTEIRA</text:p>
          </table:table-cell>
          <table:table-cell office:value-type="float" office:value="1.34060702673747" calcext:value-type="float">
            <text:p>1,340607</text:p>
          </table:table-cell>
          <table:table-cell office:value-type="float" office:value="1.87694587622971" calcext:value-type="float">
            <text:p>1,876946</text:p>
          </table:table-cell>
        </table:table-row>
        <table:table-row table:style-name="ro1" table:visibility="filter">
          <table:table-cell office:value-type="string" calcext:value-type="string">
            <text:p>IL.SOLTEIRA 2</text:p>
          </table:table-cell>
          <table:table-cell office:value-type="string" calcext:value-type="string">
            <text:p>INOCENCIA</text:p>
          </table:table-cell>
          <table:table-cell office:value-type="float" office:value="0.626145717816116" calcext:value-type="float">
            <text:p>0,626146</text:p>
          </table:table-cell>
          <table:table-cell office:value-type="float" office:value="0.975598336715562" calcext:value-type="float">
            <text:p>0,975598</text:p>
          </table:table-cell>
        </table:table-row>
        <table:table-row table:style-name="ro1" table:visibility="filter">
          <table:table-cell office:value-type="string" calcext:value-type="string">
            <text:p>ILHA SOLTEIRA</text:p>
          </table:table-cell>
          <table:table-cell office:value-type="string" calcext:value-type="string">
            <text:p>MIRASSOL II</text:p>
          </table:table-cell>
          <table:table-cell office:value-type="float" office:value="1.10154762899013" calcext:value-type="float">
            <text:p>1,101548</text:p>
          </table:table-cell>
          <table:table-cell office:value-type="float" office:value="1.5882023712045" calcext:value-type="float">
            <text:p>1,588202</text:p>
          </table:table-cell>
        </table:table-row>
        <table:table-row table:style-name="ro1" table:visibility="filter">
          <table:table-cell office:value-type="string" calcext:value-type="string">
            <text:p>ILHA SOLTEIRA</text:p>
          </table:table-cell>
          <table:table-cell office:value-type="string" calcext:value-type="string">
            <text:p>TRES IRMAOS</text:p>
          </table:table-cell>
          <table:table-cell office:value-type="float" office:value="1.14002183202399" calcext:value-type="float">
            <text:p>1,140022</text:p>
          </table:table-cell>
          <table:table-cell office:value-type="float" office:value="1.64367416278251" calcext:value-type="float">
            <text:p>1,643674</text:p>
          </table:table-cell>
        </table:table-row>
        <table:table-row table:style-name="ro1" table:visibility="filter">
          <table:table-cell office:value-type="string" calcext:value-type="string">
            <text:p>IMBIRUSSU</text:p>
          </table:table-cell>
          <table:table-cell office:value-type="string" calcext:value-type="string">
            <text:p>RIO BRILHANTE</text:p>
          </table:table-cell>
          <table:table-cell office:value-type="float" office:value="0.514324499538289" calcext:value-type="float">
            <text:p>0,514324</text:p>
          </table:table-cell>
          <table:table-cell office:value-type="float" office:value="0.91839715343962" calcext:value-type="float">
            <text:p>0,918397</text:p>
          </table:table-cell>
        </table:table-row>
        <table:table-row table:style-name="ro1" table:visibility="filter">
          <table:table-cell office:value-type="string" calcext:value-type="string">
            <text:p>IMBIRUSSU</text:p>
          </table:table-cell>
          <table:table-cell office:value-type="string" calcext:value-type="string">
            <text:p>SIDROLANDIA 2</text:p>
          </table:table-cell>
          <table:table-cell office:value-type="float" office:value="0.443142560508782" calcext:value-type="float">
            <text:p>0,443143</text:p>
          </table:table-cell>
          <table:table-cell office:value-type="float" office:value="0.79129200826435" calcext:value-type="float">
            <text:p>0,791292</text:p>
          </table:table-cell>
        </table:table-row>
        <table:table-row table:style-name="ro1" table:visibility="filter">
          <table:table-cell office:value-type="string" calcext:value-type="string">
            <text:p>IMPERATRIZ</text:p>
          </table:table-cell>
          <table:table-cell office:value-type="string" calcext:value-type="string">
            <text:p>COLINAS</text:p>
          </table:table-cell>
          <table:table-cell office:value-type="float" office:value="1.45654046763155" calcext:value-type="float">
            <text:p>1,456540</text:p>
          </table:table-cell>
          <table:table-cell office:value-type="float" office:value="1.78067955772158" calcext:value-type="float">
            <text:p>1,780680</text:p>
          </table:table-cell>
        </table:table-row>
        <table:table-row table:style-name="ro1" table:visibility="filter">
          <table:table-cell office:value-type="string" calcext:value-type="string">
            <text:p>IMPERATRIZ</text:p>
          </table:table-cell>
          <table:table-cell office:value-type="string" calcext:value-type="string">
            <text:p>P.DUTRA</text:p>
          </table:table-cell>
          <table:table-cell office:value-type="float" office:value="1.45456202944472" calcext:value-type="float">
            <text:p>1,454562</text:p>
          </table:table-cell>
          <table:table-cell office:value-type="float" office:value="1.731806876313" calcext:value-type="float">
            <text:p>1,731807</text:p>
          </table:table-cell>
        </table:table-row>
        <table:table-row table:style-name="ro1" table:visibility="filter">
          <table:table-cell office:value-type="string" calcext:value-type="string">
            <text:p>IMPERATRIZ</text:p>
          </table:table-cell>
          <table:table-cell office:value-type="string" calcext:value-type="string">
            <text:p>PORTO FRANCO</text:p>
          </table:table-cell>
          <table:table-cell office:value-type="float" office:value="0.38851938567754" calcext:value-type="float">
            <text:p>0,388519</text:p>
          </table:table-cell>
          <table:table-cell office:value-type="float" office:value="0.548827199444247" calcext:value-type="float">
            <text:p>0,548827</text:p>
          </table:table-cell>
        </table:table-row>
        <table:table-row table:style-name="ro1" table:visibility="filter">
          <table:table-cell office:value-type="string" calcext:value-type="string">
            <text:p>INDAIAL</text:p>
          </table:table-cell>
          <table:table-cell office:value-type="string" calcext:value-type="string">
            <text:p>RIO DO SUL</text:p>
          </table:table-cell>
          <table:table-cell office:value-type="float" office:value="0.354926035131191" calcext:value-type="float">
            <text:p>0,354926</text:p>
          </table:table-cell>
          <table:table-cell office:value-type="float" office:value="0.663696266648484" calcext:value-type="float">
            <text:p>0,663696</text:p>
          </table:table-cell>
        </table:table-row>
        <table:table-row table:style-name="ro1" table:visibility="filter">
          <table:table-cell office:value-type="string" calcext:value-type="string">
            <text:p>INTEGRADORA</text:p>
          </table:table-cell>
          <table:table-cell office:value-type="string" calcext:value-type="string">
            <text:p>ONCA PUMA</text:p>
          </table:table-cell>
          <table:table-cell office:value-type="float" office:value="0.452402710208232" calcext:value-type="float">
            <text:p>0,452403</text:p>
          </table:table-cell>
          <table:table-cell office:value-type="float" office:value="0.647868871117035" calcext:value-type="float">
            <text:p>0,647869</text:p>
          </table:table-cell>
        </table:table-row>
        <table:table-row table:style-name="ro1" table:visibility="filter">
          <table:table-cell office:value-type="string" calcext:value-type="string">
            <text:p>INTEGRADORA</text:p>
          </table:table-cell>
          <table:table-cell office:value-type="string" calcext:value-type="string">
            <text:p>SERRA PELADA</text:p>
          </table:table-cell>
          <table:table-cell office:value-type="float" office:value="1.33115623234496" calcext:value-type="float">
            <text:p>1,331156</text:p>
          </table:table-cell>
          <table:table-cell office:value-type="float" office:value="1.60669119807476" calcext:value-type="float">
            <text:p>1,606691</text:p>
          </table:table-cell>
        </table:table-row>
        <table:table-row table:style-name="ro1" table:visibility="filter">
          <table:table-cell office:value-type="string" calcext:value-type="string">
            <text:p>INTEGRADORA</text:p>
          </table:table-cell>
          <table:table-cell office:value-type="string" calcext:value-type="string">
            <text:p>XINGUARA 2</text:p>
          </table:table-cell>
          <table:table-cell office:value-type="float" office:value="0.388780268194859" calcext:value-type="float">
            <text:p>0,388780</text:p>
          </table:table-cell>
          <table:table-cell office:value-type="float" office:value="0.556757569714927" calcext:value-type="float">
            <text:p>0,556758</text:p>
          </table:table-cell>
        </table:table-row>
        <table:table-row table:style-name="ro1" table:visibility="filter">
          <table:table-cell office:value-type="string" calcext:value-type="string">
            <text:p>INTERLAGOS</text:p>
          </table:table-cell>
          <table:table-cell office:value-type="string" calcext:value-type="string">
            <text:p>PIRATININGA 2</text:p>
          </table:table-cell>
          <table:table-cell office:value-type="float" office:value="0.792490785854286" calcext:value-type="float">
            <text:p>0,792491</text:p>
          </table:table-cell>
          <table:table-cell office:value-type="float" office:value="1.28465222765653" calcext:value-type="float">
            <text:p>1,284652</text:p>
          </table:table-cell>
        </table:table-row>
        <table:table-row table:style-name="ro1" table:visibility="filter">
          <table:table-cell office:value-type="string" calcext:value-type="string">
            <text:p>INTERLAGOS</text:p>
          </table:table-cell>
          <table:table-cell office:value-type="string" calcext:value-type="string">
            <text:p>XAVANTES</text:p>
          </table:table-cell>
          <table:table-cell office:value-type="float" office:value="1.2666111718815" calcext:value-type="float">
            <text:p>1,266611</text:p>
          </table:table-cell>
          <table:table-cell office:value-type="float" office:value="2.05321612891459" calcext:value-type="float">
            <text:p>2,053216</text:p>
          </table:table-cell>
        </table:table-row>
        <table:table-row table:style-name="ro1" table:visibility="filter">
          <table:table-cell office:value-type="string" calcext:value-type="string">
            <text:p>IPATINGA 1</text:p>
          </table:table-cell>
          <table:table-cell office:value-type="string" calcext:value-type="string">
            <text:p>MESQUITA</text:p>
          </table:table-cell>
          <table:table-cell office:value-type="float" office:value="0.400273556468003" calcext:value-type="float">
            <text:p>0,400274</text:p>
          </table:table-cell>
          <table:table-cell office:value-type="float" office:value="0.620546985312472" calcext:value-type="float">
            <text:p>0,620547</text:p>
          </table:table-cell>
        </table:table-row>
        <table:table-row table:style-name="ro1" table:visibility="filter">
          <table:table-cell office:value-type="string" calcext:value-type="string">
            <text:p>IRAPE-SE</text:p>
          </table:table-cell>
          <table:table-cell office:value-type="string" calcext:value-type="string">
            <text:p>MONTESCLAROS2</text:p>
          </table:table-cell>
          <table:table-cell office:value-type="float" office:value="0.711366844551571" calcext:value-type="float">
            <text:p>0,711367</text:p>
          </table:table-cell>
          <table:table-cell office:value-type="float" office:value="1.12011955427228" calcext:value-type="float">
            <text:p>1,120120</text:p>
          </table:table-cell>
        </table:table-row>
        <table:table-row table:style-name="ro1" table:visibility="filter">
          <table:table-cell office:value-type="string" calcext:value-type="string">
            <text:p>ITA</text:p>
          </table:table-cell>
          <table:table-cell office:value-type="string" calcext:value-type="string">
            <text:p>MACHADINHO</text:p>
          </table:table-cell>
          <table:table-cell office:value-type="float" office:value="1.17917193199826" calcext:value-type="float">
            <text:p>1,179172</text:p>
          </table:table-cell>
          <table:table-cell office:value-type="float" office:value="1.56619568474449" calcext:value-type="float">
            <text:p>1,566196</text:p>
          </table:table-cell>
        </table:table-row>
        <table:table-row table:style-name="ro1" table:visibility="filter">
          <table:table-cell office:value-type="string" calcext:value-type="string">
            <text:p>ITA</text:p>
          </table:table-cell>
          <table:table-cell office:value-type="string" calcext:value-type="string">
            <text:p>PINHALZINHO 2</text:p>
          </table:table-cell>
          <table:table-cell office:value-type="float" office:value="0.513228210703836" calcext:value-type="float">
            <text:p>0,513228</text:p>
          </table:table-cell>
          <table:table-cell office:value-type="float" office:value="0.808836467589179" calcext:value-type="float">
            <text:p>0,808836</text:p>
          </table:table-cell>
        </table:table-row>
        <table:table-row table:style-name="ro1" table:visibility="filter">
          <table:table-cell office:value-type="string" calcext:value-type="string">
            <text:p>ITA</text:p>
          </table:table-cell>
          <table:table-cell office:value-type="string" calcext:value-type="string">
            <text:p>S.SANTIAGO</text:p>
          </table:table-cell>
          <table:table-cell office:value-type="float" office:value="1.37852359136478" calcext:value-type="float">
            <text:p>1,378524</text:p>
          </table:table-cell>
          <table:table-cell office:value-type="float" office:value="1.81184639096552" calcext:value-type="float">
            <text:p>1,811846</text:p>
          </table:table-cell>
        </table:table-row>
        <table:table-row table:style-name="ro1" table:visibility="filter">
          <table:table-cell office:value-type="string" calcext:value-type="string">
            <text:p>ITA</text:p>
          </table:table-cell>
          <table:table-cell office:value-type="string" calcext:value-type="string">
            <text:p>XANXERE ESU</text:p>
          </table:table-cell>
          <table:table-cell office:value-type="float" office:value="0.487288475075005" calcext:value-type="float">
            <text:p>0,487288</text:p>
          </table:table-cell>
          <table:table-cell office:value-type="float" office:value="0.767956009931858" calcext:value-type="float">
            <text:p>0,767956</text:p>
          </table:table-cell>
        </table:table-row>
        <table:table-row table:style-name="ro1" table:visibility="filter">
          <table:table-cell office:value-type="string" calcext:value-type="string">
            <text:p>ITABERA</text:p>
          </table:table-cell>
          <table:table-cell office:value-type="string" calcext:value-type="string">
            <text:p>IVAIPORA FUR</text:p>
          </table:table-cell>
          <table:table-cell office:value-type="float" office:value="2.39316669549539" calcext:value-type="float">
            <text:p>2,393167</text:p>
          </table:table-cell>
          <table:table-cell office:value-type="float" office:value="2.41287910037302" calcext:value-type="float">
            <text:p>2,412879</text:p>
          </table:table-cell>
        </table:table-row>
        <table:table-row table:style-name="ro1" table:visibility="filter">
          <table:table-cell office:value-type="string" calcext:value-type="string">
            <text:p>ITABIRA 2</text:p>
          </table:table-cell>
          <table:table-cell office:value-type="string" calcext:value-type="string">
            <text:p>ITABIRA 5</text:p>
          </table:table-cell>
          <table:table-cell office:value-type="float" office:value="0.411397012772047" calcext:value-type="float">
            <text:p>0,411397</text:p>
          </table:table-cell>
          <table:table-cell office:value-type="float" office:value="0.637791759952689" calcext:value-type="float">
            <text:p>0,637792</text:p>
          </table:table-cell>
        </table:table-row>
        <table:table-row table:style-name="ro1" table:visibility="filter">
          <table:table-cell office:value-type="string" calcext:value-type="string">
            <text:p>ITABIRA 2</text:p>
          </table:table-cell>
          <table:table-cell office:value-type="string" calcext:value-type="string">
            <text:p>J.MONLEVADE 4</text:p>
          </table:table-cell>
          <table:table-cell office:value-type="float" office:value="0.304656362534002" calcext:value-type="float">
            <text:p>0,304656</text:p>
          </table:table-cell>
          <table:table-cell office:value-type="float" office:value="0.5604089240251" calcext:value-type="float">
            <text:p>0,560409</text:p>
          </table:table-cell>
        </table:table-row>
        <table:table-row table:style-name="ro1" table:visibility="filter">
          <table:table-cell office:value-type="string" calcext:value-type="string">
            <text:p>ITABIRA 2</text:p>
          </table:table-cell>
          <table:table-cell office:value-type="string" calcext:value-type="string">
            <text:p>NOVA ERA 2</text:p>
          </table:table-cell>
          <table:table-cell office:value-type="float" office:value="0.30086942192268" calcext:value-type="float">
            <text:p>0,300869</text:p>
          </table:table-cell>
          <table:table-cell office:value-type="float" office:value="0.553442927005751" calcext:value-type="float">
            <text:p>0,553443</text:p>
          </table:table-cell>
        </table:table-row>
        <table:table-row table:style-name="ro1" table:visibility="filter">
          <table:table-cell office:value-type="string" calcext:value-type="string">
            <text:p>ITABIRA 4</text:p>
          </table:table-cell>
          <table:table-cell office:value-type="string" calcext:value-type="string">
            <text:p>TAQUARIL</text:p>
          </table:table-cell>
          <table:table-cell office:value-type="float" office:value="0.36502489998214" calcext:value-type="float">
            <text:p>0,365025</text:p>
          </table:table-cell>
          <table:table-cell office:value-type="float" office:value="0.621234069622381" calcext:value-type="float">
            <text:p>0,621234</text:p>
          </table:table-cell>
        </table:table-row>
        <table:table-row table:style-name="ro1" table:visibility="filter">
          <table:table-cell office:value-type="string" calcext:value-type="string">
            <text:p>ITABIRA 5</text:p>
          </table:table-cell>
          <table:table-cell office:value-type="string" calcext:value-type="string">
            <text:p>P. JUSCELINO</text:p>
          </table:table-cell>
          <table:table-cell office:value-type="float" office:value="1.75897909936002" calcext:value-type="float">
            <text:p>1,758979</text:p>
          </table:table-cell>
          <table:table-cell office:value-type="float" office:value="2.2982720177624" calcext:value-type="float">
            <text:p>2,298272</text:p>
          </table:table-cell>
        </table:table-row>
        <table:table-row table:style-name="ro1" table:visibility="filter">
          <table:table-cell office:value-type="string" calcext:value-type="string">
            <text:p>ITABIRA 5</text:p>
          </table:table-cell>
          <table:table-cell office:value-type="string" calcext:value-type="string">
            <text:p>SABARA 3</text:p>
          </table:table-cell>
          <table:table-cell office:value-type="float" office:value="0.390977523527869" calcext:value-type="float">
            <text:p>0,390978</text:p>
          </table:table-cell>
          <table:table-cell office:value-type="float" office:value="0.606135278310721" calcext:value-type="float">
            <text:p>0,606135</text:p>
          </table:table-cell>
        </table:table-row>
        <table:table-row table:style-name="ro1" table:visibility="filter">
          <table:table-cell office:value-type="string" calcext:value-type="string">
            <text:p>ITABIRA 5</text:p>
          </table:table-cell>
          <table:table-cell office:value-type="string" calcext:value-type="string">
            <text:p>VESPASIANO 2</text:p>
          </table:table-cell>
          <table:table-cell office:value-type="float" office:value="1.30876689252219" calcext:value-type="float">
            <text:p>1,308767</text:p>
          </table:table-cell>
          <table:table-cell office:value-type="float" office:value="1.71002732661916" calcext:value-type="float">
            <text:p>1,710027</text:p>
          </table:table-cell>
        </table:table-row>
        <table:table-row table:style-name="ro1" table:visibility="filter">
          <table:table-cell office:value-type="string" calcext:value-type="string">
            <text:p>ITABIRITO 2</text:p>
          </table:table-cell>
          <table:table-cell office:value-type="string" calcext:value-type="string">
            <text:p>JECEABA</text:p>
          </table:table-cell>
          <table:table-cell office:value-type="float" office:value="0.814884579801449" calcext:value-type="float">
            <text:p>0,814885</text:p>
          </table:table-cell>
          <table:table-cell office:value-type="float" office:value="1.16883135765363" calcext:value-type="float">
            <text:p>1,168831</text:p>
          </table:table-cell>
        </table:table-row>
        <table:table-row table:style-name="ro1" table:visibility="filter">
          <table:table-cell office:value-type="string" calcext:value-type="string">
            <text:p>ITABIRITO 2</text:p>
          </table:table-cell>
          <table:table-cell office:value-type="string" calcext:value-type="string">
            <text:p>S. G. DO PARA</text:p>
          </table:table-cell>
          <table:table-cell office:value-type="float" office:value="1.32959097583726" calcext:value-type="float">
            <text:p>1,329591</text:p>
          </table:table-cell>
          <table:table-cell office:value-type="float" office:value="1.73723595462162" calcext:value-type="float">
            <text:p>1,737236</text:p>
          </table:table-cell>
        </table:table-row>
        <table:table-row table:style-name="ro1" table:visibility="filter">
          <table:table-cell office:value-type="string" calcext:value-type="string">
            <text:p>ITABIRITO 2</text:p>
          </table:table-cell>
          <table:table-cell office:value-type="string" calcext:value-type="string">
            <text:p>VESPASIANO 2</text:p>
          </table:table-cell>
          <table:table-cell office:value-type="float" office:value="1.35556586208544" calcext:value-type="float">
            <text:p>1,355566</text:p>
          </table:table-cell>
          <table:table-cell office:value-type="float" office:value="1.77117459223844" calcext:value-type="float">
            <text:p>1,771175</text:p>
          </table:table-cell>
        </table:table-row>
        <table:table-row table:style-name="ro1" table:visibility="filter">
          <table:table-cell office:value-type="string" calcext:value-type="string">
            <text:p>ITABUNA III</text:p>
          </table:table-cell>
          <table:table-cell office:value-type="string" calcext:value-type="string">
            <text:p>ITAPEBI SE</text:p>
          </table:table-cell>
          <table:table-cell office:value-type="float" office:value="0.340018804345396" calcext:value-type="float">
            <text:p>0,340019</text:p>
          </table:table-cell>
          <table:table-cell office:value-type="float" office:value="0.578289864304456" calcext:value-type="float">
            <text:p>0,578290</text:p>
          </table:table-cell>
        </table:table-row>
        <table:table-row table:style-name="ro1" table:visibility="filter">
          <table:table-cell office:value-type="string" calcext:value-type="string">
            <text:p>ITACAIUNAS</text:p>
          </table:table-cell>
          <table:table-cell office:value-type="string" calcext:value-type="string">
            <text:p>SERRA PELADA</text:p>
          </table:table-cell>
          <table:table-cell office:value-type="float" office:value="1.49804744008056" calcext:value-type="float">
            <text:p>1,498047</text:p>
          </table:table-cell>
          <table:table-cell office:value-type="float" office:value="1.8081270836526" calcext:value-type="float">
            <text:p>1,808127</text:p>
          </table:table-cell>
        </table:table-row>
        <table:table-row table:style-name="ro1" table:visibility="filter">
          <table:table-cell office:value-type="string" calcext:value-type="string">
            <text:p>ITAGIBA</text:p>
          </table:table-cell>
          <table:table-cell office:value-type="string" calcext:value-type="string">
            <text:p>POCOES II</text:p>
          </table:table-cell>
          <table:table-cell office:value-type="float" office:value="0.307756562100328" calcext:value-type="float">
            <text:p>0,307757</text:p>
          </table:table-cell>
          <table:table-cell office:value-type="float" office:value="0.523419582274096" calcext:value-type="float">
            <text:p>0,523420</text:p>
          </table:table-cell>
        </table:table-row>
        <table:table-row table:style-name="ro1" table:visibility="filter">
          <table:table-cell office:value-type="string" calcext:value-type="string">
            <text:p>ITAGUACU</text:p>
          </table:table-cell>
          <table:table-cell office:value-type="string" calcext:value-type="string">
            <text:p>SAO SIMAO-SE</text:p>
          </table:table-cell>
          <table:table-cell office:value-type="float" office:value="1.29376232517484" calcext:value-type="float">
            <text:p>1,293762</text:p>
          </table:table-cell>
          <table:table-cell office:value-type="float" office:value="1.66162271753191" calcext:value-type="float">
            <text:p>1,661623</text:p>
          </table:table-cell>
        </table:table-row>
        <table:table-row table:style-name="ro1" table:visibility="filter">
          <table:table-cell office:value-type="string" calcext:value-type="string">
            <text:p>ITAJAI 2</text:p>
          </table:table-cell>
          <table:table-cell office:value-type="string" calcext:value-type="string">
            <text:p>ITAJAI</text:p>
          </table:table-cell>
          <table:table-cell office:value-type="float" office:value="0.47599125620614" calcext:value-type="float">
            <text:p>0,475991</text:p>
          </table:table-cell>
          <table:table-cell office:value-type="float" office:value="0.750151839364259" calcext:value-type="float">
            <text:p>0,750152</text:p>
          </table:table-cell>
        </table:table-row>
        <table:table-row table:style-name="ro1" table:visibility="filter">
          <table:table-cell office:value-type="string" calcext:value-type="string">
            <text:p>ITAJAI 2</text:p>
          </table:table-cell>
          <table:table-cell office:value-type="string" calcext:value-type="string">
            <text:p>JOINVILLE SUL</text:p>
          </table:table-cell>
          <table:table-cell office:value-type="float" office:value="1.50004503942675" calcext:value-type="float">
            <text:p>1,500045</text:p>
          </table:table-cell>
          <table:table-cell office:value-type="float" office:value="1.99238465903039" calcext:value-type="float">
            <text:p>1,992385</text:p>
          </table:table-cell>
        </table:table-row>
        <table:table-row table:style-name="ro1" table:visibility="filter">
          <table:table-cell office:value-type="string" calcext:value-type="string">
            <text:p>ITAPETI</text:p>
          </table:table-cell>
          <table:table-cell office:value-type="string" calcext:value-type="string">
            <text:p>MOGI CRUZES</text:p>
          </table:table-cell>
          <table:table-cell office:value-type="float" office:value="0.626524243291148" calcext:value-type="float">
            <text:p>0,626524</text:p>
          </table:table-cell>
          <table:table-cell office:value-type="float" office:value="1.0156152969743" calcext:value-type="float">
            <text:p>1,015615</text:p>
          </table:table-cell>
        </table:table-row>
        <table:table-row table:style-name="ro1" table:visibility="filter">
          <table:table-cell office:value-type="string" calcext:value-type="string">
            <text:p>ITAPETI</text:p>
          </table:table-cell>
          <table:table-cell office:value-type="string" calcext:value-type="string">
            <text:p>NORDESTE</text:p>
          </table:table-cell>
          <table:table-cell office:value-type="float" office:value="0.780829406543775" calcext:value-type="float">
            <text:p>0,780829</text:p>
          </table:table-cell>
          <table:table-cell office:value-type="float" office:value="1.26574876887039" calcext:value-type="float">
            <text:p>1,265749</text:p>
          </table:table-cell>
        </table:table-row>
        <table:table-row table:style-name="ro1" table:visibility="filter">
          <table:table-cell office:value-type="string" calcext:value-type="string">
            <text:p>ITAPETI</text:p>
          </table:table-cell>
          <table:table-cell office:value-type="string" calcext:value-type="string">
            <text:p>TIJUCO PRETO</text:p>
          </table:table-cell>
          <table:table-cell office:value-type="float" office:value="1.02486051940952" calcext:value-type="float">
            <text:p>1,024861</text:p>
          </table:table-cell>
          <table:table-cell office:value-type="float" office:value="1.32127393053274" calcext:value-type="float">
            <text:p>1,321274</text:p>
          </table:table-cell>
        </table:table-row>
        <table:table-row table:style-name="ro1" table:visibility="filter">
          <table:table-cell office:value-type="string" calcext:value-type="string">
            <text:p>ITAUBA</text:p>
          </table:table-cell>
          <table:table-cell office:value-type="string" calcext:value-type="string">
            <text:p>P.PETROQUIMIC</text:p>
          </table:table-cell>
          <table:table-cell office:value-type="float" office:value="0.39134499121127" calcext:value-type="float">
            <text:p>0,391345</text:p>
          </table:table-cell>
          <table:table-cell office:value-type="float" office:value="0.717888150683322" calcext:value-type="float">
            <text:p>0,717888</text:p>
          </table:table-cell>
        </table:table-row>
        <table:table-row table:style-name="ro1" table:visibility="filter">
          <table:table-cell office:value-type="string" calcext:value-type="string">
            <text:p>ITAUBA</text:p>
          </table:table-cell>
          <table:table-cell office:value-type="string" calcext:value-type="string">
            <text:p>U.D.FRANCISCA</text:p>
          </table:table-cell>
          <table:table-cell office:value-type="float" office:value="0.333093286235515" calcext:value-type="float">
            <text:p>0,333093</text:p>
          </table:table-cell>
          <table:table-cell office:value-type="float" office:value="0.61103049388858" calcext:value-type="float">
            <text:p>0,611030</text:p>
          </table:table-cell>
        </table:table-row>
        <table:table-row table:style-name="ro1" table:visibility="filter">
          <table:table-cell office:value-type="string" calcext:value-type="string">
            <text:p>ITUMBIARA</text:p>
          </table:table-cell>
          <table:table-cell office:value-type="string" calcext:value-type="string">
            <text:p>BANDEIRANTES</text:p>
          </table:table-cell>
          <table:table-cell office:value-type="float" office:value="0.740098192433419" calcext:value-type="float">
            <text:p>0,740098</text:p>
          </table:table-cell>
          <table:table-cell office:value-type="float" office:value="1.07709843559412" calcext:value-type="float">
            <text:p>1,077098</text:p>
          </table:table-cell>
        </table:table-row>
        <table:table-row table:style-name="ro1" table:visibility="filter">
          <table:table-cell office:value-type="string" calcext:value-type="string">
            <text:p>ITUMBIARA</text:p>
          </table:table-cell>
          <table:table-cell office:value-type="string" calcext:value-type="string">
            <text:p>MONTE ALEGRE2</text:p>
          </table:table-cell>
          <table:table-cell office:value-type="float" office:value="0.688862752394444" calcext:value-type="float">
            <text:p>0,688863</text:p>
          </table:table-cell>
          <table:table-cell office:value-type="float" office:value="0.988071692698366" calcext:value-type="float">
            <text:p>0,988072</text:p>
          </table:table-cell>
        </table:table-row>
        <table:table-row table:style-name="ro1" table:visibility="filter">
          <table:table-cell office:value-type="string" calcext:value-type="string">
            <text:p>ITUMBIARA</text:p>
          </table:table-cell>
          <table:table-cell office:value-type="string" calcext:value-type="string">
            <text:p>NOVA PONTE 3</text:p>
          </table:table-cell>
          <table:table-cell office:value-type="float" office:value="1.4135280016679" calcext:value-type="float">
            <text:p>1,413528</text:p>
          </table:table-cell>
          <table:table-cell office:value-type="float" office:value="1.84690759187469" calcext:value-type="float">
            <text:p>1,846908</text:p>
          </table:table-cell>
        </table:table-row>
        <table:table-row table:style-name="ro1" table:visibility="filter">
          <table:table-cell office:value-type="string" calcext:value-type="string">
            <text:p>ITUTINGA</text:p>
          </table:table-cell>
          <table:table-cell office:value-type="string" calcext:value-type="string">
            <text:p>JECEABA</text:p>
          </table:table-cell>
          <table:table-cell office:value-type="float" office:value="0.749548342304729" calcext:value-type="float">
            <text:p>0,749548</text:p>
          </table:table-cell>
          <table:table-cell office:value-type="float" office:value="1.18024021152849" calcext:value-type="float">
            <text:p>1,180240</text:p>
          </table:table-cell>
        </table:table-row>
        <table:table-row table:style-name="ro1" table:visibility="filter">
          <table:table-cell office:value-type="string" calcext:value-type="string">
            <text:p>ITUTINGA</text:p>
          </table:table-cell>
          <table:table-cell office:value-type="string" calcext:value-type="string">
            <text:p>JUIZ DE FORA1</text:p>
          </table:table-cell>
          <table:table-cell office:value-type="float" office:value="0.735552410592539" calcext:value-type="float">
            <text:p>0,735552</text:p>
          </table:table-cell>
          <table:table-cell office:value-type="float" office:value="1.15820219146731" calcext:value-type="float">
            <text:p>1,158202</text:p>
          </table:table-cell>
        </table:table-row>
        <table:table-row table:style-name="ro1" table:visibility="filter">
          <table:table-cell office:value-type="string" calcext:value-type="string">
            <text:p>IVAIPORA ELS</text:p>
          </table:table-cell>
          <table:table-cell office:value-type="string" calcext:value-type="string">
            <text:p>S.SANTIAGO</text:p>
          </table:table-cell>
          <table:table-cell office:value-type="float" office:value="1.53175108222497" calcext:value-type="float">
            <text:p>1,531751</text:p>
          </table:table-cell>
          <table:table-cell office:value-type="float" office:value="1.99220327980557" calcext:value-type="float">
            <text:p>1,992203</text:p>
          </table:table-cell>
        </table:table-row>
        <table:table-row table:style-name="ro1" table:visibility="filter">
          <table:table-cell office:value-type="string" calcext:value-type="string">
            <text:p>IVINHEMA 2</text:p>
          </table:table-cell>
          <table:table-cell office:value-type="string" calcext:value-type="string">
            <text:p>N.P.PRIMAVERA</text:p>
          </table:table-cell>
          <table:table-cell office:value-type="float" office:value="0.603215403415165" calcext:value-type="float">
            <text:p>0,603215</text:p>
          </table:table-cell>
          <table:table-cell office:value-type="float" office:value="0.967877427176928" calcext:value-type="float">
            <text:p>0,967877</text:p>
          </table:table-cell>
        </table:table-row>
        <table:table-row table:style-name="ro1" table:visibility="filter">
          <table:table-cell office:value-type="string" calcext:value-type="string">
            <text:p>J.LACERDA-A</text:p>
          </table:table-cell>
          <table:table-cell office:value-type="string" calcext:value-type="string">
            <text:p>J.LACERDA-B</text:p>
          </table:table-cell>
          <table:table-cell office:value-type="float" office:value="0.333628552189707" calcext:value-type="float">
            <text:p>0,333629</text:p>
          </table:table-cell>
          <table:table-cell office:value-type="float" office:value="0.623870898774166" calcext:value-type="float">
            <text:p>0,623871</text:p>
          </table:table-cell>
        </table:table-row>
        <table:table-row table:style-name="ro1" table:visibility="filter">
          <table:table-cell office:value-type="string" calcext:value-type="string">
            <text:p>JACAREPAGUA</text:p>
          </table:table-cell>
          <table:table-cell office:value-type="string" calcext:value-type="string">
            <text:p>NOVA IGUACU</text:p>
          </table:table-cell>
          <table:table-cell office:value-type="float" office:value="0.682958786652185" calcext:value-type="float">
            <text:p>0,682959</text:p>
          </table:table-cell>
          <table:table-cell office:value-type="float" office:value="0.968833214844915" calcext:value-type="float">
            <text:p>0,968833</text:p>
          </table:table-cell>
        </table:table-row>
        <table:table-row table:style-name="ro1" table:visibility="filter">
          <table:table-cell office:value-type="string" calcext:value-type="string">
            <text:p>JAGUARA-345</text:p>
          </table:table-cell>
          <table:table-cell office:value-type="string" calcext:value-type="string">
            <text:p>L.C.BARRETO</text:p>
          </table:table-cell>
          <table:table-cell office:value-type="float" office:value="0.678277145560366" calcext:value-type="float">
            <text:p>0,678277</text:p>
          </table:table-cell>
          <table:table-cell office:value-type="float" office:value="1.08364801518805" calcext:value-type="float">
            <text:p>1,083648</text:p>
          </table:table-cell>
        </table:table-row>
        <table:table-row table:style-name="ro1" table:visibility="filter">
          <table:table-cell office:value-type="string" calcext:value-type="string">
            <text:p>JAGUARA-500</text:p>
          </table:table-cell>
          <table:table-cell office:value-type="string" calcext:value-type="string">
            <text:p>B.DESPACHO 3</text:p>
          </table:table-cell>
          <table:table-cell office:value-type="float" office:value="1.36795457064289" calcext:value-type="float">
            <text:p>1,367955</text:p>
          </table:table-cell>
          <table:table-cell office:value-type="float" office:value="1.78736160789097" calcext:value-type="float">
            <text:p>1,787362</text:p>
          </table:table-cell>
        </table:table-row>
        <table:table-row table:style-name="ro1" table:visibility="filter">
          <table:table-cell office:value-type="string" calcext:value-type="string">
            <text:p>JAGUARA-500</text:p>
          </table:table-cell>
          <table:table-cell office:value-type="string" calcext:value-type="string">
            <text:p>SAO SIMAO-SE</text:p>
          </table:table-cell>
          <table:table-cell office:value-type="float" office:value="1.34982135123724" calcext:value-type="float">
            <text:p>1,349821</text:p>
          </table:table-cell>
          <table:table-cell office:value-type="float" office:value="1.7636688472623" calcext:value-type="float">
            <text:p>1,763669</text:p>
          </table:table-cell>
        </table:table-row>
        <table:table-row table:style-name="ro1" table:visibility="filter">
          <table:table-cell office:value-type="string" calcext:value-type="string">
            <text:p>JAGUARARI-SE</text:p>
          </table:table-cell>
          <table:table-cell office:value-type="string" calcext:value-type="string">
            <text:p>JUAZEIRO II</text:p>
          </table:table-cell>
          <table:table-cell office:value-type="float" office:value="0.305950764583512" calcext:value-type="float">
            <text:p>0,305951</text:p>
          </table:table-cell>
          <table:table-cell office:value-type="float" office:value="0.520348356837104" calcext:value-type="float">
            <text:p>0,520348</text:p>
          </table:table-cell>
        </table:table-row>
        <table:table-row table:style-name="ro1" table:visibility="filter">
          <table:table-cell office:value-type="string" calcext:value-type="string">
            <text:p>JAGUARIAIVA</text:p>
          </table:table-cell>
          <table:table-cell office:value-type="string" calcext:value-type="string">
            <text:p>ITARARE II</text:p>
          </table:table-cell>
          <table:table-cell office:value-type="float" office:value="0.313696653218795" calcext:value-type="float">
            <text:p>0,313697</text:p>
          </table:table-cell>
          <table:table-cell office:value-type="float" office:value="0.584144629743762" calcext:value-type="float">
            <text:p>0,584145</text:p>
          </table:table-cell>
        </table:table-row>
        <table:table-row table:style-name="ro1" table:visibility="filter">
          <table:table-cell office:value-type="string" calcext:value-type="string">
            <text:p>JAGUARIAIVA</text:p>
          </table:table-cell>
          <table:table-cell office:value-type="string" calcext:value-type="string">
            <text:p>SE.MAUA</text:p>
          </table:table-cell>
          <table:table-cell office:value-type="float" office:value="0.360598140022419" calcext:value-type="float">
            <text:p>0,360598</text:p>
          </table:table-cell>
          <table:table-cell office:value-type="float" office:value="0.660268579088793" calcext:value-type="float">
            <text:p>0,660269</text:p>
          </table:table-cell>
        </table:table-row>
        <table:table-row table:style-name="ro1" table:visibility="filter">
          <table:table-cell office:value-type="string" calcext:value-type="string">
            <text:p>JAGUARUANA II</text:p>
          </table:table-cell>
          <table:table-cell office:value-type="string" calcext:value-type="string">
            <text:p>ACU III</text:p>
          </table:table-cell>
          <table:table-cell office:value-type="float" office:value="1.44294876718857" calcext:value-type="float">
            <text:p>1,442949</text:p>
          </table:table-cell>
          <table:table-cell office:value-type="float" office:value="1.8113770933154" calcext:value-type="float">
            <text:p>1,811377</text:p>
          </table:table-cell>
        </table:table-row>
        <table:table-row table:style-name="ro1" table:visibility="filter">
          <table:table-cell office:value-type="string" calcext:value-type="string">
            <text:p>JAGUARUANA II</text:p>
          </table:table-cell>
          <table:table-cell office:value-type="string" calcext:value-type="string">
            <text:p>MOSSORO IV</text:p>
          </table:table-cell>
          <table:table-cell office:value-type="float" office:value="0.569141076501476" calcext:value-type="float">
            <text:p>0,569141</text:p>
          </table:table-cell>
          <table:table-cell office:value-type="float" office:value="0.847704433304129" calcext:value-type="float">
            <text:p>0,847704</text:p>
          </table:table-cell>
        </table:table-row>
        <table:table-row table:style-name="ro1" table:visibility="filter">
          <table:table-cell office:value-type="string" calcext:value-type="string">
            <text:p>JAGUARUANA II</text:p>
          </table:table-cell>
          <table:table-cell office:value-type="string" calcext:value-type="string">
            <text:p>PACATUBA</text:p>
          </table:table-cell>
          <table:table-cell office:value-type="float" office:value="1.46184643702825" calcext:value-type="float">
            <text:p>1,461846</text:p>
          </table:table-cell>
          <table:table-cell office:value-type="float" office:value="1.84030653419809" calcext:value-type="float">
            <text:p>1,840307</text:p>
          </table:table-cell>
        </table:table-row>
        <table:table-row table:style-name="ro1" table:visibility="filter">
          <table:table-cell office:value-type="string" calcext:value-type="string">
            <text:p>JAGUARUANA II</text:p>
          </table:table-cell>
          <table:table-cell office:value-type="string" calcext:value-type="string">
            <text:p>RUSSAS II</text:p>
          </table:table-cell>
          <table:table-cell office:value-type="float" office:value="0.55395660020242" calcext:value-type="float">
            <text:p>0,553957</text:p>
          </table:table-cell>
          <table:table-cell office:value-type="float" office:value="0.827431478854539" calcext:value-type="float">
            <text:p>0,827431</text:p>
          </table:table-cell>
        </table:table-row>
        <table:table-row table:style-name="ro1" table:visibility="filter">
          <table:table-cell office:value-type="string" calcext:value-type="string">
            <text:p>JAIBA</text:p>
          </table:table-cell>
          <table:table-cell office:value-type="string" calcext:value-type="string">
            <text:p>JANAUBA 6</text:p>
          </table:table-cell>
          <table:table-cell office:value-type="float" office:value="1.50246061017381" calcext:value-type="float">
            <text:p>1,502461</text:p>
          </table:table-cell>
          <table:table-cell office:value-type="float" office:value="1.96310642884218" calcext:value-type="float">
            <text:p>1,963106</text:p>
          </table:table-cell>
        </table:table-row>
        <table:table-row table:style-name="ro1" table:visibility="filter">
          <table:table-cell office:value-type="string" calcext:value-type="string">
            <text:p>JANAUBA 3</text:p>
          </table:table-cell>
          <table:table-cell office:value-type="string" calcext:value-type="string">
            <text:p>JANAUBA 6</text:p>
          </table:table-cell>
          <table:table-cell office:value-type="float" office:value="1.47944111200098" calcext:value-type="float">
            <text:p>1,479441</text:p>
          </table:table-cell>
          <table:table-cell office:value-type="float" office:value="1.93302928435945" calcext:value-type="float">
            <text:p>1,933029</text:p>
          </table:table-cell>
        </table:table-row>
        <table:table-row table:style-name="ro1" table:visibility="filter">
          <table:table-cell office:value-type="string" calcext:value-type="string">
            <text:p>JANAUBA 3</text:p>
          </table:table-cell>
          <table:table-cell office:value-type="string" calcext:value-type="string">
            <text:p>P. JUSCELINO</text:p>
          </table:table-cell>
          <table:table-cell office:value-type="float" office:value="1.53806851788986" calcext:value-type="float">
            <text:p>1,538069</text:p>
          </table:table-cell>
          <table:table-cell office:value-type="float" office:value="2.00963151714178" calcext:value-type="float">
            <text:p>2,009632</text:p>
          </table:table-cell>
        </table:table-row>
        <table:table-row table:style-name="ro1" table:visibility="filter">
          <table:table-cell office:value-type="string" calcext:value-type="string">
            <text:p>JANAUBA 3</text:p>
          </table:table-cell>
          <table:table-cell office:value-type="string" calcext:value-type="string">
            <text:p>S. DAS ALMAS II</text:p>
          </table:table-cell>
          <table:table-cell office:value-type="float" office:value="1.54025220454095" calcext:value-type="float">
            <text:p>1,540252</text:p>
          </table:table-cell>
          <table:table-cell office:value-type="float" office:value="2.01248470961438" calcext:value-type="float">
            <text:p>2,012485</text:p>
          </table:table-cell>
        </table:table-row>
        <table:table-row table:style-name="ro1" table:visibility="filter">
          <table:table-cell office:value-type="string" calcext:value-type="string">
            <text:p>JANDAIRA II</text:p>
          </table:table-cell>
          <table:table-cell office:value-type="string" calcext:value-type="string">
            <text:p>J. CAMARA III</text:p>
          </table:table-cell>
          <table:table-cell office:value-type="float" office:value="1.34000426489857" calcext:value-type="float">
            <text:p>1,340004</text:p>
          </table:table-cell>
          <table:table-cell office:value-type="float" office:value="1.67738859506237" calcext:value-type="float">
            <text:p>1,677389</text:p>
          </table:table-cell>
        </table:table-row>
        <table:table-row table:style-name="ro1" table:visibility="filter">
          <table:table-cell office:value-type="string" calcext:value-type="string">
            <text:p>JARAGUA DO SUL</text:p>
          </table:table-cell>
          <table:table-cell office:value-type="string" calcext:value-type="string">
            <text:p>JOINV.NORTE</text:p>
          </table:table-cell>
          <table:table-cell office:value-type="float" office:value="0.514754204656284" calcext:value-type="float">
            <text:p>0,514754</text:p>
          </table:table-cell>
          <table:table-cell office:value-type="float" office:value="0.962568000247447" calcext:value-type="float">
            <text:p>0,962568</text:p>
          </table:table-cell>
        </table:table-row>
        <table:table-row table:style-name="ro1" table:visibility="filter">
          <table:table-cell office:value-type="string" calcext:value-type="string">
            <text:p>JARAGUA DO SUL</text:p>
          </table:table-cell>
          <table:table-cell office:value-type="string" calcext:value-type="string">
            <text:p>JOINVILLE</text:p>
          </table:table-cell>
          <table:table-cell office:value-type="float" office:value="0.511528195348867" calcext:value-type="float">
            <text:p>0,511528</text:p>
          </table:table-cell>
          <table:table-cell office:value-type="float" office:value="0.956535502990053" calcext:value-type="float">
            <text:p>0,956536</text:p>
          </table:table-cell>
        </table:table-row>
        <table:table-row table:style-name="ro1" table:visibility="filter">
          <table:table-cell office:value-type="string" calcext:value-type="string">
            <text:p>JARDIM</text:p>
          </table:table-cell>
          <table:table-cell office:value-type="string" calcext:value-type="string">
            <text:p>NSA.SRA.SOCORRO</text:p>
          </table:table-cell>
          <table:table-cell office:value-type="float" office:value="0.56173648141003" calcext:value-type="float">
            <text:p>0,561736</text:p>
          </table:table-cell>
          <table:table-cell office:value-type="float" office:value="0.813840242881706" calcext:value-type="float">
            <text:p>0,813840</text:p>
          </table:table-cell>
        </table:table-row>
        <table:table-row table:style-name="ro1" table:visibility="filter">
          <table:table-cell office:value-type="string" calcext:value-type="string">
            <text:p>JARDIM</text:p>
          </table:table-cell>
          <table:table-cell office:value-type="string" calcext:value-type="string">
            <text:p>USINA XINGO</text:p>
          </table:table-cell>
          <table:table-cell office:value-type="float" office:value="1.27308705075793" calcext:value-type="float">
            <text:p>1,273087</text:p>
          </table:table-cell>
          <table:table-cell office:value-type="float" office:value="1.54104061281404" calcext:value-type="float">
            <text:p>1,541041</text:p>
          </table:table-cell>
        </table:table-row>
        <table:table-row table:style-name="ro1" table:visibility="filter">
          <table:table-cell office:value-type="string" calcext:value-type="string">
            <text:p>JARDIM BOTANICO</text:p>
          </table:table-cell>
          <table:table-cell office:value-type="string" calcext:value-type="string">
            <text:p>JBO LT GRA2</text:p>
          </table:table-cell>
          <table:table-cell office:value-type="float" office:value="0.325977654507652" calcext:value-type="float">
            <text:p>0,325978</text:p>
          </table:table-cell>
          <table:table-cell office:value-type="float" office:value="0.597977489974442" calcext:value-type="float">
            <text:p>0,597977</text:p>
          </table:table-cell>
        </table:table-row>
        <table:table-row table:style-name="ro1" table:visibility="filter">
          <table:table-cell office:value-type="string" calcext:value-type="string">
            <text:p>JARDIM BOTANICO</text:p>
          </table:table-cell>
          <table:table-cell office:value-type="string" calcext:value-type="string">
            <text:p>JBO LT PA10</text:p>
          </table:table-cell>
          <table:table-cell office:value-type="float" office:value="0.325977654507652" calcext:value-type="float">
            <text:p>0,325978</text:p>
          </table:table-cell>
          <table:table-cell office:value-type="float" office:value="0.597977489974442" calcext:value-type="float">
            <text:p>0,597977</text:p>
          </table:table-cell>
        </table:table-row>
        <table:table-row table:style-name="ro1" table:visibility="filter">
          <table:table-cell office:value-type="string" calcext:value-type="string">
            <text:p>JARDIM BOTANICO</text:p>
          </table:table-cell>
          <table:table-cell office:value-type="string" calcext:value-type="string">
            <text:p>PORTOALEGRE 1</text:p>
          </table:table-cell>
          <table:table-cell office:value-type="float" office:value="0.33128032032403" calcext:value-type="float">
            <text:p>0,331280</text:p>
          </table:table-cell>
          <table:table-cell office:value-type="float" office:value="0.607704766526082" calcext:value-type="float">
            <text:p>0,607705</text:p>
          </table:table-cell>
        </table:table-row>
        <table:table-row table:style-name="ro1" table:visibility="filter">
          <table:table-cell office:value-type="string" calcext:value-type="string">
            <text:p>JATAI</text:p>
          </table:table-cell>
          <table:table-cell office:value-type="string" calcext:value-type="string">
            <text:p>R.VERDE NORTE</text:p>
          </table:table-cell>
          <table:table-cell office:value-type="float" office:value="0.657032018060492" calcext:value-type="float">
            <text:p>0,657032</text:p>
          </table:table-cell>
          <table:table-cell office:value-type="float" office:value="0.984170116725991" calcext:value-type="float">
            <text:p>0,984170</text:p>
          </table:table-cell>
        </table:table-row>
        <table:table-row table:style-name="ro1" table:visibility="filter">
          <table:table-cell office:value-type="string" calcext:value-type="string">
            <text:p>JAURU</text:p>
          </table:table-cell>
          <table:table-cell office:value-type="string" calcext:value-type="string">
            <text:p>JUBA</text:p>
          </table:table-cell>
          <table:table-cell office:value-type="float" office:value="0.598419365761458" calcext:value-type="float">
            <text:p>0,598419</text:p>
          </table:table-cell>
          <table:table-cell office:value-type="float" office:value="0.895530628953508" calcext:value-type="float">
            <text:p>0,895531</text:p>
          </table:table-cell>
        </table:table-row>
        <table:table-row table:style-name="ro1" table:visibility="filter">
          <table:table-cell office:value-type="string" calcext:value-type="string">
            <text:p>JAURU</text:p>
          </table:table-cell>
          <table:table-cell office:value-type="string" calcext:value-type="string">
            <text:p>SE CUIABA</text:p>
          </table:table-cell>
          <table:table-cell office:value-type="float" office:value="1.43249845957793" calcext:value-type="float">
            <text:p>1,432498</text:p>
          </table:table-cell>
          <table:table-cell office:value-type="float" office:value="1.80676072709649" calcext:value-type="float">
            <text:p>1,806761</text:p>
          </table:table-cell>
        </table:table-row>
        <table:table-row table:style-name="ro1" table:visibility="filter">
          <table:table-cell office:value-type="string" calcext:value-type="string">
            <text:p>JAURU</text:p>
          </table:table-cell>
          <table:table-cell office:value-type="string" calcext:value-type="string">
            <text:p>VARZ.GRANDE 2</text:p>
          </table:table-cell>
          <table:table-cell office:value-type="float" office:value="0.664393333838411" calcext:value-type="float">
            <text:p>0,664393</text:p>
          </table:table-cell>
          <table:table-cell office:value-type="float" office:value="0.994260236494423" calcext:value-type="float">
            <text:p>0,994260</text:p>
          </table:table-cell>
        </table:table-row>
        <table:table-row table:style-name="ro1" table:visibility="filter">
          <table:table-cell office:value-type="string" calcext:value-type="string">
            <text:p>JAURU</text:p>
          </table:table-cell>
          <table:table-cell office:value-type="string" calcext:value-type="string">
            <text:p>VILHENA</text:p>
          </table:table-cell>
          <table:table-cell office:value-type="float" office:value="0.670672780806" calcext:value-type="float">
            <text:p>0,670673</text:p>
          </table:table-cell>
          <table:table-cell office:value-type="float" office:value="0.986571473044446" calcext:value-type="float">
            <text:p>0,986571</text:p>
          </table:table-cell>
        </table:table-row>
        <table:table-row table:style-name="ro1" table:visibility="filter">
          <table:table-cell office:value-type="string" calcext:value-type="string">
            <text:p>JEREMOABO</text:p>
          </table:table-cell>
          <table:table-cell office:value-type="string" calcext:value-type="string">
            <text:p>OLINDINA</text:p>
          </table:table-cell>
          <table:table-cell office:value-type="float" office:value="1.21788558258398" calcext:value-type="float">
            <text:p>1,217886</text:p>
          </table:table-cell>
          <table:table-cell office:value-type="float" office:value="1.47140309276552" calcext:value-type="float">
            <text:p>1,471403</text:p>
          </table:table-cell>
        </table:table-row>
        <table:table-row table:style-name="ro1" table:visibility="filter">
          <table:table-cell office:value-type="string" calcext:value-type="string">
            <text:p>JI-PARANA</text:p>
          </table:table-cell>
          <table:table-cell office:value-type="string" calcext:value-type="string">
            <text:p>PIMENTA BUENO</text:p>
          </table:table-cell>
          <table:table-cell office:value-type="float" office:value="0.467387067067316" calcext:value-type="float">
            <text:p>0,467387</text:p>
          </table:table-cell>
          <table:table-cell office:value-type="float" office:value="0.801873678658237" calcext:value-type="float">
            <text:p>0,801874</text:p>
          </table:table-cell>
        </table:table-row>
        <table:table-row table:style-name="ro1" table:visibility="filter">
          <table:table-cell office:value-type="string" calcext:value-type="string">
            <text:p>JOAO CAMARA 2</text:p>
          </table:table-cell>
          <table:table-cell office:value-type="string" calcext:value-type="string">
            <text:p>J. CAMARA III</text:p>
          </table:table-cell>
          <table:table-cell office:value-type="float" office:value="0.57255875353027" calcext:value-type="float">
            <text:p>0,572559</text:p>
          </table:table-cell>
          <table:table-cell office:value-type="float" office:value="0.850382134296407" calcext:value-type="float">
            <text:p>0,850382</text:p>
          </table:table-cell>
        </table:table-row>
        <table:table-row table:style-name="ro1" table:visibility="filter">
          <table:table-cell office:value-type="string" calcext:value-type="string">
            <text:p>JOAO NEIVA 2</text:p>
          </table:table-cell>
          <table:table-cell office:value-type="string" calcext:value-type="string">
            <text:p>VIANA 2</text:p>
          </table:table-cell>
          <table:table-cell office:value-type="float" office:value="1.439205752658" calcext:value-type="float">
            <text:p>1,439206</text:p>
          </table:table-cell>
          <table:table-cell office:value-type="float" office:value="1.87528492226527" calcext:value-type="float">
            <text:p>1,875285</text:p>
          </table:table-cell>
        </table:table-row>
        <table:table-row table:style-name="ro1" table:visibility="filter">
          <table:table-cell office:value-type="string" calcext:value-type="string">
            <text:p>JOAO PESSOA II</text:p>
          </table:table-cell>
          <table:table-cell office:value-type="string" calcext:value-type="string">
            <text:p>MUSSURE II</text:p>
          </table:table-cell>
          <table:table-cell office:value-type="float" office:value="0.322461888172552" calcext:value-type="float">
            <text:p>0,322462</text:p>
          </table:table-cell>
          <table:table-cell office:value-type="float" office:value="0.465380364516462" calcext:value-type="float">
            <text:p>0,465380</text:p>
          </table:table-cell>
        </table:table-row>
        <table:table-row table:style-name="ro1" table:visibility="filter">
          <table:table-cell office:value-type="string" calcext:value-type="string">
            <text:p>JORG.TEIXEIRA</text:p>
          </table:table-cell>
          <table:table-cell office:value-type="string" calcext:value-type="string">
            <text:p>LECHUGA</text:p>
          </table:table-cell>
          <table:table-cell office:value-type="float" office:value="0.664488050280051" calcext:value-type="float">
            <text:p>0,664488</text:p>
          </table:table-cell>
          <table:table-cell office:value-type="float" office:value="0.960850573755624" calcext:value-type="float">
            <text:p>0,960851</text:p>
          </table:table-cell>
        </table:table-row>
        <table:table-row table:style-name="ro1" table:visibility="filter">
          <table:table-cell office:value-type="string" calcext:value-type="string">
            <text:p>JORG.TEIXEIRA</text:p>
          </table:table-cell>
          <table:table-cell office:value-type="string" calcext:value-type="string">
            <text:p>MAUA III</text:p>
          </table:table-cell>
          <table:table-cell office:value-type="float" office:value="0.554577218348165" calcext:value-type="float">
            <text:p>0,554577</text:p>
          </table:table-cell>
          <table:table-cell office:value-type="float" office:value="0.951461658892771" calcext:value-type="float">
            <text:p>0,951462</text:p>
          </table:table-cell>
        </table:table-row>
        <table:table-row table:style-name="ro1" table:visibility="filter">
          <table:table-cell office:value-type="string" calcext:value-type="string">
            <text:p>JUAZEIRO II</text:p>
          </table:table-cell>
          <table:table-cell office:value-type="string" calcext:value-type="string">
            <text:p>JUAZEIRO III</text:p>
          </table:table-cell>
          <table:table-cell office:value-type="float" office:value="0.675019338589853" calcext:value-type="float">
            <text:p>0,675019</text:p>
          </table:table-cell>
          <table:table-cell office:value-type="float" office:value="0.967609503148707" calcext:value-type="float">
            <text:p>0,967610</text:p>
          </table:table-cell>
        </table:table-row>
        <table:table-row table:style-name="ro1" table:visibility="filter">
          <table:table-cell office:value-type="string" calcext:value-type="string">
            <text:p>JUAZEIRO II</text:p>
          </table:table-cell>
          <table:table-cell office:value-type="string" calcext:value-type="string">
            <text:p>SR.BONFIM II</text:p>
          </table:table-cell>
          <table:table-cell office:value-type="float" office:value="0.339534967829697" calcext:value-type="float">
            <text:p>0,339535</text:p>
          </table:table-cell>
          <table:table-cell office:value-type="float" office:value="0.577466975248223" calcext:value-type="float">
            <text:p>0,577467</text:p>
          </table:table-cell>
        </table:table-row>
        <table:table-row table:style-name="ro1" table:visibility="filter">
          <table:table-cell office:value-type="string" calcext:value-type="string">
            <text:p>JUAZEIRO III</text:p>
          </table:table-cell>
          <table:table-cell office:value-type="string" calcext:value-type="string">
            <text:p>US. L.GONZAGA</text:p>
          </table:table-cell>
          <table:table-cell office:value-type="float" office:value="1.27369721826998" calcext:value-type="float">
            <text:p>1,273697</text:p>
          </table:table-cell>
          <table:table-cell office:value-type="float" office:value="1.55968662194226" calcext:value-type="float">
            <text:p>1,559687</text:p>
          </table:table-cell>
        </table:table-row>
        <table:table-row table:style-name="ro1" table:visibility="filter">
          <table:table-cell office:value-type="string" calcext:value-type="string">
            <text:p>JURUMIRIM</text:p>
          </table:table-cell>
          <table:table-cell office:value-type="string" calcext:value-type="string">
            <text:p>PIRAJU</text:p>
          </table:table-cell>
          <table:table-cell office:value-type="float" office:value="0.323816090606392" calcext:value-type="float">
            <text:p>0,323816</text:p>
          </table:table-cell>
          <table:table-cell office:value-type="float" office:value="0.613228433150613" calcext:value-type="float">
            <text:p>0,613228</text:p>
          </table:table-cell>
        </table:table-row>
        <table:table-row table:style-name="ro1" table:visibility="filter">
          <table:table-cell office:value-type="string" calcext:value-type="string">
            <text:p>JURUPARI</text:p>
          </table:table-cell>
          <table:table-cell office:value-type="string" calcext:value-type="string">
            <text:p>ORIXIMINA</text:p>
          </table:table-cell>
          <table:table-cell office:value-type="float" office:value="1.53743230761904" calcext:value-type="float">
            <text:p>1,537432</text:p>
          </table:table-cell>
          <table:table-cell office:value-type="float" office:value="1.85566419347775" calcext:value-type="float">
            <text:p>1,855664</text:p>
          </table:table-cell>
        </table:table-row>
        <table:table-row table:style-name="ro1" table:visibility="filter">
          <table:table-cell office:value-type="string" calcext:value-type="string">
            <text:p>JURUPARI</text:p>
          </table:table-cell>
          <table:table-cell office:value-type="string" calcext:value-type="string">
            <text:p>XINGU</text:p>
          </table:table-cell>
          <table:table-cell office:value-type="float" office:value="1.80127988928231" calcext:value-type="float">
            <text:p>1,801280</text:p>
          </table:table-cell>
          <table:table-cell office:value-type="float" office:value="1.86791466607827" calcext:value-type="float">
            <text:p>1,867915</text:p>
          </table:table-cell>
        </table:table-row>
        <table:table-row table:style-name="ro1" table:visibility="filter">
          <table:table-cell office:value-type="string" calcext:value-type="string">
            <text:p>JURUTI</text:p>
          </table:table-cell>
          <table:table-cell office:value-type="string" calcext:value-type="string">
            <text:p>ORIXIMINA</text:p>
          </table:table-cell>
          <table:table-cell office:value-type="float" office:value="0.459905259349895" calcext:value-type="float">
            <text:p>0,459905</text:p>
          </table:table-cell>
          <table:table-cell office:value-type="float" office:value="0.658612988986426" calcext:value-type="float">
            <text:p>0,658613</text:p>
          </table:table-cell>
        </table:table-row>
        <table:table-row table:style-name="ro1" table:visibility="filter">
          <table:table-cell office:value-type="string" calcext:value-type="string">
            <text:p>JURUTI</text:p>
          </table:table-cell>
          <table:table-cell office:value-type="string" calcext:value-type="string">
            <text:p>PARINTINS</text:p>
          </table:table-cell>
          <table:table-cell office:value-type="float" office:value="0.361911947966748" calcext:value-type="float">
            <text:p>0,361912</text:p>
          </table:table-cell>
          <table:table-cell office:value-type="float" office:value="0.617913633578149" calcext:value-type="float">
            <text:p>0,617914</text:p>
          </table:table-cell>
        </table:table-row>
        <table:table-row table:style-name="ro1" table:visibility="filter">
          <table:table-cell office:value-type="string" calcext:value-type="string">
            <text:p>L.D.RIO VERDE</text:p>
          </table:table-cell>
          <table:table-cell office:value-type="string" calcext:value-type="string">
            <text:p>NOVA MUTUM</text:p>
          </table:table-cell>
          <table:table-cell office:value-type="float" office:value="0.319519605791706" calcext:value-type="float">
            <text:p>0,319520</text:p>
          </table:table-cell>
          <table:table-cell office:value-type="float" office:value="0.567336392467623" calcext:value-type="float">
            <text:p>0,567336</text:p>
          </table:table-cell>
        </table:table-row>
        <table:table-row table:style-name="ro1" table:visibility="filter">
          <table:table-cell office:value-type="string" calcext:value-type="string">
            <text:p>L.GRANDE</text:p>
          </table:table-cell>
          <table:table-cell office:value-type="string" calcext:value-type="string">
            <text:p>FORQUILHINHA</text:p>
          </table:table-cell>
          <table:table-cell office:value-type="float" office:value="0.321202439784786" calcext:value-type="float">
            <text:p>0,321202</text:p>
          </table:table-cell>
          <table:table-cell office:value-type="float" office:value="0.594898805125415" calcext:value-type="float">
            <text:p>0,594899</text:p>
          </table:table-cell>
        </table:table-row>
        <table:table-row table:style-name="ro1" table:visibility="filter">
          <table:table-cell office:value-type="string" calcext:value-type="string">
            <text:p>L.VERMELHA 2</text:p>
          </table:table-cell>
          <table:table-cell office:value-type="string" calcext:value-type="string">
            <text:p>BARRA GRANDE</text:p>
          </table:table-cell>
          <table:table-cell office:value-type="float" office:value="0.344285902107429" calcext:value-type="float">
            <text:p>0,344286</text:p>
          </table:table-cell>
          <table:table-cell office:value-type="float" office:value="0.637651668905339" calcext:value-type="float">
            <text:p>0,637652</text:p>
          </table:table-cell>
        </table:table-row>
        <table:table-row table:style-name="ro1" table:visibility="filter">
          <table:table-cell office:value-type="string" calcext:value-type="string">
            <text:p>LAGOA DO CARRO</text:p>
          </table:table-cell>
          <table:table-cell office:value-type="string" calcext:value-type="string">
            <text:p>COTEMINAS</text:p>
          </table:table-cell>
          <table:table-cell office:value-type="float" office:value="0.415496974371217" calcext:value-type="float">
            <text:p>0,415497</text:p>
          </table:table-cell>
          <table:table-cell office:value-type="float" office:value="0.718680650938299" calcext:value-type="float">
            <text:p>0,718681</text:p>
          </table:table-cell>
        </table:table-row>
        <table:table-row table:style-name="ro1" table:visibility="filter">
          <table:table-cell office:value-type="string" calcext:value-type="string">
            <text:p>LAGOA DO CARRO</text:p>
          </table:table-cell>
          <table:table-cell office:value-type="string" calcext:value-type="string">
            <text:p>PAU FERRO</text:p>
          </table:table-cell>
          <table:table-cell office:value-type="float" office:value="0.486939465390477" calcext:value-type="float">
            <text:p>0,486939</text:p>
          </table:table-cell>
          <table:table-cell office:value-type="float" office:value="0.717061990452523" calcext:value-type="float">
            <text:p>0,717062</text:p>
          </table:table-cell>
        </table:table-row>
        <table:table-row table:style-name="ro1" table:visibility="filter">
          <table:table-cell office:value-type="string" calcext:value-type="string">
            <text:p>LAGOA NOVA II</text:p>
          </table:table-cell>
          <table:table-cell office:value-type="string" calcext:value-type="string">
            <text:p>PARAISO</text:p>
          </table:table-cell>
          <table:table-cell office:value-type="float" office:value="0.448892560720366" calcext:value-type="float">
            <text:p>0,448893</text:p>
          </table:table-cell>
          <table:table-cell office:value-type="float" office:value="0.791048370807438" calcext:value-type="float">
            <text:p>0,791048</text:p>
          </table:table-cell>
        </table:table-row>
        <table:table-row table:style-name="ro1" table:visibility="filter">
          <table:table-cell office:value-type="string" calcext:value-type="string">
            <text:p>LAGOS</text:p>
          </table:table-cell>
          <table:table-cell office:value-type="string" calcext:value-type="string">
            <text:p>CAMPOS 2</text:p>
          </table:table-cell>
          <table:table-cell office:value-type="float" office:value="1.48369101537802" calcext:value-type="float">
            <text:p>1,483691</text:p>
          </table:table-cell>
          <table:table-cell office:value-type="float" office:value="1.9172742263507" calcext:value-type="float">
            <text:p>1,917274</text:p>
          </table:table-cell>
        </table:table-row>
        <table:table-row table:style-name="ro1" table:visibility="filter">
          <table:table-cell office:value-type="string" calcext:value-type="string">
            <text:p>LAGOS</text:p>
          </table:table-cell>
          <table:table-cell office:value-type="string" calcext:value-type="string">
            <text:p>LEOPOLDINA2</text:p>
          </table:table-cell>
          <table:table-cell office:value-type="float" office:value="0.836488716945828" calcext:value-type="float">
            <text:p>0,836489</text:p>
          </table:table-cell>
          <table:table-cell office:value-type="float" office:value="1.19320715964269" calcext:value-type="float">
            <text:p>1,193207</text:p>
          </table:table-cell>
        </table:table-row>
        <table:table-row table:style-name="ro1" table:visibility="filter">
          <table:table-cell office:value-type="string" calcext:value-type="string">
            <text:p>LAGOS</text:p>
          </table:table-cell>
          <table:table-cell office:value-type="string" calcext:value-type="string">
            <text:p>MACAE MERCHAN</text:p>
          </table:table-cell>
          <table:table-cell office:value-type="float" office:value="0.823911262420112" calcext:value-type="float">
            <text:p>0,823911</text:p>
          </table:table-cell>
          <table:table-cell office:value-type="float" office:value="1.16878589560329" calcext:value-type="float">
            <text:p>1,168786</text:p>
          </table:table-cell>
        </table:table-row>
        <table:table-row table:style-name="ro1" table:visibility="filter">
          <table:table-cell office:value-type="string" calcext:value-type="string">
            <text:p>LAGOS</text:p>
          </table:table-cell>
          <table:table-cell office:value-type="string" calcext:value-type="string">
            <text:p>TERMINAL RIO</text:p>
          </table:table-cell>
          <table:table-cell office:value-type="float" office:value="1.84098796491851" calcext:value-type="float">
            <text:p>1,840988</text:p>
          </table:table-cell>
          <table:table-cell office:value-type="float" office:value="2.04390960817624" calcext:value-type="float">
            <text:p>2,043910</text:p>
          </table:table-cell>
        </table:table-row>
        <table:table-row table:style-name="ro1" table:visibility="filter">
          <table:table-cell office:value-type="string" calcext:value-type="string">
            <text:p>LAJEADO 2</text:p>
          </table:table-cell>
          <table:table-cell office:value-type="string" calcext:value-type="string">
            <text:p>PASSO REAL</text:p>
          </table:table-cell>
          <table:table-cell office:value-type="float" office:value="0.332079111676493" calcext:value-type="float">
            <text:p>0,332079</text:p>
          </table:table-cell>
          <table:table-cell office:value-type="float" office:value="0.609170079382205" calcext:value-type="float">
            <text:p>0,609170</text:p>
          </table:table-cell>
        </table:table-row>
        <table:table-row table:style-name="ro1" table:visibility="filter">
          <table:table-cell office:value-type="string" calcext:value-type="string">
            <text:p>LARANJAL</text:p>
          </table:table-cell>
          <table:table-cell office:value-type="string" calcext:value-type="string">
            <text:p>JURUPARI</text:p>
          </table:table-cell>
          <table:table-cell office:value-type="float" office:value="0.565342105596143" calcext:value-type="float">
            <text:p>0,565342</text:p>
          </table:table-cell>
          <table:table-cell office:value-type="float" office:value="0.808817628195574" calcext:value-type="float">
            <text:p>0,808818</text:p>
          </table:table-cell>
        </table:table-row>
        <table:table-row table:style-name="ro1" table:visibility="filter">
          <table:table-cell office:value-type="string" calcext:value-type="string">
            <text:p>LARANJAL</text:p>
          </table:table-cell>
          <table:table-cell office:value-type="string" calcext:value-type="string">
            <text:p>MACAPA</text:p>
          </table:table-cell>
          <table:table-cell office:value-type="float" office:value="0.510120993508349" calcext:value-type="float">
            <text:p>0,510121</text:p>
          </table:table-cell>
          <table:table-cell office:value-type="float" office:value="0.865064249466112" calcext:value-type="float">
            <text:p>0,865064</text:p>
          </table:table-cell>
        </table:table-row>
        <table:table-row table:style-name="ro1" table:visibility="filter">
          <table:table-cell office:value-type="string" calcext:value-type="string">
            <text:p>LECHUGA</text:p>
          </table:table-cell>
          <table:table-cell office:value-type="string" calcext:value-type="string">
            <text:p>EQUADOR</text:p>
          </table:table-cell>
          <table:table-cell office:value-type="float" office:value="1.32300639297573" calcext:value-type="float">
            <text:p>1,323006</text:p>
          </table:table-cell>
          <table:table-cell office:value-type="float" office:value="1.61161186233139" calcext:value-type="float">
            <text:p>1,611612</text:p>
          </table:table-cell>
        </table:table-row>
        <table:table-row table:style-name="ro1" table:visibility="filter">
          <table:table-cell office:value-type="string" calcext:value-type="string">
            <text:p>LECHUGA</text:p>
          </table:table-cell>
          <table:table-cell office:value-type="string" calcext:value-type="string">
            <text:p>MANAUS</text:p>
          </table:table-cell>
          <table:table-cell office:value-type="float" office:value="0.504657750923633" calcext:value-type="float">
            <text:p>0,504658</text:p>
          </table:table-cell>
          <table:table-cell office:value-type="float" office:value="0.729735755700697" calcext:value-type="float">
            <text:p>0,729736</text:p>
          </table:table-cell>
        </table:table-row>
        <table:table-row table:style-name="ro1" table:visibility="filter">
          <table:table-cell office:value-type="string" calcext:value-type="string">
            <text:p>LECHUGA</text:p>
          </table:table-cell>
          <table:table-cell office:value-type="string" calcext:value-type="string">
            <text:p>SILVES</text:p>
          </table:table-cell>
          <table:table-cell office:value-type="float" office:value="1.49614914639712" calcext:value-type="float">
            <text:p>1,496149</text:p>
          </table:table-cell>
          <table:table-cell office:value-type="float" office:value="1.82340431875727" calcext:value-type="float">
            <text:p>1,823404</text:p>
          </table:table-cell>
        </table:table-row>
        <table:table-row table:style-name="ro1" table:visibility="filter">
          <table:table-cell office:value-type="string" calcext:value-type="string">
            <text:p>LESTE</text:p>
          </table:table-cell>
          <table:table-cell office:value-type="string" calcext:value-type="string">
            <text:p>RAM REBERT F</text:p>
          </table:table-cell>
          <table:table-cell office:value-type="float" office:value="1.01873029852615" calcext:value-type="float">
            <text:p>1,018730</text:p>
          </table:table-cell>
          <table:table-cell office:value-type="float" office:value="1.65139351869191" calcext:value-type="float">
            <text:p>1,651394</text:p>
          </table:table-cell>
        </table:table-row>
        <table:table-row table:style-name="ro1" table:visibility="filter">
          <table:table-cell office:value-type="string" calcext:value-type="string">
            <text:p>LESTE</text:p>
          </table:table-cell>
          <table:table-cell office:value-type="string" calcext:value-type="string">
            <text:p>TIJUCO PRETO</text:p>
          </table:table-cell>
          <table:table-cell office:value-type="float" office:value="0.836449222732356" calcext:value-type="float">
            <text:p>0,836449</text:p>
          </table:table-cell>
          <table:table-cell office:value-type="float" office:value="1.07836972083518" calcext:value-type="float">
            <text:p>1,078370</text:p>
          </table:table-cell>
        </table:table-row>
        <table:table-row table:style-name="ro1" table:visibility="filter">
          <table:table-cell office:value-type="string" calcext:value-type="string">
            <text:p>LINHARES</text:p>
          </table:table-cell>
          <table:table-cell office:value-type="string" calcext:value-type="string">
            <text:p>MASCARENHAS</text:p>
          </table:table-cell>
          <table:table-cell office:value-type="float" office:value="0.31171807821681" calcext:value-type="float">
            <text:p>0,311718</text:p>
          </table:table-cell>
          <table:table-cell office:value-type="float" office:value="0.571819544727012" calcext:value-type="float">
            <text:p>0,571820</text:p>
          </table:table-cell>
        </table:table-row>
        <table:table-row table:style-name="ro1" table:visibility="filter">
          <table:table-cell office:value-type="string" calcext:value-type="string">
            <text:p>LINHARES</text:p>
          </table:table-cell>
          <table:table-cell office:value-type="string" calcext:value-type="string">
            <text:p>SAO MATEUS 2</text:p>
          </table:table-cell>
          <table:table-cell office:value-type="float" office:value="0.346148407962019" calcext:value-type="float">
            <text:p>0,346148</text:p>
          </table:table-cell>
          <table:table-cell office:value-type="float" office:value="0.634978972605984" calcext:value-type="float">
            <text:p>0,634979</text:p>
          </table:table-cell>
        </table:table-row>
        <table:table-row table:style-name="ro1" table:visibility="filter">
          <table:table-cell office:value-type="string" calcext:value-type="string">
            <text:p>LIVRAMENTO 3</text:p>
          </table:table-cell>
          <table:table-cell office:value-type="string" calcext:value-type="string">
            <text:p>SANTA MARIA 3</text:p>
          </table:table-cell>
          <table:table-cell office:value-type="float" office:value="0.513976322696293" calcext:value-type="float">
            <text:p>0,513976</text:p>
          </table:table-cell>
          <table:table-cell office:value-type="float" office:value="0.942844600242402" calcext:value-type="float">
            <text:p>0,942845</text:p>
          </table:table-cell>
        </table:table-row>
        <table:table-row table:style-name="ro1" table:visibility="filter">
          <table:table-cell office:value-type="string" calcext:value-type="string">
            <text:p>LONDRINA ESU</text:p>
          </table:table-cell>
          <table:table-cell office:value-type="string" calcext:value-type="string">
            <text:p>ASSIS</text:p>
          </table:table-cell>
          <table:table-cell office:value-type="float" office:value="1.49918384830732" calcext:value-type="float">
            <text:p>1,499184</text:p>
          </table:table-cell>
          <table:table-cell office:value-type="float" office:value="1.98291831369558" calcext:value-type="float">
            <text:p>1,982918</text:p>
          </table:table-cell>
        </table:table-row>
        <table:table-row table:style-name="ro1" table:visibility="filter">
          <table:table-cell office:value-type="string" calcext:value-type="string">
            <text:p>LONDRINA ESU</text:p>
          </table:table-cell>
          <table:table-cell office:value-type="string" calcext:value-type="string">
            <text:p>LONDRINA COT</text:p>
          </table:table-cell>
          <table:table-cell office:value-type="float" office:value="0.435137814190952" calcext:value-type="float">
            <text:p>0,435138</text:p>
          </table:table-cell>
          <table:table-cell office:value-type="float" office:value="0.671503263085903" calcext:value-type="float">
            <text:p>0,671503</text:p>
          </table:table-cell>
        </table:table-row>
        <table:table-row table:style-name="ro1" table:visibility="filter">
          <table:table-cell office:value-type="string" calcext:value-type="string">
            <text:p>LONDRINA ESU</text:p>
          </table:table-cell>
          <table:table-cell office:value-type="string" calcext:value-type="string">
            <text:p>LONDRINA SUL</text:p>
          </table:table-cell>
          <table:table-cell office:value-type="float" office:value="0.423554156910934" calcext:value-type="float">
            <text:p>0,423554</text:p>
          </table:table-cell>
          <table:table-cell office:value-type="float" office:value="0.653627400753728" calcext:value-type="float">
            <text:p>0,653627</text:p>
          </table:table-cell>
        </table:table-row>
        <table:table-row table:style-name="ro1" table:visibility="filter">
          <table:table-cell office:value-type="string" calcext:value-type="string">
            <text:p>LONDRINA ESU</text:p>
          </table:table-cell>
          <table:table-cell office:value-type="string" calcext:value-type="string">
            <text:p>MARINGA</text:p>
          </table:table-cell>
          <table:table-cell office:value-type="float" office:value="0.392761207790324" calcext:value-type="float">
            <text:p>0,392761</text:p>
          </table:table-cell>
          <table:table-cell office:value-type="float" office:value="0.606107821576327" calcext:value-type="float">
            <text:p>0,606108</text:p>
          </table:table-cell>
        </table:table-row>
        <table:table-row table:style-name="ro1" table:visibility="filter">
          <table:table-cell office:value-type="string" calcext:value-type="string">
            <text:p>LONDRINA ESU</text:p>
          </table:table-cell>
          <table:table-cell office:value-type="string" calcext:value-type="string">
            <text:p>SARANDI</text:p>
          </table:table-cell>
          <table:table-cell office:value-type="float" office:value="1.49751478967638" calcext:value-type="float">
            <text:p>1,497515</text:p>
          </table:table-cell>
          <table:table-cell office:value-type="float" office:value="1.94767538288081" calcext:value-type="float">
            <text:p>1,947675</text:p>
          </table:table-cell>
        </table:table-row>
        <table:table-row table:style-name="ro1" table:visibility="filter">
          <table:table-cell office:value-type="string" calcext:value-type="string">
            <text:p>LORENA</text:p>
          </table:table-cell>
          <table:table-cell office:value-type="string" calcext:value-type="string">
            <text:p>SANTA CABECA</text:p>
          </table:table-cell>
          <table:table-cell office:value-type="float" office:value="0.615431036385187" calcext:value-type="float">
            <text:p>0,615431</text:p>
          </table:table-cell>
          <table:table-cell office:value-type="float" office:value="0.982242055358342" calcext:value-type="float">
            <text:p>0,982242</text:p>
          </table:table-cell>
        </table:table-row>
        <table:table-row table:style-name="ro1" table:visibility="filter">
          <table:table-cell office:value-type="string" calcext:value-type="string">
            <text:p>LORENA</text:p>
          </table:table-cell>
          <table:table-cell office:value-type="string" calcext:value-type="string">
            <text:p>TIJUCO PRETO</text:p>
          </table:table-cell>
          <table:table-cell office:value-type="float" office:value="1.672251802763" calcext:value-type="float">
            <text:p>1,672252</text:p>
          </table:table-cell>
          <table:table-cell office:value-type="float" office:value="1.96386351199149" calcext:value-type="float">
            <text:p>1,963864</text:p>
          </table:table-cell>
        </table:table-row>
        <table:table-row table:style-name="ro1" table:visibility="filter">
          <table:table-cell office:value-type="string" calcext:value-type="string">
            <text:p>LUZIANIA</text:p>
          </table:table-cell>
          <table:table-cell office:value-type="string" calcext:value-type="string">
            <text:p>SERRA MESA 2</text:p>
          </table:table-cell>
          <table:table-cell office:value-type="float" office:value="1.40555890799991" calcext:value-type="float">
            <text:p>1,405559</text:p>
          </table:table-cell>
          <table:table-cell office:value-type="float" office:value="1.77445154128032" calcext:value-type="float">
            <text:p>1,774452</text:p>
          </table:table-cell>
        </table:table-row>
        <table:table-row table:style-name="ro1" table:visibility="filter">
          <table:table-cell office:value-type="string" calcext:value-type="string">
            <text:p>MACAMBARA</text:p>
          </table:table-cell>
          <table:table-cell office:value-type="string" calcext:value-type="string">
            <text:p>U.URUGUAIANA</text:p>
          </table:table-cell>
          <table:table-cell office:value-type="float" office:value="0.402594495983461" calcext:value-type="float">
            <text:p>0,402594</text:p>
          </table:table-cell>
          <table:table-cell office:value-type="float" office:value="0.738524383057257" calcext:value-type="float">
            <text:p>0,738524</text:p>
          </table:table-cell>
        </table:table-row>
        <table:table-row table:style-name="ro1" table:visibility="filter">
          <table:table-cell office:value-type="string" calcext:value-type="string">
            <text:p>MACAMBARA 3</text:p>
          </table:table-cell>
          <table:table-cell office:value-type="string" calcext:value-type="string">
            <text:p>SANTO ANGELO</text:p>
          </table:table-cell>
          <table:table-cell office:value-type="float" office:value="0.561541578055073" calcext:value-type="float">
            <text:p>0,561542</text:p>
          </table:table-cell>
          <table:table-cell office:value-type="float" office:value="0.868165670165861" calcext:value-type="float">
            <text:p>0,868166</text:p>
          </table:table-cell>
        </table:table-row>
        <table:table-row table:style-name="ro1" table:visibility="filter">
          <table:table-cell office:value-type="string" calcext:value-type="string">
            <text:p>MACAPA</text:p>
          </table:table-cell>
          <table:table-cell office:value-type="string" calcext:value-type="string">
            <text:p>MACAPA III</text:p>
          </table:table-cell>
          <table:table-cell office:value-type="float" office:value="0.457704523175032" calcext:value-type="float">
            <text:p>0,457705</text:p>
          </table:table-cell>
          <table:table-cell office:value-type="float" office:value="0.77617628926533" calcext:value-type="float">
            <text:p>0,776176</text:p>
          </table:table-cell>
        </table:table-row>
        <table:table-row table:style-name="ro1" table:visibility="filter">
          <table:table-cell office:value-type="string" calcext:value-type="string">
            <text:p>MARANGATU</text:p>
          </table:table-cell>
          <table:table-cell office:value-type="string" calcext:value-type="string">
            <text:p>PIRIPIRI</text:p>
          </table:table-cell>
          <table:table-cell office:value-type="float" office:value="0.474166712627071" calcext:value-type="float">
            <text:p>0,474167</text:p>
          </table:table-cell>
          <table:table-cell office:value-type="float" office:value="0.805659455734677" calcext:value-type="float">
            <text:p>0,805659</text:p>
          </table:table-cell>
        </table:table-row>
        <table:table-row table:style-name="ro1" table:visibility="filter">
          <table:table-cell office:value-type="string" calcext:value-type="string">
            <text:p>MARIMBONDO</text:p>
          </table:table-cell>
          <table:table-cell office:value-type="string" calcext:value-type="string">
            <text:p>MORRO AGUDO</text:p>
          </table:table-cell>
          <table:table-cell office:value-type="float" office:value="1.20002633292873" calcext:value-type="float">
            <text:p>1,200026</text:p>
          </table:table-cell>
          <table:table-cell office:value-type="float" office:value="1.5908834102775" calcext:value-type="float">
            <text:p>1,590883</text:p>
          </table:table-cell>
        </table:table-row>
        <table:table-row table:style-name="ro1" table:visibility="filter">
          <table:table-cell office:value-type="string" calcext:value-type="string">
            <text:p>MARITUBA</text:p>
          </table:table-cell>
          <table:table-cell office:value-type="string" calcext:value-type="string">
            <text:p>TUCURUI</text:p>
          </table:table-cell>
          <table:table-cell office:value-type="float" office:value="1.48937898547399" calcext:value-type="float">
            <text:p>1,489379</text:p>
          </table:table-cell>
          <table:table-cell office:value-type="float" office:value="1.79766435254797" calcext:value-type="float">
            <text:p>1,797664</text:p>
          </table:table-cell>
        </table:table-row>
        <table:table-row table:style-name="ro1" table:visibility="filter">
          <table:table-cell office:value-type="string" calcext:value-type="string">
            <text:p>MARITUBA</text:p>
          </table:table-cell>
          <table:table-cell office:value-type="string" calcext:value-type="string">
            <text:p>UTINGA</text:p>
          </table:table-cell>
          <table:table-cell office:value-type="float" office:value="0.543831039067232" calcext:value-type="float">
            <text:p>0,543831</text:p>
          </table:table-cell>
          <table:table-cell office:value-type="float" office:value="0.778799935121345" calcext:value-type="float">
            <text:p>0,778800</text:p>
          </table:table-cell>
        </table:table-row>
        <table:table-row table:style-name="ro1" table:visibility="filter">
          <table:table-cell office:value-type="string" calcext:value-type="string">
            <text:p>MARITUBA</text:p>
          </table:table-cell>
          <table:table-cell office:value-type="string" calcext:value-type="string">
            <text:p>VILA DO CONDE</text:p>
          </table:table-cell>
          <table:table-cell office:value-type="float" office:value="1.61986732284185" calcext:value-type="float">
            <text:p>1,619867</text:p>
          </table:table-cell>
          <table:table-cell office:value-type="float" office:value="1.95516236668491" calcext:value-type="float">
            <text:p>1,955162</text:p>
          </table:table-cell>
        </table:table-row>
        <table:table-row table:style-name="ro1" table:visibility="filter">
          <table:table-cell office:value-type="string" calcext:value-type="string">
            <text:p>MARMELEIRO 2</text:p>
          </table:table-cell>
          <table:table-cell office:value-type="string" calcext:value-type="string">
            <text:p>S V PALMAR 2</text:p>
          </table:table-cell>
          <table:table-cell office:value-type="float" office:value="1.63624513159642" calcext:value-type="float">
            <text:p>1,636245</text:p>
          </table:table-cell>
          <table:table-cell office:value-type="float" office:value="2.13202720927553" calcext:value-type="float">
            <text:p>2,132027</text:p>
          </table:table-cell>
        </table:table-row>
        <table:table-row table:style-name="ro1" table:visibility="filter">
          <table:table-cell office:value-type="string" calcext:value-type="string">
            <text:p>MASCARENHAS</text:p>
          </table:table-cell>
          <table:table-cell office:value-type="string" calcext:value-type="string">
            <text:p>AIMORES-SE</text:p>
          </table:table-cell>
          <table:table-cell office:value-type="float" office:value="0.311517076414314" calcext:value-type="float">
            <text:p>0,311517</text:p>
          </table:table-cell>
          <table:table-cell office:value-type="float" office:value="0.572239399078609" calcext:value-type="float">
            <text:p>0,572239</text:p>
          </table:table-cell>
        </table:table-row>
        <table:table-row table:style-name="ro1" table:visibility="filter">
          <table:table-cell office:value-type="string" calcext:value-type="string">
            <text:p>MASCARENHAS</text:p>
          </table:table-cell>
          <table:table-cell office:value-type="string" calcext:value-type="string">
            <text:p>VERONA</text:p>
          </table:table-cell>
          <table:table-cell office:value-type="float" office:value="0.314736214774475" calcext:value-type="float">
            <text:p>0,314736</text:p>
          </table:table-cell>
          <table:table-cell office:value-type="float" office:value="0.577356052209031" calcext:value-type="float">
            <text:p>0,577356</text:p>
          </table:table-cell>
        </table:table-row>
        <table:table-row table:style-name="ro1" table:visibility="filter">
          <table:table-cell office:value-type="string" calcext:value-type="string">
            <text:p>MATA NORTE</text:p>
          </table:table-cell>
          <table:table-cell office:value-type="string" calcext:value-type="string">
            <text:p>PAU FERRO</text:p>
          </table:table-cell>
          <table:table-cell office:value-type="float" office:value="0.337863938397963" calcext:value-type="float">
            <text:p>0,337864</text:p>
          </table:table-cell>
          <table:table-cell office:value-type="float" office:value="0.497534920435123" calcext:value-type="float">
            <text:p>0,497535</text:p>
          </table:table-cell>
        </table:table-row>
        <table:table-row table:style-name="ro1" table:visibility="filter">
          <table:table-cell office:value-type="string" calcext:value-type="string">
            <text:p>MEDEIROS NETOII</text:p>
          </table:table-cell>
          <table:table-cell office:value-type="string" calcext:value-type="string">
            <text:p>JOAO NEIVA 2</text:p>
          </table:table-cell>
          <table:table-cell office:value-type="float" office:value="1.49145197786524" calcext:value-type="float">
            <text:p>1,491452</text:p>
          </table:table-cell>
          <table:table-cell office:value-type="float" office:value="1.87130272411514" calcext:value-type="float">
            <text:p>1,871303</text:p>
          </table:table-cell>
        </table:table-row>
        <table:table-row table:style-name="ro1" table:visibility="filter">
          <table:table-cell office:value-type="string" calcext:value-type="string">
            <text:p>MEDEIROS NETOII</text:p>
          </table:table-cell>
          <table:table-cell office:value-type="string" calcext:value-type="string">
            <text:p>POCOES III</text:p>
          </table:table-cell>
          <table:table-cell office:value-type="float" office:value="1.4958146533243" calcext:value-type="float">
            <text:p>1,495815</text:p>
          </table:table-cell>
          <table:table-cell office:value-type="float" office:value="1.80718643736273" calcext:value-type="float">
            <text:p>1,807186</text:p>
          </table:table-cell>
        </table:table-row>
        <table:table-row table:style-name="ro1" table:visibility="filter">
          <table:table-cell office:value-type="string" calcext:value-type="string">
            <text:p>MEDEIROS NETOII</text:p>
          </table:table-cell>
          <table:table-cell office:value-type="string" calcext:value-type="string">
            <text:p>TEIX FREITAS II</text:p>
          </table:table-cell>
          <table:table-cell office:value-type="float" office:value="0.425932725262528" calcext:value-type="float">
            <text:p>0,425933</text:p>
          </table:table-cell>
          <table:table-cell office:value-type="float" office:value="0.610555178355367" calcext:value-type="float">
            <text:p>0,610555</text:p>
          </table:table-cell>
        </table:table-row>
        <table:table-row table:style-name="ro1" table:visibility="filter">
          <table:table-cell office:value-type="string" calcext:value-type="string">
            <text:p>MESQUITA</text:p>
          </table:table-cell>
          <table:table-cell office:value-type="string" calcext:value-type="string">
            <text:p>JOAO NEIVA 2</text:p>
          </table:table-cell>
          <table:table-cell office:value-type="float" office:value="1.53264098962992" calcext:value-type="float">
            <text:p>1,532641</text:p>
          </table:table-cell>
          <table:table-cell office:value-type="float" office:value="1.99978358532625" calcext:value-type="float">
            <text:p>1,999784</text:p>
          </table:table-cell>
        </table:table-row>
        <table:table-row table:style-name="ro1" table:visibility="filter">
          <table:table-cell office:value-type="string" calcext:value-type="string">
            <text:p>MESQUITA</text:p>
          </table:table-cell>
          <table:table-cell office:value-type="string" calcext:value-type="string">
            <text:p>PORTO ESTRELA</text:p>
          </table:table-cell>
          <table:table-cell office:value-type="float" office:value="0.380653501936926" calcext:value-type="float">
            <text:p>0,380654</text:p>
          </table:table-cell>
          <table:table-cell office:value-type="float" office:value="0.590129873079628" calcext:value-type="float">
            <text:p>0,590130</text:p>
          </table:table-cell>
        </table:table-row>
        <table:table-row table:style-name="ro1" table:visibility="filter">
          <table:table-cell office:value-type="string" calcext:value-type="string">
            <text:p>MESQUITA</text:p>
          </table:table-cell>
          <table:table-cell office:value-type="string" calcext:value-type="string">
            <text:p>TIMOTEO 2</text:p>
          </table:table-cell>
          <table:table-cell office:value-type="float" office:value="0.404167488590764" calcext:value-type="float">
            <text:p>0,404167</text:p>
          </table:table-cell>
          <table:table-cell office:value-type="float" office:value="0.626583776403826" calcext:value-type="float">
            <text:p>0,626584</text:p>
          </table:table-cell>
        </table:table-row>
        <table:table-row table:style-name="ro1" table:visibility="filter">
          <table:table-cell office:value-type="string" calcext:value-type="string">
            <text:p>MESSIAS</text:p>
          </table:table-cell>
          <table:table-cell office:value-type="string" calcext:value-type="string">
            <text:p>MACEIO</text:p>
          </table:table-cell>
          <table:table-cell office:value-type="float" office:value="0.441153873346324" calcext:value-type="float">
            <text:p>0,441154</text:p>
          </table:table-cell>
          <table:table-cell office:value-type="float" office:value="0.628078393325791" calcext:value-type="float">
            <text:p>0,628078</text:p>
          </table:table-cell>
        </table:table-row>
        <table:table-row table:style-name="ro1" table:visibility="filter">
          <table:table-cell office:value-type="string" calcext:value-type="string">
            <text:p>MESSIAS</text:p>
          </table:table-cell>
          <table:table-cell office:value-type="string" calcext:value-type="string">
            <text:p>MACEIO II</text:p>
          </table:table-cell>
          <table:table-cell office:value-type="float" office:value="0.553714721191167" calcext:value-type="float">
            <text:p>0,553715</text:p>
          </table:table-cell>
          <table:table-cell office:value-type="float" office:value="0.788333217633494" calcext:value-type="float">
            <text:p>0,788333</text:p>
          </table:table-cell>
        </table:table-row>
        <table:table-row table:style-name="ro1" table:visibility="filter">
          <table:table-cell office:value-type="string" calcext:value-type="string">
            <text:p>MESSIAS</text:p>
          </table:table-cell>
          <table:table-cell office:value-type="string" calcext:value-type="string">
            <text:p>RIO LARGO II</text:p>
          </table:table-cell>
          <table:table-cell office:value-type="float" office:value="0.532169530486651" calcext:value-type="float">
            <text:p>0,532170</text:p>
          </table:table-cell>
          <table:table-cell office:value-type="float" office:value="0.757658957292212" calcext:value-type="float">
            <text:p>0,757659</text:p>
          </table:table-cell>
        </table:table-row>
        <table:table-row table:style-name="ro1" table:visibility="filter">
          <table:table-cell office:value-type="string" calcext:value-type="string">
            <text:p>MESSIAS</text:p>
          </table:table-cell>
          <table:table-cell office:value-type="string" calcext:value-type="string">
            <text:p>SUAPE II</text:p>
          </table:table-cell>
          <table:table-cell office:value-type="float" office:value="1.23784755495087" calcext:value-type="float">
            <text:p>1,237848</text:p>
          </table:table-cell>
          <table:table-cell office:value-type="float" office:value="1.51063291286466" calcext:value-type="float">
            <text:p>1,510633</text:p>
          </table:table-cell>
        </table:table-row>
        <table:table-row table:style-name="ro1" table:visibility="filter">
          <table:table-cell office:value-type="string" calcext:value-type="string">
            <text:p>MIGUEL REALE</text:p>
          </table:table-cell>
          <table:table-cell office:value-type="string" calcext:value-type="string">
            <text:p>S.CAETANO SUL</text:p>
          </table:table-cell>
          <table:table-cell office:value-type="float" office:value="0.459960928069891" calcext:value-type="float">
            <text:p>0,459961</text:p>
          </table:table-cell>
          <table:table-cell office:value-type="float" office:value="0.745610979240582" calcext:value-type="float">
            <text:p>0,745611</text:p>
          </table:table-cell>
        </table:table-row>
        <table:table-row table:style-name="ro1" table:visibility="filter">
          <table:table-cell office:value-type="string" calcext:value-type="string">
            <text:p>MILAGRES</text:p>
          </table:table-cell>
          <table:table-cell office:value-type="string" calcext:value-type="string">
            <text:p>COREMAS</text:p>
          </table:table-cell>
          <table:table-cell office:value-type="float" office:value="0.4070586318178" calcext:value-type="float">
            <text:p>0,407059</text:p>
          </table:table-cell>
          <table:table-cell office:value-type="float" office:value="0.597648858123532" calcext:value-type="float">
            <text:p>0,597649</text:p>
          </table:table-cell>
        </table:table-row>
        <table:table-row table:style-name="ro1" table:visibility="filter">
          <table:table-cell office:value-type="string" calcext:value-type="string">
            <text:p>MILAGRES</text:p>
          </table:table-cell>
          <table:table-cell office:value-type="string" calcext:value-type="string">
            <text:p>US. L.GONZAGA</text:p>
          </table:table-cell>
          <table:table-cell office:value-type="float" office:value="1.30606309619539" calcext:value-type="float">
            <text:p>1,306063</text:p>
          </table:table-cell>
          <table:table-cell office:value-type="float" office:value="1.63255162929257" calcext:value-type="float">
            <text:p>1,632552</text:p>
          </table:table-cell>
        </table:table-row>
        <table:table-row table:style-name="ro1" table:visibility="filter">
          <table:table-cell office:value-type="string" calcext:value-type="string">
            <text:p>MILAGRES II</text:p>
          </table:table-cell>
          <table:table-cell office:value-type="string" calcext:value-type="string">
            <text:p>QUEIMADA NOVA 2</text:p>
          </table:table-cell>
          <table:table-cell office:value-type="float" office:value="1.496676179433" calcext:value-type="float">
            <text:p>1,496676</text:p>
          </table:table-cell>
          <table:table-cell office:value-type="float" office:value="1.84490388862629" calcext:value-type="float">
            <text:p>1,844904</text:p>
          </table:table-cell>
        </table:table-row>
        <table:table-row table:style-name="ro1" table:visibility="filter">
          <table:table-cell office:value-type="string" calcext:value-type="string">
            <text:p>MILAGRES II</text:p>
          </table:table-cell>
          <table:table-cell office:value-type="string" calcext:value-type="string">
            <text:p>SANTA LUZIA II</text:p>
          </table:table-cell>
          <table:table-cell office:value-type="float" office:value="1.49644612046225" calcext:value-type="float">
            <text:p>1,496446</text:p>
          </table:table-cell>
          <table:table-cell office:value-type="float" office:value="1.85178275987338" calcext:value-type="float">
            <text:p>1,851783</text:p>
          </table:table-cell>
        </table:table-row>
        <table:table-row table:style-name="ro1" table:visibility="filter">
          <table:table-cell office:value-type="string" calcext:value-type="string">
            <text:p>MIRAMAR</text:p>
          </table:table-cell>
          <table:table-cell office:value-type="string" calcext:value-type="string">
            <text:p>UTINGA</text:p>
          </table:table-cell>
          <table:table-cell office:value-type="float" office:value="0.446787495201372" calcext:value-type="float">
            <text:p>0,446787</text:p>
          </table:table-cell>
          <table:table-cell office:value-type="float" office:value="0.75913926605831" calcext:value-type="float">
            <text:p>0,759139</text:p>
          </table:table-cell>
        </table:table-row>
        <table:table-row table:style-name="ro1" table:visibility="filter">
          <table:table-cell office:value-type="string" calcext:value-type="string">
            <text:p>MIRANDA II</text:p>
          </table:table-cell>
          <table:table-cell office:value-type="string" calcext:value-type="string">
            <text:p>SAO LUIS II</text:p>
          </table:table-cell>
          <table:table-cell office:value-type="float" office:value="1.45930965608792" calcext:value-type="float">
            <text:p>1,459310</text:p>
          </table:table-cell>
          <table:table-cell office:value-type="float" office:value="1.73745941797188" calcext:value-type="float">
            <text:p>1,737459</text:p>
          </table:table-cell>
        </table:table-row>
        <table:table-row table:style-name="ro1" table:visibility="filter">
          <table:table-cell office:value-type="string" calcext:value-type="string">
            <text:p>MIRANDA II</text:p>
          </table:table-cell>
          <table:table-cell office:value-type="string" calcext:value-type="string">
            <text:p>STA LUZIA III</text:p>
          </table:table-cell>
          <table:table-cell office:value-type="float" office:value="1.93396721372565" calcext:value-type="float">
            <text:p>1,933967</text:p>
          </table:table-cell>
          <table:table-cell office:value-type="float" office:value="2.3025884434592" calcext:value-type="float">
            <text:p>2,302588</text:p>
          </table:table-cell>
        </table:table-row>
        <table:table-row table:style-name="ro1" table:visibility="filter">
          <table:table-cell office:value-type="string" calcext:value-type="string">
            <text:p>MIRUEIRA II</text:p>
          </table:table-cell>
          <table:table-cell office:value-type="string" calcext:value-type="string">
            <text:p>PAU FERRO</text:p>
          </table:table-cell>
          <table:table-cell office:value-type="float" office:value="0.497259268644952" calcext:value-type="float">
            <text:p>0,497259</text:p>
          </table:table-cell>
          <table:table-cell office:value-type="float" office:value="0.732258825354369" calcext:value-type="float">
            <text:p>0,732259</text:p>
          </table:table-cell>
        </table:table-row>
        <table:table-row table:style-name="ro1" table:visibility="filter">
          <table:table-cell office:value-type="string" calcext:value-type="string">
            <text:p>MISSOES</text:p>
          </table:table-cell>
          <table:table-cell office:value-type="string" calcext:value-type="string">
            <text:p>SANTO ANGELO</text:p>
          </table:table-cell>
          <table:table-cell office:value-type="float" office:value="0.420389589420788" calcext:value-type="float">
            <text:p>0,420390</text:p>
          </table:table-cell>
          <table:table-cell office:value-type="float" office:value="0.649939067547472" calcext:value-type="float">
            <text:p>0,649939</text:p>
          </table:table-cell>
        </table:table-row>
        <table:table-row table:style-name="ro1" table:visibility="filter">
          <table:table-cell office:value-type="string" calcext:value-type="string">
            <text:p>MISSOES</text:p>
          </table:table-cell>
          <table:table-cell office:value-type="string" calcext:value-type="string">
            <text:p>SAO BORJA2</text:p>
          </table:table-cell>
          <table:table-cell office:value-type="float" office:value="0.36766472080612" calcext:value-type="float">
            <text:p>0,367665</text:p>
          </table:table-cell>
          <table:table-cell office:value-type="float" office:value="0.674448766225591" calcext:value-type="float">
            <text:p>0,674449</text:p>
          </table:table-cell>
        </table:table-row>
        <table:table-row table:style-name="ro1" table:visibility="filter">
          <table:table-cell office:value-type="string" calcext:value-type="string">
            <text:p>MOGI</text:p>
          </table:table-cell>
          <table:table-cell office:value-type="string" calcext:value-type="string">
            <text:p>MOGI CRUZES</text:p>
          </table:table-cell>
          <table:table-cell office:value-type="float" office:value="0.482310239011346" calcext:value-type="float">
            <text:p>0,482310</text:p>
          </table:table-cell>
          <table:table-cell office:value-type="float" office:value="0.845053270975928" calcext:value-type="float">
            <text:p>0,845053</text:p>
          </table:table-cell>
        </table:table-row>
        <table:table-row table:style-name="ro1" table:visibility="filter">
          <table:table-cell office:value-type="string" calcext:value-type="string">
            <text:p>MONTE ALEGRE2</text:p>
          </table:table-cell>
          <table:table-cell office:value-type="string" calcext:value-type="string">
            <text:p>P. COLOMBIA</text:p>
          </table:table-cell>
          <table:table-cell office:value-type="float" office:value="0.651942838728788" calcext:value-type="float">
            <text:p>0,651943</text:p>
          </table:table-cell>
          <table:table-cell office:value-type="float" office:value="1.02655040436729" calcext:value-type="float">
            <text:p>1,026550</text:p>
          </table:table-cell>
        </table:table-row>
        <table:table-row table:style-name="ro1" table:visibility="filter">
          <table:table-cell office:value-type="string" calcext:value-type="string">
            <text:p>MONTESCLAROS2</text:p>
          </table:table-cell>
          <table:table-cell office:value-type="string" calcext:value-type="string">
            <text:p>PIRAPORA 2</text:p>
          </table:table-cell>
          <table:table-cell office:value-type="float" office:value="0.855529508750124" calcext:value-type="float">
            <text:p>0,855530</text:p>
          </table:table-cell>
          <table:table-cell office:value-type="float" office:value="1.22713049431957" calcext:value-type="float">
            <text:p>1,227130</text:p>
          </table:table-cell>
        </table:table-row>
        <table:table-row table:style-name="ro1" table:visibility="filter">
          <table:table-cell office:value-type="string" calcext:value-type="string">
            <text:p>MORRO CHAPEU II</text:p>
          </table:table-cell>
          <table:table-cell office:value-type="string" calcext:value-type="string">
            <text:p>POCOES III</text:p>
          </table:table-cell>
          <table:table-cell office:value-type="float" office:value="1.70151595163274" calcext:value-type="float">
            <text:p>1,701516</text:p>
          </table:table-cell>
          <table:table-cell office:value-type="float" office:value="2.0557069312787" calcext:value-type="float">
            <text:p>2,055707</text:p>
          </table:table-cell>
        </table:table-row>
        <table:table-row table:style-name="ro1" table:visibility="filter">
          <table:table-cell office:value-type="string" calcext:value-type="string">
            <text:p>MUTUM</text:p>
          </table:table-cell>
          <table:table-cell office:value-type="string" calcext:value-type="string">
            <text:p>CAMPOS 2</text:p>
          </table:table-cell>
          <table:table-cell office:value-type="float" office:value="1.53434040729281" calcext:value-type="float">
            <text:p>1,534340</text:p>
          </table:table-cell>
          <table:table-cell office:value-type="float" office:value="1.99371226828324" calcext:value-type="float">
            <text:p>1,993712</text:p>
          </table:table-cell>
        </table:table-row>
        <table:table-row table:style-name="ro1" table:visibility="filter">
          <table:table-cell office:value-type="string" calcext:value-type="string">
            <text:p>N.P.PRIMAVERA</text:p>
          </table:table-cell>
          <table:table-cell office:value-type="string" calcext:value-type="string">
            <text:p>P. PRIMAVERA</text:p>
          </table:table-cell>
          <table:table-cell office:value-type="float" office:value="1.05249284077452" calcext:value-type="float">
            <text:p>1,052493</text:p>
          </table:table-cell>
          <table:table-cell office:value-type="float" office:value="1.51747557836089" calcext:value-type="float">
            <text:p>1,517476</text:p>
          </table:table-cell>
        </table:table-row>
        <table:table-row table:style-name="ro1" table:visibility="filter">
          <table:table-cell office:value-type="string" calcext:value-type="string">
            <text:p>N.P.PRIMAVERA</text:p>
          </table:table-cell>
          <table:table-cell office:value-type="string" calcext:value-type="string">
            <text:p>RIO BRILHANTE</text:p>
          </table:table-cell>
          <table:table-cell office:value-type="float" office:value="0.638434809665894" calcext:value-type="float">
            <text:p>0,638435</text:p>
          </table:table-cell>
          <table:table-cell office:value-type="float" office:value="1.02438803369603" calcext:value-type="float">
            <text:p>1,024388</text:p>
          </table:table-cell>
        </table:table-row>
        <table:table-row table:style-name="ro1" table:visibility="filter">
          <table:table-cell office:value-type="string" calcext:value-type="string">
            <text:p>N.P.PRIMAVERA</text:p>
          </table:table-cell>
          <table:table-cell office:value-type="string" calcext:value-type="string">
            <text:p>ROSANA</text:p>
          </table:table-cell>
          <table:table-cell office:value-type="float" office:value="0.476211068563919" calcext:value-type="float">
            <text:p>0,476211</text:p>
          </table:table-cell>
          <table:table-cell office:value-type="float" office:value="0.786887587113052" calcext:value-type="float">
            <text:p>0,786888</text:p>
          </table:table-cell>
        </table:table-row>
        <table:table-row table:style-name="ro1" table:visibility="filter">
          <table:table-cell office:value-type="string" calcext:value-type="string">
            <text:p>N.PETROPOLIS2</text:p>
          </table:table-cell>
          <table:table-cell office:value-type="string" calcext:value-type="string">
            <text:p>TAQUARA</text:p>
          </table:table-cell>
          <table:table-cell office:value-type="float" office:value="0.340025766763273" calcext:value-type="float">
            <text:p>0,340026</text:p>
          </table:table-cell>
          <table:table-cell office:value-type="float" office:value="0.623747522948584" calcext:value-type="float">
            <text:p>0,623748</text:p>
          </table:table-cell>
        </table:table-row>
        <table:table-row table:style-name="ro1" table:visibility="filter">
          <table:table-cell office:value-type="string" calcext:value-type="string">
            <text:p>NATAL III</text:p>
          </table:table-cell>
          <table:table-cell office:value-type="string" calcext:value-type="string">
            <text:p>NATAL II</text:p>
          </table:table-cell>
          <table:table-cell office:value-type="float" office:value="0.402856413048683" calcext:value-type="float">
            <text:p>0,402856</text:p>
          </table:table-cell>
          <table:table-cell office:value-type="float" office:value="0.709922456055152" calcext:value-type="float">
            <text:p>0,709922</text:p>
          </table:table-cell>
        </table:table-row>
        <table:table-row table:style-name="ro1" table:visibility="filter">
          <table:table-cell office:value-type="string" calcext:value-type="string">
            <text:p>NEVES 1</text:p>
          </table:table-cell>
          <table:table-cell office:value-type="string" calcext:value-type="string">
            <text:p>B.DESPACHO 3</text:p>
          </table:table-cell>
          <table:table-cell office:value-type="float" office:value="1.33197599530857" calcext:value-type="float">
            <text:p>1,331976</text:p>
          </table:table-cell>
          <table:table-cell office:value-type="float" office:value="1.74035220740411" calcext:value-type="float">
            <text:p>1,740352</text:p>
          </table:table-cell>
        </table:table-row>
        <table:table-row table:style-name="ro1" table:visibility="filter">
          <table:table-cell office:value-type="string" calcext:value-type="string">
            <text:p>NILO PECANHA</text:p>
          </table:table-cell>
          <table:table-cell office:value-type="string" calcext:value-type="string">
            <text:p>SANTA CABECA</text:p>
          </table:table-cell>
          <table:table-cell office:value-type="float" office:value="0.340738045031679" calcext:value-type="float">
            <text:p>0,340738</text:p>
          </table:table-cell>
          <table:table-cell office:value-type="float" office:value="0.632451400898824" calcext:value-type="float">
            <text:p>0,632451</text:p>
          </table:table-cell>
        </table:table-row>
        <table:table-row table:style-name="ro1" table:visibility="filter">
          <table:table-cell office:value-type="string" calcext:value-type="string">
            <text:p>NOBRES</text:p>
          </table:table-cell>
          <table:table-cell office:value-type="string" calcext:value-type="string">
            <text:p>SE CUIABA</text:p>
          </table:table-cell>
          <table:table-cell office:value-type="float" office:value="0.581255658054967" calcext:value-type="float">
            <text:p>0,581256</text:p>
          </table:table-cell>
          <table:table-cell office:value-type="float" office:value="0.869845253718349" calcext:value-type="float">
            <text:p>0,869845</text:p>
          </table:table-cell>
        </table:table-row>
        <table:table-row table:style-name="ro1" table:visibility="filter">
          <table:table-cell office:value-type="string" calcext:value-type="string">
            <text:p>NOVA IGUACU</text:p>
          </table:table-cell>
          <table:table-cell office:value-type="string" calcext:value-type="string">
            <text:p>TERMINAL RIO</text:p>
          </table:table-cell>
          <table:table-cell office:value-type="float" office:value="2.03585952672134" calcext:value-type="float">
            <text:p>2,035860</text:p>
          </table:table-cell>
          <table:table-cell office:value-type="float" office:value="2.26026075501643" calcext:value-type="float">
            <text:p>2,260261</text:p>
          </table:table-cell>
        </table:table-row>
        <table:table-row table:style-name="ro1" table:visibility="filter">
          <table:table-cell office:value-type="string" calcext:value-type="string">
            <text:p>NOVA PONTE</text:p>
          </table:table-cell>
          <table:table-cell office:value-type="string" calcext:value-type="string">
            <text:p>ARAXA 3</text:p>
          </table:table-cell>
          <table:table-cell office:value-type="float" office:value="0.763513854188706" calcext:value-type="float">
            <text:p>0,763514</text:p>
          </table:table-cell>
          <table:table-cell office:value-type="float" office:value="1.09514765268498" calcext:value-type="float">
            <text:p>1,095148</text:p>
          </table:table-cell>
        </table:table-row>
        <table:table-row table:style-name="ro1" table:visibility="filter">
          <table:table-cell office:value-type="string" calcext:value-type="string">
            <text:p>NOVA PONTE</text:p>
          </table:table-cell>
          <table:table-cell office:value-type="string" calcext:value-type="string">
            <text:p>UBERLANDIA 10</text:p>
          </table:table-cell>
          <table:table-cell office:value-type="float" office:value="0.743627161352508" calcext:value-type="float">
            <text:p>0,743627</text:p>
          </table:table-cell>
          <table:table-cell office:value-type="float" office:value="1.06662313428921" calcext:value-type="float">
            <text:p>1,066623</text:p>
          </table:table-cell>
        </table:table-row>
        <table:table-row table:style-name="ro1" table:visibility="filter">
          <table:table-cell office:value-type="string" calcext:value-type="string">
            <text:p>NOVA PONTE 3</text:p>
          </table:table-cell>
          <table:table-cell office:value-type="string" calcext:value-type="string">
            <text:p>PARACATU 4</text:p>
          </table:table-cell>
          <table:table-cell office:value-type="float" office:value="1.51873106540138" calcext:value-type="float">
            <text:p>1,518731</text:p>
          </table:table-cell>
          <table:table-cell office:value-type="float" office:value="1.98436531246358" calcext:value-type="float">
            <text:p>1,984365</text:p>
          </table:table-cell>
        </table:table-row>
        <table:table-row table:style-name="ro1" table:visibility="filter">
          <table:table-cell office:value-type="string" calcext:value-type="string">
            <text:p>NOVA PRATA 2</text:p>
          </table:table-cell>
          <table:table-cell office:value-type="string" calcext:value-type="string">
            <text:p>VILA MARIA</text:p>
          </table:table-cell>
          <table:table-cell office:value-type="float" office:value="0.288817040104922" calcext:value-type="float">
            <text:p>0,288817</text:p>
          </table:table-cell>
          <table:table-cell office:value-type="float" office:value="0.529809593742367" calcext:value-type="float">
            <text:p>0,529810</text:p>
          </table:table-cell>
        </table:table-row>
        <table:table-row table:style-name="ro1" table:visibility="filter">
          <table:table-cell office:value-type="string" calcext:value-type="string">
            <text:p>NOVA STA RITA</text:p>
          </table:table-cell>
          <table:table-cell office:value-type="string" calcext:value-type="string">
            <text:p>C.NOVOS</text:p>
          </table:table-cell>
          <table:table-cell office:value-type="float" office:value="1.39692299473334" calcext:value-type="float">
            <text:p>1,396923</text:p>
          </table:table-cell>
          <table:table-cell office:value-type="float" office:value="1.83771897293996" calcext:value-type="float">
            <text:p>1,837719</text:p>
          </table:table-cell>
        </table:table-row>
        <table:table-row table:style-name="ro1" table:visibility="filter">
          <table:table-cell office:value-type="string" calcext:value-type="string">
            <text:p>NOVA STA RITA</text:p>
          </table:table-cell>
          <table:table-cell office:value-type="string" calcext:value-type="string">
            <text:p>GUAIBA 3</text:p>
          </table:table-cell>
          <table:table-cell office:value-type="float" office:value="1.6308657929903" calcext:value-type="float">
            <text:p>1,630866</text:p>
          </table:table-cell>
          <table:table-cell office:value-type="float" office:value="2.12501793172005" calcext:value-type="float">
            <text:p>2,125018</text:p>
          </table:table-cell>
        </table:table-row>
        <table:table-row table:style-name="ro1" table:visibility="filter">
          <table:table-cell office:value-type="string" calcext:value-type="string">
            <text:p>NOVA STA RITA</text:p>
          </table:table-cell>
          <table:table-cell office:value-type="string" calcext:value-type="string">
            <text:p>ITA</text:p>
          </table:table-cell>
          <table:table-cell office:value-type="float" office:value="1.3594699345787" calcext:value-type="float">
            <text:p>1,359470</text:p>
          </table:table-cell>
          <table:table-cell office:value-type="float" office:value="1.7884476820382" calcext:value-type="float">
            <text:p>1,788448</text:p>
          </table:table-cell>
        </table:table-row>
        <table:table-row table:style-name="ro1" table:visibility="filter">
          <table:table-cell office:value-type="string" calcext:value-type="string">
            <text:p>NOVA STA RITA</text:p>
          </table:table-cell>
          <table:table-cell office:value-type="string" calcext:value-type="string">
            <text:p>P.PETROQUIMIC</text:p>
          </table:table-cell>
          <table:table-cell office:value-type="float" office:value="0.509918962399551" calcext:value-type="float">
            <text:p>0,509919</text:p>
          </table:table-cell>
          <table:table-cell office:value-type="float" office:value="0.788355048000506" calcext:value-type="float">
            <text:p>0,788355</text:p>
          </table:table-cell>
        </table:table-row>
        <table:table-row table:style-name="ro1" table:visibility="filter">
          <table:table-cell office:value-type="string" calcext:value-type="string">
            <text:p>NOVA STA RITA</text:p>
          </table:table-cell>
          <table:table-cell office:value-type="string" calcext:value-type="string">
            <text:p>PORTO ALEGRE9</text:p>
          </table:table-cell>
          <table:table-cell office:value-type="float" office:value="0.510324871917671" calcext:value-type="float">
            <text:p>0,510325</text:p>
          </table:table-cell>
          <table:table-cell office:value-type="float" office:value="0.788982600300455" calcext:value-type="float">
            <text:p>0,788983</text:p>
          </table:table-cell>
        </table:table-row>
        <table:table-row table:style-name="ro1" table:visibility="filter">
          <table:table-cell office:value-type="string" calcext:value-type="string">
            <text:p>NOVA STA RITA</text:p>
          </table:table-cell>
          <table:table-cell office:value-type="string" calcext:value-type="string">
            <text:p>SCHARLAU 2</text:p>
          </table:table-cell>
          <table:table-cell office:value-type="float" office:value="0.374060238535872" calcext:value-type="float">
            <text:p>0,374060</text:p>
          </table:table-cell>
          <table:table-cell office:value-type="float" office:value="0.57831204377719" calcext:value-type="float">
            <text:p>0,578312</text:p>
          </table:table-cell>
        </table:table-row>
        <table:table-row table:style-name="ro1" table:visibility="filter">
          <table:table-cell office:value-type="string" calcext:value-type="string">
            <text:p>NSA.SRA.SOCORRO</text:p>
          </table:table-cell>
          <table:table-cell office:value-type="string" calcext:value-type="string">
            <text:p>PENEDO</text:p>
          </table:table-cell>
          <table:table-cell office:value-type="float" office:value="0.319261402959297" calcext:value-type="float">
            <text:p>0,319261</text:p>
          </table:table-cell>
          <table:table-cell office:value-type="float" office:value="0.544027335877047" calcext:value-type="float">
            <text:p>0,544027</text:p>
          </table:table-cell>
        </table:table-row>
        <table:table-row table:style-name="ro1" table:visibility="filter">
          <table:table-cell office:value-type="string" calcext:value-type="string">
            <text:p>OLINDINA</text:p>
          </table:table-cell>
          <table:table-cell office:value-type="string" calcext:value-type="string">
            <text:p>PORTO SERGIPE I</text:p>
          </table:table-cell>
          <table:table-cell office:value-type="float" office:value="1.42420916926599" calcext:value-type="float">
            <text:p>1,424209</text:p>
          </table:table-cell>
          <table:table-cell office:value-type="float" office:value="1.72985271828721" calcext:value-type="float">
            <text:p>1,729853</text:p>
          </table:table-cell>
        </table:table-row>
        <table:table-row table:style-name="ro1" table:visibility="filter">
          <table:table-cell office:value-type="string" calcext:value-type="string">
            <text:p>ORIXIMINA</text:p>
          </table:table-cell>
          <table:table-cell office:value-type="string" calcext:value-type="string">
            <text:p>SILVES</text:p>
          </table:table-cell>
          <table:table-cell office:value-type="float" office:value="1.53012225362072" calcext:value-type="float">
            <text:p>1,530122</text:p>
          </table:table-cell>
          <table:table-cell office:value-type="float" office:value="1.85580298422968" calcext:value-type="float">
            <text:p>1,855803</text:p>
          </table:table-cell>
        </table:table-row>
        <table:table-row table:style-name="ro1" table:visibility="filter">
          <table:table-cell office:value-type="string" calcext:value-type="string">
            <text:p>OSORIO 2</text:p>
          </table:table-cell>
          <table:table-cell office:value-type="string" calcext:value-type="string">
            <text:p>TAQUARA</text:p>
          </table:table-cell>
          <table:table-cell office:value-type="float" office:value="0.351154155562205" calcext:value-type="float">
            <text:p>0,351154</text:p>
          </table:table-cell>
          <table:table-cell office:value-type="float" office:value="0.644161578665057" calcext:value-type="float">
            <text:p>0,644162</text:p>
          </table:table-cell>
        </table:table-row>
        <table:table-row table:style-name="ro1" table:visibility="filter">
          <table:table-cell office:value-type="string" calcext:value-type="string">
            <text:p>OURO PRETO 2</text:p>
          </table:table-cell>
          <table:table-cell office:value-type="string" calcext:value-type="string">
            <text:p>B.DESPACHO 3</text:p>
          </table:table-cell>
          <table:table-cell office:value-type="float" office:value="1.40041470789639" calcext:value-type="float">
            <text:p>1,400415</text:p>
          </table:table-cell>
          <table:table-cell office:value-type="float" office:value="1.82977383733109" calcext:value-type="float">
            <text:p>1,829774</text:p>
          </table:table-cell>
        </table:table-row>
        <table:table-row table:style-name="ro1" table:visibility="filter">
          <table:table-cell office:value-type="string" calcext:value-type="string">
            <text:p>OURO PRETO 2</text:p>
          </table:table-cell>
          <table:table-cell office:value-type="string" calcext:value-type="string">
            <text:p>NOVA LIMA 6</text:p>
          </table:table-cell>
          <table:table-cell office:value-type="float" office:value="0.692574669313365" calcext:value-type="float">
            <text:p>0,692575</text:p>
          </table:table-cell>
          <table:table-cell office:value-type="float" office:value="0.993395888295364" calcext:value-type="float">
            <text:p>0,993396</text:p>
          </table:table-cell>
        </table:table-row>
        <table:table-row table:style-name="ro1" table:visibility="filter">
          <table:table-cell office:value-type="string" calcext:value-type="string">
            <text:p>OUROLANDIA II</text:p>
          </table:table-cell>
          <table:table-cell office:value-type="string" calcext:value-type="string">
            <text:p>GENTIO OURO II</text:p>
          </table:table-cell>
          <table:table-cell office:value-type="float" office:value="1.54574030739844" calcext:value-type="float">
            <text:p>1,545740</text:p>
          </table:table-cell>
          <table:table-cell office:value-type="float" office:value="1.8675047159133" calcext:value-type="float">
            <text:p>1,867505</text:p>
          </table:table-cell>
        </table:table-row>
        <table:table-row table:style-name="ro1" table:visibility="filter">
          <table:table-cell office:value-type="string" calcext:value-type="string">
            <text:p>P. AFONSO IV_SE</text:p>
          </table:table-cell>
          <table:table-cell office:value-type="string" calcext:value-type="string">
            <text:p>ANGELIM II</text:p>
          </table:table-cell>
          <table:table-cell office:value-type="float" office:value="1.25455989657881" calcext:value-type="float">
            <text:p>1,254560</text:p>
          </table:table-cell>
          <table:table-cell office:value-type="float" office:value="1.53625230474868" calcext:value-type="float">
            <text:p>1,536252</text:p>
          </table:table-cell>
        </table:table-row>
        <table:table-row table:style-name="ro1" table:visibility="filter">
          <table:table-cell office:value-type="string" calcext:value-type="string">
            <text:p>P. AFONSO IV_SE</text:p>
          </table:table-cell>
          <table:table-cell office:value-type="string" calcext:value-type="string">
            <text:p>P.AFONSO III</text:p>
          </table:table-cell>
          <table:table-cell office:value-type="float" office:value="0.619101941726801" calcext:value-type="float">
            <text:p>0,619102</text:p>
          </table:table-cell>
          <table:table-cell office:value-type="float" office:value="0.887454459429431" calcext:value-type="float">
            <text:p>0,887454</text:p>
          </table:table-cell>
        </table:table-row>
        <table:table-row table:style-name="ro1" table:visibility="filter">
          <table:table-cell office:value-type="string" calcext:value-type="string">
            <text:p>P. JUSCELINO</text:p>
          </table:table-cell>
          <table:table-cell office:value-type="string" calcext:value-type="string">
            <text:p>PIRAPORA 2</text:p>
          </table:table-cell>
          <table:table-cell office:value-type="float" office:value="1.76689705996521" calcext:value-type="float">
            <text:p>1,766897</text:p>
          </table:table-cell>
          <table:table-cell office:value-type="float" office:value="2.30861757974393" calcext:value-type="float">
            <text:p>2,308618</text:p>
          </table:table-cell>
        </table:table-row>
        <table:table-row table:style-name="ro1" table:visibility="filter">
          <table:table-cell office:value-type="string" calcext:value-type="string">
            <text:p>P. JUSCELINO</text:p>
          </table:table-cell>
          <table:table-cell office:value-type="string" calcext:value-type="string">
            <text:p>SETE LAGOAS 4</text:p>
          </table:table-cell>
          <table:table-cell office:value-type="float" office:value="0.809077417180763" calcext:value-type="float">
            <text:p>0,809077</text:p>
          </table:table-cell>
          <table:table-cell office:value-type="float" office:value="1.1605018421145" calcext:value-type="float">
            <text:p>1,160502</text:p>
          </table:table-cell>
        </table:table-row>
        <table:table-row table:style-name="ro1" table:visibility="filter">
          <table:table-cell office:value-type="string" calcext:value-type="string">
            <text:p>P. PRIMAVERA</text:p>
          </table:table-cell>
          <table:table-cell office:value-type="string" calcext:value-type="string">
            <text:p>TAQUARUCU</text:p>
          </table:table-cell>
          <table:table-cell office:value-type="float" office:value="1.08046206065167" calcext:value-type="float">
            <text:p>1,080462</text:p>
          </table:table-cell>
          <table:table-cell office:value-type="float" office:value="1.55780137105525" calcext:value-type="float">
            <text:p>1,557801</text:p>
          </table:table-cell>
        </table:table-row>
        <table:table-row table:style-name="ro1" table:visibility="filter">
          <table:table-cell office:value-type="string" calcext:value-type="string">
            <text:p>P.AFONSO III</text:p>
          </table:table-cell>
          <table:table-cell office:value-type="string" calcext:value-type="string">
            <text:p>BOM NOME</text:p>
          </table:table-cell>
          <table:table-cell office:value-type="float" office:value="0.390883561775373" calcext:value-type="float">
            <text:p>0,390884</text:p>
          </table:table-cell>
          <table:table-cell office:value-type="float" office:value="0.673816897825116" calcext:value-type="float">
            <text:p>0,673817</text:p>
          </table:table-cell>
        </table:table-row>
        <table:table-row table:style-name="ro1" table:visibility="filter">
          <table:table-cell office:value-type="string" calcext:value-type="string">
            <text:p>P.AFONSO III</text:p>
          </table:table-cell>
          <table:table-cell office:value-type="string" calcext:value-type="string">
            <text:p>ITABAIANA</text:p>
          </table:table-cell>
          <table:table-cell office:value-type="float" office:value="0.347583918497736" calcext:value-type="float">
            <text:p>0,347584</text:p>
          </table:table-cell>
          <table:table-cell office:value-type="float" office:value="0.594312364213331" calcext:value-type="float">
            <text:p>0,594312</text:p>
          </table:table-cell>
        </table:table-row>
        <table:table-row table:style-name="ro1" table:visibility="filter">
          <table:table-cell office:value-type="string" calcext:value-type="string">
            <text:p>P.AFONSO III</text:p>
          </table:table-cell>
          <table:table-cell office:value-type="string" calcext:value-type="string">
            <text:p>ZEBU</text:p>
          </table:table-cell>
          <table:table-cell office:value-type="float" office:value="0.263080655541325" calcext:value-type="float">
            <text:p>0,263081</text:p>
          </table:table-cell>
          <table:table-cell office:value-type="float" office:value="0.445913657302346" calcext:value-type="float">
            <text:p>0,445914</text:p>
          </table:table-cell>
        </table:table-row>
        <table:table-row table:style-name="ro1" table:visibility="filter">
          <table:table-cell office:value-type="string" calcext:value-type="string">
            <text:p>P.DUTRA</text:p>
          </table:table-cell>
          <table:table-cell office:value-type="string" calcext:value-type="string">
            <text:p>B. ESPERANCA</text:p>
          </table:table-cell>
          <table:table-cell office:value-type="float" office:value="1.14033073543636" calcext:value-type="float">
            <text:p>1,140331</text:p>
          </table:table-cell>
          <table:table-cell office:value-type="float" office:value="1.36699249136007" calcext:value-type="float">
            <text:p>1,366992</text:p>
          </table:table-cell>
        </table:table-row>
        <table:table-row table:style-name="ro1" table:visibility="filter">
          <table:table-cell office:value-type="string" calcext:value-type="string">
            <text:p>P.DUTRA</text:p>
          </table:table-cell>
          <table:table-cell office:value-type="string" calcext:value-type="string">
            <text:p>PERITORO</text:p>
          </table:table-cell>
          <table:table-cell office:value-type="float" office:value="0.395848438484903" calcext:value-type="float">
            <text:p>0,395848</text:p>
          </table:table-cell>
          <table:table-cell office:value-type="float" office:value="0.559180308388424" calcext:value-type="float">
            <text:p>0,559180</text:p>
          </table:table-cell>
        </table:table-row>
        <table:table-row table:style-name="ro1" table:visibility="filter">
          <table:table-cell office:value-type="string" calcext:value-type="string">
            <text:p>P.DUTRA</text:p>
          </table:table-cell>
          <table:table-cell office:value-type="string" calcext:value-type="string">
            <text:p>S.ANTON LOPES</text:p>
          </table:table-cell>
          <table:table-cell office:value-type="float" office:value="1.19065358372598" calcext:value-type="float">
            <text:p>1,190654</text:p>
          </table:table-cell>
          <table:table-cell office:value-type="float" office:value="1.4175965148702" calcext:value-type="float">
            <text:p>1,417597</text:p>
          </table:table-cell>
        </table:table-row>
        <table:table-row table:style-name="ro1" table:visibility="filter">
          <table:table-cell office:value-type="string" calcext:value-type="string">
            <text:p>PACATUBA</text:p>
          </table:table-cell>
          <table:table-cell office:value-type="string" calcext:value-type="string">
            <text:p>PECEM II</text:p>
          </table:table-cell>
          <table:table-cell office:value-type="float" office:value="1.39070493687818" calcext:value-type="float">
            <text:p>1,390705</text:p>
          </table:table-cell>
          <table:table-cell office:value-type="float" office:value="1.75074708098701" calcext:value-type="float">
            <text:p>1,750747</text:p>
          </table:table-cell>
        </table:table-row>
        <table:table-row table:style-name="ro1" table:visibility="filter">
          <table:table-cell office:value-type="string" calcext:value-type="string">
            <text:p>PADRE FIALHO</text:p>
          </table:table-cell>
          <table:table-cell office:value-type="string" calcext:value-type="string">
            <text:p>VITORIA</text:p>
          </table:table-cell>
          <table:table-cell office:value-type="float" office:value="0.673197615145871" calcext:value-type="float">
            <text:p>0,673198</text:p>
          </table:table-cell>
          <table:table-cell office:value-type="float" office:value="1.05855840686865" calcext:value-type="float">
            <text:p>1,058558</text:p>
          </table:table-cell>
        </table:table-row>
        <table:table-row table:style-name="ro1" table:visibility="filter">
          <table:table-cell office:value-type="string" calcext:value-type="string">
            <text:p>PARANAIBA</text:p>
          </table:table-cell>
          <table:table-cell office:value-type="string" calcext:value-type="string">
            <text:p>ITUMBIARA</text:p>
          </table:table-cell>
          <table:table-cell office:value-type="float" office:value="0.322451728277515" calcext:value-type="float">
            <text:p>0,322452</text:p>
          </table:table-cell>
          <table:table-cell office:value-type="float" office:value="0.491372874789777" calcext:value-type="float">
            <text:p>0,491373</text:p>
          </table:table-cell>
        </table:table-row>
        <table:table-row table:style-name="ro1" table:visibility="filter">
          <table:table-cell office:value-type="string" calcext:value-type="string">
            <text:p>PARANAVAI NOR</text:p>
          </table:table-cell>
          <table:table-cell office:value-type="string" calcext:value-type="string">
            <text:p>SARANDI</text:p>
          </table:table-cell>
          <table:table-cell office:value-type="float" office:value="0.416641152476601" calcext:value-type="float">
            <text:p>0,416641</text:p>
          </table:table-cell>
          <table:table-cell office:value-type="float" office:value="0.642959274739416" calcext:value-type="float">
            <text:p>0,642959</text:p>
          </table:table-cell>
        </table:table-row>
        <table:table-row table:style-name="ro1" table:visibility="filter">
          <table:table-cell office:value-type="string" calcext:value-type="string">
            <text:p>PARIGOT SOUZA</text:p>
          </table:table-cell>
          <table:table-cell office:value-type="string" calcext:value-type="string">
            <text:p>SANTA MONICA</text:p>
          </table:table-cell>
          <table:table-cell office:value-type="float" office:value="0.260199849779139" calcext:value-type="float">
            <text:p>0,260200</text:p>
          </table:table-cell>
          <table:table-cell office:value-type="float" office:value="0.476435583062377" calcext:value-type="float">
            <text:p>0,476436</text:p>
          </table:table-cell>
        </table:table-row>
        <table:table-row table:style-name="ro1" table:visibility="filter">
          <table:table-cell office:value-type="string" calcext:value-type="string">
            <text:p>PASSO FUNDO</text:p>
          </table:table-cell>
          <table:table-cell office:value-type="string" calcext:value-type="string">
            <text:p>SANTA MARTA</text:p>
          </table:table-cell>
          <table:table-cell office:value-type="float" office:value="0.301594474293718" calcext:value-type="float">
            <text:p>0,301594</text:p>
          </table:table-cell>
          <table:table-cell office:value-type="float" office:value="0.553248678964543" calcext:value-type="float">
            <text:p>0,553249</text:p>
          </table:table-cell>
        </table:table-row>
        <table:table-row table:style-name="ro1" table:visibility="filter">
          <table:table-cell office:value-type="string" calcext:value-type="string">
            <text:p>PASSO FUNDO</text:p>
          </table:table-cell>
          <table:table-cell office:value-type="string" calcext:value-type="string">
            <text:p>VILA MARIA</text:p>
          </table:table-cell>
          <table:table-cell office:value-type="float" office:value="0.331707455176962" calcext:value-type="float">
            <text:p>0,331707</text:p>
          </table:table-cell>
          <table:table-cell office:value-type="float" office:value="0.608488308047119" calcext:value-type="float">
            <text:p>0,608488</text:p>
          </table:table-cell>
        </table:table-row>
        <table:table-row table:style-name="ro1" table:visibility="filter">
          <table:table-cell office:value-type="string" calcext:value-type="string">
            <text:p>PASSO FUNDO</text:p>
          </table:table-cell>
          <table:table-cell office:value-type="string" calcext:value-type="string">
            <text:p>XANXERE ESU</text:p>
          </table:table-cell>
          <table:table-cell office:value-type="float" office:value="0.314651242009969" calcext:value-type="float">
            <text:p>0,314651</text:p>
          </table:table-cell>
          <table:table-cell office:value-type="float" office:value="0.582765336491148" calcext:value-type="float">
            <text:p>0,582765</text:p>
          </table:table-cell>
        </table:table-row>
        <table:table-row table:style-name="ro1" table:visibility="filter">
          <table:table-cell office:value-type="string" calcext:value-type="string">
            <text:p>PASSO REAL</text:p>
          </table:table-cell>
          <table:table-cell office:value-type="string" calcext:value-type="string">
            <text:p>V.AIRES</text:p>
          </table:table-cell>
          <table:table-cell office:value-type="float" office:value="0.314488098298821" calcext:value-type="float">
            <text:p>0,314488</text:p>
          </table:table-cell>
          <table:table-cell office:value-type="float" office:value="0.576900904240202" calcext:value-type="float">
            <text:p>0,576901</text:p>
          </table:table-cell>
        </table:table-row>
        <table:table-row table:style-name="ro1" table:visibility="filter">
          <table:table-cell office:value-type="string" calcext:value-type="string">
            <text:p>PAU FERRO</text:p>
          </table:table-cell>
          <table:table-cell office:value-type="string" calcext:value-type="string">
            <text:p>SANTA RITA II</text:p>
          </table:table-cell>
          <table:table-cell office:value-type="float" office:value="0.604693523256773" calcext:value-type="float">
            <text:p>0,604694</text:p>
          </table:table-cell>
          <table:table-cell office:value-type="float" office:value="0.881533445916871" calcext:value-type="float">
            <text:p>0,881533</text:p>
          </table:table-cell>
        </table:table-row>
        <table:table-row table:style-name="ro1" table:visibility="filter">
          <table:table-cell office:value-type="string" calcext:value-type="string">
            <text:p>PECEM II</text:p>
          </table:table-cell>
          <table:table-cell office:value-type="string" calcext:value-type="string">
            <text:p>SOBRAL III</text:p>
          </table:table-cell>
          <table:table-cell office:value-type="float" office:value="1.4004970141061" calcext:value-type="float">
            <text:p>1,400497</text:p>
          </table:table-cell>
          <table:table-cell office:value-type="float" office:value="1.76307424699395" calcext:value-type="float">
            <text:p>1,763074</text:p>
          </table:table-cell>
        </table:table-row>
        <table:table-row table:style-name="ro1" table:visibility="filter">
          <table:table-cell office:value-type="string" calcext:value-type="string">
            <text:p>PELOTAS3</text:p>
          </table:table-cell>
          <table:table-cell office:value-type="string" calcext:value-type="string">
            <text:p>PRE.MEDICI</text:p>
          </table:table-cell>
          <table:table-cell office:value-type="float" office:value="0.381168834645119" calcext:value-type="float">
            <text:p>0,381169</text:p>
          </table:table-cell>
          <table:table-cell office:value-type="float" office:value="0.699220881694578" calcext:value-type="float">
            <text:p>0,699221</text:p>
          </table:table-cell>
        </table:table-row>
        <table:table-row table:style-name="ro1" table:visibility="filter">
          <table:table-cell office:value-type="string" calcext:value-type="string">
            <text:p>PEROXIDOS</text:p>
          </table:table-cell>
          <table:table-cell office:value-type="string" calcext:value-type="string">
            <text:p>UMBARA</text:p>
          </table:table-cell>
          <table:table-cell office:value-type="float" office:value="0.250728685059496" calcext:value-type="float">
            <text:p>0,250729</text:p>
          </table:table-cell>
          <table:table-cell office:value-type="float" office:value="0.459093528909336" calcext:value-type="float">
            <text:p>0,459094</text:p>
          </table:table-cell>
        </table:table-row>
        <table:table-row table:style-name="ro1" table:visibility="filter">
          <table:table-cell office:value-type="string" calcext:value-type="string">
            <text:p>PICOS</text:p>
          </table:table-cell>
          <table:table-cell office:value-type="string" calcext:value-type="string">
            <text:p>S.JOAO PIAUI</text:p>
          </table:table-cell>
          <table:table-cell office:value-type="float" office:value="0.394989112491589" calcext:value-type="float">
            <text:p>0,394989</text:p>
          </table:table-cell>
          <table:table-cell office:value-type="float" office:value="0.565649021633091" calcext:value-type="float">
            <text:p>0,565649</text:p>
          </table:table-cell>
        </table:table-row>
        <table:table-row table:style-name="ro1" table:visibility="filter">
          <table:table-cell office:value-type="string" calcext:value-type="string">
            <text:p>PIMENTA BUENO</text:p>
          </table:table-cell>
          <table:table-cell office:value-type="string" calcext:value-type="string">
            <text:p>VILHENA</text:p>
          </table:table-cell>
          <table:table-cell office:value-type="float" office:value="0.482403370141224" calcext:value-type="float">
            <text:p>0,482403</text:p>
          </table:table-cell>
          <table:table-cell office:value-type="float" office:value="0.82763643298791" calcext:value-type="float">
            <text:p>0,827636</text:p>
          </table:table-cell>
        </table:table-row>
        <table:table-row table:style-name="ro1" table:visibility="filter">
          <table:table-cell office:value-type="string" calcext:value-type="string">
            <text:p>PIRAPAMA II</text:p>
          </table:table-cell>
          <table:table-cell office:value-type="string" calcext:value-type="string">
            <text:p>SUAPE II</text:p>
          </table:table-cell>
          <table:table-cell office:value-type="float" office:value="0.512693047620108" calcext:value-type="float">
            <text:p>0,512693</text:p>
          </table:table-cell>
          <table:table-cell office:value-type="float" office:value="0.754986447694971" calcext:value-type="float">
            <text:p>0,754986</text:p>
          </table:table-cell>
        </table:table-row>
        <table:table-row table:style-name="ro1" table:visibility="filter">
          <table:table-cell office:value-type="string" calcext:value-type="string">
            <text:p>PIRAPORA 2</text:p>
          </table:table-cell>
          <table:table-cell office:value-type="string" calcext:value-type="string">
            <text:p>ARINOS 2</text:p>
          </table:table-cell>
          <table:table-cell office:value-type="float" office:value="1.48311969280286" calcext:value-type="float">
            <text:p>1,483120</text:p>
          </table:table-cell>
          <table:table-cell office:value-type="float" office:value="1.93783569696841" calcext:value-type="float">
            <text:p>1,937836</text:p>
          </table:table-cell>
        </table:table-row>
        <table:table-row table:style-name="ro1" table:visibility="filter">
          <table:table-cell office:value-type="string" calcext:value-type="string">
            <text:p>PIRAPORA 2</text:p>
          </table:table-cell>
          <table:table-cell office:value-type="string" calcext:value-type="string">
            <text:p>LUZIANIA</text:p>
          </table:table-cell>
          <table:table-cell office:value-type="float" office:value="1.76056516434866" calcext:value-type="float">
            <text:p>1,760565</text:p>
          </table:table-cell>
          <table:table-cell office:value-type="float" office:value="2.26115339413807" calcext:value-type="float">
            <text:p>2,261153</text:p>
          </table:table-cell>
        </table:table-row>
        <table:table-row table:style-name="ro1" table:visibility="filter">
          <table:table-cell office:value-type="string" calcext:value-type="string">
            <text:p>PIRAPORA 2</text:p>
          </table:table-cell>
          <table:table-cell office:value-type="string" calcext:value-type="string">
            <text:p>VARZEA PALMA 4</text:p>
          </table:table-cell>
          <table:table-cell office:value-type="float" office:value="0.76999755469528" calcext:value-type="float">
            <text:p>0,769998</text:p>
          </table:table-cell>
          <table:table-cell office:value-type="float" office:value="1.10444756171941" calcext:value-type="float">
            <text:p>1,104448</text:p>
          </table:table-cell>
        </table:table-row>
        <table:table-row table:style-name="ro1" table:visibility="filter">
          <table:table-cell office:value-type="string" calcext:value-type="string">
            <text:p>PIRATININGA</text:p>
          </table:table-cell>
          <table:table-cell office:value-type="string" calcext:value-type="string">
            <text:p>INTERLAGOS</text:p>
          </table:table-cell>
          <table:table-cell office:value-type="float" office:value="0.376068943903087" calcext:value-type="float">
            <text:p>0,376069</text:p>
          </table:table-cell>
          <table:table-cell office:value-type="float" office:value="0.658908448241113" calcext:value-type="float">
            <text:p>0,658908</text:p>
          </table:table-cell>
        </table:table-row>
        <table:table-row table:style-name="ro1" table:visibility="filter">
          <table:table-cell office:value-type="string" calcext:value-type="string">
            <text:p>PIRINEUS</text:p>
          </table:table-cell>
          <table:table-cell office:value-type="string" calcext:value-type="string">
            <text:p>SAMAMBAIA</text:p>
          </table:table-cell>
          <table:table-cell office:value-type="float" office:value="0.700918065698422" calcext:value-type="float">
            <text:p>0,700918</text:p>
          </table:table-cell>
          <table:table-cell office:value-type="float" office:value="1.00628084295079" calcext:value-type="float">
            <text:p>1,006281</text:p>
          </table:table-cell>
        </table:table-row>
        <table:table-row table:style-name="ro1" table:visibility="filter">
          <table:table-cell office:value-type="string" calcext:value-type="string">
            <text:p>PIRIPIRI</text:p>
          </table:table-cell>
          <table:table-cell office:value-type="string" calcext:value-type="string">
            <text:p>TERESINA III</text:p>
          </table:table-cell>
          <table:table-cell office:value-type="float" office:value="0.512646685300476" calcext:value-type="float">
            <text:p>0,512647</text:p>
          </table:table-cell>
          <table:table-cell office:value-type="float" office:value="0.871041004070237" calcext:value-type="float">
            <text:p>0,871041</text:p>
          </table:table-cell>
        </table:table-row>
        <table:table-row table:style-name="ro1" table:visibility="filter">
          <table:table-cell office:value-type="string" calcext:value-type="string">
            <text:p>PITUACU</text:p>
          </table:table-cell>
          <table:table-cell office:value-type="string" calcext:value-type="string">
            <text:p>NARANDIBA</text:p>
          </table:table-cell>
          <table:table-cell office:value-type="float" office:value="0.39690658499163" calcext:value-type="float">
            <text:p>0,396907</text:p>
          </table:table-cell>
          <table:table-cell office:value-type="float" office:value="0.675042239555662" calcext:value-type="float">
            <text:p>0,675042</text:p>
          </table:table-cell>
        </table:table-row>
        <table:table-row table:style-name="ro1" table:visibility="filter">
          <table:table-cell office:value-type="string" calcext:value-type="string">
            <text:p>POCOES II</text:p>
          </table:table-cell>
          <table:table-cell office:value-type="string" calcext:value-type="string">
            <text:p>POCOES III</text:p>
          </table:table-cell>
          <table:table-cell office:value-type="float" office:value="0.581399900443678" calcext:value-type="float">
            <text:p>0,581400</text:p>
          </table:table-cell>
          <table:table-cell office:value-type="float" office:value="0.833410298991205" calcext:value-type="float">
            <text:p>0,833410</text:p>
          </table:table-cell>
        </table:table-row>
        <table:table-row table:style-name="ro1" table:visibility="filter">
          <table:table-cell office:value-type="string" calcext:value-type="string">
            <text:p>POCOES III</text:p>
          </table:table-cell>
          <table:table-cell office:value-type="string" calcext:value-type="string">
            <text:p>PE. PARAISO 2</text:p>
          </table:table-cell>
          <table:table-cell office:value-type="float" office:value="1.51507866084724" calcext:value-type="float">
            <text:p>1,515079</text:p>
          </table:table-cell>
          <table:table-cell office:value-type="float" office:value="1.90356689868198" calcext:value-type="float">
            <text:p>1,903567</text:p>
          </table:table-cell>
        </table:table-row>
        <table:table-row table:style-name="ro1" table:visibility="filter">
          <table:table-cell office:value-type="string" calcext:value-type="string">
            <text:p>POCOS CALDAS</text:p>
          </table:table-cell>
          <table:table-cell office:value-type="string" calcext:value-type="string">
            <text:p>ITAJUBA 3</text:p>
          </table:table-cell>
          <table:table-cell office:value-type="float" office:value="1.16343044471528" calcext:value-type="float">
            <text:p>1,163430</text:p>
          </table:table-cell>
          <table:table-cell office:value-type="float" office:value="1.52013155623898" calcext:value-type="float">
            <text:p>1,520132</text:p>
          </table:table-cell>
        </table:table-row>
        <table:table-row table:style-name="ro1" table:visibility="filter">
          <table:table-cell office:value-type="string" calcext:value-type="string">
            <text:p>PONTA G NORTE</text:p>
          </table:table-cell>
          <table:table-cell office:value-type="string" calcext:value-type="string">
            <text:p>PONTA GROSSA</text:p>
          </table:table-cell>
          <table:table-cell office:value-type="float" office:value="0.384766013507649" calcext:value-type="float">
            <text:p>0,384766</text:p>
          </table:table-cell>
          <table:table-cell office:value-type="float" office:value="0.593769663699141" calcext:value-type="float">
            <text:p>0,593770</text:p>
          </table:table-cell>
        </table:table-row>
        <table:table-row table:style-name="ro1" table:visibility="filter">
          <table:table-cell office:value-type="string" calcext:value-type="string">
            <text:p>PONTA GROSSA</text:p>
          </table:table-cell>
          <table:table-cell office:value-type="string" calcext:value-type="string">
            <text:p>IVAIPORA ELS</text:p>
          </table:table-cell>
          <table:table-cell office:value-type="float" office:value="1.57631898241064" calcext:value-type="float">
            <text:p>1,576319</text:p>
          </table:table-cell>
          <table:table-cell office:value-type="float" office:value="2.050168518384" calcext:value-type="float">
            <text:p>2,050169</text:p>
          </table:table-cell>
        </table:table-row>
        <table:table-row table:style-name="ro1" table:visibility="filter">
          <table:table-cell office:value-type="string" calcext:value-type="string">
            <text:p>PONTA GROSSA</text:p>
          </table:table-cell>
          <table:table-cell office:value-type="string" calcext:value-type="string">
            <text:p>PONTA G SUL</text:p>
          </table:table-cell>
          <table:table-cell office:value-type="float" office:value="0.444470832808792" calcext:value-type="float">
            <text:p>0,444471</text:p>
          </table:table-cell>
          <table:table-cell office:value-type="float" office:value="0.685905947136641" calcext:value-type="float">
            <text:p>0,685906</text:p>
          </table:table-cell>
        </table:table-row>
        <table:table-row table:style-name="ro1" table:visibility="filter">
          <table:table-cell office:value-type="string" calcext:value-type="string">
            <text:p>PONTA GROSSA</text:p>
          </table:table-cell>
          <table:table-cell office:value-type="string" calcext:value-type="string">
            <text:p>S.MATEUS SUL</text:p>
          </table:table-cell>
          <table:table-cell office:value-type="float" office:value="0.479529429150555" calcext:value-type="float">
            <text:p>0,479529</text:p>
          </table:table-cell>
          <table:table-cell office:value-type="float" office:value="0.740008259266136" calcext:value-type="float">
            <text:p>0,740008</text:p>
          </table:table-cell>
        </table:table-row>
        <table:table-row table:style-name="ro1" table:visibility="filter">
          <table:table-cell office:value-type="string" calcext:value-type="string">
            <text:p>PORTO ALEGRE8</text:p>
          </table:table-cell>
          <table:table-cell office:value-type="string" calcext:value-type="string">
            <text:p>PORTO ALEGRE9</text:p>
          </table:table-cell>
          <table:table-cell office:value-type="float" office:value="0.318566382768388" calcext:value-type="float">
            <text:p>0,318566</text:p>
          </table:table-cell>
          <table:table-cell office:value-type="float" office:value="0.584382160322607" calcext:value-type="float">
            <text:p>0,584382</text:p>
          </table:table-cell>
        </table:table-row>
        <table:table-row table:style-name="ro1" table:visibility="filter">
          <table:table-cell office:value-type="string" calcext:value-type="string">
            <text:p>PORTO ALEGRE8</text:p>
          </table:table-cell>
          <table:table-cell office:value-type="string" calcext:value-type="string">
            <text:p>PORTOALEGRE 1</text:p>
          </table:table-cell>
          <table:table-cell office:value-type="float" office:value="0.331586323000696" calcext:value-type="float">
            <text:p>0,331586</text:p>
          </table:table-cell>
          <table:table-cell office:value-type="float" office:value="0.60826610166666" calcext:value-type="float">
            <text:p>0,608266</text:p>
          </table:table-cell>
        </table:table-row>
        <table:table-row table:style-name="ro1" table:visibility="filter">
          <table:table-cell office:value-type="string" calcext:value-type="string">
            <text:p>PORTO VELHO</text:p>
          </table:table-cell>
          <table:table-cell office:value-type="string" calcext:value-type="string">
            <text:p>SAMUEL</text:p>
          </table:table-cell>
          <table:table-cell office:value-type="float" office:value="0.43972035678654" calcext:value-type="float">
            <text:p>0,439720</text:p>
          </table:table-cell>
          <table:table-cell office:value-type="float" office:value="0.754407224593897" calcext:value-type="float">
            <text:p>0,754407</text:p>
          </table:table-cell>
        </table:table-row>
        <table:table-row table:style-name="ro1" table:visibility="filter">
          <table:table-cell office:value-type="string" calcext:value-type="string">
            <text:p>PORTOALEGRE 4</text:p>
          </table:table-cell>
          <table:table-cell office:value-type="string" calcext:value-type="string">
            <text:p>PORTO ALEGRE9</text:p>
          </table:table-cell>
          <table:table-cell office:value-type="float" office:value="0.327134612347924" calcext:value-type="float">
            <text:p>0,327135</text:p>
          </table:table-cell>
          <table:table-cell office:value-type="float" office:value="0.600099827919283" calcext:value-type="float">
            <text:p>0,600100</text:p>
          </table:table-cell>
        </table:table-row>
        <table:table-row table:style-name="ro1" table:visibility="filter">
          <table:table-cell office:value-type="string" calcext:value-type="string">
            <text:p>PORTOALEGRE 4</text:p>
          </table:table-cell>
          <table:table-cell office:value-type="string" calcext:value-type="string">
            <text:p>PORTOALEGRE10</text:p>
          </table:table-cell>
          <table:table-cell office:value-type="float" office:value="0.312415310766279" calcext:value-type="float">
            <text:p>0,312415</text:p>
          </table:table-cell>
          <table:table-cell office:value-type="float" office:value="0.573098556843624" calcext:value-type="float">
            <text:p>0,573099</text:p>
          </table:table-cell>
        </table:table-row>
        <table:table-row table:style-name="ro1" table:visibility="filter">
          <table:table-cell office:value-type="string" calcext:value-type="string">
            <text:p>PORTOALEGRE13</text:p>
          </table:table-cell>
          <table:table-cell office:value-type="string" calcext:value-type="string">
            <text:p>PORTOALEGRE6</text:p>
          </table:table-cell>
          <table:table-cell office:value-type="float" office:value="0.280379317171022" calcext:value-type="float">
            <text:p>0,280379</text:p>
          </table:table-cell>
          <table:table-cell office:value-type="float" office:value="0.51433132917011" calcext:value-type="float">
            <text:p>0,514331</text:p>
          </table:table-cell>
        </table:table-row>
        <table:table-row table:style-name="ro1" table:visibility="filter">
          <table:table-cell office:value-type="string" calcext:value-type="string">
            <text:p>POVO NOVO</text:p>
          </table:table-cell>
          <table:table-cell office:value-type="string" calcext:value-type="string">
            <text:p>GUAIBA 3</text:p>
          </table:table-cell>
          <table:table-cell office:value-type="float" office:value="1.70348235916258" calcext:value-type="float">
            <text:p>1,703482</text:p>
          </table:table-cell>
          <table:table-cell office:value-type="float" office:value="2.21963730869103" calcext:value-type="float">
            <text:p>2,219637</text:p>
          </table:table-cell>
        </table:table-row>
        <table:table-row table:style-name="ro1" table:visibility="filter">
          <table:table-cell office:value-type="string" calcext:value-type="string">
            <text:p>POVO NOVO</text:p>
          </table:table-cell>
          <table:table-cell office:value-type="string" calcext:value-type="string">
            <text:p>MARMELEIRO 2</text:p>
          </table:table-cell>
          <table:table-cell office:value-type="float" office:value="1.67324378844416" calcext:value-type="float">
            <text:p>1,673244</text:p>
          </table:table-cell>
          <table:table-cell office:value-type="float" office:value="2.18023645468918" calcext:value-type="float">
            <text:p>2,180236</text:p>
          </table:table-cell>
        </table:table-row>
        <table:table-row table:style-name="ro1" table:visibility="filter">
          <table:table-cell office:value-type="string" calcext:value-type="string">
            <text:p>POVO NOVO</text:p>
          </table:table-cell>
          <table:table-cell office:value-type="string" calcext:value-type="string">
            <text:p>QUINTA</text:p>
          </table:table-cell>
          <table:table-cell office:value-type="float" office:value="0.533232461458869" calcext:value-type="float">
            <text:p>0,533232</text:p>
          </table:table-cell>
          <table:table-cell office:value-type="float" office:value="0.824398647131395" calcext:value-type="float">
            <text:p>0,824399</text:p>
          </table:table-cell>
        </table:table-row>
        <table:table-row table:style-name="ro1" table:visibility="filter">
          <table:table-cell office:value-type="string" calcext:value-type="string">
            <text:p>PRE.MEDICI</text:p>
          </table:table-cell>
          <table:table-cell office:value-type="string" calcext:value-type="string">
            <text:p>QUINTA</text:p>
          </table:table-cell>
          <table:table-cell office:value-type="float" office:value="0.360063601620152" calcext:value-type="float">
            <text:p>0,360064</text:p>
          </table:table-cell>
          <table:table-cell office:value-type="float" office:value="0.660505178041035" calcext:value-type="float">
            <text:p>0,660505</text:p>
          </table:table-cell>
        </table:table-row>
        <table:table-row table:style-name="ro1" table:visibility="filter">
          <table:table-cell office:value-type="string" calcext:value-type="string">
            <text:p>PRE.MEDICI</text:p>
          </table:table-cell>
          <table:table-cell office:value-type="string" calcext:value-type="string">
            <text:p>SANTA CRUZ1</text:p>
          </table:table-cell>
          <table:table-cell office:value-type="float" office:value="0.398320578461811" calcext:value-type="float">
            <text:p>0,398321</text:p>
          </table:table-cell>
          <table:table-cell office:value-type="float" office:value="0.730684255255202" calcext:value-type="float">
            <text:p>0,730684</text:p>
          </table:table-cell>
        </table:table-row>
        <table:table-row table:style-name="ro1" table:visibility="filter">
          <table:table-cell office:value-type="string" calcext:value-type="string">
            <text:p>QUIXERE</text:p>
          </table:table-cell>
          <table:table-cell office:value-type="string" calcext:value-type="string">
            <text:p>MOSSORO II</text:p>
          </table:table-cell>
          <table:table-cell office:value-type="float" office:value="0.290099509712039" calcext:value-type="float">
            <text:p>0,290100</text:p>
          </table:table-cell>
          <table:table-cell office:value-type="float" office:value="0.512671767386472" calcext:value-type="float">
            <text:p>0,512672</text:p>
          </table:table-cell>
        </table:table-row>
        <table:table-row table:style-name="ro1" table:visibility="filter">
          <table:table-cell office:value-type="string" calcext:value-type="string">
            <text:p>R.VERDE NORTE</text:p>
          </table:table-cell>
          <table:table-cell office:value-type="string" calcext:value-type="string">
            <text:p>MARIMBONDO II</text:p>
          </table:table-cell>
          <table:table-cell office:value-type="float" office:value="1.51181260180435" calcext:value-type="float">
            <text:p>1,511813</text:p>
          </table:table-cell>
          <table:table-cell office:value-type="float" office:value="1.94167206366104" calcext:value-type="float">
            <text:p>1,941672</text:p>
          </table:table-cell>
        </table:table-row>
        <table:table-row table:style-name="ro1" table:visibility="filter">
          <table:table-cell office:value-type="string" calcext:value-type="string">
            <text:p>RECIFE II</text:p>
          </table:table-cell>
          <table:table-cell office:value-type="string" calcext:value-type="string">
            <text:p>JOAIRAM</text:p>
          </table:table-cell>
          <table:table-cell office:value-type="float" office:value="0.370040551723019" calcext:value-type="float">
            <text:p>0,370041</text:p>
          </table:table-cell>
          <table:table-cell office:value-type="float" office:value="0.544917866441325" calcext:value-type="float">
            <text:p>0,544918</text:p>
          </table:table-cell>
        </table:table-row>
        <table:table-row table:style-name="ro1" table:visibility="filter">
          <table:table-cell office:value-type="string" calcext:value-type="string">
            <text:p>RECIFE II</text:p>
          </table:table-cell>
          <table:table-cell office:value-type="string" calcext:value-type="string">
            <text:p>MIRUEIRA</text:p>
          </table:table-cell>
          <table:table-cell office:value-type="float" office:value="0.340995851385694" calcext:value-type="float">
            <text:p>0,340996</text:p>
          </table:table-cell>
          <table:table-cell office:value-type="float" office:value="0.502146942915382" calcext:value-type="float">
            <text:p>0,502147</text:p>
          </table:table-cell>
        </table:table-row>
        <table:table-row table:style-name="ro1" table:visibility="filter">
          <table:table-cell office:value-type="string" calcext:value-type="string">
            <text:p>RECIFE II</text:p>
          </table:table-cell>
          <table:table-cell office:value-type="string" calcext:value-type="string">
            <text:p>SUAPE II</text:p>
          </table:table-cell>
          <table:table-cell office:value-type="float" office:value="1.23770874340438" calcext:value-type="float">
            <text:p>1,237709</text:p>
          </table:table-cell>
          <table:table-cell office:value-type="float" office:value="1.53615690408018" calcext:value-type="float">
            <text:p>1,536157</text:p>
          </table:table-cell>
        </table:table-row>
        <table:table-row table:style-name="ro1" table:visibility="filter">
          <table:table-cell office:value-type="string" calcext:value-type="string">
            <text:p>RESTINGA</text:p>
          </table:table-cell>
          <table:table-cell office:value-type="string" calcext:value-type="string">
            <text:p>VIAMAO 3</text:p>
          </table:table-cell>
          <table:table-cell office:value-type="float" office:value="0.276539379206533" calcext:value-type="float">
            <text:p>0,276539</text:p>
          </table:table-cell>
          <table:table-cell office:value-type="float" office:value="0.507287298900211" calcext:value-type="float">
            <text:p>0,507287</text:p>
          </table:table-cell>
        </table:table-row>
        <table:table-row table:style-name="ro1" table:visibility="filter">
          <table:table-cell office:value-type="string" calcext:value-type="string">
            <text:p>RIB.GONCALVES</text:p>
          </table:table-cell>
          <table:table-cell office:value-type="string" calcext:value-type="string">
            <text:p>COLINAS</text:p>
          </table:table-cell>
          <table:table-cell office:value-type="float" office:value="1.2801836377937" calcext:value-type="float">
            <text:p>1,280184</text:p>
          </table:table-cell>
          <table:table-cell office:value-type="float" office:value="1.57580899607611" calcext:value-type="float">
            <text:p>1,575809</text:p>
          </table:table-cell>
        </table:table-row>
        <table:table-row table:style-name="ro1" table:visibility="filter">
          <table:table-cell office:value-type="string" calcext:value-type="string">
            <text:p>RIBEIRAOPRETO</text:p>
          </table:table-cell>
          <table:table-cell office:value-type="string" calcext:value-type="string">
            <text:p>MORRO AGUDO</text:p>
          </table:table-cell>
          <table:table-cell office:value-type="float" office:value="1.17943480930934" calcext:value-type="float">
            <text:p>1,179435</text:p>
          </table:table-cell>
          <table:table-cell office:value-type="float" office:value="1.5864571438395" calcext:value-type="float">
            <text:p>1,586457</text:p>
          </table:table-cell>
        </table:table-row>
        <table:table-row table:style-name="ro1" table:visibility="filter">
          <table:table-cell office:value-type="string" calcext:value-type="string">
            <text:p>RIBEIRAOPRETO</text:p>
          </table:table-cell>
          <table:table-cell office:value-type="string" calcext:value-type="string">
            <text:p>POCOS CALDAS</text:p>
          </table:table-cell>
          <table:table-cell office:value-type="float" office:value="1.20088458762653" calcext:value-type="float">
            <text:p>1,200885</text:p>
          </table:table-cell>
          <table:table-cell office:value-type="float" office:value="1.59202120461006" calcext:value-type="float">
            <text:p>1,592021</text:p>
          </table:table-cell>
        </table:table-row>
        <table:table-row table:style-name="ro1" table:visibility="filter">
          <table:table-cell office:value-type="string" calcext:value-type="string">
            <text:p>RIBEIRAOPRETO</text:p>
          </table:table-cell>
          <table:table-cell office:value-type="string" calcext:value-type="string">
            <text:p>SANTA BARBARA</text:p>
          </table:table-cell>
          <table:table-cell office:value-type="float" office:value="1.10476940298861" calcext:value-type="float">
            <text:p>1,104769</text:p>
          </table:table-cell>
          <table:table-cell office:value-type="float" office:value="1.53850927779724" calcext:value-type="float">
            <text:p>1,538509</text:p>
          </table:table-cell>
        </table:table-row>
        <table:table-row table:style-name="ro1" table:visibility="filter">
          <table:table-cell office:value-type="string" calcext:value-type="string">
            <text:p>RIBEIRAOZINHO</text:p>
          </table:table-cell>
          <table:table-cell office:value-type="string" calcext:value-type="string">
            <text:p>PARANATINGA</text:p>
          </table:table-cell>
          <table:table-cell office:value-type="float" office:value="1.50896177186556" calcext:value-type="float">
            <text:p>1,508962</text:p>
          </table:table-cell>
          <table:table-cell office:value-type="float" office:value="1.90320125642572" calcext:value-type="float">
            <text:p>1,903201</text:p>
          </table:table-cell>
        </table:table-row>
        <table:table-row table:style-name="ro1" table:visibility="filter">
          <table:table-cell office:value-type="string" calcext:value-type="string">
            <text:p>RIBEIRAOZINHO</text:p>
          </table:table-cell>
          <table:table-cell office:value-type="string" calcext:value-type="string">
            <text:p>R.VERDE NORTE</text:p>
          </table:table-cell>
          <table:table-cell office:value-type="float" office:value="1.46676872648629" calcext:value-type="float">
            <text:p>1,466769</text:p>
          </table:table-cell>
          <table:table-cell office:value-type="float" office:value="1.85085512834085" calcext:value-type="float">
            <text:p>1,850855</text:p>
          </table:table-cell>
        </table:table-row>
        <table:table-row table:style-name="ro1" table:visibility="filter">
          <table:table-cell office:value-type="string" calcext:value-type="string">
            <text:p>RIBEIRAOZINHO</text:p>
          </table:table-cell>
          <table:table-cell office:value-type="string" calcext:value-type="string">
            <text:p>SE CUIABA</text:p>
          </table:table-cell>
          <table:table-cell office:value-type="float" office:value="1.48512375152231" calcext:value-type="float">
            <text:p>1,485124</text:p>
          </table:table-cell>
          <table:table-cell office:value-type="float" office:value="1.87313518642059" calcext:value-type="float">
            <text:p>1,873135</text:p>
          </table:table-cell>
        </table:table-row>
        <table:table-row table:style-name="ro1" table:visibility="filter">
          <table:table-cell office:value-type="string" calcext:value-type="string">
            <text:p>RIO BRANCO I</text:p>
          </table:table-cell>
          <table:table-cell office:value-type="string" calcext:value-type="string">
            <text:p>ABUNA</text:p>
          </table:table-cell>
          <table:table-cell office:value-type="float" office:value="0.567081010523858" calcext:value-type="float">
            <text:p>0,567081</text:p>
          </table:table-cell>
          <table:table-cell office:value-type="float" office:value="0.977606920566425" calcext:value-type="float">
            <text:p>0,977607</text:p>
          </table:table-cell>
        </table:table-row>
        <table:table-row table:style-name="ro1" table:visibility="filter">
          <table:table-cell office:value-type="string" calcext:value-type="string">
            <text:p>RIO CLARO 2</text:p>
          </table:table-cell>
          <table:table-cell office:value-type="string" calcext:value-type="string">
            <text:p>RONDONOPOLIS</text:p>
          </table:table-cell>
          <table:table-cell office:value-type="float" office:value="0.437168581808446" calcext:value-type="float">
            <text:p>0,437169</text:p>
          </table:table-cell>
          <table:table-cell office:value-type="float" office:value="0.776598598792113" calcext:value-type="float">
            <text:p>0,776599</text:p>
          </table:table-cell>
        </table:table-row>
        <table:table-row table:style-name="ro1" table:visibility="filter">
          <table:table-cell office:value-type="string" calcext:value-type="string">
            <text:p>RIO DAS EGUAS</text:p>
          </table:table-cell>
          <table:table-cell office:value-type="string" calcext:value-type="string">
            <text:p>LUZIANIA</text:p>
          </table:table-cell>
          <table:table-cell office:value-type="float" office:value="2.08888531428723" calcext:value-type="float">
            <text:p>2,088885</text:p>
          </table:table-cell>
          <table:table-cell office:value-type="float" office:value="2.57979222850736" calcext:value-type="float">
            <text:p>2,579792</text:p>
          </table:table-cell>
        </table:table-row>
        <table:table-row table:style-name="ro1" table:visibility="filter">
          <table:table-cell office:value-type="string" calcext:value-type="string">
            <text:p>RIO DAS EGUAS</text:p>
          </table:table-cell>
          <table:table-cell office:value-type="string" calcext:value-type="string">
            <text:p>RIO FORMOSO II</text:p>
          </table:table-cell>
          <table:table-cell office:value-type="float" office:value="0.563952847422763" calcext:value-type="float">
            <text:p>0,563953</text:p>
          </table:table-cell>
          <table:table-cell office:value-type="float" office:value="0.808400742464656" calcext:value-type="float">
            <text:p>0,808401</text:p>
          </table:table-cell>
        </table:table-row>
        <table:table-row table:style-name="ro1" table:visibility="filter">
          <table:table-cell office:value-type="string" calcext:value-type="string">
            <text:p>RIO DAS EGUAS</text:p>
          </table:table-cell>
          <table:table-cell office:value-type="string" calcext:value-type="string">
            <text:p>RIO GRANDE II</text:p>
          </table:table-cell>
          <table:table-cell office:value-type="float" office:value="0.438694452984942" calcext:value-type="float">
            <text:p>0,438694</text:p>
          </table:table-cell>
          <table:table-cell office:value-type="float" office:value="0.628848534285881" calcext:value-type="float">
            <text:p>0,628849</text:p>
          </table:table-cell>
        </table:table-row>
        <table:table-row table:style-name="ro1" table:visibility="filter">
          <table:table-cell office:value-type="string" calcext:value-type="string">
            <text:p>RIO NOVO SUL</text:p>
          </table:table-cell>
          <table:table-cell office:value-type="string" calcext:value-type="string">
            <text:p>MUTUM</text:p>
          </table:table-cell>
          <table:table-cell office:value-type="float" office:value="1.40794241313812" calcext:value-type="float">
            <text:p>1,407942</text:p>
          </table:table-cell>
          <table:table-cell office:value-type="float" office:value="1.83707740164128" calcext:value-type="float">
            <text:p>1,837077</text:p>
          </table:table-cell>
        </table:table-row>
        <table:table-row table:style-name="ro1" table:visibility="filter">
          <table:table-cell office:value-type="string" calcext:value-type="string">
            <text:p>RIO VERDE FUR</text:p>
          </table:table-cell>
          <table:table-cell office:value-type="string" calcext:value-type="string">
            <text:p>ITUMBIARA</text:p>
          </table:table-cell>
          <table:table-cell office:value-type="float" office:value="0.579701251523225" calcext:value-type="float">
            <text:p>0,579701</text:p>
          </table:table-cell>
          <table:table-cell office:value-type="float" office:value="0.883386397095215" calcext:value-type="float">
            <text:p>0,883386</text:p>
          </table:table-cell>
        </table:table-row>
        <table:table-row table:style-name="ro1" table:visibility="filter">
          <table:table-cell office:value-type="string" calcext:value-type="string">
            <text:p>RUROPOLIS</text:p>
          </table:table-cell>
          <table:table-cell office:value-type="string" calcext:value-type="string">
            <text:p>TRANSAMAZONIC</text:p>
          </table:table-cell>
          <table:table-cell office:value-type="float" office:value="0.415836481681008" calcext:value-type="float">
            <text:p>0,415836</text:p>
          </table:table-cell>
          <table:table-cell office:value-type="float" office:value="0.706550216588563" calcext:value-type="float">
            <text:p>0,706550</text:p>
          </table:table-cell>
        </table:table-row>
        <table:table-row table:style-name="ro1" table:visibility="filter">
          <table:table-cell office:value-type="string" calcext:value-type="string">
            <text:p>S.DA MESA</text:p>
          </table:table-cell>
          <table:table-cell office:value-type="string" calcext:value-type="string">
            <text:p>GURUPI</text:p>
          </table:table-cell>
          <table:table-cell office:value-type="float" office:value="1.43015588307192" calcext:value-type="float">
            <text:p>1,430156</text:p>
          </table:table-cell>
          <table:table-cell office:value-type="float" office:value="1.80040634096501" calcext:value-type="float">
            <text:p>1,800406</text:p>
          </table:table-cell>
        </table:table-row>
        <table:table-row table:style-name="ro1" table:visibility="filter">
          <table:table-cell office:value-type="string" calcext:value-type="string">
            <text:p>S.DA MESA</text:p>
          </table:table-cell>
          <table:table-cell office:value-type="string" calcext:value-type="string">
            <text:p>NIQUELANDIA</text:p>
          </table:table-cell>
          <table:table-cell office:value-type="float" office:value="0.609959764326798" calcext:value-type="float">
            <text:p>0,609960</text:p>
          </table:table-cell>
          <table:table-cell office:value-type="float" office:value="0.913660454824889" calcext:value-type="float">
            <text:p>0,913660</text:p>
          </table:table-cell>
        </table:table-row>
        <table:table-row table:style-name="ro1" table:visibility="filter">
          <table:table-cell office:value-type="string" calcext:value-type="string">
            <text:p>S.DA MESA</text:p>
          </table:table-cell>
          <table:table-cell office:value-type="string" calcext:value-type="string">
            <text:p>SAMAMBAIA</text:p>
          </table:table-cell>
          <table:table-cell office:value-type="float" office:value="1.4395543865848" calcext:value-type="float">
            <text:p>1,439554</text:p>
          </table:table-cell>
          <table:table-cell office:value-type="float" office:value="1.88264649257471" calcext:value-type="float">
            <text:p>1,882646</text:p>
          </table:table-cell>
        </table:table-row>
        <table:table-row table:style-name="ro1" table:visibility="filter">
          <table:table-cell office:value-type="string" calcext:value-type="string">
            <text:p>S.JOAO PIAUI</text:p>
          </table:table-cell>
          <table:table-cell office:value-type="string" calcext:value-type="string">
            <text:p>GILBUES II</text:p>
          </table:table-cell>
          <table:table-cell office:value-type="float" office:value="1.97867120242677" calcext:value-type="float">
            <text:p>1,978671</text:p>
          </table:table-cell>
          <table:table-cell office:value-type="float" office:value="2.3882347748339" calcext:value-type="float">
            <text:p>2,388235</text:p>
          </table:table-cell>
        </table:table-row>
        <table:table-row table:style-name="ro1" table:visibility="filter">
          <table:table-cell office:value-type="string" calcext:value-type="string">
            <text:p>S.JOSE CAMPOS</text:p>
          </table:table-cell>
          <table:table-cell office:value-type="string" calcext:value-type="string">
            <text:p>TAUBATE</text:p>
          </table:table-cell>
          <table:table-cell office:value-type="float" office:value="0.592909796629487" calcext:value-type="float">
            <text:p>0,592910</text:p>
          </table:table-cell>
          <table:table-cell office:value-type="float" office:value="0.946297639950259" calcext:value-type="float">
            <text:p>0,946298</text:p>
          </table:table-cell>
        </table:table-row>
        <table:table-row table:style-name="ro1" table:visibility="filter">
          <table:table-cell office:value-type="string" calcext:value-type="string">
            <text:p>S.MATEUS SUL</text:p>
          </table:table-cell>
          <table:table-cell office:value-type="string" calcext:value-type="string">
            <text:p>CANOINHAS ESU</text:p>
          </table:table-cell>
          <table:table-cell office:value-type="float" office:value="0.297731421345299" calcext:value-type="float">
            <text:p>0,297731</text:p>
          </table:table-cell>
          <table:table-cell office:value-type="float" office:value="0.550920589316862" calcext:value-type="float">
            <text:p>0,550921</text:p>
          </table:table-cell>
        </table:table-row>
        <table:table-row table:style-name="ro1" table:visibility="filter">
          <table:table-cell office:value-type="string" calcext:value-type="string">
            <text:p>S.SANTIAGO</text:p>
          </table:table-cell>
          <table:table-cell office:value-type="string" calcext:value-type="string">
            <text:p>SALTO CAXIAS</text:p>
          </table:table-cell>
          <table:table-cell office:value-type="float" office:value="1.05342138598746" calcext:value-type="float">
            <text:p>1,053421</text:p>
          </table:table-cell>
          <table:table-cell office:value-type="float" office:value="1.37008523417078" calcext:value-type="float">
            <text:p>1,370085</text:p>
          </table:table-cell>
        </table:table-row>
        <table:table-row table:style-name="ro1" table:visibility="filter">
          <table:table-cell office:value-type="string" calcext:value-type="string">
            <text:p>S.SANTIAGO</text:p>
          </table:table-cell>
          <table:table-cell office:value-type="string" calcext:value-type="string">
            <text:p>SEGREDO</text:p>
          </table:table-cell>
          <table:table-cell office:value-type="float" office:value="1.28587635019045" calcext:value-type="float">
            <text:p>1,285876</text:p>
          </table:table-cell>
          <table:table-cell office:value-type="float" office:value="1.67241734770165" calcext:value-type="float">
            <text:p>1,672417</text:p>
          </table:table-cell>
        </table:table-row>
        <table:table-row table:style-name="ro1" table:visibility="filter">
          <table:table-cell office:value-type="string" calcext:value-type="string">
            <text:p>SANT. ARAGUAIA</text:p>
          </table:table-cell>
          <table:table-cell office:value-type="string" calcext:value-type="string">
            <text:p>XINGUARA 2</text:p>
          </table:table-cell>
          <table:table-cell office:value-type="float" office:value="0.407864386162245" calcext:value-type="float">
            <text:p>0,407864</text:p>
          </table:table-cell>
          <table:table-cell office:value-type="float" office:value="0.693004782112306" calcext:value-type="float">
            <text:p>0,693005</text:p>
          </table:table-cell>
        </table:table-row>
        <table:table-row table:style-name="ro1" table:visibility="filter">
          <table:table-cell office:value-type="string" calcext:value-type="string">
            <text:p>SANT.DUMONT 2</text:p>
          </table:table-cell>
          <table:table-cell office:value-type="string" calcext:value-type="string">
            <text:p>LEOPOLDINA2</text:p>
          </table:table-cell>
          <table:table-cell office:value-type="float" office:value="0.730897121019593" calcext:value-type="float">
            <text:p>0,730897</text:p>
          </table:table-cell>
          <table:table-cell office:value-type="float" office:value="1.15087196386197" calcext:value-type="float">
            <text:p>1,150872</text:p>
          </table:table-cell>
        </table:table-row>
        <table:table-row table:style-name="ro1" table:visibility="filter">
          <table:table-cell office:value-type="string" calcext:value-type="string">
            <text:p>SANTA MARIA 3</text:p>
          </table:table-cell>
          <table:table-cell office:value-type="string" calcext:value-type="string">
            <text:p>SANTO ANGELO2</text:p>
          </table:table-cell>
          <table:table-cell office:value-type="float" office:value="0.499183116196488" calcext:value-type="float">
            <text:p>0,499183</text:p>
          </table:table-cell>
          <table:table-cell office:value-type="float" office:value="0.915707757059737" calcext:value-type="float">
            <text:p>0,915708</text:p>
          </table:table-cell>
        </table:table-row>
        <table:table-row table:style-name="ro1" table:visibility="filter">
          <table:table-cell office:value-type="string" calcext:value-type="string">
            <text:p>SANTA MARTA</text:p>
          </table:table-cell>
          <table:table-cell office:value-type="string" calcext:value-type="string">
            <text:p>TAPERA 2</text:p>
          </table:table-cell>
          <table:table-cell office:value-type="float" office:value="0.266056515760168" calcext:value-type="float">
            <text:p>0,266057</text:p>
          </table:table-cell>
          <table:table-cell office:value-type="float" office:value="0.488057402971087" calcext:value-type="float">
            <text:p>0,488057</text:p>
          </table:table-cell>
        </table:table-row>
        <table:table-row table:style-name="ro1" table:visibility="filter">
          <table:table-cell office:value-type="string" calcext:value-type="string">
            <text:p>SANTANA II</text:p>
          </table:table-cell>
          <table:table-cell office:value-type="string" calcext:value-type="string">
            <text:p>ANGELIM</text:p>
          </table:table-cell>
          <table:table-cell office:value-type="float" office:value="0.306478097599413" calcext:value-type="float">
            <text:p>0,306478</text:p>
          </table:table-cell>
          <table:table-cell office:value-type="float" office:value="0.526517909292257" calcext:value-type="float">
            <text:p>0,526518</text:p>
          </table:table-cell>
        </table:table-row>
        <table:table-row table:style-name="ro1" table:visibility="filter">
          <table:table-cell office:value-type="string" calcext:value-type="string">
            <text:p>SANTO ANGELO</text:p>
          </table:table-cell>
          <table:table-cell office:value-type="string" calcext:value-type="string">
            <text:p>CV.GARABI 1</text:p>
          </table:table-cell>
          <table:table-cell office:value-type="float" office:value="1.26741364353524" calcext:value-type="float">
            <text:p>1,267414</text:p>
          </table:table-cell>
          <table:table-cell office:value-type="float" office:value="1.6514398247821" calcext:value-type="float">
            <text:p>1,651440</text:p>
          </table:table-cell>
        </table:table-row>
        <table:table-row table:style-name="ro1" table:visibility="filter">
          <table:table-cell office:value-type="string" calcext:value-type="string">
            <text:p>SANTO ANGELO</text:p>
          </table:table-cell>
          <table:table-cell office:value-type="string" calcext:value-type="string">
            <text:p>CV.GARABI 2</text:p>
          </table:table-cell>
          <table:table-cell office:value-type="float" office:value="1.27001497301797" calcext:value-type="float">
            <text:p>1,270015</text:p>
          </table:table-cell>
          <table:table-cell office:value-type="float" office:value="1.6548293567846" calcext:value-type="float">
            <text:p>1,654829</text:p>
          </table:table-cell>
        </table:table-row>
        <table:table-row table:style-name="ro1" table:visibility="filter">
          <table:table-cell office:value-type="string" calcext:value-type="string">
            <text:p>SANTO ANGELO</text:p>
          </table:table-cell>
          <table:table-cell office:value-type="string" calcext:value-type="string">
            <text:p>ITA</text:p>
          </table:table-cell>
          <table:table-cell office:value-type="float" office:value="1.30837456748236" calcext:value-type="float">
            <text:p>1,308375</text:p>
          </table:table-cell>
          <table:table-cell office:value-type="float" office:value="1.721229284248" calcext:value-type="float">
            <text:p>1,721229</text:p>
          </table:table-cell>
        </table:table-row>
        <table:table-row table:style-name="ro1" table:visibility="filter">
          <table:table-cell office:value-type="string" calcext:value-type="string">
            <text:p>SANTO ANGELO</text:p>
          </table:table-cell>
          <table:table-cell office:value-type="string" calcext:value-type="string">
            <text:p>REPLAN</text:p>
          </table:table-cell>
          <table:table-cell office:value-type="float" office:value="1.0883712505322" calcext:value-type="float">
            <text:p>1,088371</text:p>
          </table:table-cell>
          <table:table-cell office:value-type="float" office:value="1.49176539728988" calcext:value-type="float">
            <text:p>1,491765</text:p>
          </table:table-cell>
        </table:table-row>
        <table:table-row table:style-name="ro1" table:visibility="filter">
          <table:table-cell office:value-type="string" calcext:value-type="string">
            <text:p>SANTO ANGELO</text:p>
          </table:table-cell>
          <table:table-cell office:value-type="string" calcext:value-type="string">
            <text:p>SANTA ROSA 1</text:p>
          </table:table-cell>
          <table:table-cell office:value-type="float" office:value="0.405574518045942" calcext:value-type="float">
            <text:p>0,405575</text:p>
          </table:table-cell>
          <table:table-cell office:value-type="float" office:value="0.627034376476784" calcext:value-type="float">
            <text:p>0,627034</text:p>
          </table:table-cell>
        </table:table-row>
        <table:table-row table:style-name="ro1" table:visibility="filter">
          <table:table-cell office:value-type="string" calcext:value-type="string">
            <text:p>SAO GOTARDO 2</text:p>
          </table:table-cell>
          <table:table-cell office:value-type="string" calcext:value-type="string">
            <text:p>EMBORCACAO</text:p>
          </table:table-cell>
          <table:table-cell office:value-type="float" office:value="1.37363947008927" calcext:value-type="float">
            <text:p>1,373639</text:p>
          </table:table-cell>
          <table:table-cell office:value-type="float" office:value="1.79478946495087" calcext:value-type="float">
            <text:p>1,794789</text:p>
          </table:table-cell>
        </table:table-row>
        <table:table-row table:style-name="ro1" table:visibility="filter">
          <table:table-cell office:value-type="string" calcext:value-type="string">
            <text:p>SAO GOTARDO 2</text:p>
          </table:table-cell>
          <table:table-cell office:value-type="string" calcext:value-type="string">
            <text:p>TRES MARIAS-SE</text:p>
          </table:table-cell>
          <table:table-cell office:value-type="float" office:value="0.848142361469893" calcext:value-type="float">
            <text:p>0,848142</text:p>
          </table:table-cell>
          <table:table-cell office:value-type="float" office:value="1.21653472456425" calcext:value-type="float">
            <text:p>1,216535</text:p>
          </table:table-cell>
        </table:table-row>
        <table:table-row table:style-name="ro1" table:visibility="filter">
          <table:table-cell office:value-type="string" calcext:value-type="string">
            <text:p>SAO LUIS II</text:p>
          </table:table-cell>
          <table:table-cell office:value-type="string" calcext:value-type="string">
            <text:p>SAO LUIS I</text:p>
          </table:table-cell>
          <table:table-cell office:value-type="float" office:value="0.477447890470798" calcext:value-type="float">
            <text:p>0,477448</text:p>
          </table:table-cell>
          <table:table-cell office:value-type="float" office:value="0.67444868458928" calcext:value-type="float">
            <text:p>0,674449</text:p>
          </table:table-cell>
        </table:table-row>
        <table:table-row table:style-name="ro1" table:visibility="filter">
          <table:table-cell office:value-type="string" calcext:value-type="string">
            <text:p>SAO LUIS II</text:p>
          </table:table-cell>
          <table:table-cell office:value-type="string" calcext:value-type="string">
            <text:p>SAO LUIS III</text:p>
          </table:table-cell>
          <table:table-cell office:value-type="float" office:value="0.469842621148103" calcext:value-type="float">
            <text:p>0,469843</text:p>
          </table:table-cell>
          <table:table-cell office:value-type="float" office:value="0.663705388843264" calcext:value-type="float">
            <text:p>0,663705</text:p>
          </table:table-cell>
        </table:table-row>
        <table:table-row table:style-name="ro1" table:visibility="filter">
          <table:table-cell office:value-type="string" calcext:value-type="string">
            <text:p>SAO LUIS II</text:p>
          </table:table-cell>
          <table:table-cell office:value-type="string" calcext:value-type="string">
            <text:p>SAO LUIS IV</text:p>
          </table:table-cell>
          <table:table-cell office:value-type="float" office:value="1.42052578919864" calcext:value-type="float">
            <text:p>1,420526</text:p>
          </table:table-cell>
          <table:table-cell office:value-type="float" office:value="1.69128320409498" calcext:value-type="float">
            <text:p>1,691283</text:p>
          </table:table-cell>
        </table:table-row>
        <table:table-row table:style-name="ro1" table:visibility="filter">
          <table:table-cell office:value-type="string" calcext:value-type="string">
            <text:p>SAPEACU</text:p>
          </table:table-cell>
          <table:table-cell office:value-type="string" calcext:value-type="string">
            <text:p>MORRO CHAPEU II</text:p>
          </table:table-cell>
          <table:table-cell office:value-type="float" office:value="1.4881892892964" calcext:value-type="float">
            <text:p>1,488189</text:p>
          </table:table-cell>
          <table:table-cell office:value-type="float" office:value="1.7979737622358" calcext:value-type="float">
            <text:p>1,797974</text:p>
          </table:table-cell>
        </table:table-row>
        <table:table-row table:style-name="ro1" table:visibility="filter">
          <table:table-cell office:value-type="string" calcext:value-type="string">
            <text:p>SAPEACU</text:p>
          </table:table-cell>
          <table:table-cell office:value-type="string" calcext:value-type="string">
            <text:p>OLINDINA</text:p>
          </table:table-cell>
          <table:table-cell office:value-type="float" office:value="1.42987337102318" calcext:value-type="float">
            <text:p>1,429873</text:p>
          </table:table-cell>
          <table:table-cell office:value-type="float" office:value="1.72751868523043" calcext:value-type="float">
            <text:p>1,727519</text:p>
          </table:table-cell>
        </table:table-row>
        <table:table-row table:style-name="ro1" table:visibility="filter">
          <table:table-cell office:value-type="string" calcext:value-type="string">
            <text:p>SE BALBINA</text:p>
          </table:table-cell>
          <table:table-cell office:value-type="string" calcext:value-type="string">
            <text:p>PR.FIGUEIREDO</text:p>
          </table:table-cell>
          <table:table-cell office:value-type="float" office:value="0.413973606964054" calcext:value-type="float">
            <text:p>0,413974</text:p>
          </table:table-cell>
          <table:table-cell office:value-type="float" office:value="0.710234755032011" calcext:value-type="float">
            <text:p>0,710235</text:p>
          </table:table-cell>
        </table:table-row>
        <table:table-row table:style-name="ro1" table:visibility="filter">
          <table:table-cell office:value-type="string" calcext:value-type="string">
            <text:p>SE LAJEADO</text:p>
          </table:table-cell>
          <table:table-cell office:value-type="string" calcext:value-type="string">
            <text:p>MIRACEMA</text:p>
          </table:table-cell>
          <table:table-cell office:value-type="float" office:value="1.17900980925171" calcext:value-type="float">
            <text:p>1,179010</text:p>
          </table:table-cell>
          <table:table-cell office:value-type="float" office:value="1.48005086286446" calcext:value-type="float">
            <text:p>1,480051</text:p>
          </table:table-cell>
        </table:table-row>
        <table:table-row table:style-name="ro1" table:visibility="filter">
          <table:table-cell office:value-type="string" calcext:value-type="string">
            <text:p>SERRA PELADA</text:p>
          </table:table-cell>
          <table:table-cell office:value-type="string" calcext:value-type="string">
            <text:p>MIRACEMA</text:p>
          </table:table-cell>
          <table:table-cell office:value-type="float" office:value="1.62479198801555" calcext:value-type="float">
            <text:p>1,624792</text:p>
          </table:table-cell>
          <table:table-cell office:value-type="float" office:value="1.99999574739127" calcext:value-type="float">
            <text:p>1,999996</text:p>
          </table:table-cell>
        </table:table-row>
        <table:table-row table:style-name="ro1" table:visibility="filter">
          <table:table-cell office:value-type="string" calcext:value-type="string">
            <text:p>SERRA PELADA</text:p>
          </table:table-cell>
          <table:table-cell office:value-type="string" calcext:value-type="string">
            <text:p>XINGU</text:p>
          </table:table-cell>
          <table:table-cell office:value-type="float" office:value="1.95913999554038" calcext:value-type="float">
            <text:p>1,959140</text:p>
          </table:table-cell>
          <table:table-cell office:value-type="float" office:value="2.03161449386328" calcext:value-type="float">
            <text:p>2,031614</text:p>
          </table:table-cell>
        </table:table-row>
        <table:table-row table:style-name="ro1" table:visibility="filter">
          <table:table-cell office:value-type="string" calcext:value-type="string">
            <text:p>SIDEROPOL.ESU</text:p>
          </table:table-cell>
          <table:table-cell office:value-type="string" calcext:value-type="string">
            <text:p>SIDEROPOLIS 2</text:p>
          </table:table-cell>
          <table:table-cell office:value-type="float" office:value="0.56750736613726" calcext:value-type="float">
            <text:p>0,567507</text:p>
          </table:table-cell>
          <table:table-cell office:value-type="float" office:value="0.894379232832512" calcext:value-type="float">
            <text:p>0,894379</text:p>
          </table:table-cell>
        </table:table-row>
        <table:table-row table:style-name="ro1" table:visibility="filter">
          <table:table-cell office:value-type="string" calcext:value-type="string">
            <text:p>SIDEROPOL.ESU</text:p>
          </table:table-cell>
          <table:table-cell office:value-type="string" calcext:value-type="string">
            <text:p>TUBARAO SUL</text:p>
          </table:table-cell>
          <table:table-cell office:value-type="float" office:value="0.310613065718061" calcext:value-type="float">
            <text:p>0,310613</text:p>
          </table:table-cell>
          <table:table-cell office:value-type="float" office:value="0.580832938933648" calcext:value-type="float">
            <text:p>0,580833</text:p>
          </table:table-cell>
        </table:table-row>
        <table:table-row table:style-name="ro1" table:visibility="filter">
          <table:table-cell office:value-type="string" calcext:value-type="string">
            <text:p>SINOP</text:p>
          </table:table-cell>
          <table:table-cell office:value-type="string" calcext:value-type="string">
            <text:p>PARANATINGA</text:p>
          </table:table-cell>
          <table:table-cell office:value-type="float" office:value="1.48678114421386" calcext:value-type="float">
            <text:p>1,486781</text:p>
          </table:table-cell>
          <table:table-cell office:value-type="float" office:value="1.87522559845869" calcext:value-type="float">
            <text:p>1,875226</text:p>
          </table:table-cell>
        </table:table-row>
        <table:table-row table:style-name="ro1" table:visibility="filter">
          <table:table-cell office:value-type="string" calcext:value-type="string">
            <text:p>SINOP</text:p>
          </table:table-cell>
          <table:table-cell office:value-type="string" calcext:value-type="string">
            <text:p>SORRISO II</text:p>
          </table:table-cell>
          <table:table-cell office:value-type="float" office:value="0.365263311134021" calcext:value-type="float">
            <text:p>0,365263</text:p>
          </table:table-cell>
          <table:table-cell office:value-type="float" office:value="0.546614132945492" calcext:value-type="float">
            <text:p>0,546614</text:p>
          </table:table-cell>
        </table:table-row>
        <table:table-row table:style-name="ro1" table:visibility="filter">
          <table:table-cell office:value-type="string" calcext:value-type="string">
            <text:p>SOBRAL II</text:p>
          </table:table-cell>
          <table:table-cell office:value-type="string" calcext:value-type="string">
            <text:p>SOBRAL III</text:p>
          </table:table-cell>
          <table:table-cell office:value-type="float" office:value="0.536266778843829" calcext:value-type="float">
            <text:p>0,536267</text:p>
          </table:table-cell>
          <table:table-cell office:value-type="float" office:value="0.801008623630749" calcext:value-type="float">
            <text:p>0,801009</text:p>
          </table:table-cell>
        </table:table-row>
        <table:table-row table:style-name="ro1" table:visibility="filter">
          <table:table-cell office:value-type="string" calcext:value-type="string">
            <text:p>SUAPE II</text:p>
          </table:table-cell>
          <table:table-cell office:value-type="string" calcext:value-type="string">
            <text:p>ANGELIM II</text:p>
          </table:table-cell>
          <table:table-cell office:value-type="float" office:value="1.25766427851591" calcext:value-type="float">
            <text:p>1,257664</text:p>
          </table:table-cell>
          <table:table-cell office:value-type="float" office:value="1.56092430852776" calcext:value-type="float">
            <text:p>1,560924</text:p>
          </table:table-cell>
        </table:table-row>
        <table:table-row table:style-name="ro1" table:visibility="filter">
          <table:table-cell office:value-type="string" calcext:value-type="string">
            <text:p>SUAPE II</text:p>
          </table:table-cell>
          <table:table-cell office:value-type="string" calcext:value-type="string">
            <text:p>SUAPE III</text:p>
          </table:table-cell>
          <table:table-cell office:value-type="float" office:value="0.504481037438433" calcext:value-type="float">
            <text:p>0,504481</text:p>
          </table:table-cell>
          <table:table-cell office:value-type="float" office:value="0.742893526941944" calcext:value-type="float">
            <text:p>0,742894</text:p>
          </table:table-cell>
        </table:table-row>
        <table:table-row table:style-name="ro1" table:visibility="filter">
          <table:table-cell office:value-type="string" calcext:value-type="string">
            <text:p>SUL</text:p>
          </table:table-cell>
          <table:table-cell office:value-type="string" calcext:value-type="string">
            <text:p>S.CAETANO SUL</text:p>
          </table:table-cell>
          <table:table-cell office:value-type="float" office:value="0.505757871999407" calcext:value-type="float">
            <text:p>0,505758</text:p>
          </table:table-cell>
          <table:table-cell office:value-type="float" office:value="0.819849250636373" calcext:value-type="float">
            <text:p>0,819849</text:p>
          </table:table-cell>
        </table:table-row>
        <table:table-row table:style-name="ro1" table:visibility="filter">
          <table:table-cell office:value-type="string" calcext:value-type="string">
            <text:p>SUL</text:p>
          </table:table-cell>
          <table:table-cell office:value-type="string" calcext:value-type="string">
            <text:p>TIJUCO PRETO</text:p>
          </table:table-cell>
          <table:table-cell office:value-type="float" office:value="1.05949605678976" calcext:value-type="float">
            <text:p>1,059496</text:p>
          </table:table-cell>
          <table:table-cell office:value-type="float" office:value="1.36592686792647" calcext:value-type="float">
            <text:p>1,365927</text:p>
          </table:table-cell>
        </table:table-row>
        <table:table-row table:style-name="ro1" table:visibility="filter">
          <table:table-cell office:value-type="string" calcext:value-type="string">
            <text:p>TAPAJOS II</text:p>
          </table:table-cell>
          <table:table-cell office:value-type="string" calcext:value-type="string">
            <text:p>TRANSAMAZONIC</text:p>
          </table:table-cell>
          <table:table-cell office:value-type="float" office:value="0.395978610003253" calcext:value-type="float">
            <text:p>0,395979</text:p>
          </table:table-cell>
          <table:table-cell office:value-type="float" office:value="0.672809589796542" calcext:value-type="float">
            <text:p>0,672810</text:p>
          </table:table-cell>
        </table:table-row>
        <table:table-row table:style-name="ro1" table:visibility="filter">
          <table:table-cell office:value-type="string" calcext:value-type="string">
            <text:p>TAQUARIL</text:p>
          </table:table-cell>
          <table:table-cell office:value-type="string" calcext:value-type="string">
            <text:p>NEVES 1</text:p>
          </table:table-cell>
          <table:table-cell office:value-type="float" office:value="0.802679216058776" calcext:value-type="float">
            <text:p>0,802679</text:p>
          </table:table-cell>
          <table:table-cell office:value-type="float" office:value="1.15132456929658" calcext:value-type="float">
            <text:p>1,151325</text:p>
          </table:table-cell>
        </table:table-row>
        <table:table-row table:style-name="ro1" table:visibility="filter">
          <table:table-cell office:value-type="string" calcext:value-type="string">
            <text:p>TERESINA II</text:p>
          </table:table-cell>
          <table:table-cell office:value-type="string" calcext:value-type="string">
            <text:p>TIANGUA II</text:p>
          </table:table-cell>
          <table:table-cell office:value-type="float" office:value="1.28956155920188" calcext:value-type="float">
            <text:p>1,289562</text:p>
          </table:table-cell>
          <table:table-cell office:value-type="float" office:value="1.58960045458586" calcext:value-type="float">
            <text:p>1,589600</text:p>
          </table:table-cell>
        </table:table-row>
        <table:table-row table:style-name="ro1" table:visibility="filter">
          <table:table-cell office:value-type="string" calcext:value-type="string">
            <text:p>TERMINAL RIO</text:p>
          </table:table-cell>
          <table:table-cell office:value-type="string" calcext:value-type="string">
            <text:p>RESENDE</text:p>
          </table:table-cell>
          <table:table-cell office:value-type="float" office:value="1.37206030539376" calcext:value-type="float">
            <text:p>1,372060</text:p>
          </table:table-cell>
          <table:table-cell office:value-type="float" office:value="1.52329471709265" calcext:value-type="float">
            <text:p>1,523295</text:p>
          </table:table-cell>
        </table:table-row>
        <table:table-row table:style-name="ro1">
          <table:table-cell office:value-type="string" calcext:value-type="string">
            <text:p>TIJUCO PRETO</text:p>
          </table:table-cell>
          <table:table-cell office:value-type="string" calcext:value-type="string">
            <text:p>ITABERA</text:p>
          </table:table-cell>
          <table:table-cell office:value-type="float" office:value="2.42830220156315" calcext:value-type="float">
            <text:p>2,428302</text:p>
          </table:table-cell>
          <table:table-cell office:value-type="float" office:value="2.48981791096995" calcext:value-type="float">
            <text:p>2,489818</text:p>
          </table:table-cell>
        </table:table-row>
        <table:table-row table:style-name="ro1" table:visibility="filter">
          <table:table-cell office:value-type="string" calcext:value-type="string">
            <text:p>TOME ACU</text:p>
          </table:table-cell>
          <table:table-cell office:value-type="string" calcext:value-type="string">
            <text:p>VILA DO CONDE</text:p>
          </table:table-cell>
          <table:table-cell office:value-type="float" office:value="0.412772094426174" calcext:value-type="float">
            <text:p>0,412772</text:p>
          </table:table-cell>
          <table:table-cell office:value-type="float" office:value="0.591115359855847" calcext:value-type="float">
            <text:p>0,591115</text:p>
          </table:table-cell>
        </table:table-row>
        <table:table-row table:style-name="ro1" table:visibility="filter">
          <table:table-cell office:value-type="string" calcext:value-type="string">
            <text:p>TRES MARIAS-SE</text:p>
          </table:table-cell>
          <table:table-cell office:value-type="string" calcext:value-type="string">
            <text:p>VARZEA PALMA1</text:p>
          </table:table-cell>
          <table:table-cell office:value-type="float" office:value="0.707060201263003" calcext:value-type="float">
            <text:p>0,707060</text:p>
          </table:table-cell>
          <table:table-cell office:value-type="float" office:value="1.11333830575368" calcext:value-type="float">
            <text:p>1,113338</text:p>
          </table:table-cell>
        </table:table-row>
        <table:table-row table:style-name="ro1" table:visibility="filter">
          <table:table-cell office:value-type="string" calcext:value-type="string">
            <text:p>TRINDADE</text:p>
          </table:table-cell>
          <table:table-cell office:value-type="string" calcext:value-type="string">
            <text:p>R.VERDE NORTE</text:p>
          </table:table-cell>
          <table:table-cell office:value-type="float" office:value="1.39046822410262" calcext:value-type="float">
            <text:p>1,390468</text:p>
          </table:table-cell>
          <table:table-cell office:value-type="float" office:value="1.75540026769219" calcext:value-type="float">
            <text:p>1,755400</text:p>
          </table:table-cell>
        </table:table-row>
        <table:table-row table:style-name="ro1" table:visibility="filter">
          <table:table-cell office:value-type="string" calcext:value-type="string">
            <text:p>TRINDADE</text:p>
          </table:table-cell>
          <table:table-cell office:value-type="string" calcext:value-type="string">
            <text:p>SILVANIA</text:p>
          </table:table-cell>
          <table:table-cell office:value-type="float" office:value="1.51350738656312" calcext:value-type="float">
            <text:p>1,513507</text:p>
          </table:table-cell>
          <table:table-cell office:value-type="float" office:value="1.91073138204339" calcext:value-type="float">
            <text:p>1,910731</text:p>
          </table:table-cell>
        </table:table-row>
        <table:table-row table:style-name="ro1" table:visibility="filter">
          <table:table-cell office:value-type="string" calcext:value-type="string">
            <text:p>TUCURUI</text:p>
          </table:table-cell>
          <table:table-cell office:value-type="string" calcext:value-type="string">
            <text:p>MARABA</text:p>
          </table:table-cell>
          <table:table-cell office:value-type="float" office:value="1.39992395479554" calcext:value-type="float">
            <text:p>1,399924</text:p>
          </table:table-cell>
          <table:table-cell office:value-type="float" office:value="1.68969309649082" calcext:value-type="float">
            <text:p>1,689693</text:p>
          </table:table-cell>
        </table:table-row>
        <table:table-row table:style-name="ro1" table:visibility="filter">
          <table:table-cell office:value-type="string" calcext:value-type="string">
            <text:p>TUCURUI</text:p>
          </table:table-cell>
          <table:table-cell office:value-type="string" calcext:value-type="string">
            <text:p>XINGU</text:p>
          </table:table-cell>
          <table:table-cell office:value-type="float" office:value="1.80816089638534" calcext:value-type="float">
            <text:p>1,808161</text:p>
          </table:table-cell>
          <table:table-cell office:value-type="float" office:value="1.8750502223911" calcext:value-type="float">
            <text:p>1,875050</text:p>
          </table:table-cell>
        </table:table-row>
        <table:table-row table:style-name="ro1" table:visibility="filter">
          <table:table-cell office:value-type="string" calcext:value-type="string">
            <text:p>U.SOBRADINHO</text:p>
          </table:table-cell>
          <table:table-cell office:value-type="string" calcext:value-type="string">
            <text:p>FUTURA</text:p>
          </table:table-cell>
          <table:table-cell office:value-type="float" office:value="1.18488499130003" calcext:value-type="float">
            <text:p>1,184885</text:p>
          </table:table-cell>
          <table:table-cell office:value-type="float" office:value="1.43153303208604" calcext:value-type="float">
            <text:p>1,431533</text:p>
          </table:table-cell>
        </table:table-row>
        <table:table-row table:style-name="ro1" table:visibility="filter">
          <table:table-cell office:value-type="string" calcext:value-type="string">
            <text:p>VIANA</text:p>
          </table:table-cell>
          <table:table-cell office:value-type="string" calcext:value-type="string">
            <text:p>VIANA 2</text:p>
          </table:table-cell>
          <table:table-cell office:value-type="float" office:value="0.758797451821491" calcext:value-type="float">
            <text:p>0,758797</text:p>
          </table:table-cell>
          <table:table-cell office:value-type="float" office:value="1.08538778259897" calcext:value-type="float">
            <text:p>1,085388</text:p>
          </table:table-cell>
        </table:table-row>
      </table:table>
      <table:table table:name="intersection_data" table:style-name="ta1">
        <table:table-column table:style-name="co8" table:number-columns-repeated="2" table:default-cell-style-name="Default"/>
        <table:table-column table:style-name="co4" table:number-columns-repeated="2" table:default-cell-style-name="ce14"/>
        <table:table-row table:style-name="ro1">
          <table:table-cell office:value-type="string" calcext:value-type="string">
            <text:p>node1</text:p>
          </table:table-cell>
          <table:table-cell office:value-type="string" calcext:value-type="string">
            <text:p>node2</text:p>
          </table:table-cell>
          <table:table-cell table:style-name="Default" office:value-type="string" calcext:value-type="string">
            <text:p>weight_t</text:p>
          </table:table-cell>
          <table:table-cell table:style-name="Default" office:value-type="string" calcext:value-type="string">
            <text:p>weight_s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C. PAULISTA</text:p>
          </table:table-cell>
          <table:table-cell office:value-type="float" office:value="1.83780661830519" calcext:value-type="float">
            <text:p>1,837807</text:p>
          </table:table-cell>
          <table:table-cell office:value-type="float" office:value="2.09322893329873" calcext:value-type="float">
            <text:p>2,093229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FERNAO DIAS</text:p>
          </table:table-cell>
          <table:table-cell office:value-type="float" office:value="1.98501476173632" calcext:value-type="float">
            <text:p>1,985015</text:p>
          </table:table-cell>
          <table:table-cell office:value-type="float" office:value="2.2608963809932" calcext:value-type="float">
            <text:p>2,260896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M. MORAES</text:p>
          </table:table-cell>
          <table:table-cell office:value-type="float" office:value="0.815162822297762" calcext:value-type="float">
            <text:p>0,815163</text:p>
          </table:table-cell>
          <table:table-cell office:value-type="float" office:value="1.00454514734831" calcext:value-type="float">
            <text:p>1,004545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NOVA PONTE</text:p>
          </table:table-cell>
          <table:table-cell office:value-type="float" office:value="1.6033037542632" calcext:value-type="float">
            <text:p>1,603304</text:p>
          </table:table-cell>
          <table:table-cell office:value-type="float" office:value="1.79980685180629" calcext:value-type="float">
            <text:p>1,799807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RIBEIRAOPRETO</text:p>
          </table:table-cell>
          <table:table-cell office:value-type="float" office:value="1.43661455761293" calcext:value-type="float">
            <text:p>1,436615</text:p>
          </table:table-cell>
          <table:table-cell office:value-type="float" office:value="1.63627833747096" calcext:value-type="float">
            <text:p>1,636278</text:p>
          </table:table-cell>
        </table:table-row>
        <table:table-row table:style-name="ro1">
          <table:table-cell office:value-type="string" calcext:value-type="string">
            <text:p>TIJUCO PRETO</text:p>
          </table:table-cell>
          <table:table-cell office:value-type="string" calcext:value-type="string">
            <text:p>ITABERA</text:p>
          </table:table-cell>
          <table:table-cell office:value-type="float" office:value="2.42830220156315" calcext:value-type="float">
            <text:p>2,428302</text:p>
          </table:table-cell>
          <table:table-cell office:value-type="float" office:value="2.48981791096995" calcext:value-type="float">
            <text:p>2,489818</text:p>
          </table:table-cell>
        </table:table-row>
      </table:table>
      <table:named-expressions/>
      <table:database-ranges>
        <table:database-range table:name="__Anonymous_Sheet_DB__0" table:target-range-address="level_cpmci.D3:level_cpmci.E698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edges_cpmci_technical.A2:edges_cpmci_technical.C696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edges_cpmci_social.A2:edges_cpmci_social.C696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4" table:target-range-address="comparative.E2:comparative.G696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5" table:target-range-address="intersection.A1:intersection.D644" table:display-filter-buttons="true">
          <table:filter>
            <table:filter-and>
              <table:filter-condition table:value="ESTREITO" table:operator="=" table:field-number="0">
                <table:filter-set-item table:value="ESTREITO"/>
                <table:filter-set-item table:value="FERNAO DIAS"/>
                <table:filter-set-item table:value="FURNAS"/>
                <table:filter-set-item table:value="JAGUARA-500"/>
                <table:filter-set-item table:value="NOVA PONTE"/>
                <table:filter-set-item table:value="RIBEIRAOPRETO"/>
                <table:filter-set-item table:value="TIJUCO PRETO"/>
              </table:filter-condition>
              <table:filter-condition table:value="C. PAULISTA" table:operator="=" table:field-number="1">
                <table:filter-set-item table:value="C. PAULISTA"/>
                <table:filter-set-item table:value="FERNAO DIAS"/>
                <table:filter-set-item table:value="ITABERA"/>
                <table:filter-set-item table:value="M. MORAES"/>
                <table:filter-set-item table:value="NOVA PONTE"/>
                <table:filter-set-item table:value="RIBEIRAOPRETO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3">00/00/0000</text:date>, <text:time style:data-style-name="N2" text:time-value="19:42:43.1801300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7-12T22:14:52.889201384</dc:date>
    <meta:editing-duration>PT2H5M28S</meta:editing-duration>
    <meta:editing-cycles>20</meta:editing-cycles>
    <meta:document-statistic meta:table-count="7" meta:cell-count="13825" meta:object-count="0"/>
  </office:meta>
</office:document-meta>
</file>